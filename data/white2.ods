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/>
    <style:font-face style:name="Aptos Narrow" svg:font-family="'Aptos Narro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1.893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5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hit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me of Day</text:p>
          </table:table-cell>
          <table:table-cell office:value-type="string" calcext:value-type="string">
            <text:p>Process Name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etail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915129" calcext:value-type="float">
            <text:p>9151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ileInformationClass: FileIdBothDirectoryInformation, Filter: white2.mfa, 2: white2.mf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922127" calcext:value-type="float">
            <text:p>9221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reat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924000" calcext:value-type="float">
            <text:p>9240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Basic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reationTime: 06.06.2026 13:21:48, LastAccessTime: 06.06.2026 12:48:03, LastWriteTime: 05.07.2022 12:36:38, ChangeTime: 06.06.2026 13:30:04, FileAttributes: 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924337" calcext:value-type="float">
            <text:p>9243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los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08188" calcext:value-type="float">
            <text:p>11081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reat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sired Access: Generic Read, Disposition: Open, Options: Synchronous IO Non-Alert, Non-Directory File, Attributes: N, ShareMode: Read, AllocationSize: n/a, OpenResult: Opened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10787" calcext:value-type="float">
            <text:p>11107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Basic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reationTime: 06.06.2026 13:21:48, LastAccessTime: 06.06.2026 12:48:03, LastWriteTime: 05.07.2022 12:36:38, ChangeTime: 06.06.2026 13:30:04, FileAttributes: 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11280" calcext:value-type="float">
            <text:p>11112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Standard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llocationSize: 978 944, EndOfFile: 976 799, NumberOfLinks: 1, DeletePending: False, Directory: False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15127" calcext:value-type="float">
            <text:p>11151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reat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16655" calcext:value-type="float">
            <text:p>11166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Basic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reationTime: 06.06.2026 13:21:48, LastAccessTime: 06.06.2026 12:48:03, LastWriteTime: 05.07.2022 12:36:38, ChangeTime: 06.06.2026 13:30:04, FileAttributes: 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17028" calcext:value-type="float">
            <text:p>11170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los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22851" calcext:value-type="float">
            <text:p>11228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Standard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llocationSize: 978 944, EndOfFile: 976 799, NumberOfLinks: 1, DeletePending: False, Directory: False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196596" calcext:value-type="float">
            <text:p>11965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0, Length: 4 096, Priority: Normal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25502" calcext:value-type="float">
            <text:p>12255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Basic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reationTime: 06.06.2026 13:21:48, LastAccessTime: 06.06.2026 13:34:36, LastWriteTime: 05.07.2022 12:36:38, ChangeTime: 06.06.2026 13:30:04, FileAttributes: 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25934" calcext:value-type="float">
            <text:p>12259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Standard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llocationSize: 978 944, EndOfFile: 976 799, NumberOfLinks: 1, DeletePending: False, Directory: False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31312" calcext:value-type="float">
            <text:p>12313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reat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33362" calcext:value-type="float">
            <text:p>12333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Basic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reationTime: 06.06.2026 13:21:48, LastAccessTime: 06.06.2026 13:34:36, LastWriteTime: 05.07.2022 12:36:38, ChangeTime: 06.06.2026 13:30:04, FileAttributes: 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33700" calcext:value-type="float">
            <text:p>12337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los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42341" calcext:value-type="float">
            <text:p>12423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reateFile</text:p>
          </table:table-cell>
          <table:table-cell office:value-type="string" calcext:value-type="string">
            <text:p>C:\Users\mw\Downloads\MFA\white2.mfacfg</text:p>
          </table:table-cell>
          <table:table-cell office:value-type="string" calcext:value-type="string">
            <text:p>NAME NOT FOUND</text:p>
          </table:table-cell>
          <table:table-cell office:value-type="string" calcext:value-type="string">
            <text:p>Desired Access: Read Attributes, Disposition: Open, Options: Open Reparse Point, Attributes: n/a, ShareMode: Read, Write, Delete, AllocationSize: n/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49737" calcext:value-type="float">
            <text:p>12497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50405" calcext:value-type="float">
            <text:p>12504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36S" calcext:value-type="time">
            <text:p>13:34:36</text:p>
          </table:table-cell>
          <table:table-cell office:value-type="float" office:value="1250733" calcext:value-type="float">
            <text:p>12507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19827" calcext:value-type="float">
            <text:p>48198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21984" calcext:value-type="float">
            <text:p>48219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0, Length: 2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22915" calcext:value-type="float">
            <text:p>48229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23429" calcext:value-type="float">
            <text:p>48234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23882" calcext:value-type="float">
            <text:p>48238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24210" calcext:value-type="float">
            <text:p>48242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8, Length: 89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24557" calcext:value-type="float">
            <text:p>48245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85459" calcext:value-type="float">
            <text:p>48854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3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886123" calcext:value-type="float">
            <text:p>48861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38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941859" calcext:value-type="float">
            <text:p>49418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38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4942435" calcext:value-type="float">
            <text:p>49424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38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004318" calcext:value-type="float">
            <text:p>50043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39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004887" calcext:value-type="float">
            <text:p>50048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39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056827" calcext:value-type="float">
            <text:p>50568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40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057427" calcext:value-type="float">
            <text:p>50574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40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057731" calcext:value-type="float">
            <text:p>50577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 409, Length: 1 02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058671" calcext:value-type="float">
            <text:p>50586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 43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39620" calcext:value-type="float">
            <text:p>51396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 44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0726" calcext:value-type="float">
            <text:p>51407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 44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1548" calcext:value-type="float">
            <text:p>51415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 477, Length: 6 91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3856" calcext:value-type="float">
            <text:p>51438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4 38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4713" calcext:value-type="float">
            <text:p>51447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4 39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5437" calcext:value-type="float">
            <text:p>51454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4 425, Length: 3 07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7275" calcext:value-type="float">
            <text:p>51472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7 49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8125" calcext:value-type="float">
            <text:p>51481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7 50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8848" calcext:value-type="float">
            <text:p>51488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7 533, Length: 76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49565" calcext:value-type="float">
            <text:p>51495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8 30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0296" calcext:value-type="float">
            <text:p>51502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8 30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1001" calcext:value-type="float">
            <text:p>51510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8 337, Length: 1 56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1763" calcext:value-type="float">
            <text:p>51517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9 89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2575" calcext:value-type="float">
            <text:p>51525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9 90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3285" calcext:value-type="float">
            <text:p>51532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9 933, Length: 89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6462" calcext:value-type="float">
            <text:p>51564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0 8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7266" calcext:value-type="float">
            <text:p>51572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0 83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8203" calcext:value-type="float">
            <text:p>51582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0 863, Length: 3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59339" calcext:value-type="float">
            <text:p>51593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1 17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0120" calcext:value-type="float">
            <text:p>51601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1 17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0848" calcext:value-type="float">
            <text:p>51608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1 209, Length: 88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1556" calcext:value-type="float">
            <text:p>51615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0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2286" calcext:value-type="float">
            <text:p>51622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09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2995" calcext:value-type="float">
            <text:p>51629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131, Length: 55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3702" calcext:value-type="float">
            <text:p>51637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68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4463" calcext:value-type="float">
            <text:p>51644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68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5166" calcext:value-type="float">
            <text:p>51651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717, Length: 26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69521" calcext:value-type="float">
            <text:p>51695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9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71165" calcext:value-type="float">
            <text:p>51711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 98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72198" calcext:value-type="float">
            <text:p>51721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3 013, Length: 13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76775" calcext:value-type="float">
            <text:p>51767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3 1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77602" calcext:value-type="float">
            <text:p>51776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3 14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78335" calcext:value-type="float">
            <text:p>51783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3 179, Length: 86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79052" calcext:value-type="float">
            <text:p>51790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4 0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79788" calcext:value-type="float">
            <text:p>51797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4 04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0496" calcext:value-type="float">
            <text:p>51804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4 076, Length: 597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1301" calcext:value-type="float">
            <text:p>51813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4 67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2057" calcext:value-type="float">
            <text:p>51820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4 67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2775" calcext:value-type="float">
            <text:p>51827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4 709, Length: 523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3482" calcext:value-type="float">
            <text:p>51834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 2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4203" calcext:value-type="float">
            <text:p>51842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 23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4906" calcext:value-type="float">
            <text:p>51849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 268, Length: 597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5605" calcext:value-type="float">
            <text:p>51856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 86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6331" calcext:value-type="float">
            <text:p>51863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 86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7033" calcext:value-type="float">
            <text:p>51870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 901, Length: 56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7738" calcext:value-type="float">
            <text:p>51877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6 46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8457" calcext:value-type="float">
            <text:p>51884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6 46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89157" calcext:value-type="float">
            <text:p>51891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6 497, Length: 49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0009" calcext:value-type="float">
            <text:p>51900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6 9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0793" calcext:value-type="float">
            <text:p>51907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6 99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1512" calcext:value-type="float">
            <text:p>51915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7 027, Length: 583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2215" calcext:value-type="float">
            <text:p>51922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7 61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2938" calcext:value-type="float">
            <text:p>51929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7 61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3648" calcext:value-type="float">
            <text:p>51936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7 646, Length: 585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4350" calcext:value-type="float">
            <text:p>51943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 2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5075" calcext:value-type="float">
            <text:p>51950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 23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6005" calcext:value-type="float">
            <text:p>51960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 267, Length: 597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6769" calcext:value-type="float">
            <text:p>51967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 8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7502" calcext:value-type="float">
            <text:p>51975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 86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8201" calcext:value-type="float">
            <text:p>51982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 900, Length: 38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8899" calcext:value-type="float">
            <text:p>51988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9 2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199637" calcext:value-type="float">
            <text:p>51996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9 28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0335" calcext:value-type="float">
            <text:p>52003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9 320, Length: 1 24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1041" calcext:value-type="float">
            <text:p>52010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0 56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1764" calcext:value-type="float">
            <text:p>52017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0 56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2471" calcext:value-type="float">
            <text:p>52024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0 598, Length: 425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3245" calcext:value-type="float">
            <text:p>52032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 0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3998" calcext:value-type="float">
            <text:p>52039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 02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4888" calcext:value-type="float">
            <text:p>52048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 059, Length: 47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5601" calcext:value-type="float">
            <text:p>52056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 53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6320" calcext:value-type="float">
            <text:p>52063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 53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7025" calcext:value-type="float">
            <text:p>52070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 566, Length: 1 25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7773" calcext:value-type="float">
            <text:p>52077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2 8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8518" calcext:value-type="float">
            <text:p>52085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2 82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09310" calcext:value-type="float">
            <text:p>52093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2 852, Length: 34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0019" calcext:value-type="float">
            <text:p>52100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3 19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0741" calcext:value-type="float">
            <text:p>52107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3 19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1440" calcext:value-type="float">
            <text:p>52114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3 230, Length: 599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2151" calcext:value-type="float">
            <text:p>52121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3 82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2872" calcext:value-type="float">
            <text:p>52128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3 83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3572" calcext:value-type="float">
            <text:p>52135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3 865, Length: 58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4274" calcext:value-type="float">
            <text:p>52142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4 4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5009" calcext:value-type="float">
            <text:p>52150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4 45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5913" calcext:value-type="float">
            <text:p>52159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4 483, Length: 599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6703" calcext:value-type="float">
            <text:p>52167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 08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7490" calcext:value-type="float">
            <text:p>52174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 08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8212" calcext:value-type="float">
            <text:p>52182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 118, Length: 50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8917" calcext:value-type="float">
            <text:p>52189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 6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19642" calcext:value-type="float">
            <text:p>52196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 62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0342" calcext:value-type="float">
            <text:p>52203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 656, Length: 599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1041" calcext:value-type="float">
            <text:p>52210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6 2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1775" calcext:value-type="float">
            <text:p>52217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6 25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2477" calcext:value-type="float">
            <text:p>52224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6 291, Length: 599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3222" calcext:value-type="float">
            <text:p>52232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6 8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3947" calcext:value-type="float">
            <text:p>52239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6 89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4653" calcext:value-type="float">
            <text:p>52246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6 926, Length: 56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5354" calcext:value-type="float">
            <text:p>52253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7 4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6099" calcext:value-type="float">
            <text:p>52260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7 49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6799" calcext:value-type="float">
            <text:p>52267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7 524, Length: 52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7501" calcext:value-type="float">
            <text:p>52275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 04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8229" calcext:value-type="float">
            <text:p>52282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 05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8931" calcext:value-type="float">
            <text:p>52289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 082, Length: 87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29636" calcext:value-type="float">
            <text:p>52296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 95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1445" calcext:value-type="float">
            <text:p>52314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 96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2315" calcext:value-type="float">
            <text:p>52323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 994, Length: 837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5593" calcext:value-type="float">
            <text:p>52355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9 8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6595" calcext:value-type="float">
            <text:p>52365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9 83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7383" calcext:value-type="float">
            <text:p>52373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9 867, Length: 48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8277" calcext:value-type="float">
            <text:p>52382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0 3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9065" calcext:value-type="float">
            <text:p>52390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0 35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39787" calcext:value-type="float">
            <text:p>52397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0 383, Length: 1 0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0601" calcext:value-type="float">
            <text:p>52406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 4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1337" calcext:value-type="float">
            <text:p>52413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 41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2052" calcext:value-type="float">
            <text:p>52420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 451, Length: 1 037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2782" calcext:value-type="float">
            <text:p>52427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 4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3508" calcext:value-type="float">
            <text:p>52435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 49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4214" calcext:value-type="float">
            <text:p>52442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 524, Length: 1 16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4992" calcext:value-type="float">
            <text:p>52449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3 6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5758" calcext:value-type="float">
            <text:p>52457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3 69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6467" calcext:value-type="float">
            <text:p>52464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3 726, Length: 1 18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7179" calcext:value-type="float">
            <text:p>52471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4 91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7937" calcext:value-type="float">
            <text:p>52479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4 91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8646" calcext:value-type="float">
            <text:p>52486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4 946, Length: 1 13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49402" calcext:value-type="float">
            <text:p>52494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6 08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0133" calcext:value-type="float">
            <text:p>52501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6 08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1098" calcext:value-type="float">
            <text:p>52510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6 118, Length: 1 14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1828" calcext:value-type="float">
            <text:p>52518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7 2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2563" calcext:value-type="float">
            <text:p>52525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7 26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3273" calcext:value-type="float">
            <text:p>52532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7 300, Length: 7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4039" calcext:value-type="float">
            <text:p>52540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8 0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4801" calcext:value-type="float">
            <text:p>52548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8 02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5514" calcext:value-type="float">
            <text:p>52555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8 056, Length: 1 01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6216" calcext:value-type="float">
            <text:p>52562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9 07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6967" calcext:value-type="float">
            <text:p>52569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9 07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7674" calcext:value-type="float">
            <text:p>52576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9 110, Length: 68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8423" calcext:value-type="float">
            <text:p>52584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9 7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9156" calcext:value-type="float">
            <text:p>52591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9 79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59860" calcext:value-type="float">
            <text:p>52598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9 826, Length: 657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0563" calcext:value-type="float">
            <text:p>52605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0 4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1292" calcext:value-type="float">
            <text:p>52612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0 48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1996" calcext:value-type="float">
            <text:p>52619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0 519, Length: 67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2707" calcext:value-type="float">
            <text:p>52627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1 1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3436" calcext:value-type="float">
            <text:p>52634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1 19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4141" calcext:value-type="float">
            <text:p>52641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1 226, Length: 929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4900" calcext:value-type="float">
            <text:p>52649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2 1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5687" calcext:value-type="float">
            <text:p>52656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2 15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6402" calcext:value-type="float">
            <text:p>52664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2 191, Length: 1 06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7141" calcext:value-type="float">
            <text:p>52671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3 25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7861" calcext:value-type="float">
            <text:p>52678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3 26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8710" calcext:value-type="float">
            <text:p>52687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3 293, Length: 1 12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69424" calcext:value-type="float">
            <text:p>52694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 42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0184" calcext:value-type="float">
            <text:p>52701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 42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1075" calcext:value-type="float">
            <text:p>52710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 457, Length: 53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1810" calcext:value-type="float">
            <text:p>52718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 9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2591" calcext:value-type="float">
            <text:p>52725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 99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3514" calcext:value-type="float">
            <text:p>52735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5 023, Length: 55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4293" calcext:value-type="float">
            <text:p>52742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5 5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5073" calcext:value-type="float">
            <text:p>52750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5 58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5781" calcext:value-type="float">
            <text:p>52757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5 615, Length: 55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6481" calcext:value-type="float">
            <text:p>52764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6 17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7199" calcext:value-type="float">
            <text:p>52771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6 17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7899" calcext:value-type="float">
            <text:p>52778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6 209, Length: 57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8597" calcext:value-type="float">
            <text:p>52785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6 7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79317" calcext:value-type="float">
            <text:p>52793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6 78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0012" calcext:value-type="float">
            <text:p>52800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6 819, Length: 62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0760" calcext:value-type="float">
            <text:p>52807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7 4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1488" calcext:value-type="float">
            <text:p>52814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7 45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2187" calcext:value-type="float">
            <text:p>52821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7 483, Length: 64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2886" calcext:value-type="float">
            <text:p>52828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8 1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3641" calcext:value-type="float">
            <text:p>52836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8 13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4344" calcext:value-type="float">
            <text:p>52843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8 163, Length: 833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5044" calcext:value-type="float">
            <text:p>52850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8 9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5767" calcext:value-type="float">
            <text:p>52857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9 00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6469" calcext:value-type="float">
            <text:p>52864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9 032, Length: 1 317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7229" calcext:value-type="float">
            <text:p>52872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0 34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7999" calcext:value-type="float">
            <text:p>52879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0 35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8706" calcext:value-type="float">
            <text:p>52887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0 385, Length: 1 11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89448" calcext:value-type="float">
            <text:p>52894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1 50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0182" calcext:value-type="float">
            <text:p>52901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1 50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1062" calcext:value-type="float">
            <text:p>52910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1 537, Length: 1 329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1808" calcext:value-type="float">
            <text:p>52918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2 86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2577" calcext:value-type="float">
            <text:p>52925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2 87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3291" calcext:value-type="float">
            <text:p>52932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2 902, Length: 78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3993" calcext:value-type="float">
            <text:p>52939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3 6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4742" calcext:value-type="float">
            <text:p>52947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3 69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5451" calcext:value-type="float">
            <text:p>52954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3 726, Length: 1 08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6224" calcext:value-type="float">
            <text:p>52962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4 8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6987" calcext:value-type="float">
            <text:p>52969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4 81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297695" calcext:value-type="float">
            <text:p>52976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4 843, Length: 4 10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383045" calcext:value-type="float">
            <text:p>53830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8 94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383889" calcext:value-type="float">
            <text:p>53838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8 94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384675" calcext:value-type="float">
            <text:p>53846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8 953, Length: 1 02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385972" calcext:value-type="float">
            <text:p>53859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9 98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399601" calcext:value-type="float">
            <text:p>53996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9 98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0724" calcext:value-type="float">
            <text:p>54007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9 98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1552" calcext:value-type="float">
            <text:p>54015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0 021, Length: 26 30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4131" calcext:value-type="float">
            <text:p>54041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 32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5034" calcext:value-type="float">
            <text:p>54050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 32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5766" calcext:value-type="float">
            <text:p>54057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 361, Length: 5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6532" calcext:value-type="float">
            <text:p>54065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 4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7262" calcext:value-type="float">
            <text:p>54072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 42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07973" calcext:value-type="float">
            <text:p>54079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 455, Length: 31 18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0153" calcext:value-type="float">
            <text:p>54101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27 6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0986" calcext:value-type="float">
            <text:p>54109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27 64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1711" calcext:value-type="float">
            <text:p>54117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27 679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2619" calcext:value-type="float">
            <text:p>54126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41 5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3417" calcext:value-type="float">
            <text:p>54134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41 60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4127" calcext:value-type="float">
            <text:p>54141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41 635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5417" calcext:value-type="float">
            <text:p>54154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55 5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6195" calcext:value-type="float">
            <text:p>54161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55 55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6918" calcext:value-type="float">
            <text:p>54169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55 591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8736" calcext:value-type="float">
            <text:p>54187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69 5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19564" calcext:value-type="float">
            <text:p>54195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69 51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0288" calcext:value-type="float">
            <text:p>54202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69 547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1190" calcext:value-type="float">
            <text:p>54211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83 4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1957" calcext:value-type="float">
            <text:p>54219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83 47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2664" calcext:value-type="float">
            <text:p>54226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83 503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4700" calcext:value-type="float">
            <text:p>54247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97 4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5559" calcext:value-type="float">
            <text:p>54255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97 42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6301" calcext:value-type="float">
            <text:p>54263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197 459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8106" calcext:value-type="float">
            <text:p>54281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11 3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9013" calcext:value-type="float">
            <text:p>54290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11 38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29741" calcext:value-type="float">
            <text:p>54297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11 415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1556" calcext:value-type="float">
            <text:p>54315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5 3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2383" calcext:value-type="float">
            <text:p>54323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5 33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3102" calcext:value-type="float">
            <text:p>54331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25 371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5077" calcext:value-type="float">
            <text:p>54350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39 2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5923" calcext:value-type="float">
            <text:p>54359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39 29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6655" calcext:value-type="float">
            <text:p>54366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39 327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8615" calcext:value-type="float">
            <text:p>54386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3 2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39465" calcext:value-type="float">
            <text:p>54394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3 25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0237" calcext:value-type="float">
            <text:p>54402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3 283, Length: 4 40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1050" calcext:value-type="float">
            <text:p>54410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7 6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1818" calcext:value-type="float">
            <text:p>54418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7 69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2526" calcext:value-type="float">
            <text:p>54425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57 727, Length: 12 29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3514" calcext:value-type="float">
            <text:p>54435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70 0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4276" calcext:value-type="float">
            <text:p>54442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70 02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4991" calcext:value-type="float">
            <text:p>54449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70 059, Length: 12 29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5875" calcext:value-type="float">
            <text:p>54458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2 3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6632" calcext:value-type="float">
            <text:p>54466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2 35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7343" calcext:value-type="float">
            <text:p>54473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2 391, Length: 4 40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8147" calcext:value-type="float">
            <text:p>54481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6 7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8942" calcext:value-type="float">
            <text:p>54489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6 80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49658" calcext:value-type="float">
            <text:p>54496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286 835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0557" calcext:value-type="float">
            <text:p>54505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00 7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1314" calcext:value-type="float">
            <text:p>54513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00 75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2025" calcext:value-type="float">
            <text:p>54520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00 791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2951" calcext:value-type="float">
            <text:p>54529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4 7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3714" calcext:value-type="float">
            <text:p>54537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4 71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4426" calcext:value-type="float">
            <text:p>54544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14 747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5575" calcext:value-type="float">
            <text:p>54555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28 6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6352" calcext:value-type="float">
            <text:p>54563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28 67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7073" calcext:value-type="float">
            <text:p>54570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28 703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8336" calcext:value-type="float">
            <text:p>54583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42 6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9135" calcext:value-type="float">
            <text:p>54591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42 62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59859" calcext:value-type="float">
            <text:p>54598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42 659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0974" calcext:value-type="float">
            <text:p>54609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6 5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1754" calcext:value-type="float">
            <text:p>54617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6 58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2468" calcext:value-type="float">
            <text:p>54624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56 615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3368" calcext:value-type="float">
            <text:p>54633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70 5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4128" calcext:value-type="float">
            <text:p>54641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70 53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4886" calcext:value-type="float">
            <text:p>54648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70 571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5832" calcext:value-type="float">
            <text:p>54658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4 4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6603" calcext:value-type="float">
            <text:p>54666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4 49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7312" calcext:value-type="float">
            <text:p>54673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84 527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8227" calcext:value-type="float">
            <text:p>54682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98 4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9002" calcext:value-type="float">
            <text:p>54690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98 45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69723" calcext:value-type="float">
            <text:p>54697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398 483, Length: 13 9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0622" calcext:value-type="float">
            <text:p>54706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2 4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1376" calcext:value-type="float">
            <text:p>54713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2 40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2086" calcext:value-type="float">
            <text:p>54720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2 439, Length: 4 77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2906" calcext:value-type="float">
            <text:p>54729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7 20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3656" calcext:value-type="float">
            <text:p>54736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7 21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4366" calcext:value-type="float">
            <text:p>54743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17 245, Length: 5 20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5375" calcext:value-type="float">
            <text:p>54753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2 4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6146" calcext:value-type="float">
            <text:p>54761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2 45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6864" calcext:value-type="float">
            <text:p>54768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2 483, Length: 6 23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7660" calcext:value-type="float">
            <text:p>54776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8 71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8442" calcext:value-type="float">
            <text:p>54784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8 71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79157" calcext:value-type="float">
            <text:p>54791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28 749, Length: 24 7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0190" calcext:value-type="float">
            <text:p>54801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53 46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0947" calcext:value-type="float">
            <text:p>54809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53 47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1660" calcext:value-type="float">
            <text:p>54816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53 505, Length: 24 72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3935" calcext:value-type="float">
            <text:p>54839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78 22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4772" calcext:value-type="float">
            <text:p>54847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78 22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5491" calcext:value-type="float">
            <text:p>54854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78 261, Length: 11 34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6386" calcext:value-type="float">
            <text:p>54863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89 60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7143" calcext:value-type="float">
            <text:p>54871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89 60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7860" calcext:value-type="float">
            <text:p>54878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489 637, Length: 11 34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8742" calcext:value-type="float">
            <text:p>54887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00 9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89521" calcext:value-type="float">
            <text:p>54895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00 98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0238" calcext:value-type="float">
            <text:p>54902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01 013, Length: 21 06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1226" calcext:value-type="float">
            <text:p>54912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22 07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1989" calcext:value-type="float">
            <text:p>54919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22 07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2702" calcext:value-type="float">
            <text:p>54927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22 109, Length: 21 06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3763" calcext:value-type="float">
            <text:p>54937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3 16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4680" calcext:value-type="float">
            <text:p>54946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3 17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5608" calcext:value-type="float">
            <text:p>54956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43 205, Length: 32 76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6770" calcext:value-type="float">
            <text:p>54967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575 973, Length: 27 37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7969" calcext:value-type="float">
            <text:p>54979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03 3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8791" calcext:value-type="float">
            <text:p>54987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03 34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499503" calcext:value-type="float">
            <text:p>54995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03 379, Length: 32 76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0608" calcext:value-type="float">
            <text:p>55006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36 147, Length: 26 12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1661" calcext:value-type="float">
            <text:p>55016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62 26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2462" calcext:value-type="float">
            <text:p>55024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62 27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3179" calcext:value-type="float">
            <text:p>55031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62 305, Length: 13 53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4110" calcext:value-type="float">
            <text:p>55041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75 8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4873" calcext:value-type="float">
            <text:p>55048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75 839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5613" calcext:value-type="float">
            <text:p>55056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75 871, Length: 16 20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6535" calcext:value-type="float">
            <text:p>55065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92 0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7294" calcext:value-type="float">
            <text:p>55072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92 07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8009" calcext:value-type="float">
            <text:p>55080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692 107, Length: 16 20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8952" calcext:value-type="float">
            <text:p>55089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08 3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09718" calcext:value-type="float">
            <text:p>55097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08 31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0432" calcext:value-type="float">
            <text:p>55104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08 343, Length: 21 99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2594" calcext:value-type="float">
            <text:p>55125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30 3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3469" calcext:value-type="float">
            <text:p>55134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30 34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4201" calcext:value-type="float">
            <text:p>55142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30 375, Length: 11 28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5376" calcext:value-type="float">
            <text:p>55153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41 6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6278" calcext:value-type="float">
            <text:p>55162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41 66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6998" calcext:value-type="float">
            <text:p>55169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41 699, Length: 14 59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7894" calcext:value-type="float">
            <text:p>55178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56 2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8649" calcext:value-type="float">
            <text:p>55186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56 29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19353" calcext:value-type="float">
            <text:p>55193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56 327, Length: 6 14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0186" calcext:value-type="float">
            <text:p>55201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62 4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0940" calcext:value-type="float">
            <text:p>55209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62 47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1643" calcext:value-type="float">
            <text:p>55216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62 507, Length: 6 14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2439" calcext:value-type="float">
            <text:p>55224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68 6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3213" calcext:value-type="float">
            <text:p>55232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68 65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3925" calcext:value-type="float">
            <text:p>55239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68 687, Length: 6 14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4755" calcext:value-type="float">
            <text:p>55247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74 8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5520" calcext:value-type="float">
            <text:p>55255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74 83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6226" calcext:value-type="float">
            <text:p>55262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74 867, Length: 6 14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7013" calcext:value-type="float">
            <text:p>55270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81 0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7770" calcext:value-type="float">
            <text:p>55277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81 015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8478" calcext:value-type="float">
            <text:p>55284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81 047, Length: 8 46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29512" calcext:value-type="float">
            <text:p>55295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89 51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0293" calcext:value-type="float">
            <text:p>55302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89 51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1007" calcext:value-type="float">
            <text:p>55310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89 549, Length: 6 80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1844" calcext:value-type="float">
            <text:p>55318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96 35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2671" calcext:value-type="float">
            <text:p>55326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96 36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3430" calcext:value-type="float">
            <text:p>55334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796 393, Length: 9 75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4270" calcext:value-type="float">
            <text:p>55342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06 1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5025" calcext:value-type="float">
            <text:p>55350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06 147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7033" calcext:value-type="float">
            <text:p>55370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06 179, Length: 26 12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8155" calcext:value-type="float">
            <text:p>55381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32 3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8920" calcext:value-type="float">
            <text:p>55389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32 31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39630" calcext:value-type="float">
            <text:p>55396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32 343, Length: 32 76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2004" calcext:value-type="float">
            <text:p>55420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65 111, Length: 12 71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2999" calcext:value-type="float">
            <text:p>55429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77 8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3770" calcext:value-type="float">
            <text:p>55437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77 83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4489" calcext:value-type="float">
            <text:p>55444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877 863, Length: 32 76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6161" calcext:value-type="float">
            <text:p>55461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10 631, Length: 10 31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7103" calcext:value-type="float">
            <text:p>55471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20 94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7978" calcext:value-type="float">
            <text:p>55479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20 953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8735" calcext:value-type="float">
            <text:p>55487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20 985, Length: 16 36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49680" calcext:value-type="float">
            <text:p>55496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37 3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50463" calcext:value-type="float">
            <text:p>55504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37 35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551176" calcext:value-type="float">
            <text:p>55511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37 383, Length: 31 46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6882" calcext:value-type="float">
            <text:p>56168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8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7599" calcext:value-type="float">
            <text:p>56175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851, Length: 2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7999" calcext:value-type="float">
            <text:p>56179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8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8290" calcext:value-type="float">
            <text:p>56182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883, Length: 1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8587" calcext:value-type="float">
            <text:p>56185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89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8879" calcext:value-type="float">
            <text:p>56188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01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9190" calcext:value-type="float">
            <text:p>56191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3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9476" calcext:value-type="float">
            <text:p>56194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3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19760" calcext:value-type="float">
            <text:p>56197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4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0036" calcext:value-type="float">
            <text:p>56200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45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0322" calcext:value-type="float">
            <text:p>56203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0600" calcext:value-type="float">
            <text:p>56206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0875" calcext:value-type="float">
            <text:p>56208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1148" calcext:value-type="float">
            <text:p>56211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1426" calcext:value-type="float">
            <text:p>56214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1698" calcext:value-type="float">
            <text:p>56216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1972" calcext:value-type="float">
            <text:p>56219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2244" calcext:value-type="float">
            <text:p>56222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2516" calcext:value-type="float">
            <text:p>56225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2791" calcext:value-type="float">
            <text:p>56227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3061" calcext:value-type="float">
            <text:p>56230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3332" calcext:value-type="float">
            <text:p>56233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8 9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3602" calcext:value-type="float">
            <text:p>56236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4034" calcext:value-type="float">
            <text:p>56240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4657" calcext:value-type="float">
            <text:p>56246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4967" calcext:value-type="float">
            <text:p>56249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5248" calcext:value-type="float">
            <text:p>56252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5527" calcext:value-type="float">
            <text:p>56255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5804" calcext:value-type="float">
            <text:p>56258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6088" calcext:value-type="float">
            <text:p>56260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6360" calcext:value-type="float">
            <text:p>56263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6634" calcext:value-type="float">
            <text:p>56266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6906" calcext:value-type="float">
            <text:p>56269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7178" calcext:value-type="float">
            <text:p>56271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7451" calcext:value-type="float">
            <text:p>56274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7721" calcext:value-type="float">
            <text:p>56277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8206" calcext:value-type="float">
            <text:p>56282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8494" calcext:value-type="float">
            <text:p>56284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8771" calcext:value-type="float">
            <text:p>56287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9053" calcext:value-type="float">
            <text:p>56290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9327" calcext:value-type="float">
            <text:p>56293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9598" calcext:value-type="float">
            <text:p>56295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29869" calcext:value-type="float">
            <text:p>56298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0139" calcext:value-type="float">
            <text:p>56301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0412" calcext:value-type="float">
            <text:p>56304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0685" calcext:value-type="float">
            <text:p>56306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0957" calcext:value-type="float">
            <text:p>56309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0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1246" calcext:value-type="float">
            <text:p>56312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1839" calcext:value-type="float">
            <text:p>56318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2117" calcext:value-type="float">
            <text:p>56321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2390" calcext:value-type="float">
            <text:p>56323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2663" calcext:value-type="float">
            <text:p>56326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2936" calcext:value-type="float">
            <text:p>56329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3211" calcext:value-type="float">
            <text:p>56332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3487" calcext:value-type="float">
            <text:p>56334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3759" calcext:value-type="float">
            <text:p>56337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4037" calcext:value-type="float">
            <text:p>56340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4308" calcext:value-type="float">
            <text:p>56343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4581" calcext:value-type="float">
            <text:p>56345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4858" calcext:value-type="float">
            <text:p>56348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5132" calcext:value-type="float">
            <text:p>56351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5407" calcext:value-type="float">
            <text:p>56354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5680" calcext:value-type="float">
            <text:p>56356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5954" calcext:value-type="float">
            <text:p>56359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6224" calcext:value-type="float">
            <text:p>56362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6534" calcext:value-type="float">
            <text:p>56365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6807" calcext:value-type="float">
            <text:p>56368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7082" calcext:value-type="float">
            <text:p>56370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7352" calcext:value-type="float">
            <text:p>56373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7628" calcext:value-type="float">
            <text:p>56376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7900" calcext:value-type="float">
            <text:p>56379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8173" calcext:value-type="float">
            <text:p>56381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1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8443" calcext:value-type="float">
            <text:p>56384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8713" calcext:value-type="float">
            <text:p>56387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8988" calcext:value-type="float">
            <text:p>56389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9257" calcext:value-type="float">
            <text:p>56392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39528" calcext:value-type="float">
            <text:p>56395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0144" calcext:value-type="float">
            <text:p>56401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0422" calcext:value-type="float">
            <text:p>56404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0694" calcext:value-type="float">
            <text:p>56406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0966" calcext:value-type="float">
            <text:p>56409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1237" calcext:value-type="float">
            <text:p>56412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1508" calcext:value-type="float">
            <text:p>56415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1785" calcext:value-type="float">
            <text:p>56417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2058" calcext:value-type="float">
            <text:p>56420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2329" calcext:value-type="float">
            <text:p>56423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2600" calcext:value-type="float">
            <text:p>56426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2872" calcext:value-type="float">
            <text:p>56428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3143" calcext:value-type="float">
            <text:p>56431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3413" calcext:value-type="float">
            <text:p>56434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3682" calcext:value-type="float">
            <text:p>56436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3955" calcext:value-type="float">
            <text:p>56439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4229" calcext:value-type="float">
            <text:p>56442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4500" calcext:value-type="float">
            <text:p>56445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4770" calcext:value-type="float">
            <text:p>56447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5041" calcext:value-type="float">
            <text:p>56450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5310" calcext:value-type="float">
            <text:p>56453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2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5580" calcext:value-type="float">
            <text:p>56455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3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5852" calcext:value-type="float">
            <text:p>56458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3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6123" calcext:value-type="float">
            <text:p>56461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3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6396" calcext:value-type="float">
            <text:p>56463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3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6670" calcext:value-type="float">
            <text:p>56466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3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6995" calcext:value-type="float">
            <text:p>56469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323, Length: 55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7277" calcext:value-type="float">
            <text:p>56472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87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7712" calcext:value-type="float">
            <text:p>56477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8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8136" calcext:value-type="float">
            <text:p>56481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88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8428" calcext:value-type="float">
            <text:p>56484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88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8811" calcext:value-type="float">
            <text:p>56488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88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9181" calcext:value-type="float">
            <text:p>56491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89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9462" calcext:value-type="float">
            <text:p>56494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89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49743" calcext:value-type="float">
            <text:p>56497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0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50031" calcext:value-type="float">
            <text:p>56500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0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650310" calcext:value-type="float">
            <text:p>56503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09, Length: 3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41318" calcext:value-type="float">
            <text:p>57413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4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41939" calcext:value-type="float">
            <text:p>57419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4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42557" calcext:value-type="float">
            <text:p>57425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5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42855" calcext:value-type="float">
            <text:p>57428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57, Length: 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4792" calcext:value-type="float">
            <text:p>57647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6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5243" calcext:value-type="float">
            <text:p>57652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6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5537" calcext:value-type="float">
            <text:p>57655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73, Length: 3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5876" calcext:value-type="float">
            <text:p>57658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6151" calcext:value-type="float">
            <text:p>57661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6428" calcext:value-type="float">
            <text:p>57664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6699" calcext:value-type="float">
            <text:p>57666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6970" calcext:value-type="float">
            <text:p>57669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7243" calcext:value-type="float">
            <text:p>57672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69 9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7527" calcext:value-type="float">
            <text:p>57675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0 0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7803" calcext:value-type="float">
            <text:p>57678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0 0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8073" calcext:value-type="float">
            <text:p>57680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0 0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8345" calcext:value-type="float">
            <text:p>57683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0 0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68857" calcext:value-type="float">
            <text:p>57688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0 016, Length: 1 02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1334" calcext:value-type="float">
            <text:p>57713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1728" calcext:value-type="float">
            <text:p>57717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2154" calcext:value-type="float">
            <text:p>57721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2444" calcext:value-type="float">
            <text:p>57724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2720" calcext:value-type="float">
            <text:p>57727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2997" calcext:value-type="float">
            <text:p>57729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3271" calcext:value-type="float">
            <text:p>57732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3564" calcext:value-type="float">
            <text:p>57735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68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3840" calcext:value-type="float">
            <text:p>57738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6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4193" calcext:value-type="float">
            <text:p>57741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7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4491" calcext:value-type="float">
            <text:p>57744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7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4800" calcext:value-type="float">
            <text:p>57748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7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5074" calcext:value-type="float">
            <text:p>57750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8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5351" calcext:value-type="float">
            <text:p>57753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8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5660" calcext:value-type="float">
            <text:p>57756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5946" calcext:value-type="float">
            <text:p>57759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9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6219" calcext:value-type="float">
            <text:p>57762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09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6490" calcext:value-type="float">
            <text:p>57764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0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6771" calcext:value-type="float">
            <text:p>57767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0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7053" calcext:value-type="float">
            <text:p>57770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1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7349" calcext:value-type="float">
            <text:p>57773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1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7629" calcext:value-type="float">
            <text:p>57776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18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77902" calcext:value-type="float">
            <text:p>57779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0287" calcext:value-type="float">
            <text:p>57802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0693" calcext:value-type="float">
            <text:p>57806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1081" calcext:value-type="float">
            <text:p>57810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1373" calcext:value-type="float">
            <text:p>57813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1645" calcext:value-type="float">
            <text:p>57816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1923" calcext:value-type="float">
            <text:p>57819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43, Length: 8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2222" calcext:value-type="float">
            <text:p>57822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2498" calcext:value-type="float">
            <text:p>57824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2772" calcext:value-type="float">
            <text:p>57827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3043" calcext:value-type="float">
            <text:p>57830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3313" calcext:value-type="float">
            <text:p>57833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3588" calcext:value-type="float">
            <text:p>57835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3870" calcext:value-type="float">
            <text:p>57838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4205" calcext:value-type="float">
            <text:p>57842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7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4484" calcext:value-type="float">
            <text:p>57844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4761" calcext:value-type="float">
            <text:p>57847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5054" calcext:value-type="float">
            <text:p>57850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5367" calcext:value-type="float">
            <text:p>57853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5652" calcext:value-type="float">
            <text:p>57856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1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5932" calcext:value-type="float">
            <text:p>57859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6210" calcext:value-type="float">
            <text:p>57862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04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6500" calcext:value-type="float">
            <text:p>57865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1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6774" calcext:value-type="float">
            <text:p>57867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1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7045" calcext:value-type="float">
            <text:p>57870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2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7319" calcext:value-type="float">
            <text:p>57873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2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7593" calcext:value-type="float">
            <text:p>57875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3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7871" calcext:value-type="float">
            <text:p>57878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3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8150" calcext:value-type="float">
            <text:p>57881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3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8426" calcext:value-type="float">
            <text:p>57884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42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8869" calcext:value-type="float">
            <text:p>57888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9161" calcext:value-type="float">
            <text:p>57891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89452" calcext:value-type="float">
            <text:p>57894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6884" calcext:value-type="float">
            <text:p>57968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7523" calcext:value-type="float">
            <text:p>57975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7814" calcext:value-type="float">
            <text:p>57978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8099" calcext:value-type="float">
            <text:p>57980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67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8429" calcext:value-type="float">
            <text:p>57984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8706" calcext:value-type="float">
            <text:p>57987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8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8999" calcext:value-type="float">
            <text:p>57989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8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9274" calcext:value-type="float">
            <text:p>57992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8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9550" calcext:value-type="float">
            <text:p>57995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9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799839" calcext:value-type="float">
            <text:p>57998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29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0139" calcext:value-type="float">
            <text:p>58001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0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0432" calcext:value-type="float">
            <text:p>58004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0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0706" calcext:value-type="float">
            <text:p>58007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0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0979" calcext:value-type="float">
            <text:p>58009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1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1260" calcext:value-type="float">
            <text:p>58012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1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1577" calcext:value-type="float">
            <text:p>58015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1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1864" calcext:value-type="float">
            <text:p>58018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2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2140" calcext:value-type="float">
            <text:p>58021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2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2420" calcext:value-type="float">
            <text:p>58024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30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2739" calcext:value-type="float">
            <text:p>58027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3015" calcext:value-type="float">
            <text:p>58030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3288" calcext:value-type="float">
            <text:p>58032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3561" calcext:value-type="float">
            <text:p>58035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3836" calcext:value-type="float">
            <text:p>58038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4115" calcext:value-type="float">
            <text:p>58041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4396" calcext:value-type="float">
            <text:p>58043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4675" calcext:value-type="float">
            <text:p>58046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68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4949" calcext:value-type="float">
            <text:p>58049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6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5226" calcext:value-type="float">
            <text:p>58052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7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05501" calcext:value-type="float">
            <text:p>58055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5444" calcext:value-type="float">
            <text:p>58154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8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6175" calcext:value-type="float">
            <text:p>58161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8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6472" calcext:value-type="float">
            <text:p>58164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8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6757" calcext:value-type="float">
            <text:p>58167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393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7105" calcext:value-type="float">
            <text:p>58171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7385" calcext:value-type="float">
            <text:p>58173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7662" calcext:value-type="float">
            <text:p>58176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7936" calcext:value-type="float">
            <text:p>58179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8210" calcext:value-type="float">
            <text:p>58182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8502" calcext:value-type="float">
            <text:p>58185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8792" calcext:value-type="float">
            <text:p>58187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9083" calcext:value-type="float">
            <text:p>58190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3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9357" calcext:value-type="float">
            <text:p>58193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9632" calcext:value-type="float">
            <text:p>58196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19914" calcext:value-type="float">
            <text:p>58199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0228" calcext:value-type="float">
            <text:p>58202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0512" calcext:value-type="float">
            <text:p>58205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0792" calcext:value-type="float">
            <text:p>58207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1071" calcext:value-type="float">
            <text:p>58210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56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1364" calcext:value-type="float">
            <text:p>58213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6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1640" calcext:value-type="float">
            <text:p>58216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7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1916" calcext:value-type="float">
            <text:p>58219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7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2193" calcext:value-type="float">
            <text:p>58221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7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2465" calcext:value-type="float">
            <text:p>58224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8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2741" calcext:value-type="float">
            <text:p>58227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8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3021" calcext:value-type="float">
            <text:p>58230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3318" calcext:value-type="float">
            <text:p>58233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94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3591" calcext:value-type="float">
            <text:p>58235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3862" calcext:value-type="float">
            <text:p>58238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4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4136" calcext:value-type="float">
            <text:p>58241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8075" calcext:value-type="float">
            <text:p>58280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8589" calcext:value-type="float">
            <text:p>58285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8880" calcext:value-type="float">
            <text:p>58288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9396" calcext:value-type="float">
            <text:p>58293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19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29724" calcext:value-type="float">
            <text:p>58297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2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0162" calcext:value-type="float">
            <text:p>58301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3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0437" calcext:value-type="float">
            <text:p>58304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3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0726" calcext:value-type="float">
            <text:p>58307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4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1000" calcext:value-type="float">
            <text:p>58310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4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1285" calcext:value-type="float">
            <text:p>58312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4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1569" calcext:value-type="float">
            <text:p>58315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5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1847" calcext:value-type="float">
            <text:p>58318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5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2122" calcext:value-type="float">
            <text:p>58321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5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2394" calcext:value-type="float">
            <text:p>58323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6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2669" calcext:value-type="float">
            <text:p>58326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6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2971" calcext:value-type="float">
            <text:p>58329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7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3252" calcext:value-type="float">
            <text:p>58332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7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3529" calcext:value-type="float">
            <text:p>58335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7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3805" calcext:value-type="float">
            <text:p>58338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82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4094" calcext:value-type="float">
            <text:p>58340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4369" calcext:value-type="float">
            <text:p>58343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5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4641" calcext:value-type="float">
            <text:p>58346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4913" calcext:value-type="float">
            <text:p>58349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5185" calcext:value-type="float">
            <text:p>58351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5463" calcext:value-type="float">
            <text:p>58354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5753" calcext:value-type="float">
            <text:p>58357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6029" calcext:value-type="float">
            <text:p>58360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20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6304" calcext:value-type="float">
            <text:p>58363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2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6583" calcext:value-type="float">
            <text:p>58365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2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36863" calcext:value-type="float">
            <text:p>58368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2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0838" calcext:value-type="float">
            <text:p>58408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3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1348" calcext:value-type="float">
            <text:p>58413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3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1635" calcext:value-type="float">
            <text:p>58416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4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1918" calcext:value-type="float">
            <text:p>58419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45, Length: 10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2228" calcext:value-type="float">
            <text:p>58422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2503" calcext:value-type="float">
            <text:p>58425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2775" calcext:value-type="float">
            <text:p>58427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3049" calcext:value-type="float">
            <text:p>58430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3322" calcext:value-type="float">
            <text:p>58433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3604" calcext:value-type="float">
            <text:p>58436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3888" calcext:value-type="float">
            <text:p>58438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4169" calcext:value-type="float">
            <text:p>58441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8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4442" calcext:value-type="float">
            <text:p>58444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4713" calcext:value-type="float">
            <text:p>58447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4988" calcext:value-type="float">
            <text:p>58449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5285" calcext:value-type="float">
            <text:p>58452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6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5577" calcext:value-type="float">
            <text:p>58455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5857" calcext:value-type="float">
            <text:p>58458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6136" calcext:value-type="float">
            <text:p>58461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0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6453" calcext:value-type="float">
            <text:p>58464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6730" calcext:value-type="float">
            <text:p>58467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7006" calcext:value-type="float">
            <text:p>58470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7278" calcext:value-type="float">
            <text:p>58472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7549" calcext:value-type="float">
            <text:p>58475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7828" calcext:value-type="float">
            <text:p>58478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8117" calcext:value-type="float">
            <text:p>58481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8393" calcext:value-type="float">
            <text:p>58483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4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8665" calcext:value-type="float">
            <text:p>58486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8940" calcext:value-type="float">
            <text:p>58489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49403" calcext:value-type="float">
            <text:p>58494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3161" calcext:value-type="float">
            <text:p>58531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3665" calcext:value-type="float">
            <text:p>58536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3950" calcext:value-type="float">
            <text:p>58539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4228" calcext:value-type="float">
            <text:p>58542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7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4535" calcext:value-type="float">
            <text:p>58545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4813" calcext:value-type="float">
            <text:p>58548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5088" calcext:value-type="float">
            <text:p>58550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5362" calcext:value-type="float">
            <text:p>58553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5634" calcext:value-type="float">
            <text:p>58556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7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5917" calcext:value-type="float">
            <text:p>58559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6199" calcext:value-type="float">
            <text:p>58561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6481" calcext:value-type="float">
            <text:p>58564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1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6754" calcext:value-type="float">
            <text:p>58567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7031" calcext:value-type="float">
            <text:p>58570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7306" calcext:value-type="float">
            <text:p>58573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7603" calcext:value-type="float">
            <text:p>58576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7885" calcext:value-type="float">
            <text:p>58578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8160" calcext:value-type="float">
            <text:p>58581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8437" calcext:value-type="float">
            <text:p>58584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3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8723" calcext:value-type="float">
            <text:p>58587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8994" calcext:value-type="float">
            <text:p>58589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9269" calcext:value-type="float">
            <text:p>58592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9542" calcext:value-type="float">
            <text:p>58595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59815" calcext:value-type="float">
            <text:p>58598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0090" calcext:value-type="float">
            <text:p>58600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0370" calcext:value-type="float">
            <text:p>58603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0647" calcext:value-type="float">
            <text:p>58606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7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0920" calcext:value-type="float">
            <text:p>58609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1198" calcext:value-type="float">
            <text:p>58611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1609" calcext:value-type="float">
            <text:p>58616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6983" calcext:value-type="float">
            <text:p>58669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7888" calcext:value-type="float">
            <text:p>58678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8212" calcext:value-type="float">
            <text:p>58682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8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8502" calcext:value-type="float">
            <text:p>58685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0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8836" calcext:value-type="float">
            <text:p>58688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9116" calcext:value-type="float">
            <text:p>58691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9617" calcext:value-type="float">
            <text:p>58696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69909" calcext:value-type="float">
            <text:p>58699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0183" calcext:value-type="float">
            <text:p>58701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0480" calcext:value-type="float">
            <text:p>58704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0772" calcext:value-type="float">
            <text:p>58707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1070" calcext:value-type="float">
            <text:p>58710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3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1353" calcext:value-type="float">
            <text:p>58713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1627" calcext:value-type="float">
            <text:p>58716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2295" calcext:value-type="float">
            <text:p>58722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2624" calcext:value-type="float">
            <text:p>58726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2908" calcext:value-type="float">
            <text:p>58729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3181" calcext:value-type="float">
            <text:p>58731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3459" calcext:value-type="float">
            <text:p>58734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6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3747" calcext:value-type="float">
            <text:p>58737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4023" calcext:value-type="float">
            <text:p>58740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4295" calcext:value-type="float">
            <text:p>58742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4565" calcext:value-type="float">
            <text:p>58745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4837" calcext:value-type="float">
            <text:p>58748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5113" calcext:value-type="float">
            <text:p>58751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5393" calcext:value-type="float">
            <text:p>58753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1 9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5673" calcext:value-type="float">
            <text:p>58756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0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5945" calcext:value-type="float">
            <text:p>58759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6220" calcext:value-type="float">
            <text:p>58762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76494" calcext:value-type="float">
            <text:p>58764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0766" calcext:value-type="float">
            <text:p>58807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1274" calcext:value-type="float">
            <text:p>58812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1562" calcext:value-type="float">
            <text:p>58815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1845" calcext:value-type="float">
            <text:p>58818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2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2176" calcext:value-type="float">
            <text:p>58821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2454" calcext:value-type="float">
            <text:p>58824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2728" calcext:value-type="float">
            <text:p>58827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3002" calcext:value-type="float">
            <text:p>58830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3275" calcext:value-type="float">
            <text:p>58832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3560" calcext:value-type="float">
            <text:p>58835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3848" calcext:value-type="float">
            <text:p>58838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4133" calcext:value-type="float">
            <text:p>58841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6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4406" calcext:value-type="float">
            <text:p>58844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4678" calcext:value-type="float">
            <text:p>58846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4951" calcext:value-type="float">
            <text:p>58849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5254" calcext:value-type="float">
            <text:p>58852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5538" calcext:value-type="float">
            <text:p>58855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5815" calcext:value-type="float">
            <text:p>58858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6091" calcext:value-type="float">
            <text:p>58860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09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6379" calcext:value-type="float">
            <text:p>58863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6651" calcext:value-type="float">
            <text:p>58866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6925" calcext:value-type="float">
            <text:p>58869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7197" calcext:value-type="float">
            <text:p>58871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7469" calcext:value-type="float">
            <text:p>58874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7744" calcext:value-type="float">
            <text:p>58877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8022" calcext:value-type="float">
            <text:p>58880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8300" calcext:value-type="float">
            <text:p>58883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3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8574" calcext:value-type="float">
            <text:p>58885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8856" calcext:value-type="float">
            <text:p>58888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89130" calcext:value-type="float">
            <text:p>58891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3232" calcext:value-type="float">
            <text:p>58932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3751" calcext:value-type="float">
            <text:p>58937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4045" calcext:value-type="float">
            <text:p>58940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4328" calcext:value-type="float">
            <text:p>58943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5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4639" calcext:value-type="float">
            <text:p>58946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4915" calcext:value-type="float">
            <text:p>58949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5196" calcext:value-type="float">
            <text:p>58951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5471" calcext:value-type="float">
            <text:p>58954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5743" calcext:value-type="float">
            <text:p>58957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6028" calcext:value-type="float">
            <text:p>58960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6314" calcext:value-type="float">
            <text:p>58963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6604" calcext:value-type="float">
            <text:p>58966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9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6876" calcext:value-type="float">
            <text:p>58968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1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7152" calcext:value-type="float">
            <text:p>58971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7429" calcext:value-type="float">
            <text:p>58974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7734" calcext:value-type="float">
            <text:p>58977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8020" calcext:value-type="float">
            <text:p>58980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8294" calcext:value-type="float">
            <text:p>58982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8572" calcext:value-type="float">
            <text:p>58985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2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8861" calcext:value-type="float">
            <text:p>58988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9135" calcext:value-type="float">
            <text:p>58991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9407" calcext:value-type="float">
            <text:p>58994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899866" calcext:value-type="float">
            <text:p>58998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0146" calcext:value-type="float">
            <text:p>59001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0437" calcext:value-type="float">
            <text:p>59004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0719" calcext:value-type="float">
            <text:p>59007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1000" calcext:value-type="float">
            <text:p>59010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5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1272" calcext:value-type="float">
            <text:p>59012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1543" calcext:value-type="float">
            <text:p>59015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1819" calcext:value-type="float">
            <text:p>59018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2115" calcext:value-type="float">
            <text:p>59021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2397" calcext:value-type="float">
            <text:p>59023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2671" calcext:value-type="float">
            <text:p>59026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2948" calcext:value-type="float">
            <text:p>59029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8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3254" calcext:value-type="float">
            <text:p>59032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3530" calcext:value-type="float">
            <text:p>59035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2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3806" calcext:value-type="float">
            <text:p>59038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4089" calcext:value-type="float">
            <text:p>59040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4360" calcext:value-type="float">
            <text:p>59043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4656" calcext:value-type="float">
            <text:p>59046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4937" calcext:value-type="float">
            <text:p>59049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5214" calcext:value-type="float">
            <text:p>59052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2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5487" calcext:value-type="float">
            <text:p>59054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5762" calcext:value-type="float">
            <text:p>59057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06036" calcext:value-type="float">
            <text:p>59060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0128" calcext:value-type="float">
            <text:p>59101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0642" calcext:value-type="float">
            <text:p>59106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0929" calcext:value-type="float">
            <text:p>59109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1214" calcext:value-type="float">
            <text:p>59112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4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1524" calcext:value-type="float">
            <text:p>59115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1801" calcext:value-type="float">
            <text:p>59118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2076" calcext:value-type="float">
            <text:p>59120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2350" calcext:value-type="float">
            <text:p>59123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2633" calcext:value-type="float">
            <text:p>59126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2917" calcext:value-type="float">
            <text:p>59129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3205" calcext:value-type="float">
            <text:p>59132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3491" calcext:value-type="float">
            <text:p>59134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8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3766" calcext:value-type="float">
            <text:p>59137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4040" calcext:value-type="float">
            <text:p>59140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4313" calcext:value-type="float">
            <text:p>59143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3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4655" calcext:value-type="float">
            <text:p>59146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4940" calcext:value-type="float">
            <text:p>59149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5216" calcext:value-type="float">
            <text:p>59152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5491" calcext:value-type="float">
            <text:p>59154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1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5778" calcext:value-type="float">
            <text:p>59157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6051" calcext:value-type="float">
            <text:p>59160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6326" calcext:value-type="float">
            <text:p>59163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6598" calcext:value-type="float">
            <text:p>59165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6875" calcext:value-type="float">
            <text:p>59168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7150" calcext:value-type="float">
            <text:p>59171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7429" calcext:value-type="float">
            <text:p>59174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7705" calcext:value-type="float">
            <text:p>59177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5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7978" calcext:value-type="float">
            <text:p>59179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8250" calcext:value-type="float">
            <text:p>59182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18526" calcext:value-type="float">
            <text:p>59185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2256" calcext:value-type="float">
            <text:p>59222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2758" calcext:value-type="float">
            <text:p>59227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3045" calcext:value-type="float">
            <text:p>59230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3328" calcext:value-type="float">
            <text:p>59233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7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3637" calcext:value-type="float">
            <text:p>59236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3913" calcext:value-type="float">
            <text:p>59239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4184" calcext:value-type="float">
            <text:p>59241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4458" calcext:value-type="float">
            <text:p>59244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4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4731" calcext:value-type="float">
            <text:p>59247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5015" calcext:value-type="float">
            <text:p>59250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5299" calcext:value-type="float">
            <text:p>59252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5582" calcext:value-type="float">
            <text:p>59255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1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5853" calcext:value-type="float">
            <text:p>59258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6126" calcext:value-type="float">
            <text:p>59261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6402" calcext:value-type="float">
            <text:p>59264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6700" calcext:value-type="float">
            <text:p>59267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6984" calcext:value-type="float">
            <text:p>59269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7261" calcext:value-type="float">
            <text:p>59272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7541" calcext:value-type="float">
            <text:p>59275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4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7846" calcext:value-type="float">
            <text:p>59278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8120" calcext:value-type="float">
            <text:p>59281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8391" calcext:value-type="float">
            <text:p>59283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8665" calcext:value-type="float">
            <text:p>59286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8938" calcext:value-type="float">
            <text:p>59289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9220" calcext:value-type="float">
            <text:p>59292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9501" calcext:value-type="float">
            <text:p>59295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29963" calcext:value-type="float">
            <text:p>59299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7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0254" calcext:value-type="float">
            <text:p>59302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0533" calcext:value-type="float">
            <text:p>59305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0810" calcext:value-type="float">
            <text:p>59308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4709" calcext:value-type="float">
            <text:p>59347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5231" calcext:value-type="float">
            <text:p>59352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5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5528" calcext:value-type="float">
            <text:p>59355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5814" calcext:value-type="float">
            <text:p>59358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0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6171" calcext:value-type="float">
            <text:p>59361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6450" calcext:value-type="float">
            <text:p>59364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6726" calcext:value-type="float">
            <text:p>59367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7002" calcext:value-type="float">
            <text:p>59370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7276" calcext:value-type="float">
            <text:p>59372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7558" calcext:value-type="float">
            <text:p>59375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7846" calcext:value-type="float">
            <text:p>59378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8125" calcext:value-type="float">
            <text:p>59381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4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8400" calcext:value-type="float">
            <text:p>59384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8675" calcext:value-type="float">
            <text:p>59386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8951" calcext:value-type="float">
            <text:p>59389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9300" calcext:value-type="float">
            <text:p>59393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9582" calcext:value-type="float">
            <text:p>59395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39856" calcext:value-type="float">
            <text:p>59398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0134" calcext:value-type="float">
            <text:p>59401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6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0427" calcext:value-type="float">
            <text:p>59404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0701" calcext:value-type="float">
            <text:p>59407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0973" calcext:value-type="float">
            <text:p>59409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1245" calcext:value-type="float">
            <text:p>59412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1517" calcext:value-type="float">
            <text:p>59415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1793" calcext:value-type="float">
            <text:p>59417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6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2073" calcext:value-type="float">
            <text:p>59420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2347" calcext:value-type="float">
            <text:p>59423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0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2618" calcext:value-type="float">
            <text:p>59426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2891" calcext:value-type="float">
            <text:p>59428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3166" calcext:value-type="float">
            <text:p>59431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6928" calcext:value-type="float">
            <text:p>59469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7426" calcext:value-type="float">
            <text:p>59474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7714" calcext:value-type="float">
            <text:p>59477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7994" calcext:value-type="float">
            <text:p>59479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3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8317" calcext:value-type="float">
            <text:p>59483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8593" calcext:value-type="float">
            <text:p>59485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8864" calcext:value-type="float">
            <text:p>59488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9136" calcext:value-type="float">
            <text:p>59491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9407" calcext:value-type="float">
            <text:p>59494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49688" calcext:value-type="float">
            <text:p>59496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0178" calcext:value-type="float">
            <text:p>59501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0465" calcext:value-type="float">
            <text:p>59504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7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0739" calcext:value-type="float">
            <text:p>59507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1011" calcext:value-type="float">
            <text:p>59510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1287" calcext:value-type="float">
            <text:p>59512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1587" calcext:value-type="float">
            <text:p>59515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1871" calcext:value-type="float">
            <text:p>59518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2145" calcext:value-type="float">
            <text:p>59521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2427" calcext:value-type="float">
            <text:p>59524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79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2723" calcext:value-type="float">
            <text:p>59527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2996" calcext:value-type="float">
            <text:p>59529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3268" calcext:value-type="float">
            <text:p>59532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3544" calcext:value-type="float">
            <text:p>59535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3814" calcext:value-type="float">
            <text:p>59538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4092" calcext:value-type="float">
            <text:p>59540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4374" calcext:value-type="float">
            <text:p>59543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4654" calcext:value-type="float">
            <text:p>59546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3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4927" calcext:value-type="float">
            <text:p>59549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5198" calcext:value-type="float">
            <text:p>59551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5473" calcext:value-type="float">
            <text:p>59554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9223" calcext:value-type="float">
            <text:p>59592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59726" calcext:value-type="float">
            <text:p>59597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0011" calcext:value-type="float">
            <text:p>59600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0296" calcext:value-type="float">
            <text:p>59602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6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0604" calcext:value-type="float">
            <text:p>59606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0878" calcext:value-type="float">
            <text:p>59608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1150" calcext:value-type="float">
            <text:p>59611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1421" calcext:value-type="float">
            <text:p>59614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1691" calcext:value-type="float">
            <text:p>59616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1973" calcext:value-type="float">
            <text:p>59619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2255" calcext:value-type="float">
            <text:p>59622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2538" calcext:value-type="float">
            <text:p>59625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89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2811" calcext:value-type="float">
            <text:p>59628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3084" calcext:value-type="float">
            <text:p>59630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3358" calcext:value-type="float">
            <text:p>59633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3699" calcext:value-type="float">
            <text:p>59636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3979" calcext:value-type="float">
            <text:p>59639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4251" calcext:value-type="float">
            <text:p>59642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4528" calcext:value-type="float">
            <text:p>59645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2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4837" calcext:value-type="float">
            <text:p>59648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5111" calcext:value-type="float">
            <text:p>59651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5383" calcext:value-type="float">
            <text:p>59653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5808" calcext:value-type="float">
            <text:p>59658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6086" calcext:value-type="float">
            <text:p>59660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6373" calcext:value-type="float">
            <text:p>59663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6654" calcext:value-type="float">
            <text:p>59666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6931" calcext:value-type="float">
            <text:p>59669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6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7205" calcext:value-type="float">
            <text:p>59672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7480" calcext:value-type="float">
            <text:p>59674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67755" calcext:value-type="float">
            <text:p>59677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1907" calcext:value-type="float">
            <text:p>59719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2422" calcext:value-type="float">
            <text:p>59724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2712" calcext:value-type="float">
            <text:p>59727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2989" calcext:value-type="float">
            <text:p>59729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8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3297" calcext:value-type="float">
            <text:p>59732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2 9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3584" calcext:value-type="float">
            <text:p>59735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3858" calcext:value-type="float">
            <text:p>59738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4129" calcext:value-type="float">
            <text:p>59741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4399" calcext:value-type="float">
            <text:p>59743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4686" calcext:value-type="float">
            <text:p>59746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4969" calcext:value-type="float">
            <text:p>59749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5253" calcext:value-type="float">
            <text:p>59752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2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5526" calcext:value-type="float">
            <text:p>59755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5805" calcext:value-type="float">
            <text:p>59758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6083" calcext:value-type="float">
            <text:p>59760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6383" calcext:value-type="float">
            <text:p>59763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6665" calcext:value-type="float">
            <text:p>59766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6940" calcext:value-type="float">
            <text:p>59769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7217" calcext:value-type="float">
            <text:p>59772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5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7518" calcext:value-type="float">
            <text:p>59775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7793" calcext:value-type="float">
            <text:p>59777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8068" calcext:value-type="float">
            <text:p>59780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8340" calcext:value-type="float">
            <text:p>59783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8612" calcext:value-type="float">
            <text:p>59786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8889" calcext:value-type="float">
            <text:p>59788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9169" calcext:value-type="float">
            <text:p>59791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9450" calcext:value-type="float">
            <text:p>59794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9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9725" calcext:value-type="float">
            <text:p>59797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79997" calcext:value-type="float">
            <text:p>59799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0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0276" calcext:value-type="float">
            <text:p>59802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4040" calcext:value-type="float">
            <text:p>59840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4544" calcext:value-type="float">
            <text:p>59845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4830" calcext:value-type="float">
            <text:p>59848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5110" calcext:value-type="float">
            <text:p>59851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1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5417" calcext:value-type="float">
            <text:p>59854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5915" calcext:value-type="float">
            <text:p>59859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6191" calcext:value-type="float">
            <text:p>59861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8530" calcext:value-type="float">
            <text:p>59885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8876" calcext:value-type="float">
            <text:p>59888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9168" calcext:value-type="float">
            <text:p>59891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9461" calcext:value-type="float">
            <text:p>59894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89743" calcext:value-type="float">
            <text:p>59897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5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0017" calcext:value-type="float">
            <text:p>59900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0451" calcext:value-type="float">
            <text:p>59904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0734" calcext:value-type="float">
            <text:p>59907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1102" calcext:value-type="float">
            <text:p>59911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1393" calcext:value-type="float">
            <text:p>59913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1667" calcext:value-type="float">
            <text:p>59916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1944" calcext:value-type="float">
            <text:p>59919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8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2290" calcext:value-type="float">
            <text:p>59922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2564" calcext:value-type="float">
            <text:p>59925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2839" calcext:value-type="float">
            <text:p>59928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1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3111" calcext:value-type="float">
            <text:p>59931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3383" calcext:value-type="float">
            <text:p>59933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3660" calcext:value-type="float">
            <text:p>59936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3961" calcext:value-type="float">
            <text:p>59939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4261" calcext:value-type="float">
            <text:p>59942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1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4536" calcext:value-type="float">
            <text:p>59945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4810" calcext:value-type="float">
            <text:p>59948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5088" calcext:value-type="float">
            <text:p>59950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5999844" calcext:value-type="float">
            <text:p>59998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0373" calcext:value-type="float">
            <text:p>60003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0663" calcext:value-type="float">
            <text:p>60006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0958" calcext:value-type="float">
            <text:p>60009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4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1268" calcext:value-type="float">
            <text:p>60012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1544" calcext:value-type="float">
            <text:p>60015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1816" calcext:value-type="float">
            <text:p>60018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2088" calcext:value-type="float">
            <text:p>60020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2358" calcext:value-type="float">
            <text:p>60023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2640" calcext:value-type="float">
            <text:p>60026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2925" calcext:value-type="float">
            <text:p>60029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3204" calcext:value-type="float">
            <text:p>60032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8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3477" calcext:value-type="float">
            <text:p>60034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3749" calcext:value-type="float">
            <text:p>60037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4025" calcext:value-type="float">
            <text:p>60040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4480" calcext:value-type="float">
            <text:p>60044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2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4790" calcext:value-type="float">
            <text:p>60047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5070" calcext:value-type="float">
            <text:p>60050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5346" calcext:value-type="float">
            <text:p>60053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0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5640" calcext:value-type="float">
            <text:p>60056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5914" calcext:value-type="float">
            <text:p>60059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6208" calcext:value-type="float">
            <text:p>60062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6481" calcext:value-type="float">
            <text:p>60064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6756" calcext:value-type="float">
            <text:p>60067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8140" calcext:value-type="float">
            <text:p>60081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8462" calcext:value-type="float">
            <text:p>60084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8853" calcext:value-type="float">
            <text:p>60088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4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9285" calcext:value-type="float">
            <text:p>60092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9565" calcext:value-type="float">
            <text:p>60095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09844" calcext:value-type="float">
            <text:p>60098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0354" calcext:value-type="float">
            <text:p>60103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0671" calcext:value-type="float">
            <text:p>60106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0948" calcext:value-type="float">
            <text:p>60109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1227" calcext:value-type="float">
            <text:p>60112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7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1525" calcext:value-type="float">
            <text:p>60115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1802" calcext:value-type="float">
            <text:p>60118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2075" calcext:value-type="float">
            <text:p>60120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2346" calcext:value-type="float">
            <text:p>60123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2616" calcext:value-type="float">
            <text:p>60126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3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2891" calcext:value-type="float">
            <text:p>60128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3171" calcext:value-type="float">
            <text:p>60131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3451" calcext:value-type="float">
            <text:p>60134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1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3725" calcext:value-type="float">
            <text:p>601372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3998" calcext:value-type="float">
            <text:p>60139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4272" calcext:value-type="float">
            <text:p>60142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19738" calcext:value-type="float">
            <text:p>60197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0415" calcext:value-type="float">
            <text:p>60204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0706" calcext:value-type="float">
            <text:p>60207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0989" calcext:value-type="float">
            <text:p>60209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3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1319" calcext:value-type="float">
            <text:p>60213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1603" calcext:value-type="float">
            <text:p>60216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1910" calcext:value-type="float">
            <text:p>60219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2204" calcext:value-type="float">
            <text:p>60222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2474" calcext:value-type="float">
            <text:p>60224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7371" calcext:value-type="float">
            <text:p>60273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7857" calcext:value-type="float">
            <text:p>60278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8317" calcext:value-type="float">
            <text:p>60283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7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8694" calcext:value-type="float">
            <text:p>60286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9082" calcext:value-type="float">
            <text:p>60290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9383" calcext:value-type="float">
            <text:p>60293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29750" calcext:value-type="float">
            <text:p>60297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0059" calcext:value-type="float">
            <text:p>60300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0623" calcext:value-type="float">
            <text:p>60306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4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0928" calcext:value-type="float">
            <text:p>60309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0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1280" calcext:value-type="float">
            <text:p>60312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1559" calcext:value-type="float">
            <text:p>60315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1843" calcext:value-type="float">
            <text:p>60318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2113" calcext:value-type="float">
            <text:p>60321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2393" calcext:value-type="float">
            <text:p>60323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2799" calcext:value-type="float">
            <text:p>60327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3146" calcext:value-type="float">
            <text:p>60331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3433" calcext:value-type="float">
            <text:p>60334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3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3709" calcext:value-type="float">
            <text:p>60337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3985" calcext:value-type="float">
            <text:p>60339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34260" calcext:value-type="float">
            <text:p>60342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0866" calcext:value-type="float">
            <text:p>60408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1606" calcext:value-type="float">
            <text:p>60416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1894" calcext:value-type="float">
            <text:p>60418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2282" calcext:value-type="float">
            <text:p>60422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6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2797" calcext:value-type="float">
            <text:p>60427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3178" calcext:value-type="float">
            <text:p>60431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3454" calcext:value-type="float">
            <text:p>60434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3729" calcext:value-type="float">
            <text:p>60437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4002" calcext:value-type="float">
            <text:p>60440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4301" calcext:value-type="float">
            <text:p>60443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5134" calcext:value-type="float">
            <text:p>60451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5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5453" calcext:value-type="float">
            <text:p>60454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0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5732" calcext:value-type="float">
            <text:p>60457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6004" calcext:value-type="float">
            <text:p>60460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6283" calcext:value-type="float">
            <text:p>60462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6691" calcext:value-type="float">
            <text:p>60466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6984" calcext:value-type="float">
            <text:p>60469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7258" calcext:value-type="float">
            <text:p>60472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7537" calcext:value-type="float">
            <text:p>60475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2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8158" calcext:value-type="float">
            <text:p>60481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8437" calcext:value-type="float">
            <text:p>60484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8718" calcext:value-type="float">
            <text:p>60487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8991" calcext:value-type="float">
            <text:p>60489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9375" calcext:value-type="float">
            <text:p>60493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9662" calcext:value-type="float">
            <text:p>60496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49966" calcext:value-type="float">
            <text:p>60499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0258" calcext:value-type="float">
            <text:p>60502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6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0532" calcext:value-type="float">
            <text:p>60505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1029" calcext:value-type="float">
            <text:p>60510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1311" calcext:value-type="float">
            <text:p>60513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6665" calcext:value-type="float">
            <text:p>60566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7227" calcext:value-type="float">
            <text:p>60572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7512" calcext:value-type="float">
            <text:p>60575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7793" calcext:value-type="float">
            <text:p>60577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69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8121" calcext:value-type="float">
            <text:p>60581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8399" calcext:value-type="float">
            <text:p>60583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8673" calcext:value-type="float">
            <text:p>60586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8943" calcext:value-type="float">
            <text:p>60589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9214" calcext:value-type="float">
            <text:p>60592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9498" calcext:value-type="float">
            <text:p>60594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59782" calcext:value-type="float">
            <text:p>60597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0065" calcext:value-type="float">
            <text:p>60600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3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0338" calcext:value-type="float">
            <text:p>60603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0614" calcext:value-type="float">
            <text:p>60606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0888" calcext:value-type="float">
            <text:p>60608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1201" calcext:value-type="float">
            <text:p>606120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1581" calcext:value-type="float">
            <text:p>60615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1857" calcext:value-type="float">
            <text:p>60618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2137" calcext:value-type="float">
            <text:p>60621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5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2430" calcext:value-type="float">
            <text:p>60624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2705" calcext:value-type="float">
            <text:p>60627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2977" calcext:value-type="float">
            <text:p>60629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3249" calcext:value-type="float">
            <text:p>60632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3522" calcext:value-type="float">
            <text:p>60635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3797" calcext:value-type="float">
            <text:p>60637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4080" calcext:value-type="float">
            <text:p>60640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4358" calcext:value-type="float">
            <text:p>60643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9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4632" calcext:value-type="float">
            <text:p>60646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7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4905" calcext:value-type="float">
            <text:p>60649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5178" calcext:value-type="float">
            <text:p>60651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9018" calcext:value-type="float">
            <text:p>60690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9521" calcext:value-type="float">
            <text:p>60695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69807" calcext:value-type="float">
            <text:p>60698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0088" calcext:value-type="float">
            <text:p>60700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2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0395" calcext:value-type="float">
            <text:p>60703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0891" calcext:value-type="float">
            <text:p>60708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1189" calcext:value-type="float">
            <text:p>60711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1464" calcext:value-type="float">
            <text:p>60714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1736" calcext:value-type="float">
            <text:p>60717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2021" calcext:value-type="float">
            <text:p>60720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2306" calcext:value-type="float">
            <text:p>60723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2588" calcext:value-type="float">
            <text:p>60725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5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2870" calcext:value-type="float">
            <text:p>60728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3145" calcext:value-type="float">
            <text:p>60731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3422" calcext:value-type="float">
            <text:p>60734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3777" calcext:value-type="float">
            <text:p>60737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4071" calcext:value-type="float">
            <text:p>60740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4348" calcext:value-type="float">
            <text:p>60743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4624" calcext:value-type="float">
            <text:p>60746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8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4914" calcext:value-type="float">
            <text:p>60749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5196" calcext:value-type="float">
            <text:p>60751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8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5469" calcext:value-type="float">
            <text:p>60754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5742" calcext:value-type="float">
            <text:p>60757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6017" calcext:value-type="float">
            <text:p>60760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6296" calcext:value-type="float">
            <text:p>60762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6580" calcext:value-type="float">
            <text:p>60765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6865" calcext:value-type="float">
            <text:p>60768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2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7140" calcext:value-type="float">
            <text:p>60771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7414" calcext:value-type="float">
            <text:p>60774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77689" calcext:value-type="float">
            <text:p>60776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1549" calcext:value-type="float">
            <text:p>60815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2056" calcext:value-type="float">
            <text:p>60820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2347" calcext:value-type="float">
            <text:p>60823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2628" calcext:value-type="float">
            <text:p>60826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4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2937" calcext:value-type="float">
            <text:p>60829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3216" calcext:value-type="float">
            <text:p>60832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3489" calcext:value-type="float">
            <text:p>60834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3763" calcext:value-type="float">
            <text:p>60837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4036" calcext:value-type="float">
            <text:p>60840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4321" calcext:value-type="float">
            <text:p>60843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4609" calcext:value-type="float">
            <text:p>60846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4893" calcext:value-type="float">
            <text:p>60848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8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5166" calcext:value-type="float">
            <text:p>60851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5439" calcext:value-type="float">
            <text:p>60854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5716" calcext:value-type="float">
            <text:p>60857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3 9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6018" calcext:value-type="float">
            <text:p>60860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6464" calcext:value-type="float">
            <text:p>60864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6742" calcext:value-type="float">
            <text:p>60867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7033" calcext:value-type="float">
            <text:p>608703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1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7323" calcext:value-type="float">
            <text:p>60873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7598" calcext:value-type="float">
            <text:p>60875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7869" calcext:value-type="float">
            <text:p>60878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8142" calcext:value-type="float">
            <text:p>60881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8416" calcext:value-type="float">
            <text:p>60884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8697" calcext:value-type="float">
            <text:p>60886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8978" calcext:value-type="float">
            <text:p>60889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9256" calcext:value-type="float">
            <text:p>60892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5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9529" calcext:value-type="float">
            <text:p>60895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89802" calcext:value-type="float">
            <text:p>60898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0077" calcext:value-type="float">
            <text:p>60900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4315" calcext:value-type="float">
            <text:p>60943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4828" calcext:value-type="float">
            <text:p>60948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5124" calcext:value-type="float">
            <text:p>60951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5403" calcext:value-type="float">
            <text:p>60954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7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5709" calcext:value-type="float">
            <text:p>60957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5984" calcext:value-type="float">
            <text:p>60959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6256" calcext:value-type="float">
            <text:p>60962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6534" calcext:value-type="float">
            <text:p>60965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0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6806" calcext:value-type="float">
            <text:p>60968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7087" calcext:value-type="float">
            <text:p>60970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7372" calcext:value-type="float">
            <text:p>60973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7654" calcext:value-type="float">
            <text:p>60976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1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7926" calcext:value-type="float">
            <text:p>60979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8199" calcext:value-type="float">
            <text:p>60981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8473" calcext:value-type="float">
            <text:p>60984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8811" calcext:value-type="float">
            <text:p>60988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9095" calcext:value-type="float">
            <text:p>60990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9366" calcext:value-type="float">
            <text:p>60993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9642" calcext:value-type="float">
            <text:p>60996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40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099929" calcext:value-type="float">
            <text:p>60999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0207" calcext:value-type="float">
            <text:p>610020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0485" calcext:value-type="float">
            <text:p>61004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0755" calcext:value-type="float">
            <text:p>61007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1032" calcext:value-type="float">
            <text:p>61010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1309" calcext:value-type="float">
            <text:p>61013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7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1592" calcext:value-type="float">
            <text:p>61015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7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1872" calcext:value-type="float">
            <text:p>61018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7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2149" calcext:value-type="float">
            <text:p>61021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2422" calcext:value-type="float">
            <text:p>61024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2699" calcext:value-type="float">
            <text:p>61026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6493" calcext:value-type="float">
            <text:p>61064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6999" calcext:value-type="float">
            <text:p>61069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1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7286" calcext:value-type="float">
            <text:p>61072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7565" calcext:value-type="float">
            <text:p>61075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04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7875" calcext:value-type="float">
            <text:p>61078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8152" calcext:value-type="float">
            <text:p>61081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8426" calcext:value-type="float">
            <text:p>61084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8699" calcext:value-type="float">
            <text:p>61086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8967" calcext:value-type="float">
            <text:p>61089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9249" calcext:value-type="float">
            <text:p>61092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3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9530" calcext:value-type="float">
            <text:p>61095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3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09811" calcext:value-type="float">
            <text:p>61098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43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0084" calcext:value-type="float">
            <text:p>61100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0360" calcext:value-type="float">
            <text:p>61103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0635" calcext:value-type="float">
            <text:p>61106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0929" calcext:value-type="float">
            <text:p>61109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1412" calcext:value-type="float">
            <text:p>61114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1690" calcext:value-type="float">
            <text:p>61116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1966" calcext:value-type="float">
            <text:p>61119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68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2257" calcext:value-type="float">
            <text:p>61122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7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2535" calcext:value-type="float">
            <text:p>61125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8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2815" calcext:value-type="float">
            <text:p>61128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8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3085" calcext:value-type="float">
            <text:p>61130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9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3363" calcext:value-type="float">
            <text:p>61133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9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3638" calcext:value-type="float">
            <text:p>61136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29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3920" calcext:value-type="float">
            <text:p>61139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0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4482" calcext:value-type="float">
            <text:p>61144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0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4762" calcext:value-type="float">
            <text:p>61147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5038" calcext:value-type="float">
            <text:p>61150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5335" calcext:value-type="float">
            <text:p>61153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9229" calcext:value-type="float">
            <text:p>61192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19743" calcext:value-type="float">
            <text:p>61197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0031" calcext:value-type="float">
            <text:p>612003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0310" calcext:value-type="float">
            <text:p>61203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32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0619" calcext:value-type="float">
            <text:p>61206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4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0895" calcext:value-type="float">
            <text:p>612089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4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1170" calcext:value-type="float">
            <text:p>61211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5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1458" calcext:value-type="float">
            <text:p>61214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5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1728" calcext:value-type="float">
            <text:p>61217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2152" calcext:value-type="float">
            <text:p>61221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2444" calcext:value-type="float">
            <text:p>61224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2737" calcext:value-type="float">
            <text:p>61227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71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3013" calcext:value-type="float">
            <text:p>612301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3287" calcext:value-type="float">
            <text:p>61232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3561" calcext:value-type="float">
            <text:p>61235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3865" calcext:value-type="float">
            <text:p>61238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4165" calcext:value-type="float">
            <text:p>61241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4439" calcext:value-type="float">
            <text:p>61244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4716" calcext:value-type="float">
            <text:p>61247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396, Length: 1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5005" calcext:value-type="float">
            <text:p>61250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0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5279" calcext:value-type="float">
            <text:p>61252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1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5552" calcext:value-type="float">
            <text:p>61255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1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5823" calcext:value-type="float">
            <text:p>61258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1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6094" calcext:value-type="float">
            <text:p>612609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2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6383" calcext:value-type="float">
            <text:p>61263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2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6663" calcext:value-type="float">
            <text:p>61266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3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6941" calcext:value-type="float">
            <text:p>612694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3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7217" calcext:value-type="float">
            <text:p>61272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7489" calcext:value-type="float">
            <text:p>61274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27762" calcext:value-type="float">
            <text:p>61277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1947" calcext:value-type="float">
            <text:p>61319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2438" calcext:value-type="float">
            <text:p>61324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2724" calcext:value-type="float">
            <text:p>61327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3171" calcext:value-type="float">
            <text:p>613317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3460" calcext:value-type="float">
            <text:p>61334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3739" calcext:value-type="float">
            <text:p>61337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4014" calcext:value-type="float">
            <text:p>61340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4289" calcext:value-type="float">
            <text:p>61342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4563" calcext:value-type="float">
            <text:p>61345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4838" calcext:value-type="float">
            <text:p>61348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5109" calcext:value-type="float">
            <text:p>61351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5384" calcext:value-type="float">
            <text:p>61353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5657" calcext:value-type="float">
            <text:p>613565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4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5940" calcext:value-type="float">
            <text:p>61359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6215" calcext:value-type="float">
            <text:p>61362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6488" calcext:value-type="float">
            <text:p>61364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6762" calcext:value-type="float">
            <text:p>61367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7039" calcext:value-type="float">
            <text:p>613703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7316" calcext:value-type="float">
            <text:p>613731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7588" calcext:value-type="float">
            <text:p>61375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7862" calcext:value-type="float">
            <text:p>61378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8140" calcext:value-type="float">
            <text:p>61381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8415" calcext:value-type="float">
            <text:p>61384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8696" calcext:value-type="float">
            <text:p>613869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8968" calcext:value-type="float">
            <text:p>61389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9242" calcext:value-type="float">
            <text:p>61392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9514" calcext:value-type="float">
            <text:p>61395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39789" calcext:value-type="float">
            <text:p>61397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0062" calcext:value-type="float">
            <text:p>61400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0337" calcext:value-type="float">
            <text:p>61403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0610" calcext:value-type="float">
            <text:p>614061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0885" calcext:value-type="float">
            <text:p>61408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1162" calcext:value-type="float">
            <text:p>61411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1434" calcext:value-type="float">
            <text:p>61414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1709" calcext:value-type="float">
            <text:p>61417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1981" calcext:value-type="float">
            <text:p>61419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2254" calcext:value-type="float">
            <text:p>61422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2529" calcext:value-type="float">
            <text:p>614252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5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2802" calcext:value-type="float">
            <text:p>61428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3075" calcext:value-type="float">
            <text:p>61430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3348" calcext:value-type="float">
            <text:p>61433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3622" calcext:value-type="float">
            <text:p>61436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3897" calcext:value-type="float">
            <text:p>61438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4177" calcext:value-type="float">
            <text:p>61441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4451" calcext:value-type="float">
            <text:p>61444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4724" calcext:value-type="float">
            <text:p>61447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4997" calcext:value-type="float">
            <text:p>61449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5270" calcext:value-type="float">
            <text:p>61452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5542" calcext:value-type="float">
            <text:p>61455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5814" calcext:value-type="float">
            <text:p>614581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6088" calcext:value-type="float">
            <text:p>61460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6364" calcext:value-type="float">
            <text:p>61463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6636" calcext:value-type="float">
            <text:p>614663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6917" calcext:value-type="float">
            <text:p>61469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7189" calcext:value-type="float">
            <text:p>614718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7463" calcext:value-type="float">
            <text:p>61474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7735" calcext:value-type="float">
            <text:p>614773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8009" calcext:value-type="float">
            <text:p>614800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8284" calcext:value-type="float">
            <text:p>61482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8559" calcext:value-type="float">
            <text:p>61485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8832" calcext:value-type="float">
            <text:p>61488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9108" calcext:value-type="float">
            <text:p>61491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9382" calcext:value-type="float">
            <text:p>61493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6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49782" calcext:value-type="float">
            <text:p>61497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0073" calcext:value-type="float">
            <text:p>61500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0356" calcext:value-type="float">
            <text:p>61503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0630" calcext:value-type="float">
            <text:p>61506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0904" calcext:value-type="float">
            <text:p>61509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1178" calcext:value-type="float">
            <text:p>61511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1611" calcext:value-type="float">
            <text:p>615161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1904" calcext:value-type="float">
            <text:p>61519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2176" calcext:value-type="float">
            <text:p>61521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2455" calcext:value-type="float">
            <text:p>615245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2727" calcext:value-type="float">
            <text:p>61527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2998" calcext:value-type="float">
            <text:p>61529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3270" calcext:value-type="float">
            <text:p>61532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3542" calcext:value-type="float">
            <text:p>61535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3823" calcext:value-type="float">
            <text:p>61538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4099" calcext:value-type="float">
            <text:p>615409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4372" calcext:value-type="float">
            <text:p>615437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4645" calcext:value-type="float">
            <text:p>61546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4919" calcext:value-type="float">
            <text:p>61549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5190" calcext:value-type="float">
            <text:p>61551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5470" calcext:value-type="float">
            <text:p>61554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5744" calcext:value-type="float">
            <text:p>61557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8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6017" calcext:value-type="float">
            <text:p>615601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6287" calcext:value-type="float">
            <text:p>61562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6559" calcext:value-type="float">
            <text:p>61565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7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6832" calcext:value-type="float">
            <text:p>61568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7105" calcext:value-type="float">
            <text:p>61571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7375" calcext:value-type="float">
            <text:p>61573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7647" calcext:value-type="float">
            <text:p>61576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7918" calcext:value-type="float">
            <text:p>615791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8188" calcext:value-type="float">
            <text:p>61581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8460" calcext:value-type="float">
            <text:p>61584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8732" calcext:value-type="float">
            <text:p>61587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2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9004" calcext:value-type="float">
            <text:p>61590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3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9277" calcext:value-type="float">
            <text:p>615927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3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9549" calcext:value-type="float">
            <text:p>61595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4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59820" calcext:value-type="float">
            <text:p>61598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4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0091" calcext:value-type="float">
            <text:p>616009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4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0432" calcext:value-type="float">
            <text:p>61604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5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0703" calcext:value-type="float">
            <text:p>61607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5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0981" calcext:value-type="float">
            <text:p>61609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6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1253" calcext:value-type="float">
            <text:p>61612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6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1526" calcext:value-type="float">
            <text:p>61615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1798" calcext:value-type="float">
            <text:p>61617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2080" calcext:value-type="float">
            <text:p>616208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7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2364" calcext:value-type="float">
            <text:p>61623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88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2704" calcext:value-type="float">
            <text:p>61627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91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2990" calcext:value-type="float">
            <text:p>61629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94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3276" calcext:value-type="float">
            <text:p>61632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4 97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3561" calcext:value-type="float">
            <text:p>616356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00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3859" calcext:value-type="float">
            <text:p>61638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04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4146" calcext:value-type="float">
            <text:p>616414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07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4428" calcext:value-type="float">
            <text:p>61644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10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4712" calcext:value-type="float">
            <text:p>61647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13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5004" calcext:value-type="float">
            <text:p>61650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16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5292" calcext:value-type="float">
            <text:p>616529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20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5579" calcext:value-type="float">
            <text:p>61655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23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5862" calcext:value-type="float">
            <text:p>61658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26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6162" calcext:value-type="float">
            <text:p>61661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29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6454" calcext:value-type="float">
            <text:p>61664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32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6745" calcext:value-type="float">
            <text:p>61667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36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7027" calcext:value-type="float">
            <text:p>616702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39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7337" calcext:value-type="float">
            <text:p>616733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42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7621" calcext:value-type="float">
            <text:p>61676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45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7904" calcext:value-type="float">
            <text:p>616790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48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8188" calcext:value-type="float">
            <text:p>616818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52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8482" calcext:value-type="float">
            <text:p>61684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55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8768" calcext:value-type="float">
            <text:p>616876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58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9056" calcext:value-type="float">
            <text:p>616905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61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9340" calcext:value-type="float">
            <text:p>616934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64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9638" calcext:value-type="float">
            <text:p>61696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68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69921" calcext:value-type="float">
            <text:p>61699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71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0206" calcext:value-type="float">
            <text:p>61702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74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0487" calcext:value-type="float">
            <text:p>617048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77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0776" calcext:value-type="float">
            <text:p>61707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80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1058" calcext:value-type="float">
            <text:p>61710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84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1467" calcext:value-type="float">
            <text:p>61714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87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1773" calcext:value-type="float">
            <text:p>617177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90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2074" calcext:value-type="float">
            <text:p>617207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93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2360" calcext:value-type="float">
            <text:p>617236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5 96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2642" calcext:value-type="float">
            <text:p>61726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00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2923" calcext:value-type="float">
            <text:p>617292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03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3219" calcext:value-type="float">
            <text:p>617321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06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3502" calcext:value-type="float">
            <text:p>61735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09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3783" calcext:value-type="float">
            <text:p>617378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12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4151" calcext:value-type="float">
            <text:p>61741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16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4454" calcext:value-type="float">
            <text:p>61744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19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4743" calcext:value-type="float">
            <text:p>617474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22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5024" calcext:value-type="float">
            <text:p>61750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25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5306" calcext:value-type="float">
            <text:p>61753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28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5602" calcext:value-type="float">
            <text:p>61756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32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5890" calcext:value-type="float">
            <text:p>61758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35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6176" calcext:value-type="float">
            <text:p>61761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38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6458" calcext:value-type="float">
            <text:p>617645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416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6750" calcext:value-type="float">
            <text:p>617675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448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7034" calcext:value-type="float">
            <text:p>61770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480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7320" calcext:value-type="float">
            <text:p>61773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12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77606" calcext:value-type="float">
            <text:p>61776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44, Length: 3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88403" calcext:value-type="float">
            <text:p>61884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76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89298" calcext:value-type="float">
            <text:p>61892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78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89686" calcext:value-type="float">
            <text:p>618968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8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0145" calcext:value-type="float">
            <text:p>619014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84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0522" calcext:value-type="float">
            <text:p>619052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86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0912" calcext:value-type="float">
            <text:p>619091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88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1259" calcext:value-type="float">
            <text:p>61912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1681" calcext:value-type="float">
            <text:p>619168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94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2105" calcext:value-type="float">
            <text:p>61921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59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2493" calcext:value-type="float">
            <text:p>619249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0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2885" calcext:value-type="float">
            <text:p>61928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0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3269" calcext:value-type="float">
            <text:p>619326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0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3665" calcext:value-type="float">
            <text:p>61936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1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4053" calcext:value-type="float">
            <text:p>619405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1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4447" calcext:value-type="float">
            <text:p>61944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20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4815" calcext:value-type="float">
            <text:p>61948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2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5165" calcext:value-type="float">
            <text:p>61951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2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5530" calcext:value-type="float">
            <text:p>619553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3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5890" calcext:value-type="float">
            <text:p>619589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3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6265" calcext:value-type="float">
            <text:p>61962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3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6667" calcext:value-type="float">
            <text:p>619666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4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7084" calcext:value-type="float">
            <text:p>619708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46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7478" calcext:value-type="float">
            <text:p>61974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48, Length: 2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7866" calcext:value-type="float">
            <text:p>619786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5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8249" calcext:value-type="float">
            <text:p>61982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5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8634" calcext:value-type="float">
            <text:p>619863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5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199020" calcext:value-type="float">
            <text:p>619902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6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1447" calcext:value-type="float">
            <text:p>62014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66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2205" calcext:value-type="float">
            <text:p>620220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6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2563" calcext:value-type="float">
            <text:p>620256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71, Length: 16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2844" calcext:value-type="float">
            <text:p>620284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8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3121" calcext:value-type="float">
            <text:p>62031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8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3403" calcext:value-type="float">
            <text:p>62034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9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3678" calcext:value-type="float">
            <text:p>62036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96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3954" calcext:value-type="float">
            <text:p>620395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69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4228" calcext:value-type="float">
            <text:p>620422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0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4502" calcext:value-type="float">
            <text:p>620450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05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4775" calcext:value-type="float">
            <text:p>620477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0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5049" calcext:value-type="float">
            <text:p>620504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1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5324" calcext:value-type="float">
            <text:p>62053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1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05600" calcext:value-type="float">
            <text:p>620560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18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4803" calcext:value-type="float">
            <text:p>6214803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19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5415" calcext:value-type="float">
            <text:p>621541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2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5751" calcext:value-type="float">
            <text:p>621575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2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6070" calcext:value-type="float">
            <text:p>62160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28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6347" calcext:value-type="float">
            <text:p>621634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2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6679" calcext:value-type="float">
            <text:p>621667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4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6952" calcext:value-type="float">
            <text:p>621695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4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7224" calcext:value-type="float">
            <text:p>621722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5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7498" calcext:value-type="float">
            <text:p>621749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5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7776" calcext:value-type="float">
            <text:p>621777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58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8426" calcext:value-type="float">
            <text:p>62184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59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8708" calcext:value-type="float">
            <text:p>621870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63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8982" calcext:value-type="float">
            <text:p>621898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67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9265" calcext:value-type="float">
            <text:p>62192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68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19826" calcext:value-type="float">
            <text:p>621982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72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0238" calcext:value-type="float">
            <text:p>62202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76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1170" calcext:value-type="float">
            <text:p>6221170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77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1759" calcext:value-type="float">
            <text:p>6221759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81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2197" calcext:value-type="float">
            <text:p>6222197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85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2606" calcext:value-type="float">
            <text:p>6222606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86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3021" calcext:value-type="float">
            <text:p>6223021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90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3448" calcext:value-type="float">
            <text:p>622344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94, Length: 4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3862" calcext:value-type="float">
            <text:p>622386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Read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Offset: 976 798, Length: 1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5078" calcext:value-type="float">
            <text:p>622507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Basic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reationTime: 06.06.2026 13:21:48, LastAccessTime: 06.06.2026 13:34:46, LastWriteTime: 05.07.2022 12:36:38, ChangeTime: 06.06.2026 13:30:04, FileAttributes: 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26442" calcext:value-type="float">
            <text:p>622644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Standard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llocationSize: 978 944, EndOfFile: 976 799, NumberOfLinks: 1, DeletePending: False, Directory: False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34164" calcext:value-type="float">
            <text:p>6234164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reat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37438" calcext:value-type="float">
            <text:p>6237438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Basic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reationTime: 06.06.2026 13:21:48, LastAccessTime: 06.06.2026 13:34:46, LastWriteTime: 05.07.2022 12:36:38, ChangeTime: 06.06.2026 13:30:04, FileAttributes: A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6237932" calcext:value-type="float">
            <text:p>6237932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los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7384985" calcext:value-type="float">
            <text:p>73849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StandardInformation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llocationSize: 978 944, EndOfFile: 976 799, NumberOfLinks: 1, DeletePending: False, Directory: False</text:p>
          </table:table-cell>
          <table:table-cell table:number-columns-repeated="1016"/>
        </table:table-row>
        <table:table-row table:style-name="ro1">
          <table:table-cell table:style-name="ce2" office:value-type="time" office:time-value="PT13H34M46S" calcext:value-type="time">
            <text:p>13:34:46</text:p>
          </table:table-cell>
          <table:table-cell office:value-type="float" office:value="7385685" calcext:value-type="float">
            <text:p>738568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CloseFile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13H34M47S" calcext:value-type="time">
            <text:p>13:34:47</text:p>
          </table:table-cell>
          <table:table-cell office:value-type="float" office:value="2130965" calcext:value-type="float">
            <text:p>2130965</text:p>
          </table:table-cell>
          <table:table-cell office:value-type="string" calcext:value-type="string">
            <text:p>mmf2u.exe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Users\mw\Downloads\MFA\white2.m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ileInformationClass: FileIdBothDirectoryInformation, Filter: white2.mfa, 2: white2.mfa</text:p>
          </table:table-cell>
          <table:table-cell table:number-columns-repeated="1016"/>
        </table:table-row>
        <table:table-row table:style-name="ro1" table:number-rows-repeated="10470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" table:style-name="ta1"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ffset HEX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 at Offset (length)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ext offs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C2])" office:value-type="string" office:string-value="4" calcext:value-type="string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C3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C4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C5]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C6])" office:value-type="string" office:string-value="14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C7])" office:value-type="string" office:string-value="30" calcext:value-type="string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C8])" office:value-type="string" office:string-value="34" calcext:value-type="string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C9])" office:value-type="string" office:string-value="54" calcext:value-type="string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C10])" office:value-type="string" office:string-value="58" calcext:value-type="string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C11])" office:value-type="string" office:string-value="B1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1834" calcext:value-type="float">
            <text:p>1834</text:p>
          </table:table-cell>
          <table:table-cell table:formula="of:=HEX2DEC([.E11])" office:value-type="float" office:value="6196" calcext:value-type="float">
            <text:p>6196</text:p>
          </table:table-cell>
          <table:table-cell table:formula="of:=[.F11]+[.C11]+[.D11]" office:value-type="float" office:value="6377" calcext:value-type="float">
            <text:p>637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C12])" office:value-type="string" office:string-value="18E9" calcext:value-type="string">
            <text:p>18E9</text:p>
          </table:table-cell>
          <table:table-cell office:value-type="float" office:value="6377" calcext:value-type="float">
            <text:p>6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FN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C13])" office:value-type="string" office:string-value="18ED" calcext:value-type="string">
            <text:p>18ED</text:p>
          </table:table-cell>
          <table:table-cell office:value-type="float" office:value="6381" calcext:value-type="float">
            <text:p>6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C14])" office:value-type="string" office:string-value="18F1" calcext:value-type="string">
            <text:p>18F1</text:p>
          </table:table-cell>
          <table:table-cell office:value-type="float" office:value="6385" calcext:value-type="float">
            <text:p>6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M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C15])" office:value-type="string" office:string-value="18F5" calcext:value-type="string">
            <text:p>18F5</text:p>
          </table:table-cell>
          <table:table-cell office:value-type="float" office:value="6389" calcext:value-type="float">
            <text:p>6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C16])" office:value-type="string" office:string-value="18F9" calcext:value-type="string">
            <text:p>18F9</text:p>
          </table:table-cell>
          <table:table-cell office:value-type="float" office:value="6393" calcext:value-type="float">
            <text:p>63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UM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C17])" office:value-type="string" office:string-value="18FD" calcext:value-type="string">
            <text:p>18FD</text:p>
          </table:table-cell>
          <table:table-cell office:value-type="float" office:value="6397" calcext:value-type="float">
            <text:p>63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C18])" office:value-type="string" office:string-value="1901" calcext:value-type="string">
            <text:p>1901</text:p>
          </table:table-cell>
          <table:table-cell office:value-type="float" office:value="6401" calcext:value-type="float">
            <text:p>6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MI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C19])" office:value-type="string" office:string-value="1905" calcext:value-type="string">
            <text:p>1905</text:p>
          </table:table-cell>
          <table:table-cell office:value-type="float" office:value="6405" calcext:value-type="float">
            <text:p>64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C20])" office:value-type="string" office:string-value="1909" calcext:value-type="string">
            <text:p>1909</text:p>
          </table:table-cell>
          <table:table-cell office:value-type="float" office:value="6409" calcext:value-type="float">
            <text:p>64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????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C21])" office:value-type="string" office:string-value="1D0D" calcext:value-type="string">
            <text:p>1D0D</text:p>
          </table:table-cell>
          <table:table-cell office:value-type="float" office:value="7437" calcext:value-type="float">
            <text:p>743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C22])" office:value-type="string" office:string-value="1D11" calcext:value-type="string">
            <text:p>1D11</text:p>
          </table:table-cell>
          <table:table-cell office:value-type="float" office:value="7441" calcext:value-type="float">
            <text:p>744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C23])" office:value-type="string" office:string-value="1D15" calcext:value-type="string">
            <text:p>1D15</text:p>
          </table:table-cell>
          <table:table-cell office:value-type="float" office:value="7445" calcext:value-type="float">
            <text:p>744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C24])" office:value-type="string" office:string-value="1D35" calcext:value-type="string">
            <text:p>1D35</text:p>
          </table:table-cell>
          <table:table-cell office:value-type="float" office:value="7477" calcext:value-type="float">
            <text:p>7477</text:p>
          </table:table-cell>
          <table:table-cell office:value-type="float" office:value="6912" calcext:value-type="float">
            <text:p>691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C25])" office:value-type="string" office:string-value="3835" calcext:value-type="string">
            <text:p>3835</text:p>
          </table:table-cell>
          <table:table-cell office:value-type="float" office:value="14389" calcext:value-type="float">
            <text:p>1438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C26])" office:value-type="string" office:string-value="3839" calcext:value-type="string">
            <text:p>3839</text:p>
          </table:table-cell>
          <table:table-cell office:value-type="float" office:value="14393" calcext:value-type="float">
            <text:p>14393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C27])" office:value-type="string" office:string-value="3859" calcext:value-type="string">
            <text:p>3859</text:p>
          </table:table-cell>
          <table:table-cell office:value-type="float" office:value="14425" calcext:value-type="float">
            <text:p>14425</text:p>
          </table:table-cell>
          <table:table-cell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C28])" office:value-type="string" office:string-value="4459" calcext:value-type="string">
            <text:p>4459</text:p>
          </table:table-cell>
          <table:table-cell office:value-type="float" office:value="17497" calcext:value-type="float">
            <text:p>1749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C29])" office:value-type="string" office:string-value="445D" calcext:value-type="string">
            <text:p>445D</text:p>
          </table:table-cell>
          <table:table-cell office:value-type="float" office:value="17501" calcext:value-type="float">
            <text:p>1750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C30])" office:value-type="string" office:string-value="447D" calcext:value-type="string">
            <text:p>447D</text:p>
          </table:table-cell>
          <table:table-cell office:value-type="float" office:value="17533" calcext:value-type="float">
            <text:p>17533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C31])" office:value-type="string" office:string-value="477D" calcext:value-type="string">
            <text:p>477D</text:p>
          </table:table-cell>
          <table:table-cell office:value-type="float" office:value="18301" calcext:value-type="float">
            <text:p>1830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C32])" office:value-type="string" office:string-value="4781" calcext:value-type="string">
            <text:p>4781</text:p>
          </table:table-cell>
          <table:table-cell office:value-type="float" office:value="18305" calcext:value-type="float">
            <text:p>1830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C33])" office:value-type="string" office:string-value="47A1" calcext:value-type="string">
            <text:p>47A1</text:p>
          </table:table-cell>
          <table:table-cell office:value-type="float" office:value="18337" calcext:value-type="float">
            <text:p>18337</text:p>
          </table:table-cell>
          <table:table-cell office:value-type="float" office:value="1560" calcext:value-type="float">
            <text:p>1560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C34])" office:value-type="string" office:string-value="4DB9" calcext:value-type="string">
            <text:p>4DB9</text:p>
          </table:table-cell>
          <table:table-cell office:value-type="float" office:value="19897" calcext:value-type="float">
            <text:p>1989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C35])" office:value-type="string" office:string-value="4DBD" calcext:value-type="string">
            <text:p>4DBD</text:p>
          </table:table-cell>
          <table:table-cell office:value-type="float" office:value="19901" calcext:value-type="float">
            <text:p>1990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C36])" office:value-type="string" office:string-value="4DDD" calcext:value-type="string">
            <text:p>4DDD</text:p>
          </table:table-cell>
          <table:table-cell office:value-type="float" office:value="19933" calcext:value-type="float">
            <text:p>19933</text:p>
          </table:table-cell>
          <table:table-cell office:value-type="float" office:value="894" calcext:value-type="float">
            <text:p>89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C37])" office:value-type="string" office:string-value="515B" calcext:value-type="string">
            <text:p>515B</text:p>
          </table:table-cell>
          <table:table-cell office:value-type="float" office:value="20827" calcext:value-type="float">
            <text:p>2082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C38])" office:value-type="string" office:string-value="515F" calcext:value-type="string">
            <text:p>515F</text:p>
          </table:table-cell>
          <table:table-cell office:value-type="float" office:value="20831" calcext:value-type="float">
            <text:p>2083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C39])" office:value-type="string" office:string-value="517F" calcext:value-type="string">
            <text:p>517F</text:p>
          </table:table-cell>
          <table:table-cell office:value-type="float" office:value="20863" calcext:value-type="float">
            <text:p>20863</text:p>
          </table:table-cell>
          <table:table-cell office:value-type="float" office:value="310" calcext:value-type="float">
            <text:p>31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C40])" office:value-type="string" office:string-value="52B5" calcext:value-type="string">
            <text:p>52B5</text:p>
          </table:table-cell>
          <table:table-cell office:value-type="float" office:value="21173" calcext:value-type="float">
            <text:p>2117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C41])" office:value-type="string" office:string-value="52B9" calcext:value-type="string">
            <text:p>52B9</text:p>
          </table:table-cell>
          <table:table-cell office:value-type="float" office:value="21177" calcext:value-type="float">
            <text:p>2117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C42])" office:value-type="string" office:string-value="52D9" calcext:value-type="string">
            <text:p>52D9</text:p>
          </table:table-cell>
          <table:table-cell office:value-type="float" office:value="21209" calcext:value-type="float">
            <text:p>21209</text:p>
          </table:table-cell>
          <table:table-cell office:value-type="float" office:value="886" calcext:value-type="float">
            <text:p>88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C43])" office:value-type="string" office:string-value="564F" calcext:value-type="string">
            <text:p>564F</text:p>
          </table:table-cell>
          <table:table-cell office:value-type="float" office:value="22095" calcext:value-type="float">
            <text:p>2209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C44])" office:value-type="string" office:string-value="5653" calcext:value-type="string">
            <text:p>5653</text:p>
          </table:table-cell>
          <table:table-cell office:value-type="float" office:value="22099" calcext:value-type="float">
            <text:p>2209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C45])" office:value-type="string" office:string-value="5673" calcext:value-type="string">
            <text:p>5673</text:p>
          </table:table-cell>
          <table:table-cell office:value-type="float" office:value="22131" calcext:value-type="float">
            <text:p>22131</text:p>
          </table:table-cell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C46])" office:value-type="string" office:string-value="5899" calcext:value-type="string">
            <text:p>5899</text:p>
          </table:table-cell>
          <table:table-cell office:value-type="float" office:value="22681" calcext:value-type="float">
            <text:p>2268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C47])" office:value-type="string" office:string-value="589D" calcext:value-type="string">
            <text:p>589D</text:p>
          </table:table-cell>
          <table:table-cell office:value-type="float" office:value="22685" calcext:value-type="float">
            <text:p>2268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C48])" office:value-type="string" office:string-value="58BD" calcext:value-type="string">
            <text:p>58BD</text:p>
          </table:table-cell>
          <table:table-cell office:value-type="float" office:value="22717" calcext:value-type="float">
            <text:p>2271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kipped until here (15440)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C49])" office:value-type="string" office:string-value="59C1" calcext:value-type="string">
            <text:p>59C1</text:p>
          </table:table-cell>
          <table:table-cell office:value-type="float" office:value="22977" calcext:value-type="float">
            <text:p>2297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C50])" office:value-type="string" office:string-value="59C5" calcext:value-type="string">
            <text:p>59C5</text:p>
          </table:table-cell>
          <table:table-cell office:value-type="float" office:value="22981" calcext:value-type="float">
            <text:p>2298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C51])" office:value-type="string" office:string-value="59E5" calcext:value-type="string">
            <text:p>59E5</text:p>
          </table:table-cell>
          <table:table-cell office:value-type="float" office:value="23013" calcext:value-type="float">
            <text:p>23013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C52])" office:value-type="string" office:string-value="5A67" calcext:value-type="string">
            <text:p>5A67</text:p>
          </table:table-cell>
          <table:table-cell office:value-type="float" office:value="23143" calcext:value-type="float">
            <text:p>2314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C53])" office:value-type="string" office:string-value="5A6B" calcext:value-type="string">
            <text:p>5A6B</text:p>
          </table:table-cell>
          <table:table-cell office:value-type="float" office:value="23147" calcext:value-type="float">
            <text:p>2314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C54])" office:value-type="string" office:string-value="5A8B" calcext:value-type="string">
            <text:p>5A8B</text:p>
          </table:table-cell>
          <table:table-cell office:value-type="float" office:value="23179" calcext:value-type="float">
            <text:p>23179</text:p>
          </table:table-cell>
          <table:table-cell office:value-type="float" office:value="861" calcext:value-type="float">
            <text:p>861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C55])" office:value-type="string" office:string-value="5DE8" calcext:value-type="string">
            <text:p>5DE8</text:p>
          </table:table-cell>
          <table:table-cell office:value-type="float" office:value="24040" calcext:value-type="float">
            <text:p>2404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C56])" office:value-type="string" office:string-value="5DEC" calcext:value-type="string">
            <text:p>5DEC</text:p>
          </table:table-cell>
          <table:table-cell office:value-type="float" office:value="24044" calcext:value-type="float">
            <text:p>2404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C57])" office:value-type="string" office:string-value="5E0C" calcext:value-type="string">
            <text:p>5E0C</text:p>
          </table:table-cell>
          <table:table-cell office:value-type="float" office:value="24076" calcext:value-type="float">
            <text:p>24076</text:p>
          </table:table-cell>
          <table:table-cell office:value-type="float" office:value="597" calcext:value-type="float">
            <text:p>597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C58])" office:value-type="string" office:string-value="6061" calcext:value-type="string">
            <text:p>6061</text:p>
          </table:table-cell>
          <table:table-cell office:value-type="float" office:value="24673" calcext:value-type="float">
            <text:p>2467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C59])" office:value-type="string" office:string-value="6065" calcext:value-type="string">
            <text:p>6065</text:p>
          </table:table-cell>
          <table:table-cell office:value-type="float" office:value="24677" calcext:value-type="float">
            <text:p>2467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C60])" office:value-type="string" office:string-value="6085" calcext:value-type="string">
            <text:p>6085</text:p>
          </table:table-cell>
          <table:table-cell office:value-type="float" office:value="24709" calcext:value-type="float">
            <text:p>24709</text:p>
          </table:table-cell>
          <table:table-cell office:value-type="float" office:value="523" calcext:value-type="float">
            <text:p>52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C61])" office:value-type="string" office:string-value="6290" calcext:value-type="string">
            <text:p>6290</text:p>
          </table:table-cell>
          <table:table-cell office:value-type="float" office:value="25232" calcext:value-type="float">
            <text:p>2523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C62])" office:value-type="string" office:string-value="6294" calcext:value-type="string">
            <text:p>6294</text:p>
          </table:table-cell>
          <table:table-cell office:value-type="float" office:value="25236" calcext:value-type="float">
            <text:p>2523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C63])" office:value-type="string" office:string-value="62B4" calcext:value-type="string">
            <text:p>62B4</text:p>
          </table:table-cell>
          <table:table-cell office:value-type="float" office:value="25268" calcext:value-type="float">
            <text:p>25268</text:p>
          </table:table-cell>
          <table:table-cell office:value-type="float" office:value="597" calcext:value-type="float">
            <text:p>597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C64])" office:value-type="string" office:string-value="6509" calcext:value-type="string">
            <text:p>6509</text:p>
          </table:table-cell>
          <table:table-cell office:value-type="float" office:value="25865" calcext:value-type="float">
            <text:p>258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C65])" office:value-type="string" office:string-value="650D" calcext:value-type="string">
            <text:p>650D</text:p>
          </table:table-cell>
          <table:table-cell office:value-type="float" office:value="25869" calcext:value-type="float">
            <text:p>2586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C66])" office:value-type="string" office:string-value="652D" calcext:value-type="string">
            <text:p>652D</text:p>
          </table:table-cell>
          <table:table-cell office:value-type="float" office:value="25901" calcext:value-type="float">
            <text:p>25901</text:p>
          </table:table-cell>
          <table:table-cell office:value-type="float" office:value="560" calcext:value-type="float">
            <text:p>560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C67])" office:value-type="string" office:string-value="675D" calcext:value-type="string">
            <text:p>675D</text:p>
          </table:table-cell>
          <table:table-cell office:value-type="float" office:value="26461" calcext:value-type="float">
            <text:p>2646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C68])" office:value-type="string" office:string-value="6761" calcext:value-type="string">
            <text:p>6761</text:p>
          </table:table-cell>
          <table:table-cell office:value-type="float" office:value="26465" calcext:value-type="float">
            <text:p>2646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C69])" office:value-type="string" office:string-value="6781" calcext:value-type="string">
            <text:p>6781</text:p>
          </table:table-cell>
          <table:table-cell office:value-type="float" office:value="26497" calcext:value-type="float">
            <text:p>26497</text:p>
          </table:table-cell>
          <table:table-cell office:value-type="float" office:value="494" calcext:value-type="float">
            <text:p>49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C70])" office:value-type="string" office:string-value="696F" calcext:value-type="string">
            <text:p>696F</text:p>
          </table:table-cell>
          <table:table-cell office:value-type="float" office:value="26991" calcext:value-type="float">
            <text:p>2699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C71])" office:value-type="string" office:string-value="6973" calcext:value-type="string">
            <text:p>6973</text:p>
          </table:table-cell>
          <table:table-cell office:value-type="float" office:value="26995" calcext:value-type="float">
            <text:p>2699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C72])" office:value-type="string" office:string-value="6993" calcext:value-type="string">
            <text:p>6993</text:p>
          </table:table-cell>
          <table:table-cell office:value-type="float" office:value="27027" calcext:value-type="float">
            <text:p>27027</text:p>
          </table:table-cell>
          <table:table-cell office:value-type="float" office:value="583" calcext:value-type="float">
            <text:p>58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C73])" office:value-type="string" office:string-value="6BDA" calcext:value-type="string">
            <text:p>6BDA</text:p>
          </table:table-cell>
          <table:table-cell office:value-type="float" office:value="27610" calcext:value-type="float">
            <text:p>276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C74])" office:value-type="string" office:string-value="6BDE" calcext:value-type="string">
            <text:p>6BDE</text:p>
          </table:table-cell>
          <table:table-cell office:value-type="float" office:value="27614" calcext:value-type="float">
            <text:p>2761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C75])" office:value-type="string" office:string-value="6BFE" calcext:value-type="string">
            <text:p>6BFE</text:p>
          </table:table-cell>
          <table:table-cell office:value-type="float" office:value="27646" calcext:value-type="float">
            <text:p>27646</text:p>
          </table:table-cell>
          <table:table-cell office:value-type="float" office:value="585" calcext:value-type="float">
            <text:p>585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C76])" office:value-type="string" office:string-value="6E47" calcext:value-type="string">
            <text:p>6E47</text:p>
          </table:table-cell>
          <table:table-cell office:value-type="float" office:value="28231" calcext:value-type="float">
            <text:p>2823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C77])" office:value-type="string" office:string-value="6E4B" calcext:value-type="string">
            <text:p>6E4B</text:p>
          </table:table-cell>
          <table:table-cell office:value-type="float" office:value="28235" calcext:value-type="float">
            <text:p>2823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C78])" office:value-type="string" office:string-value="6E6B" calcext:value-type="string">
            <text:p>6E6B</text:p>
          </table:table-cell>
          <table:table-cell office:value-type="float" office:value="28267" calcext:value-type="float">
            <text:p>28267</text:p>
          </table:table-cell>
          <table:table-cell office:value-type="float" office:value="597" calcext:value-type="float">
            <text:p>59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C79])" office:value-type="string" office:string-value="70C0" calcext:value-type="string">
            <text:p>70C0</text:p>
          </table:table-cell>
          <table:table-cell office:value-type="float" office:value="28864" calcext:value-type="float">
            <text:p>2886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C80])" office:value-type="string" office:string-value="70C4" calcext:value-type="string">
            <text:p>70C4</text:p>
          </table:table-cell>
          <table:table-cell office:value-type="float" office:value="28868" calcext:value-type="float">
            <text:p>2886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C81])" office:value-type="string" office:string-value="70E4" calcext:value-type="string">
            <text:p>70E4</text:p>
          </table:table-cell>
          <table:table-cell office:value-type="float" office:value="28900" calcext:value-type="float">
            <text:p>28900</text:p>
          </table:table-cell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C82])" office:value-type="string" office:string-value="7264" calcext:value-type="string">
            <text:p>7264</text:p>
          </table:table-cell>
          <table:table-cell office:value-type="float" office:value="29284" calcext:value-type="float">
            <text:p>2928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C83])" office:value-type="string" office:string-value="7268" calcext:value-type="string">
            <text:p>7268</text:p>
          </table:table-cell>
          <table:table-cell office:value-type="float" office:value="29288" calcext:value-type="float">
            <text:p>2928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C84])" office:value-type="string" office:string-value="7288" calcext:value-type="string">
            <text:p>7288</text:p>
          </table:table-cell>
          <table:table-cell office:value-type="float" office:value="29320" calcext:value-type="float">
            <text:p>29320</text:p>
          </table:table-cell>
          <table:table-cell office:value-type="float" office:value="1242" calcext:value-type="float">
            <text:p>1242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C85])" office:value-type="string" office:string-value="7762" calcext:value-type="string">
            <text:p>7762</text:p>
          </table:table-cell>
          <table:table-cell office:value-type="float" office:value="30562" calcext:value-type="float">
            <text:p>3056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C86])" office:value-type="string" office:string-value="7766" calcext:value-type="string">
            <text:p>7766</text:p>
          </table:table-cell>
          <table:table-cell office:value-type="float" office:value="30566" calcext:value-type="float">
            <text:p>3056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C87])" office:value-type="string" office:string-value="7786" calcext:value-type="string">
            <text:p>7786</text:p>
          </table:table-cell>
          <table:table-cell office:value-type="float" office:value="30598" calcext:value-type="float">
            <text:p>30598</text:p>
          </table:table-cell>
          <table:table-cell office:value-type="float" office:value="425" calcext:value-type="float">
            <text:p>42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C88])" office:value-type="string" office:string-value="792F" calcext:value-type="string">
            <text:p>792F</text:p>
          </table:table-cell>
          <table:table-cell office:value-type="float" office:value="31023" calcext:value-type="float">
            <text:p>3102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C89])" office:value-type="string" office:string-value="7933" calcext:value-type="string">
            <text:p>7933</text:p>
          </table:table-cell>
          <table:table-cell office:value-type="float" office:value="31027" calcext:value-type="float">
            <text:p>3102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C90])" office:value-type="string" office:string-value="7953" calcext:value-type="string">
            <text:p>7953</text:p>
          </table:table-cell>
          <table:table-cell office:value-type="float" office:value="31059" calcext:value-type="float">
            <text:p>31059</text:p>
          </table:table-cell>
          <table:table-cell office:value-type="float" office:value="471" calcext:value-type="float">
            <text:p>47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C91])" office:value-type="string" office:string-value="7B2A" calcext:value-type="string">
            <text:p>7B2A</text:p>
          </table:table-cell>
          <table:table-cell office:value-type="float" office:value="31530" calcext:value-type="float">
            <text:p>3153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C92])" office:value-type="string" office:string-value="7B2E" calcext:value-type="string">
            <text:p>7B2E</text:p>
          </table:table-cell>
          <table:table-cell office:value-type="float" office:value="31534" calcext:value-type="float">
            <text:p>3153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C93])" office:value-type="string" office:string-value="7B4E" calcext:value-type="string">
            <text:p>7B4E</text:p>
          </table:table-cell>
          <table:table-cell office:value-type="float" office:value="31566" calcext:value-type="float">
            <text:p>31566</text:p>
          </table:table-cell>
          <table:table-cell office:value-type="float" office:value="1250" calcext:value-type="float">
            <text:p>1250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C94])" office:value-type="string" office:string-value="8030" calcext:value-type="string">
            <text:p>8030</text:p>
          </table:table-cell>
          <table:table-cell office:value-type="float" office:value="32816" calcext:value-type="float">
            <text:p>328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C95])" office:value-type="string" office:string-value="8034" calcext:value-type="string">
            <text:p>8034</text:p>
          </table:table-cell>
          <table:table-cell office:value-type="float" office:value="32820" calcext:value-type="float">
            <text:p>3282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C96])" office:value-type="string" office:string-value="8054" calcext:value-type="string">
            <text:p>8054</text:p>
          </table:table-cell>
          <table:table-cell office:value-type="float" office:value="32852" calcext:value-type="float">
            <text:p>32852</text:p>
          </table:table-cell>
          <table:table-cell office:value-type="float" office:value="342" calcext:value-type="float">
            <text:p>34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C97])" office:value-type="string" office:string-value="81AA" calcext:value-type="string">
            <text:p>81AA</text:p>
          </table:table-cell>
          <table:table-cell office:value-type="float" office:value="33194" calcext:value-type="float">
            <text:p>3319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C98])" office:value-type="string" office:string-value="81AE" calcext:value-type="string">
            <text:p>81AE</text:p>
          </table:table-cell>
          <table:table-cell office:value-type="float" office:value="33198" calcext:value-type="float">
            <text:p>3319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C99])" office:value-type="string" office:string-value="81CE" calcext:value-type="string">
            <text:p>81CE</text:p>
          </table:table-cell>
          <table:table-cell office:value-type="float" office:value="33230" calcext:value-type="float">
            <text:p>33230</text:p>
          </table:table-cell>
          <table:table-cell office:value-type="float" office:value="599" calcext:value-type="float">
            <text:p>599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C100])" office:value-type="string" office:string-value="8425" calcext:value-type="string">
            <text:p>8425</text:p>
          </table:table-cell>
          <table:table-cell office:value-type="float" office:value="33829" calcext:value-type="float">
            <text:p>3382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C101])" office:value-type="string" office:string-value="8429" calcext:value-type="string">
            <text:p>8429</text:p>
          </table:table-cell>
          <table:table-cell office:value-type="float" office:value="33833" calcext:value-type="float">
            <text:p>33833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C102])" office:value-type="string" office:string-value="8449" calcext:value-type="string">
            <text:p>8449</text:p>
          </table:table-cell>
          <table:table-cell office:value-type="float" office:value="33865" calcext:value-type="float">
            <text:p>33865</text:p>
          </table:table-cell>
          <table:table-cell office:value-type="float" office:value="582" calcext:value-type="float">
            <text:p>582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C103])" office:value-type="string" office:string-value="868F" calcext:value-type="string">
            <text:p>868F</text:p>
          </table:table-cell>
          <table:table-cell office:value-type="float" office:value="34447" calcext:value-type="float">
            <text:p>3444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C104])" office:value-type="string" office:string-value="8693" calcext:value-type="string">
            <text:p>8693</text:p>
          </table:table-cell>
          <table:table-cell office:value-type="float" office:value="34451" calcext:value-type="float">
            <text:p>3445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C105])" office:value-type="string" office:string-value="86B3" calcext:value-type="string">
            <text:p>86B3</text:p>
          </table:table-cell>
          <table:table-cell office:value-type="float" office:value="34483" calcext:value-type="float">
            <text:p>34483</text:p>
          </table:table-cell>
          <table:table-cell office:value-type="float" office:value="599" calcext:value-type="float">
            <text:p>599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C106])" office:value-type="string" office:string-value="890A" calcext:value-type="string">
            <text:p>890A</text:p>
          </table:table-cell>
          <table:table-cell office:value-type="float" office:value="35082" calcext:value-type="float">
            <text:p>3508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C107])" office:value-type="string" office:string-value="890E" calcext:value-type="string">
            <text:p>890E</text:p>
          </table:table-cell>
          <table:table-cell office:value-type="float" office:value="35086" calcext:value-type="float">
            <text:p>3508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C108])" office:value-type="string" office:string-value="892E" calcext:value-type="string">
            <text:p>892E</text:p>
          </table:table-cell>
          <table:table-cell office:value-type="float" office:value="35118" calcext:value-type="float">
            <text:p>35118</text:p>
          </table:table-cell>
          <table:table-cell office:value-type="float" office:value="502" calcext:value-type="float">
            <text:p>502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C109])" office:value-type="string" office:string-value="8B24" calcext:value-type="string">
            <text:p>8B24</text:p>
          </table:table-cell>
          <table:table-cell office:value-type="float" office:value="35620" calcext:value-type="float">
            <text:p>3562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C110])" office:value-type="string" office:string-value="8B28" calcext:value-type="string">
            <text:p>8B28</text:p>
          </table:table-cell>
          <table:table-cell office:value-type="float" office:value="35624" calcext:value-type="float">
            <text:p>3562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C111])" office:value-type="string" office:string-value="8B48" calcext:value-type="string">
            <text:p>8B48</text:p>
          </table:table-cell>
          <table:table-cell office:value-type="float" office:value="35656" calcext:value-type="float">
            <text:p>35656</text:p>
          </table:table-cell>
          <table:table-cell office:value-type="float" office:value="599" calcext:value-type="float">
            <text:p>599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C112])" office:value-type="string" office:string-value="8D9F" calcext:value-type="string">
            <text:p>8D9F</text:p>
          </table:table-cell>
          <table:table-cell office:value-type="float" office:value="36255" calcext:value-type="float">
            <text:p>3625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C113])" office:value-type="string" office:string-value="8DA3" calcext:value-type="string">
            <text:p>8DA3</text:p>
          </table:table-cell>
          <table:table-cell office:value-type="float" office:value="36259" calcext:value-type="float">
            <text:p>3625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C114])" office:value-type="string" office:string-value="8DC3" calcext:value-type="string">
            <text:p>8DC3</text:p>
          </table:table-cell>
          <table:table-cell office:value-type="float" office:value="36291" calcext:value-type="float">
            <text:p>36291</text:p>
          </table:table-cell>
          <table:table-cell office:value-type="float" office:value="599" calcext:value-type="float">
            <text:p>599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C115])" office:value-type="string" office:string-value="901A" calcext:value-type="string">
            <text:p>901A</text:p>
          </table:table-cell>
          <table:table-cell office:value-type="float" office:value="36890" calcext:value-type="float">
            <text:p>368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C116])" office:value-type="string" office:string-value="901E" calcext:value-type="string">
            <text:p>901E</text:p>
          </table:table-cell>
          <table:table-cell office:value-type="float" office:value="36894" calcext:value-type="float">
            <text:p>3689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C117])" office:value-type="string" office:string-value="903E" calcext:value-type="string">
            <text:p>903E</text:p>
          </table:table-cell>
          <table:table-cell office:value-type="float" office:value="36926" calcext:value-type="float">
            <text:p>36926</text:p>
          </table:table-cell>
          <table:table-cell office:value-type="float" office:value="562" calcext:value-type="float">
            <text:p>562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C118])" office:value-type="string" office:string-value="9270" calcext:value-type="string">
            <text:p>9270</text:p>
          </table:table-cell>
          <table:table-cell office:value-type="float" office:value="37488" calcext:value-type="float">
            <text:p>3748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C119])" office:value-type="string" office:string-value="9274" calcext:value-type="string">
            <text:p>9274</text:p>
          </table:table-cell>
          <table:table-cell office:value-type="float" office:value="37492" calcext:value-type="float">
            <text:p>3749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C120])" office:value-type="string" office:string-value="9294" calcext:value-type="string">
            <text:p>9294</text:p>
          </table:table-cell>
          <table:table-cell office:value-type="float" office:value="37524" calcext:value-type="float">
            <text:p>37524</text:p>
          </table:table-cell>
          <table:table-cell office:value-type="float" office:value="522" calcext:value-type="float">
            <text:p>522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C121])" office:value-type="string" office:string-value="949E" calcext:value-type="string">
            <text:p>949E</text:p>
          </table:table-cell>
          <table:table-cell office:value-type="float" office:value="38046" calcext:value-type="float">
            <text:p>3804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C122])" office:value-type="string" office:string-value="94A2" calcext:value-type="string">
            <text:p>94A2</text:p>
          </table:table-cell>
          <table:table-cell office:value-type="float" office:value="38050" calcext:value-type="float">
            <text:p>3805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C123])" office:value-type="string" office:string-value="94C2" calcext:value-type="string">
            <text:p>94C2</text:p>
          </table:table-cell>
          <table:table-cell office:value-type="float" office:value="38082" calcext:value-type="float">
            <text:p>38082</text:p>
          </table:table-cell>
          <table:table-cell office:value-type="float" office:value="876" calcext:value-type="float">
            <text:p>87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C124])" office:value-type="string" office:string-value="982E" calcext:value-type="string">
            <text:p>982E</text:p>
          </table:table-cell>
          <table:table-cell office:value-type="float" office:value="38958" calcext:value-type="float">
            <text:p>3895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C125])" office:value-type="string" office:string-value="9832" calcext:value-type="string">
            <text:p>9832</text:p>
          </table:table-cell>
          <table:table-cell office:value-type="float" office:value="38962" calcext:value-type="float">
            <text:p>3896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C126])" office:value-type="string" office:string-value="9852" calcext:value-type="string">
            <text:p>9852</text:p>
          </table:table-cell>
          <table:table-cell office:value-type="float" office:value="38994" calcext:value-type="float">
            <text:p>38994</text:p>
          </table:table-cell>
          <table:table-cell office:value-type="float" office:value="837" calcext:value-type="float">
            <text:p>837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C127])" office:value-type="string" office:string-value="9B97" calcext:value-type="string">
            <text:p>9B97</text:p>
          </table:table-cell>
          <table:table-cell office:value-type="float" office:value="39831" calcext:value-type="float">
            <text:p>3983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C128])" office:value-type="string" office:string-value="9B9B" calcext:value-type="string">
            <text:p>9B9B</text:p>
          </table:table-cell>
          <table:table-cell office:value-type="float" office:value="39835" calcext:value-type="float">
            <text:p>3983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C129])" office:value-type="string" office:string-value="9BBB" calcext:value-type="string">
            <text:p>9BBB</text:p>
          </table:table-cell>
          <table:table-cell office:value-type="float" office:value="39867" calcext:value-type="float">
            <text:p>39867</text:p>
          </table:table-cell>
          <table:table-cell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C130])" office:value-type="string" office:string-value="9D9B" calcext:value-type="string">
            <text:p>9D9B</text:p>
          </table:table-cell>
          <table:table-cell office:value-type="float" office:value="40347" calcext:value-type="float">
            <text:p>4034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C131])" office:value-type="string" office:string-value="9D9F" calcext:value-type="string">
            <text:p>9D9F</text:p>
          </table:table-cell>
          <table:table-cell office:value-type="float" office:value="40351" calcext:value-type="float">
            <text:p>4035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C132])" office:value-type="string" office:string-value="9DBF" calcext:value-type="string">
            <text:p>9DBF</text:p>
          </table:table-cell>
          <table:table-cell office:value-type="float" office:value="40383" calcext:value-type="float">
            <text:p>40383</text:p>
          </table:table-cell>
          <table:table-cell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C133])" office:value-type="string" office:string-value="A1C7" calcext:value-type="string">
            <text:p>A1C7</text:p>
          </table:table-cell>
          <table:table-cell office:value-type="float" office:value="41415" calcext:value-type="float">
            <text:p>4141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C134])" office:value-type="string" office:string-value="A1CB" calcext:value-type="string">
            <text:p>A1CB</text:p>
          </table:table-cell>
          <table:table-cell office:value-type="float" office:value="41419" calcext:value-type="float">
            <text:p>4141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C135])" office:value-type="string" office:string-value="A1EB" calcext:value-type="string">
            <text:p>A1EB</text:p>
          </table:table-cell>
          <table:table-cell office:value-type="float" office:value="41451" calcext:value-type="float">
            <text:p>41451</text:p>
          </table:table-cell>
          <table:table-cell office:value-type="float" office:value="1037" calcext:value-type="float">
            <text:p>1037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C136])" office:value-type="string" office:string-value="A5F8" calcext:value-type="string">
            <text:p>A5F8</text:p>
          </table:table-cell>
          <table:table-cell office:value-type="float" office:value="42488" calcext:value-type="float">
            <text:p>4248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C137])" office:value-type="string" office:string-value="A5FC" calcext:value-type="string">
            <text:p>A5FC</text:p>
          </table:table-cell>
          <table:table-cell office:value-type="float" office:value="42492" calcext:value-type="float">
            <text:p>4249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C138])" office:value-type="string" office:string-value="A61C" calcext:value-type="string">
            <text:p>A61C</text:p>
          </table:table-cell>
          <table:table-cell office:value-type="float" office:value="42524" calcext:value-type="float">
            <text:p>42524</text:p>
          </table:table-cell>
          <table:table-cell office:value-type="float" office:value="1166" calcext:value-type="float">
            <text:p>116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C139])" office:value-type="string" office:string-value="AAAA" calcext:value-type="string">
            <text:p>AAAA</text:p>
          </table:table-cell>
          <table:table-cell office:value-type="float" office:value="43690" calcext:value-type="float">
            <text:p>436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C140])" office:value-type="string" office:string-value="AAAE" calcext:value-type="string">
            <text:p>AAAE</text:p>
          </table:table-cell>
          <table:table-cell office:value-type="float" office:value="43694" calcext:value-type="float">
            <text:p>4369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C141])" office:value-type="string" office:string-value="AACE" calcext:value-type="string">
            <text:p>AACE</text:p>
          </table:table-cell>
          <table:table-cell office:value-type="float" office:value="43726" calcext:value-type="float">
            <text:p>43726</text:p>
          </table:table-cell>
          <table:table-cell office:value-type="float" office:value="1184" calcext:value-type="float">
            <text:p>118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C142])" office:value-type="string" office:string-value="AF6E" calcext:value-type="string">
            <text:p>AF6E</text:p>
          </table:table-cell>
          <table:table-cell office:value-type="float" office:value="44910" calcext:value-type="float">
            <text:p>449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C143])" office:value-type="string" office:string-value="AF72" calcext:value-type="string">
            <text:p>AF72</text:p>
          </table:table-cell>
          <table:table-cell office:value-type="float" office:value="44914" calcext:value-type="float">
            <text:p>4491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C144])" office:value-type="string" office:string-value="AF92" calcext:value-type="string">
            <text:p>AF92</text:p>
          </table:table-cell>
          <table:table-cell office:value-type="float" office:value="44946" calcext:value-type="float">
            <text:p>44946</text:p>
          </table:table-cell>
          <table:table-cell office:value-type="float" office:value="1136" calcext:value-type="float">
            <text:p>1136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C145])" office:value-type="string" office:string-value="B402" calcext:value-type="string">
            <text:p>B402</text:p>
          </table:table-cell>
          <table:table-cell office:value-type="float" office:value="46082" calcext:value-type="float">
            <text:p>4608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C146])" office:value-type="string" office:string-value="B406" calcext:value-type="string">
            <text:p>B406</text:p>
          </table:table-cell>
          <table:table-cell office:value-type="float" office:value="46086" calcext:value-type="float">
            <text:p>4608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C147])" office:value-type="string" office:string-value="B426" calcext:value-type="string">
            <text:p>B426</text:p>
          </table:table-cell>
          <table:table-cell office:value-type="float" office:value="46118" calcext:value-type="float">
            <text:p>46118</text:p>
          </table:table-cell>
          <table:table-cell office:value-type="float" office:value="1146" calcext:value-type="float">
            <text:p>114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C148])" office:value-type="string" office:string-value="B8A0" calcext:value-type="string">
            <text:p>B8A0</text:p>
          </table:table-cell>
          <table:table-cell office:value-type="float" office:value="47264" calcext:value-type="float">
            <text:p>4726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C149])" office:value-type="string" office:string-value="B8A4" calcext:value-type="string">
            <text:p>B8A4</text:p>
          </table:table-cell>
          <table:table-cell office:value-type="float" office:value="47268" calcext:value-type="float">
            <text:p>4726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C150])" office:value-type="string" office:string-value="B8C4" calcext:value-type="string">
            <text:p>B8C4</text:p>
          </table:table-cell>
          <table:table-cell office:value-type="float" office:value="47300" calcext:value-type="float">
            <text:p>47300</text:p>
          </table:table-cell>
          <table:table-cell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C151])" office:value-type="string" office:string-value="BB94" calcext:value-type="string">
            <text:p>BB94</text:p>
          </table:table-cell>
          <table:table-cell office:value-type="float" office:value="48020" calcext:value-type="float">
            <text:p>4802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C152])" office:value-type="string" office:string-value="BB98" calcext:value-type="string">
            <text:p>BB98</text:p>
          </table:table-cell>
          <table:table-cell office:value-type="float" office:value="48024" calcext:value-type="float">
            <text:p>4802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C153])" office:value-type="string" office:string-value="BBB8" calcext:value-type="string">
            <text:p>BBB8</text:p>
          </table:table-cell>
          <table:table-cell office:value-type="float" office:value="48056" calcext:value-type="float">
            <text:p>48056</text:p>
          </table:table-cell>
          <table:table-cell office:value-type="float" office:value="1018" calcext:value-type="float">
            <text:p>101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C154])" office:value-type="string" office:string-value="BFB2" calcext:value-type="string">
            <text:p>BFB2</text:p>
          </table:table-cell>
          <table:table-cell office:value-type="float" office:value="49074" calcext:value-type="float">
            <text:p>4907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C155])" office:value-type="string" office:string-value="BFB6" calcext:value-type="string">
            <text:p>BFB6</text:p>
          </table:table-cell>
          <table:table-cell office:value-type="float" office:value="49078" calcext:value-type="float">
            <text:p>4907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C156])" office:value-type="string" office:string-value="BFD6" calcext:value-type="string">
            <text:p>BFD6</text:p>
          </table:table-cell>
          <table:table-cell office:value-type="float" office:value="49110" calcext:value-type="float">
            <text:p>49110</text:p>
          </table:table-cell>
          <table:table-cell office:value-type="float" office:value="680" calcext:value-type="float">
            <text:p>680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C157])" office:value-type="string" office:string-value="C27E" calcext:value-type="string">
            <text:p>C27E</text:p>
          </table:table-cell>
          <table:table-cell office:value-type="float" office:value="49790" calcext:value-type="float">
            <text:p>497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C158])" office:value-type="string" office:string-value="C282" calcext:value-type="string">
            <text:p>C282</text:p>
          </table:table-cell>
          <table:table-cell office:value-type="float" office:value="49794" calcext:value-type="float">
            <text:p>4979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C159])" office:value-type="string" office:string-value="C2A2" calcext:value-type="string">
            <text:p>C2A2</text:p>
          </table:table-cell>
          <table:table-cell office:value-type="float" office:value="49826" calcext:value-type="float">
            <text:p>49826</text:p>
          </table:table-cell>
          <table:table-cell office:value-type="float" office:value="657" calcext:value-type="float">
            <text:p>657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C160])" office:value-type="string" office:string-value="C533" calcext:value-type="string">
            <text:p>C533</text:p>
          </table:table-cell>
          <table:table-cell office:value-type="float" office:value="50483" calcext:value-type="float">
            <text:p>5048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C161])" office:value-type="string" office:string-value="C537" calcext:value-type="string">
            <text:p>C537</text:p>
          </table:table-cell>
          <table:table-cell office:value-type="float" office:value="50487" calcext:value-type="float">
            <text:p>5048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C162])" office:value-type="string" office:string-value="C557" calcext:value-type="string">
            <text:p>C557</text:p>
          </table:table-cell>
          <table:table-cell office:value-type="float" office:value="50519" calcext:value-type="float">
            <text:p>50519</text:p>
          </table:table-cell>
          <table:table-cell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C163])" office:value-type="string" office:string-value="C7F6" calcext:value-type="string">
            <text:p>C7F6</text:p>
          </table:table-cell>
          <table:table-cell office:value-type="float" office:value="51190" calcext:value-type="float">
            <text:p>511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C164])" office:value-type="string" office:string-value="C7FA" calcext:value-type="string">
            <text:p>C7FA</text:p>
          </table:table-cell>
          <table:table-cell office:value-type="float" office:value="51194" calcext:value-type="float">
            <text:p>5119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C165])" office:value-type="string" office:string-value="C81A" calcext:value-type="string">
            <text:p>C81A</text:p>
          </table:table-cell>
          <table:table-cell office:value-type="float" office:value="51226" calcext:value-type="float">
            <text:p>51226</text:p>
          </table:table-cell>
          <table:table-cell office:value-type="float" office:value="929" calcext:value-type="float">
            <text:p>929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C166])" office:value-type="string" office:string-value="CBBB" calcext:value-type="string">
            <text:p>CBBB</text:p>
          </table:table-cell>
          <table:table-cell office:value-type="float" office:value="52155" calcext:value-type="float">
            <text:p>5215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C167])" office:value-type="string" office:string-value="CBBF" calcext:value-type="string">
            <text:p>CBBF</text:p>
          </table:table-cell>
          <table:table-cell office:value-type="float" office:value="52159" calcext:value-type="float">
            <text:p>5215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C168])" office:value-type="string" office:string-value="CBDF" calcext:value-type="string">
            <text:p>CBDF</text:p>
          </table:table-cell>
          <table:table-cell office:value-type="float" office:value="52191" calcext:value-type="float">
            <text:p>52191</text:p>
          </table:table-cell>
          <table:table-cell office:value-type="float" office:value="1066" calcext:value-type="float">
            <text:p>106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C169])" office:value-type="string" office:string-value="D009" calcext:value-type="string">
            <text:p>D009</text:p>
          </table:table-cell>
          <table:table-cell office:value-type="float" office:value="53257" calcext:value-type="float">
            <text:p>5325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C170])" office:value-type="string" office:string-value="D00D" calcext:value-type="string">
            <text:p>D00D</text:p>
          </table:table-cell>
          <table:table-cell office:value-type="float" office:value="53261" calcext:value-type="float">
            <text:p>5326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C171])" office:value-type="string" office:string-value="D02D" calcext:value-type="string">
            <text:p>D02D</text:p>
          </table:table-cell>
          <table:table-cell office:value-type="float" office:value="53293" calcext:value-type="float">
            <text:p>53293</text:p>
          </table:table-cell>
          <table:table-cell office:value-type="float" office:value="1128" calcext:value-type="float">
            <text:p>112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C172])" office:value-type="string" office:string-value="D495" calcext:value-type="string">
            <text:p>D495</text:p>
          </table:table-cell>
          <table:table-cell office:value-type="float" office:value="54421" calcext:value-type="float">
            <text:p>5442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C173])" office:value-type="string" office:string-value="D499" calcext:value-type="string">
            <text:p>D499</text:p>
          </table:table-cell>
          <table:table-cell office:value-type="float" office:value="54425" calcext:value-type="float">
            <text:p>5442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C174])" office:value-type="string" office:string-value="D4B9" calcext:value-type="string">
            <text:p>D4B9</text:p>
          </table:table-cell>
          <table:table-cell office:value-type="float" office:value="54457" calcext:value-type="float">
            <text:p>54457</text:p>
          </table:table-cell>
          <table:table-cell office:value-type="float" office:value="530" calcext:value-type="float">
            <text:p>530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C175])" office:value-type="string" office:string-value="D6CB" calcext:value-type="string">
            <text:p>D6CB</text:p>
          </table:table-cell>
          <table:table-cell office:value-type="float" office:value="54987" calcext:value-type="float">
            <text:p>5498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C176])" office:value-type="string" office:string-value="D6CF" calcext:value-type="string">
            <text:p>D6CF</text:p>
          </table:table-cell>
          <table:table-cell office:value-type="float" office:value="54991" calcext:value-type="float">
            <text:p>5499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C177])" office:value-type="string" office:string-value="D6EF" calcext:value-type="string">
            <text:p>D6EF</text:p>
          </table:table-cell>
          <table:table-cell office:value-type="float" office:value="55023" calcext:value-type="float">
            <text:p>55023</text:p>
          </table:table-cell>
          <table:table-cell office:value-type="float" office:value="556" calcext:value-type="float">
            <text:p>55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C178])" office:value-type="string" office:string-value="D91B" calcext:value-type="string">
            <text:p>D91B</text:p>
          </table:table-cell>
          <table:table-cell office:value-type="float" office:value="55579" calcext:value-type="float">
            <text:p>5557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C179])" office:value-type="string" office:string-value="D91F" calcext:value-type="string">
            <text:p>D91F</text:p>
          </table:table-cell>
          <table:table-cell office:value-type="float" office:value="55583" calcext:value-type="float">
            <text:p>55583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C180])" office:value-type="string" office:string-value="D93F" calcext:value-type="string">
            <text:p>D93F</text:p>
          </table:table-cell>
          <table:table-cell office:value-type="float" office:value="55615" calcext:value-type="float">
            <text:p>55615</text:p>
          </table:table-cell>
          <table:table-cell office:value-type="float" office:value="558" calcext:value-type="float">
            <text:p>558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C181])" office:value-type="string" office:string-value="DB6D" calcext:value-type="string">
            <text:p>DB6D</text:p>
          </table:table-cell>
          <table:table-cell office:value-type="float" office:value="56173" calcext:value-type="float">
            <text:p>5617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C182])" office:value-type="string" office:string-value="DB71" calcext:value-type="string">
            <text:p>DB71</text:p>
          </table:table-cell>
          <table:table-cell office:value-type="float" office:value="56177" calcext:value-type="float">
            <text:p>5617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C183])" office:value-type="string" office:string-value="DB91" calcext:value-type="string">
            <text:p>DB91</text:p>
          </table:table-cell>
          <table:table-cell office:value-type="float" office:value="56209" calcext:value-type="float">
            <text:p>56209</text:p>
          </table:table-cell>
          <table:table-cell office:value-type="float" office:value="574" calcext:value-type="float">
            <text:p>57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C184])" office:value-type="string" office:string-value="DDCF" calcext:value-type="string">
            <text:p>DDCF</text:p>
          </table:table-cell>
          <table:table-cell office:value-type="float" office:value="56783" calcext:value-type="float">
            <text:p>5678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C185])" office:value-type="string" office:string-value="DDD3" calcext:value-type="string">
            <text:p>DDD3</text:p>
          </table:table-cell>
          <table:table-cell office:value-type="float" office:value="56787" calcext:value-type="float">
            <text:p>5678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C186])" office:value-type="string" office:string-value="DDF3" calcext:value-type="string">
            <text:p>DDF3</text:p>
          </table:table-cell>
          <table:table-cell office:value-type="float" office:value="56819" calcext:value-type="float">
            <text:p>56819</text:p>
          </table:table-cell>
          <table:table-cell office:value-type="float" office:value="628" calcext:value-type="float">
            <text:p>628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C187])" office:value-type="string" office:string-value="E067" calcext:value-type="string">
            <text:p>E067</text:p>
          </table:table-cell>
          <table:table-cell office:value-type="float" office:value="57447" calcext:value-type="float">
            <text:p>5744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C188])" office:value-type="string" office:string-value="E06B" calcext:value-type="string">
            <text:p>E06B</text:p>
          </table:table-cell>
          <table:table-cell office:value-type="float" office:value="57451" calcext:value-type="float">
            <text:p>5745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C189])" office:value-type="string" office:string-value="E08B" calcext:value-type="string">
            <text:p>E08B</text:p>
          </table:table-cell>
          <table:table-cell office:value-type="float" office:value="57483" calcext:value-type="float">
            <text:p>57483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C190])" office:value-type="string" office:string-value="E30F" calcext:value-type="string">
            <text:p>E30F</text:p>
          </table:table-cell>
          <table:table-cell office:value-type="float" office:value="58127" calcext:value-type="float">
            <text:p>5812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C191])" office:value-type="string" office:string-value="E313" calcext:value-type="string">
            <text:p>E313</text:p>
          </table:table-cell>
          <table:table-cell office:value-type="float" office:value="58131" calcext:value-type="float">
            <text:p>5813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C192])" office:value-type="string" office:string-value="E333" calcext:value-type="string">
            <text:p>E333</text:p>
          </table:table-cell>
          <table:table-cell office:value-type="float" office:value="58163" calcext:value-type="float">
            <text:p>58163</text:p>
          </table:table-cell>
          <table:table-cell office:value-type="float" office:value="833" calcext:value-type="float">
            <text:p>833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C193])" office:value-type="string" office:string-value="E674" calcext:value-type="string">
            <text:p>E674</text:p>
          </table:table-cell>
          <table:table-cell office:value-type="float" office:value="58996" calcext:value-type="float">
            <text:p>5899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C194])" office:value-type="string" office:string-value="E678" calcext:value-type="string">
            <text:p>E678</text:p>
          </table:table-cell>
          <table:table-cell office:value-type="float" office:value="59000" calcext:value-type="float">
            <text:p>5900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C195])" office:value-type="string" office:string-value="E698" calcext:value-type="string">
            <text:p>E698</text:p>
          </table:table-cell>
          <table:table-cell office:value-type="float" office:value="59032" calcext:value-type="float">
            <text:p>59032</text:p>
          </table:table-cell>
          <table:table-cell office:value-type="float" office:value="1317" calcext:value-type="float">
            <text:p>1317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C196])" office:value-type="string" office:string-value="EBBD" calcext:value-type="string">
            <text:p>EBBD</text:p>
          </table:table-cell>
          <table:table-cell office:value-type="float" office:value="60349" calcext:value-type="float">
            <text:p>6034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C197])" office:value-type="string" office:string-value="EBC1" calcext:value-type="string">
            <text:p>EBC1</text:p>
          </table:table-cell>
          <table:table-cell office:value-type="float" office:value="60353" calcext:value-type="float">
            <text:p>60353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C198])" office:value-type="string" office:string-value="EBE1" calcext:value-type="string">
            <text:p>EBE1</text:p>
          </table:table-cell>
          <table:table-cell office:value-type="float" office:value="60385" calcext:value-type="float">
            <text:p>60385</text:p>
          </table:table-cell>
          <table:table-cell office:value-type="float" office:value="1116" calcext:value-type="float">
            <text:p>1116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C199])" office:value-type="string" office:string-value="F03D" calcext:value-type="string">
            <text:p>F03D</text:p>
          </table:table-cell>
          <table:table-cell office:value-type="float" office:value="61501" calcext:value-type="float">
            <text:p>6150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C200])" office:value-type="string" office:string-value="F041" calcext:value-type="string">
            <text:p>F041</text:p>
          </table:table-cell>
          <table:table-cell office:value-type="float" office:value="61505" calcext:value-type="float">
            <text:p>6150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C201])" office:value-type="string" office:string-value="F061" calcext:value-type="string">
            <text:p>F061</text:p>
          </table:table-cell>
          <table:table-cell office:value-type="float" office:value="61537" calcext:value-type="float">
            <text:p>61537</text:p>
          </table:table-cell>
          <table:table-cell office:value-type="float" office:value="1329" calcext:value-type="float">
            <text:p>1329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C202])" office:value-type="string" office:string-value="F592" calcext:value-type="string">
            <text:p>F592</text:p>
          </table:table-cell>
          <table:table-cell office:value-type="float" office:value="62866" calcext:value-type="float">
            <text:p>6286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C203])" office:value-type="string" office:string-value="F596" calcext:value-type="string">
            <text:p>F596</text:p>
          </table:table-cell>
          <table:table-cell office:value-type="float" office:value="62870" calcext:value-type="float">
            <text:p>6287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C204])" office:value-type="string" office:string-value="F5B6" calcext:value-type="string">
            <text:p>F5B6</text:p>
          </table:table-cell>
          <table:table-cell office:value-type="float" office:value="62902" calcext:value-type="float">
            <text:p>62902</text:p>
          </table:table-cell>
          <table:table-cell office:value-type="float" office:value="788" calcext:value-type="float">
            <text:p>788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C205])" office:value-type="string" office:string-value="F8CA" calcext:value-type="string">
            <text:p>F8CA</text:p>
          </table:table-cell>
          <table:table-cell office:value-type="float" office:value="63690" calcext:value-type="float">
            <text:p>636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C206])" office:value-type="string" office:string-value="F8CE" calcext:value-type="string">
            <text:p>F8CE</text:p>
          </table:table-cell>
          <table:table-cell office:value-type="float" office:value="63694" calcext:value-type="float">
            <text:p>6369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C207])" office:value-type="string" office:string-value="F8EE" calcext:value-type="string">
            <text:p>F8EE</text:p>
          </table:table-cell>
          <table:table-cell office:value-type="float" office:value="63726" calcext:value-type="float">
            <text:p>63726</text:p>
          </table:table-cell>
          <table:table-cell office:value-type="float" office:value="1081" calcext:value-type="float">
            <text:p>1081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C208])" office:value-type="string" office:string-value="FD27" calcext:value-type="string">
            <text:p>FD27</text:p>
          </table:table-cell>
          <table:table-cell office:value-type="float" office:value="64807" calcext:value-type="float">
            <text:p>6480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C209])" office:value-type="string" office:string-value="FD2B" calcext:value-type="string">
            <text:p>FD2B</text:p>
          </table:table-cell>
          <table:table-cell office:value-type="float" office:value="64811" calcext:value-type="float">
            <text:p>6481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C210])" office:value-type="string" office:string-value="FD4B" calcext:value-type="string">
            <text:p>FD4B</text:p>
          </table:table-cell>
          <table:table-cell office:value-type="float" office:value="64843" calcext:value-type="float">
            <text:p>64843</text:p>
          </table:table-cell>
          <table:table-cell office:value-type="float" office:value="4102" calcext:value-type="float">
            <text:p>4102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C211])" office:value-type="string" office:string-value="10D51" calcext:value-type="string">
            <text:p>10D51</text:p>
          </table:table-cell>
          <table:table-cell office:value-type="float" office:value="68945" calcext:value-type="float">
            <text:p>6894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C212])" office:value-type="string" office:string-value="10D55" calcext:value-type="string">
            <text:p>10D55</text:p>
          </table:table-cell>
          <table:table-cell office:value-type="float" office:value="68949" calcext:value-type="float">
            <text:p>6894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C213])" office:value-type="string" office:string-value="10D59" calcext:value-type="string">
            <text:p>10D59</text:p>
          </table:table-cell>
          <table:table-cell office:value-type="float" office:value="68953" calcext:value-type="float">
            <text:p>68953</text:p>
          </table:table-cell>
          <table:table-cell office:value-type="float" office:value="1028" calcext:value-type="float">
            <text:p>1028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C214])" office:value-type="string" office:string-value="1115D" calcext:value-type="string">
            <text:p>1115D</text:p>
          </table:table-cell>
          <table:table-cell office:value-type="float" office:value="69981" calcext:value-type="float">
            <text:p>69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pped until here (47008)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C215])" office:value-type="string" office:string-value="11161" calcext:value-type="string">
            <text:p>11161</text:p>
          </table:table-cell>
          <table:table-cell office:value-type="float" office:value="69985" calcext:value-type="float">
            <text:p>699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C216])" office:value-type="string" office:string-value="11165" calcext:value-type="string">
            <text:p>11165</text:p>
          </table:table-cell>
          <table:table-cell office:value-type="float" office:value="69989" calcext:value-type="float">
            <text:p>6998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C217])" office:value-type="string" office:string-value="11185" calcext:value-type="string">
            <text:p>11185</text:p>
          </table:table-cell>
          <table:table-cell office:value-type="float" office:value="70021" calcext:value-type="float">
            <text:p>70021</text:p>
          </table:table-cell>
          <table:table-cell office:value-type="float" office:value="26304" calcext:value-type="float">
            <text:p>26304</text:p>
          </table:table-cell>
          <table:table-cell office:value-type="string" calcext:value-type="string">
            <text:p>'&lt;&lt; looks more interesting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C218])" office:value-type="string" office:string-value="17845" calcext:value-type="string">
            <text:p>17845</text:p>
          </table:table-cell>
          <table:table-cell office:value-type="float" office:value="96325" calcext:value-type="float">
            <text:p>963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C219])" office:value-type="string" office:string-value="17849" calcext:value-type="string">
            <text:p>17849</text:p>
          </table:table-cell>
          <table:table-cell office:value-type="float" office:value="96329" calcext:value-type="float">
            <text:p>9632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C220])" office:value-type="string" office:string-value="17869" calcext:value-type="string">
            <text:p>17869</text:p>
          </table:table-cell>
          <table:table-cell office:value-type="float" office:value="96361" calcext:value-type="float">
            <text:p>963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kipped until here (26434)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C221])" office:value-type="string" office:string-value="178A3" calcext:value-type="string">
            <text:p>178A3</text:p>
          </table:table-cell>
          <table:table-cell office:value-type="float" office:value="96419" calcext:value-type="float">
            <text:p>96419</text:p>
          </table:table-cell>
          <table:table-cell office:value-type="float" office:value="4" calcext:value-type="float">
            <text:p>4</text:p>
          </table:table-cell>
          <table:table-cell table:formula="of:=IF([.D221]&gt;100;1;0)" office:value-type="float" office:value="0" calcext:value-type="float">
            <text:p>0</text:p>
          </table:table-cell>
          <table:table-cell office:value-type="string" calcext:value-type="string">
            <text:p>'&lt;←- assets start here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C222])" office:value-type="string" office:string-value="178A7" calcext:value-type="string">
            <text:p>178A7</text:p>
          </table:table-cell>
          <table:table-cell office:value-type="float" office:value="96423" calcext:value-type="float">
            <text:p>96423</text:p>
          </table:table-cell>
          <table:table-cell office:value-type="float" office:value="32" calcext:value-type="float">
            <text:p>32</text:p>
          </table:table-cell>
          <table:table-cell table:formula="of:=IF([.D2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C223])" office:value-type="string" office:string-value="178C7" calcext:value-type="string">
            <text:p>178C7</text:p>
          </table:table-cell>
          <table:table-cell office:value-type="float" office:value="96455" calcext:value-type="float">
            <text:p>96455</text:p>
          </table:table-cell>
          <table:table-cell office:value-type="float" office:value="31188" calcext:value-type="float">
            <text:p>31188</text:p>
          </table:table-cell>
          <table:table-cell table:formula="of:=IF([.D22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C224])" office:value-type="string" office:string-value="1F29B" calcext:value-type="string">
            <text:p>1F29B</text:p>
          </table:table-cell>
          <table:table-cell office:value-type="float" office:value="127643" calcext:value-type="float">
            <text:p>127643</text:p>
          </table:table-cell>
          <table:table-cell office:value-type="float" office:value="4" calcext:value-type="float">
            <text:p>4</text:p>
          </table:table-cell>
          <table:table-cell table:formula="of:=IF([.D2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C225])" office:value-type="string" office:string-value="1F29F" calcext:value-type="string">
            <text:p>1F29F</text:p>
          </table:table-cell>
          <table:table-cell office:value-type="float" office:value="127647" calcext:value-type="float">
            <text:p>127647</text:p>
          </table:table-cell>
          <table:table-cell office:value-type="float" office:value="32" calcext:value-type="float">
            <text:p>32</text:p>
          </table:table-cell>
          <table:table-cell table:formula="of:=IF([.D2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C226])" office:value-type="string" office:string-value="1F2BF" calcext:value-type="string">
            <text:p>1F2BF</text:p>
          </table:table-cell>
          <table:table-cell office:value-type="float" office:value="127679" calcext:value-type="float">
            <text:p>127679</text:p>
          </table:table-cell>
          <table:table-cell office:value-type="float" office:value="13920" calcext:value-type="float">
            <text:p>13920</text:p>
          </table:table-cell>
          <table:table-cell table:formula="of:=IF([.D226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C227])" office:value-type="string" office:string-value="2291F" calcext:value-type="string">
            <text:p>2291F</text:p>
          </table:table-cell>
          <table:table-cell office:value-type="float" office:value="141599" calcext:value-type="float">
            <text:p>141599</text:p>
          </table:table-cell>
          <table:table-cell office:value-type="float" office:value="4" calcext:value-type="float">
            <text:p>4</text:p>
          </table:table-cell>
          <table:table-cell table:formula="of:=IF([.D227]&gt;100;1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width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C228])" office:value-type="string" office:string-value="22923" calcext:value-type="string">
            <text:p>22923</text:p>
          </table:table-cell>
          <table:table-cell office:value-type="float" office:value="141603" calcext:value-type="float">
            <text:p>141603</text:p>
          </table:table-cell>
          <table:table-cell office:value-type="float" office:value="32" calcext:value-type="float">
            <text:p>32</text:p>
          </table:table-cell>
          <table:table-cell table:formula="of:=IF([.D228]&gt;100;1;0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height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C229])" office:value-type="string" office:string-value="22943" calcext:value-type="string">
            <text:p>22943</text:p>
          </table:table-cell>
          <table:table-cell office:value-type="float" office:value="141635" calcext:value-type="float">
            <text:p>141635</text:p>
          </table:table-cell>
          <table:table-cell office:value-type="float" office:value="13920" calcext:value-type="float">
            <text:p>13920</text:p>
          </table:table-cell>
          <table:table-cell table:formula="of:=IF([.D229]&gt;100;1;0)" office:value-type="float" office:value="1" calcext:value-type="float">
            <text:p>1</text:p>
          </table:table-cell>
          <table:table-cell/>
          <table:table-cell table:formula="of:=[.G227]*[.G228]" office:value-type="float" office:value="4560" calcext:value-type="float">
            <text:p>4560</text:p>
          </table:table-cell>
          <table:table-cell office:value-type="string" calcext:value-type="string">
            <text:p>pixels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C230])" office:value-type="string" office:string-value="25FA3" calcext:value-type="string">
            <text:p>25FA3</text:p>
          </table:table-cell>
          <table:table-cell office:value-type="float" office:value="155555" calcext:value-type="float">
            <text:p>155555</text:p>
          </table:table-cell>
          <table:table-cell office:value-type="float" office:value="4" calcext:value-type="float">
            <text:p>4</text:p>
          </table:table-cell>
          <table:table-cell table:formula="of:=IF([.D230]&gt;100;1;0)" office:value-type="float" office:value="0" calcext:value-type="float">
            <text:p>0</text:p>
          </table:table-cell>
          <table:table-cell/>
          <table:table-cell table:formula="of:=[.G229]*2" office:value-type="float" office:value="9120" calcext:value-type="float">
            <text:p>9120</text:p>
          </table:table-cell>
          <table:table-cell office:value-type="string" calcext:value-type="string">
            <text:p>2bytes/px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C231])" office:value-type="string" office:string-value="25FA7" calcext:value-type="string">
            <text:p>25FA7</text:p>
          </table:table-cell>
          <table:table-cell office:value-type="float" office:value="155559" calcext:value-type="float">
            <text:p>155559</text:p>
          </table:table-cell>
          <table:table-cell office:value-type="float" office:value="32" calcext:value-type="float">
            <text:p>32</text:p>
          </table:table-cell>
          <table:table-cell table:formula="of:=IF([.D231]&gt;100;1;0)" office:value-type="float" office:value="0" calcext:value-type="float">
            <text:p>0</text:p>
          </table:table-cell>
          <table:table-cell/>
          <table:table-cell table:formula="of:=[.G230]*2" office:value-type="float" office:value="18240" calcext:value-type="float">
            <text:p>18240</text:p>
          </table:table-cell>
          <table:table-cell office:value-type="string" calcext:value-type="string">
            <text:p>twice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C232])" office:value-type="string" office:string-value="25FC7" calcext:value-type="string">
            <text:p>25FC7</text:p>
          </table:table-cell>
          <table:table-cell office:value-type="float" office:value="155591" calcext:value-type="float">
            <text:p>155591</text:p>
          </table:table-cell>
          <table:table-cell office:value-type="float" office:value="13920" calcext:value-type="float">
            <text:p>13920</text:p>
          </table:table-cell>
          <table:table-cell table:formula="of:=IF([.D232]&gt;100;1;0)" office:value-type="float" office:value="1" calcext:value-type="float">
            <text:p>1</text:p>
          </table:table-cell>
          <table:table-cell/>
          <table:table-cell table:formula="of:=[.D229]-[.G230]" office:value-type="float" office:value="4800" calcext:value-type="float">
            <text:p>4800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C233])" office:value-type="string" office:string-value="29627" calcext:value-type="string">
            <text:p>29627</text:p>
          </table:table-cell>
          <table:table-cell office:value-type="float" office:value="169511" calcext:value-type="float">
            <text:p>169511</text:p>
          </table:table-cell>
          <table:table-cell office:value-type="float" office:value="4" calcext:value-type="float">
            <text:p>4</text:p>
          </table:table-cell>
          <table:table-cell table:formula="of:=IF([.D233]&gt;100;1;0)" office:value-type="float" office:value="0" calcext:value-type="float">
            <text:p>0</text:p>
          </table:table-cell>
          <table:table-cell/>
          <table:table-cell table:style-name="ce5" table:formula="of:=+[.G229]*3" office:value-type="float" office:value="13680" calcext:value-type="float">
            <text:p>13680</text:p>
          </table:table-cell>
          <table:table-cell table:style-name="ce5" office:value-type="string" calcext:value-type="string">
            <text:p>3x pixels</text:p>
          </table:table-cell>
          <table:table-cell table:number-columns-repeated="10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C234])" office:value-type="string" office:string-value="2962B" calcext:value-type="string">
            <text:p>2962B</text:p>
          </table:table-cell>
          <table:table-cell office:value-type="float" office:value="169515" calcext:value-type="float">
            <text:p>169515</text:p>
          </table:table-cell>
          <table:table-cell office:value-type="float" office:value="32" calcext:value-type="float">
            <text:p>32</text:p>
          </table:table-cell>
          <table:table-cell table:formula="of:=IF([.D234]&gt;100;1;0)" office:value-type="float" office:value="0" calcext:value-type="float">
            <text:p>0</text:p>
          </table:table-cell>
          <table:table-cell/>
          <table:table-cell table:style-name="ce5" table:formula="of:=+[.G233]-[.D229]" office:value-type="float" office:value="-240" calcext:value-type="float">
            <text:p>-240</text:p>
          </table:table-cell>
          <table:table-cell table:style-name="ce5" office:value-type="string" calcext:value-type="string">
            <text:p>something…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C235])" office:value-type="string" office:string-value="2964B" calcext:value-type="string">
            <text:p>2964B</text:p>
          </table:table-cell>
          <table:table-cell office:value-type="float" office:value="169547" calcext:value-type="float">
            <text:p>169547</text:p>
          </table:table-cell>
          <table:table-cell office:value-type="float" office:value="13920" calcext:value-type="float">
            <text:p>13920</text:p>
          </table:table-cell>
          <table:table-cell table:formula="of:=IF([.D235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C236])" office:value-type="string" office:string-value="2CCAB" calcext:value-type="string">
            <text:p>2CCAB</text:p>
          </table:table-cell>
          <table:table-cell office:value-type="float" office:value="183467" calcext:value-type="float">
            <text:p>183467</text:p>
          </table:table-cell>
          <table:table-cell office:value-type="float" office:value="4" calcext:value-type="float">
            <text:p>4</text:p>
          </table:table-cell>
          <table:table-cell table:formula="of:=IF([.D2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C237])" office:value-type="string" office:string-value="2CCAF" calcext:value-type="string">
            <text:p>2CCAF</text:p>
          </table:table-cell>
          <table:table-cell office:value-type="float" office:value="183471" calcext:value-type="float">
            <text:p>183471</text:p>
          </table:table-cell>
          <table:table-cell office:value-type="float" office:value="32" calcext:value-type="float">
            <text:p>32</text:p>
          </table:table-cell>
          <table:table-cell table:formula="of:=IF([.D2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C238])" office:value-type="string" office:string-value="2CCCF" calcext:value-type="string">
            <text:p>2CCCF</text:p>
          </table:table-cell>
          <table:table-cell office:value-type="float" office:value="183503" calcext:value-type="float">
            <text:p>183503</text:p>
          </table:table-cell>
          <table:table-cell office:value-type="float" office:value="13920" calcext:value-type="float">
            <text:p>13920</text:p>
          </table:table-cell>
          <table:table-cell table:formula="of:=IF([.D238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C239])" office:value-type="string" office:string-value="3032F" calcext:value-type="string">
            <text:p>3032F</text:p>
          </table:table-cell>
          <table:table-cell office:value-type="float" office:value="197423" calcext:value-type="float">
            <text:p>197423</text:p>
          </table:table-cell>
          <table:table-cell office:value-type="float" office:value="4" calcext:value-type="float">
            <text:p>4</text:p>
          </table:table-cell>
          <table:table-cell table:formula="of:=IF([.D2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C240])" office:value-type="string" office:string-value="30333" calcext:value-type="string">
            <text:p>30333</text:p>
          </table:table-cell>
          <table:table-cell office:value-type="float" office:value="197427" calcext:value-type="float">
            <text:p>197427</text:p>
          </table:table-cell>
          <table:table-cell office:value-type="float" office:value="32" calcext:value-type="float">
            <text:p>32</text:p>
          </table:table-cell>
          <table:table-cell table:formula="of:=IF([.D2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C241])" office:value-type="string" office:string-value="30353" calcext:value-type="string">
            <text:p>30353</text:p>
          </table:table-cell>
          <table:table-cell office:value-type="float" office:value="197459" calcext:value-type="float">
            <text:p>197459</text:p>
          </table:table-cell>
          <table:table-cell office:value-type="float" office:value="13920" calcext:value-type="float">
            <text:p>13920</text:p>
          </table:table-cell>
          <table:table-cell table:formula="of:=IF([.D241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C242])" office:value-type="string" office:string-value="339B3" calcext:value-type="string">
            <text:p>339B3</text:p>
          </table:table-cell>
          <table:table-cell office:value-type="float" office:value="211379" calcext:value-type="float">
            <text:p>211379</text:p>
          </table:table-cell>
          <table:table-cell office:value-type="float" office:value="4" calcext:value-type="float">
            <text:p>4</text:p>
          </table:table-cell>
          <table:table-cell table:formula="of:=IF([.D2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C243])" office:value-type="string" office:string-value="339B7" calcext:value-type="string">
            <text:p>339B7</text:p>
          </table:table-cell>
          <table:table-cell office:value-type="float" office:value="211383" calcext:value-type="float">
            <text:p>211383</text:p>
          </table:table-cell>
          <table:table-cell office:value-type="float" office:value="32" calcext:value-type="float">
            <text:p>32</text:p>
          </table:table-cell>
          <table:table-cell table:formula="of:=IF([.D2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C244])" office:value-type="string" office:string-value="339D7" calcext:value-type="string">
            <text:p>339D7</text:p>
          </table:table-cell>
          <table:table-cell office:value-type="float" office:value="211415" calcext:value-type="float">
            <text:p>211415</text:p>
          </table:table-cell>
          <table:table-cell office:value-type="float" office:value="13920" calcext:value-type="float">
            <text:p>13920</text:p>
          </table:table-cell>
          <table:table-cell table:formula="of:=IF([.D244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C245])" office:value-type="string" office:string-value="37037" calcext:value-type="string">
            <text:p>37037</text:p>
          </table:table-cell>
          <table:table-cell office:value-type="float" office:value="225335" calcext:value-type="float">
            <text:p>225335</text:p>
          </table:table-cell>
          <table:table-cell office:value-type="float" office:value="4" calcext:value-type="float">
            <text:p>4</text:p>
          </table:table-cell>
          <table:table-cell table:formula="of:=IF([.D2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C246])" office:value-type="string" office:string-value="3703B" calcext:value-type="string">
            <text:p>3703B</text:p>
          </table:table-cell>
          <table:table-cell office:value-type="float" office:value="225339" calcext:value-type="float">
            <text:p>225339</text:p>
          </table:table-cell>
          <table:table-cell office:value-type="float" office:value="32" calcext:value-type="float">
            <text:p>32</text:p>
          </table:table-cell>
          <table:table-cell table:formula="of:=IF([.D2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C247])" office:value-type="string" office:string-value="3705B" calcext:value-type="string">
            <text:p>3705B</text:p>
          </table:table-cell>
          <table:table-cell office:value-type="float" office:value="225371" calcext:value-type="float">
            <text:p>225371</text:p>
          </table:table-cell>
          <table:table-cell office:value-type="float" office:value="13920" calcext:value-type="float">
            <text:p>13920</text:p>
          </table:table-cell>
          <table:table-cell table:formula="of:=IF([.D247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C248])" office:value-type="string" office:string-value="3A6BB" calcext:value-type="string">
            <text:p>3A6BB</text:p>
          </table:table-cell>
          <table:table-cell office:value-type="float" office:value="239291" calcext:value-type="float">
            <text:p>239291</text:p>
          </table:table-cell>
          <table:table-cell office:value-type="float" office:value="4" calcext:value-type="float">
            <text:p>4</text:p>
          </table:table-cell>
          <table:table-cell table:formula="of:=IF([.D2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C249])" office:value-type="string" office:string-value="3A6BF" calcext:value-type="string">
            <text:p>3A6BF</text:p>
          </table:table-cell>
          <table:table-cell office:value-type="float" office:value="239295" calcext:value-type="float">
            <text:p>239295</text:p>
          </table:table-cell>
          <table:table-cell office:value-type="float" office:value="32" calcext:value-type="float">
            <text:p>32</text:p>
          </table:table-cell>
          <table:table-cell table:formula="of:=IF([.D2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C250])" office:value-type="string" office:string-value="3A6DF" calcext:value-type="string">
            <text:p>3A6DF</text:p>
          </table:table-cell>
          <table:table-cell office:value-type="float" office:value="239327" calcext:value-type="float">
            <text:p>239327</text:p>
          </table:table-cell>
          <table:table-cell office:value-type="float" office:value="13920" calcext:value-type="float">
            <text:p>13920</text:p>
          </table:table-cell>
          <table:table-cell table:formula="of:=IF([.D25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C251])" office:value-type="string" office:string-value="3DD3F" calcext:value-type="string">
            <text:p>3DD3F</text:p>
          </table:table-cell>
          <table:table-cell office:value-type="float" office:value="253247" calcext:value-type="float">
            <text:p>253247</text:p>
          </table:table-cell>
          <table:table-cell office:value-type="float" office:value="4" calcext:value-type="float">
            <text:p>4</text:p>
          </table:table-cell>
          <table:table-cell table:formula="of:=IF([.D2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C252])" office:value-type="string" office:string-value="3DD43" calcext:value-type="string">
            <text:p>3DD43</text:p>
          </table:table-cell>
          <table:table-cell office:value-type="float" office:value="253251" calcext:value-type="float">
            <text:p>253251</text:p>
          </table:table-cell>
          <table:table-cell office:value-type="float" office:value="32" calcext:value-type="float">
            <text:p>32</text:p>
          </table:table-cell>
          <table:table-cell table:formula="of:=IF([.D2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C253])" office:value-type="string" office:string-value="3DD63" calcext:value-type="string">
            <text:p>3DD63</text:p>
          </table:table-cell>
          <table:table-cell office:value-type="float" office:value="253283" calcext:value-type="float">
            <text:p>253283</text:p>
          </table:table-cell>
          <table:table-cell office:value-type="float" office:value="4408" calcext:value-type="float">
            <text:p>4408</text:p>
          </table:table-cell>
          <table:table-cell table:formula="of:=IF([.D25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C254])" office:value-type="string" office:string-value="3EE9B" calcext:value-type="string">
            <text:p>3EE9B</text:p>
          </table:table-cell>
          <table:table-cell office:value-type="float" office:value="257691" calcext:value-type="float">
            <text:p>257691</text:p>
          </table:table-cell>
          <table:table-cell office:value-type="float" office:value="4" calcext:value-type="float">
            <text:p>4</text:p>
          </table:table-cell>
          <table:table-cell table:formula="of:=IF([.D2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C255])" office:value-type="string" office:string-value="3EE9F" calcext:value-type="string">
            <text:p>3EE9F</text:p>
          </table:table-cell>
          <table:table-cell office:value-type="float" office:value="257695" calcext:value-type="float">
            <text:p>257695</text:p>
          </table:table-cell>
          <table:table-cell office:value-type="float" office:value="32" calcext:value-type="float">
            <text:p>32</text:p>
          </table:table-cell>
          <table:table-cell table:formula="of:=IF([.D2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C256])" office:value-type="string" office:string-value="3EEBF" calcext:value-type="string">
            <text:p>3EEBF</text:p>
          </table:table-cell>
          <table:table-cell office:value-type="float" office:value="257727" calcext:value-type="float">
            <text:p>257727</text:p>
          </table:table-cell>
          <table:table-cell office:value-type="float" office:value="12296" calcext:value-type="float">
            <text:p>12296</text:p>
          </table:table-cell>
          <table:table-cell table:formula="of:=IF([.D256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C257])" office:value-type="string" office:string-value="41EC7" calcext:value-type="string">
            <text:p>41EC7</text:p>
          </table:table-cell>
          <table:table-cell office:value-type="float" office:value="270023" calcext:value-type="float">
            <text:p>270023</text:p>
          </table:table-cell>
          <table:table-cell office:value-type="float" office:value="4" calcext:value-type="float">
            <text:p>4</text:p>
          </table:table-cell>
          <table:table-cell table:formula="of:=IF([.D2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C258])" office:value-type="string" office:string-value="41ECB" calcext:value-type="string">
            <text:p>41ECB</text:p>
          </table:table-cell>
          <table:table-cell office:value-type="float" office:value="270027" calcext:value-type="float">
            <text:p>270027</text:p>
          </table:table-cell>
          <table:table-cell office:value-type="float" office:value="32" calcext:value-type="float">
            <text:p>32</text:p>
          </table:table-cell>
          <table:table-cell table:formula="of:=IF([.D2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C259])" office:value-type="string" office:string-value="41EEB" calcext:value-type="string">
            <text:p>41EEB</text:p>
          </table:table-cell>
          <table:table-cell office:value-type="float" office:value="270059" calcext:value-type="float">
            <text:p>270059</text:p>
          </table:table-cell>
          <table:table-cell office:value-type="float" office:value="12296" calcext:value-type="float">
            <text:p>12296</text:p>
          </table:table-cell>
          <table:table-cell table:formula="of:=IF([.D259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C260])" office:value-type="string" office:string-value="44EF3" calcext:value-type="string">
            <text:p>44EF3</text:p>
          </table:table-cell>
          <table:table-cell office:value-type="float" office:value="282355" calcext:value-type="float">
            <text:p>282355</text:p>
          </table:table-cell>
          <table:table-cell office:value-type="float" office:value="4" calcext:value-type="float">
            <text:p>4</text:p>
          </table:table-cell>
          <table:table-cell table:formula="of:=IF([.D2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C261])" office:value-type="string" office:string-value="44EF7" calcext:value-type="string">
            <text:p>44EF7</text:p>
          </table:table-cell>
          <table:table-cell office:value-type="float" office:value="282359" calcext:value-type="float">
            <text:p>282359</text:p>
          </table:table-cell>
          <table:table-cell office:value-type="float" office:value="32" calcext:value-type="float">
            <text:p>32</text:p>
          </table:table-cell>
          <table:table-cell table:formula="of:=IF([.D2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C262])" office:value-type="string" office:string-value="44F17" calcext:value-type="string">
            <text:p>44F17</text:p>
          </table:table-cell>
          <table:table-cell office:value-type="float" office:value="282391" calcext:value-type="float">
            <text:p>282391</text:p>
          </table:table-cell>
          <table:table-cell office:value-type="float" office:value="4408" calcext:value-type="float">
            <text:p>4408</text:p>
          </table:table-cell>
          <table:table-cell table:formula="of:=IF([.D262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C263])" office:value-type="string" office:string-value="4604F" calcext:value-type="string">
            <text:p>4604F</text:p>
          </table:table-cell>
          <table:table-cell office:value-type="float" office:value="286799" calcext:value-type="float">
            <text:p>286799</text:p>
          </table:table-cell>
          <table:table-cell office:value-type="float" office:value="4" calcext:value-type="float">
            <text:p>4</text:p>
          </table:table-cell>
          <table:table-cell table:formula="of:=IF([.D2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C264])" office:value-type="string" office:string-value="46053" calcext:value-type="string">
            <text:p>46053</text:p>
          </table:table-cell>
          <table:table-cell office:value-type="float" office:value="286803" calcext:value-type="float">
            <text:p>286803</text:p>
          </table:table-cell>
          <table:table-cell office:value-type="float" office:value="32" calcext:value-type="float">
            <text:p>32</text:p>
          </table:table-cell>
          <table:table-cell table:formula="of:=IF([.D2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C265])" office:value-type="string" office:string-value="46073" calcext:value-type="string">
            <text:p>46073</text:p>
          </table:table-cell>
          <table:table-cell office:value-type="float" office:value="286835" calcext:value-type="float">
            <text:p>286835</text:p>
          </table:table-cell>
          <table:table-cell office:value-type="float" office:value="13920" calcext:value-type="float">
            <text:p>13920</text:p>
          </table:table-cell>
          <table:table-cell table:formula="of:=IF([.D265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C266])" office:value-type="string" office:string-value="496D3" calcext:value-type="string">
            <text:p>496D3</text:p>
          </table:table-cell>
          <table:table-cell office:value-type="float" office:value="300755" calcext:value-type="float">
            <text:p>300755</text:p>
          </table:table-cell>
          <table:table-cell office:value-type="float" office:value="4" calcext:value-type="float">
            <text:p>4</text:p>
          </table:table-cell>
          <table:table-cell table:formula="of:=IF([.D2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C267])" office:value-type="string" office:string-value="496D7" calcext:value-type="string">
            <text:p>496D7</text:p>
          </table:table-cell>
          <table:table-cell office:value-type="float" office:value="300759" calcext:value-type="float">
            <text:p>300759</text:p>
          </table:table-cell>
          <table:table-cell office:value-type="float" office:value="32" calcext:value-type="float">
            <text:p>32</text:p>
          </table:table-cell>
          <table:table-cell table:formula="of:=IF([.D2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C268])" office:value-type="string" office:string-value="496F7" calcext:value-type="string">
            <text:p>496F7</text:p>
          </table:table-cell>
          <table:table-cell office:value-type="float" office:value="300791" calcext:value-type="float">
            <text:p>300791</text:p>
          </table:table-cell>
          <table:table-cell office:value-type="float" office:value="13920" calcext:value-type="float">
            <text:p>13920</text:p>
          </table:table-cell>
          <table:table-cell table:formula="of:=IF([.D268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C269])" office:value-type="string" office:string-value="4CD57" calcext:value-type="string">
            <text:p>4CD57</text:p>
          </table:table-cell>
          <table:table-cell office:value-type="float" office:value="314711" calcext:value-type="float">
            <text:p>314711</text:p>
          </table:table-cell>
          <table:table-cell office:value-type="float" office:value="4" calcext:value-type="float">
            <text:p>4</text:p>
          </table:table-cell>
          <table:table-cell table:formula="of:=IF([.D2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C270])" office:value-type="string" office:string-value="4CD5B" calcext:value-type="string">
            <text:p>4CD5B</text:p>
          </table:table-cell>
          <table:table-cell office:value-type="float" office:value="314715" calcext:value-type="float">
            <text:p>314715</text:p>
          </table:table-cell>
          <table:table-cell office:value-type="float" office:value="32" calcext:value-type="float">
            <text:p>32</text:p>
          </table:table-cell>
          <table:table-cell table:formula="of:=IF([.D2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C271])" office:value-type="string" office:string-value="4CD7B" calcext:value-type="string">
            <text:p>4CD7B</text:p>
          </table:table-cell>
          <table:table-cell office:value-type="float" office:value="314747" calcext:value-type="float">
            <text:p>314747</text:p>
          </table:table-cell>
          <table:table-cell office:value-type="float" office:value="13920" calcext:value-type="float">
            <text:p>13920</text:p>
          </table:table-cell>
          <table:table-cell table:formula="of:=IF([.D271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C272])" office:value-type="string" office:string-value="503DB" calcext:value-type="string">
            <text:p>503DB</text:p>
          </table:table-cell>
          <table:table-cell office:value-type="float" office:value="328667" calcext:value-type="float">
            <text:p>328667</text:p>
          </table:table-cell>
          <table:table-cell office:value-type="float" office:value="4" calcext:value-type="float">
            <text:p>4</text:p>
          </table:table-cell>
          <table:table-cell table:formula="of:=IF([.D2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C273])" office:value-type="string" office:string-value="503DF" calcext:value-type="string">
            <text:p>503DF</text:p>
          </table:table-cell>
          <table:table-cell office:value-type="float" office:value="328671" calcext:value-type="float">
            <text:p>328671</text:p>
          </table:table-cell>
          <table:table-cell office:value-type="float" office:value="32" calcext:value-type="float">
            <text:p>32</text:p>
          </table:table-cell>
          <table:table-cell table:formula="of:=IF([.D2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C274])" office:value-type="string" office:string-value="503FF" calcext:value-type="string">
            <text:p>503FF</text:p>
          </table:table-cell>
          <table:table-cell office:value-type="float" office:value="328703" calcext:value-type="float">
            <text:p>328703</text:p>
          </table:table-cell>
          <table:table-cell office:value-type="float" office:value="13920" calcext:value-type="float">
            <text:p>13920</text:p>
          </table:table-cell>
          <table:table-cell table:formula="of:=IF([.D274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C275])" office:value-type="string" office:string-value="53A5F" calcext:value-type="string">
            <text:p>53A5F</text:p>
          </table:table-cell>
          <table:table-cell office:value-type="float" office:value="342623" calcext:value-type="float">
            <text:p>342623</text:p>
          </table:table-cell>
          <table:table-cell office:value-type="float" office:value="4" calcext:value-type="float">
            <text:p>4</text:p>
          </table:table-cell>
          <table:table-cell table:formula="of:=IF([.D2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C276])" office:value-type="string" office:string-value="53A63" calcext:value-type="string">
            <text:p>53A63</text:p>
          </table:table-cell>
          <table:table-cell office:value-type="float" office:value="342627" calcext:value-type="float">
            <text:p>342627</text:p>
          </table:table-cell>
          <table:table-cell office:value-type="float" office:value="32" calcext:value-type="float">
            <text:p>32</text:p>
          </table:table-cell>
          <table:table-cell table:formula="of:=IF([.D2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C277])" office:value-type="string" office:string-value="53A83" calcext:value-type="string">
            <text:p>53A83</text:p>
          </table:table-cell>
          <table:table-cell office:value-type="float" office:value="342659" calcext:value-type="float">
            <text:p>342659</text:p>
          </table:table-cell>
          <table:table-cell office:value-type="float" office:value="13920" calcext:value-type="float">
            <text:p>13920</text:p>
          </table:table-cell>
          <table:table-cell table:formula="of:=IF([.D277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C278])" office:value-type="string" office:string-value="570E3" calcext:value-type="string">
            <text:p>570E3</text:p>
          </table:table-cell>
          <table:table-cell office:value-type="float" office:value="356579" calcext:value-type="float">
            <text:p>356579</text:p>
          </table:table-cell>
          <table:table-cell office:value-type="float" office:value="4" calcext:value-type="float">
            <text:p>4</text:p>
          </table:table-cell>
          <table:table-cell table:formula="of:=IF([.D2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C279])" office:value-type="string" office:string-value="570E7" calcext:value-type="string">
            <text:p>570E7</text:p>
          </table:table-cell>
          <table:table-cell office:value-type="float" office:value="356583" calcext:value-type="float">
            <text:p>356583</text:p>
          </table:table-cell>
          <table:table-cell office:value-type="float" office:value="32" calcext:value-type="float">
            <text:p>32</text:p>
          </table:table-cell>
          <table:table-cell table:formula="of:=IF([.D2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C280])" office:value-type="string" office:string-value="57107" calcext:value-type="string">
            <text:p>57107</text:p>
          </table:table-cell>
          <table:table-cell office:value-type="float" office:value="356615" calcext:value-type="float">
            <text:p>356615</text:p>
          </table:table-cell>
          <table:table-cell office:value-type="float" office:value="13920" calcext:value-type="float">
            <text:p>13920</text:p>
          </table:table-cell>
          <table:table-cell table:formula="of:=IF([.D28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C281])" office:value-type="string" office:string-value="5A767" calcext:value-type="string">
            <text:p>5A767</text:p>
          </table:table-cell>
          <table:table-cell office:value-type="float" office:value="370535" calcext:value-type="float">
            <text:p>370535</text:p>
          </table:table-cell>
          <table:table-cell office:value-type="float" office:value="4" calcext:value-type="float">
            <text:p>4</text:p>
          </table:table-cell>
          <table:table-cell table:formula="of:=IF([.D2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C282])" office:value-type="string" office:string-value="5A76B" calcext:value-type="string">
            <text:p>5A76B</text:p>
          </table:table-cell>
          <table:table-cell office:value-type="float" office:value="370539" calcext:value-type="float">
            <text:p>370539</text:p>
          </table:table-cell>
          <table:table-cell office:value-type="float" office:value="32" calcext:value-type="float">
            <text:p>32</text:p>
          </table:table-cell>
          <table:table-cell table:formula="of:=IF([.D2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C283])" office:value-type="string" office:string-value="5A78B" calcext:value-type="string">
            <text:p>5A78B</text:p>
          </table:table-cell>
          <table:table-cell office:value-type="float" office:value="370571" calcext:value-type="float">
            <text:p>370571</text:p>
          </table:table-cell>
          <table:table-cell office:value-type="float" office:value="13920" calcext:value-type="float">
            <text:p>13920</text:p>
          </table:table-cell>
          <table:table-cell table:formula="of:=IF([.D28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C284])" office:value-type="string" office:string-value="5DDEB" calcext:value-type="string">
            <text:p>5DDEB</text:p>
          </table:table-cell>
          <table:table-cell office:value-type="float" office:value="384491" calcext:value-type="float">
            <text:p>384491</text:p>
          </table:table-cell>
          <table:table-cell office:value-type="float" office:value="4" calcext:value-type="float">
            <text:p>4</text:p>
          </table:table-cell>
          <table:table-cell table:formula="of:=IF([.D2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C285])" office:value-type="string" office:string-value="5DDEF" calcext:value-type="string">
            <text:p>5DDEF</text:p>
          </table:table-cell>
          <table:table-cell office:value-type="float" office:value="384495" calcext:value-type="float">
            <text:p>384495</text:p>
          </table:table-cell>
          <table:table-cell office:value-type="float" office:value="32" calcext:value-type="float">
            <text:p>32</text:p>
          </table:table-cell>
          <table:table-cell table:formula="of:=IF([.D2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C286])" office:value-type="string" office:string-value="5DE0F" calcext:value-type="string">
            <text:p>5DE0F</text:p>
          </table:table-cell>
          <table:table-cell office:value-type="float" office:value="384527" calcext:value-type="float">
            <text:p>384527</text:p>
          </table:table-cell>
          <table:table-cell office:value-type="float" office:value="13920" calcext:value-type="float">
            <text:p>13920</text:p>
          </table:table-cell>
          <table:table-cell table:formula="of:=IF([.D286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C287])" office:value-type="string" office:string-value="6146F" calcext:value-type="string">
            <text:p>6146F</text:p>
          </table:table-cell>
          <table:table-cell office:value-type="float" office:value="398447" calcext:value-type="float">
            <text:p>398447</text:p>
          </table:table-cell>
          <table:table-cell office:value-type="float" office:value="4" calcext:value-type="float">
            <text:p>4</text:p>
          </table:table-cell>
          <table:table-cell table:formula="of:=IF([.D2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C288])" office:value-type="string" office:string-value="61473" calcext:value-type="string">
            <text:p>61473</text:p>
          </table:table-cell>
          <table:table-cell office:value-type="float" office:value="398451" calcext:value-type="float">
            <text:p>398451</text:p>
          </table:table-cell>
          <table:table-cell office:value-type="float" office:value="32" calcext:value-type="float">
            <text:p>32</text:p>
          </table:table-cell>
          <table:table-cell table:formula="of:=IF([.D2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C289])" office:value-type="string" office:string-value="61493" calcext:value-type="string">
            <text:p>61493</text:p>
          </table:table-cell>
          <table:table-cell office:value-type="float" office:value="398483" calcext:value-type="float">
            <text:p>398483</text:p>
          </table:table-cell>
          <table:table-cell office:value-type="float" office:value="13920" calcext:value-type="float">
            <text:p>13920</text:p>
          </table:table-cell>
          <table:table-cell table:formula="of:=IF([.D289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C290])" office:value-type="string" office:string-value="64AF3" calcext:value-type="string">
            <text:p>64AF3</text:p>
          </table:table-cell>
          <table:table-cell office:value-type="float" office:value="412403" calcext:value-type="float">
            <text:p>412403</text:p>
          </table:table-cell>
          <table:table-cell office:value-type="float" office:value="4" calcext:value-type="float">
            <text:p>4</text:p>
          </table:table-cell>
          <table:table-cell table:formula="of:=IF([.D2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C291])" office:value-type="string" office:string-value="64AF7" calcext:value-type="string">
            <text:p>64AF7</text:p>
          </table:table-cell>
          <table:table-cell office:value-type="float" office:value="412407" calcext:value-type="float">
            <text:p>412407</text:p>
          </table:table-cell>
          <table:table-cell office:value-type="float" office:value="32" calcext:value-type="float">
            <text:p>32</text:p>
          </table:table-cell>
          <table:table-cell table:formula="of:=IF([.D2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C292])" office:value-type="string" office:string-value="64B17" calcext:value-type="string">
            <text:p>64B17</text:p>
          </table:table-cell>
          <table:table-cell office:value-type="float" office:value="412439" calcext:value-type="float">
            <text:p>412439</text:p>
          </table:table-cell>
          <table:table-cell office:value-type="float" office:value="4770" calcext:value-type="float">
            <text:p>4770</text:p>
          </table:table-cell>
          <table:table-cell table:formula="of:=IF([.D292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C293])" office:value-type="string" office:string-value="65DB9" calcext:value-type="string">
            <text:p>65DB9</text:p>
          </table:table-cell>
          <table:table-cell office:value-type="float" office:value="417209" calcext:value-type="float">
            <text:p>417209</text:p>
          </table:table-cell>
          <table:table-cell office:value-type="float" office:value="4" calcext:value-type="float">
            <text:p>4</text:p>
          </table:table-cell>
          <table:table-cell table:formula="of:=IF([.D2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C294])" office:value-type="string" office:string-value="65DBD" calcext:value-type="string">
            <text:p>65DBD</text:p>
          </table:table-cell>
          <table:table-cell office:value-type="float" office:value="417213" calcext:value-type="float">
            <text:p>417213</text:p>
          </table:table-cell>
          <table:table-cell office:value-type="float" office:value="32" calcext:value-type="float">
            <text:p>32</text:p>
          </table:table-cell>
          <table:table-cell table:formula="of:=IF([.D2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C295])" office:value-type="string" office:string-value="65DDD" calcext:value-type="string">
            <text:p>65DDD</text:p>
          </table:table-cell>
          <table:table-cell office:value-type="float" office:value="417245" calcext:value-type="float">
            <text:p>417245</text:p>
          </table:table-cell>
          <table:table-cell office:value-type="float" office:value="5202" calcext:value-type="float">
            <text:p>5202</text:p>
          </table:table-cell>
          <table:table-cell table:formula="of:=IF([.D295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C296])" office:value-type="string" office:string-value="6722F" calcext:value-type="string">
            <text:p>6722F</text:p>
          </table:table-cell>
          <table:table-cell office:value-type="float" office:value="422447" calcext:value-type="float">
            <text:p>422447</text:p>
          </table:table-cell>
          <table:table-cell office:value-type="float" office:value="4" calcext:value-type="float">
            <text:p>4</text:p>
          </table:table-cell>
          <table:table-cell table:formula="of:=IF([.D2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C297])" office:value-type="string" office:string-value="67233" calcext:value-type="string">
            <text:p>67233</text:p>
          </table:table-cell>
          <table:table-cell office:value-type="float" office:value="422451" calcext:value-type="float">
            <text:p>422451</text:p>
          </table:table-cell>
          <table:table-cell office:value-type="float" office:value="32" calcext:value-type="float">
            <text:p>32</text:p>
          </table:table-cell>
          <table:table-cell table:formula="of:=IF([.D2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C298])" office:value-type="string" office:string-value="67253" calcext:value-type="string">
            <text:p>67253</text:p>
          </table:table-cell>
          <table:table-cell office:value-type="float" office:value="422483" calcext:value-type="float">
            <text:p>422483</text:p>
          </table:table-cell>
          <table:table-cell office:value-type="float" office:value="6230" calcext:value-type="float">
            <text:p>6230</text:p>
          </table:table-cell>
          <table:table-cell table:formula="of:=IF([.D298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C299])" office:value-type="string" office:string-value="68AA9" calcext:value-type="string">
            <text:p>68AA9</text:p>
          </table:table-cell>
          <table:table-cell office:value-type="float" office:value="428713" calcext:value-type="float">
            <text:p>428713</text:p>
          </table:table-cell>
          <table:table-cell office:value-type="float" office:value="4" calcext:value-type="float">
            <text:p>4</text:p>
          </table:table-cell>
          <table:table-cell table:formula="of:=IF([.D2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C300])" office:value-type="string" office:string-value="68AAD" calcext:value-type="string">
            <text:p>68AAD</text:p>
          </table:table-cell>
          <table:table-cell office:value-type="float" office:value="428717" calcext:value-type="float">
            <text:p>428717</text:p>
          </table:table-cell>
          <table:table-cell office:value-type="float" office:value="32" calcext:value-type="float">
            <text:p>32</text:p>
          </table:table-cell>
          <table:table-cell table:formula="of:=IF([.D3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C301])" office:value-type="string" office:string-value="68ACD" calcext:value-type="string">
            <text:p>68ACD</text:p>
          </table:table-cell>
          <table:table-cell office:value-type="float" office:value="428749" calcext:value-type="float">
            <text:p>428749</text:p>
          </table:table-cell>
          <table:table-cell office:value-type="float" office:value="24720" calcext:value-type="float">
            <text:p>24720</text:p>
          </table:table-cell>
          <table:table-cell table:formula="of:=IF([.D301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C302])" office:value-type="string" office:string-value="6EB5D" calcext:value-type="string">
            <text:p>6EB5D</text:p>
          </table:table-cell>
          <table:table-cell office:value-type="float" office:value="453469" calcext:value-type="float">
            <text:p>453469</text:p>
          </table:table-cell>
          <table:table-cell office:value-type="float" office:value="4" calcext:value-type="float">
            <text:p>4</text:p>
          </table:table-cell>
          <table:table-cell table:formula="of:=IF([.D3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C303])" office:value-type="string" office:string-value="6EB61" calcext:value-type="string">
            <text:p>6EB61</text:p>
          </table:table-cell>
          <table:table-cell office:value-type="float" office:value="453473" calcext:value-type="float">
            <text:p>453473</text:p>
          </table:table-cell>
          <table:table-cell office:value-type="float" office:value="32" calcext:value-type="float">
            <text:p>32</text:p>
          </table:table-cell>
          <table:table-cell table:formula="of:=IF([.D3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C304])" office:value-type="string" office:string-value="6EB81" calcext:value-type="string">
            <text:p>6EB81</text:p>
          </table:table-cell>
          <table:table-cell office:value-type="float" office:value="453505" calcext:value-type="float">
            <text:p>453505</text:p>
          </table:table-cell>
          <table:table-cell office:value-type="float" office:value="24720" calcext:value-type="float">
            <text:p>24720</text:p>
          </table:table-cell>
          <table:table-cell table:formula="of:=IF([.D304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C305])" office:value-type="string" office:string-value="74C11" calcext:value-type="string">
            <text:p>74C11</text:p>
          </table:table-cell>
          <table:table-cell office:value-type="float" office:value="478225" calcext:value-type="float">
            <text:p>478225</text:p>
          </table:table-cell>
          <table:table-cell office:value-type="float" office:value="4" calcext:value-type="float">
            <text:p>4</text:p>
          </table:table-cell>
          <table:table-cell table:formula="of:=IF([.D3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C306])" office:value-type="string" office:string-value="74C15" calcext:value-type="string">
            <text:p>74C15</text:p>
          </table:table-cell>
          <table:table-cell office:value-type="float" office:value="478229" calcext:value-type="float">
            <text:p>478229</text:p>
          </table:table-cell>
          <table:table-cell office:value-type="float" office:value="32" calcext:value-type="float">
            <text:p>32</text:p>
          </table:table-cell>
          <table:table-cell table:formula="of:=IF([.D3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C307])" office:value-type="string" office:string-value="74C35" calcext:value-type="string">
            <text:p>74C35</text:p>
          </table:table-cell>
          <table:table-cell office:value-type="float" office:value="478261" calcext:value-type="float">
            <text:p>478261</text:p>
          </table:table-cell>
          <table:table-cell office:value-type="float" office:value="11340" calcext:value-type="float">
            <text:p>11340</text:p>
          </table:table-cell>
          <table:table-cell table:formula="of:=IF([.D307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C308])" office:value-type="string" office:string-value="77881" calcext:value-type="string">
            <text:p>77881</text:p>
          </table:table-cell>
          <table:table-cell office:value-type="float" office:value="489601" calcext:value-type="float">
            <text:p>489601</text:p>
          </table:table-cell>
          <table:table-cell office:value-type="float" office:value="4" calcext:value-type="float">
            <text:p>4</text:p>
          </table:table-cell>
          <table:table-cell table:formula="of:=IF([.D3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C309])" office:value-type="string" office:string-value="77885" calcext:value-type="string">
            <text:p>77885</text:p>
          </table:table-cell>
          <table:table-cell office:value-type="float" office:value="489605" calcext:value-type="float">
            <text:p>489605</text:p>
          </table:table-cell>
          <table:table-cell office:value-type="float" office:value="32" calcext:value-type="float">
            <text:p>32</text:p>
          </table:table-cell>
          <table:table-cell table:formula="of:=IF([.D3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C310])" office:value-type="string" office:string-value="778A5" calcext:value-type="string">
            <text:p>778A5</text:p>
          </table:table-cell>
          <table:table-cell office:value-type="float" office:value="489637" calcext:value-type="float">
            <text:p>489637</text:p>
          </table:table-cell>
          <table:table-cell office:value-type="float" office:value="11340" calcext:value-type="float">
            <text:p>11340</text:p>
          </table:table-cell>
          <table:table-cell table:formula="of:=IF([.D31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C311])" office:value-type="string" office:string-value="7A4F1" calcext:value-type="string">
            <text:p>7A4F1</text:p>
          </table:table-cell>
          <table:table-cell office:value-type="float" office:value="500977" calcext:value-type="float">
            <text:p>500977</text:p>
          </table:table-cell>
          <table:table-cell office:value-type="float" office:value="4" calcext:value-type="float">
            <text:p>4</text:p>
          </table:table-cell>
          <table:table-cell table:formula="of:=IF([.D3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C312])" office:value-type="string" office:string-value="7A4F5" calcext:value-type="string">
            <text:p>7A4F5</text:p>
          </table:table-cell>
          <table:table-cell office:value-type="float" office:value="500981" calcext:value-type="float">
            <text:p>500981</text:p>
          </table:table-cell>
          <table:table-cell office:value-type="float" office:value="32" calcext:value-type="float">
            <text:p>32</text:p>
          </table:table-cell>
          <table:table-cell table:formula="of:=IF([.D3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C313])" office:value-type="string" office:string-value="7A515" calcext:value-type="string">
            <text:p>7A515</text:p>
          </table:table-cell>
          <table:table-cell office:value-type="float" office:value="501013" calcext:value-type="float">
            <text:p>501013</text:p>
          </table:table-cell>
          <table:table-cell office:value-type="float" office:value="21060" calcext:value-type="float">
            <text:p>21060</text:p>
          </table:table-cell>
          <table:table-cell table:formula="of:=IF([.D31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C314])" office:value-type="string" office:string-value="7F759" calcext:value-type="string">
            <text:p>7F759</text:p>
          </table:table-cell>
          <table:table-cell office:value-type="float" office:value="522073" calcext:value-type="float">
            <text:p>522073</text:p>
          </table:table-cell>
          <table:table-cell office:value-type="float" office:value="4" calcext:value-type="float">
            <text:p>4</text:p>
          </table:table-cell>
          <table:table-cell table:formula="of:=IF([.D3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C315])" office:value-type="string" office:string-value="7F75D" calcext:value-type="string">
            <text:p>7F75D</text:p>
          </table:table-cell>
          <table:table-cell office:value-type="float" office:value="522077" calcext:value-type="float">
            <text:p>522077</text:p>
          </table:table-cell>
          <table:table-cell office:value-type="float" office:value="32" calcext:value-type="float">
            <text:p>32</text:p>
          </table:table-cell>
          <table:table-cell table:formula="of:=IF([.D3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C316])" office:value-type="string" office:string-value="7F77D" calcext:value-type="string">
            <text:p>7F77D</text:p>
          </table:table-cell>
          <table:table-cell office:value-type="float" office:value="522109" calcext:value-type="float">
            <text:p>522109</text:p>
          </table:table-cell>
          <table:table-cell office:value-type="float" office:value="21060" calcext:value-type="float">
            <text:p>21060</text:p>
          </table:table-cell>
          <table:table-cell table:formula="of:=IF([.D316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C317])" office:value-type="string" office:string-value="849C1" calcext:value-type="string">
            <text:p>849C1</text:p>
          </table:table-cell>
          <table:table-cell office:value-type="float" office:value="543169" calcext:value-type="float">
            <text:p>543169</text:p>
          </table:table-cell>
          <table:table-cell office:value-type="float" office:value="4" calcext:value-type="float">
            <text:p>4</text:p>
          </table:table-cell>
          <table:table-cell table:formula="of:=IF([.D3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C318])" office:value-type="string" office:string-value="849C5" calcext:value-type="string">
            <text:p>849C5</text:p>
          </table:table-cell>
          <table:table-cell office:value-type="float" office:value="543173" calcext:value-type="float">
            <text:p>543173</text:p>
          </table:table-cell>
          <table:table-cell office:value-type="float" office:value="32" calcext:value-type="float">
            <text:p>32</text:p>
          </table:table-cell>
          <table:table-cell table:formula="of:=IF([.D3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C319])" office:value-type="string" office:string-value="849E5" calcext:value-type="string">
            <text:p>849E5</text:p>
          </table:table-cell>
          <table:table-cell office:value-type="float" office:value="543205" calcext:value-type="float">
            <text:p>543205</text:p>
          </table:table-cell>
          <table:table-cell office:value-type="float" office:value="32768" calcext:value-type="float">
            <text:p>32768</text:p>
          </table:table-cell>
          <table:table-cell table:formula="of:=IF([.D319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C320])" office:value-type="string" office:string-value="8C9E5" calcext:value-type="string">
            <text:p>8C9E5</text:p>
          </table:table-cell>
          <table:table-cell office:value-type="float" office:value="575973" calcext:value-type="float">
            <text:p>575973</text:p>
          </table:table-cell>
          <table:table-cell office:value-type="float" office:value="27370" calcext:value-type="float">
            <text:p>27370</text:p>
          </table:table-cell>
          <table:table-cell table:formula="of:=IF([.D32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C321])" office:value-type="string" office:string-value="934CF" calcext:value-type="string">
            <text:p>934CF</text:p>
          </table:table-cell>
          <table:table-cell office:value-type="float" office:value="603343" calcext:value-type="float">
            <text:p>603343</text:p>
          </table:table-cell>
          <table:table-cell office:value-type="float" office:value="4" calcext:value-type="float">
            <text:p>4</text:p>
          </table:table-cell>
          <table:table-cell table:formula="of:=IF([.D3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C322])" office:value-type="string" office:string-value="934D3" calcext:value-type="string">
            <text:p>934D3</text:p>
          </table:table-cell>
          <table:table-cell office:value-type="float" office:value="603347" calcext:value-type="float">
            <text:p>603347</text:p>
          </table:table-cell>
          <table:table-cell office:value-type="float" office:value="32" calcext:value-type="float">
            <text:p>32</text:p>
          </table:table-cell>
          <table:table-cell table:formula="of:=IF([.D3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C323])" office:value-type="string" office:string-value="934F3" calcext:value-type="string">
            <text:p>934F3</text:p>
          </table:table-cell>
          <table:table-cell office:value-type="float" office:value="603379" calcext:value-type="float">
            <text:p>603379</text:p>
          </table:table-cell>
          <table:table-cell office:value-type="float" office:value="32768" calcext:value-type="float">
            <text:p>32768</text:p>
          </table:table-cell>
          <table:table-cell table:formula="of:=IF([.D32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C324])" office:value-type="string" office:string-value="9B4F3" calcext:value-type="string">
            <text:p>9B4F3</text:p>
          </table:table-cell>
          <table:table-cell office:value-type="float" office:value="636147" calcext:value-type="float">
            <text:p>636147</text:p>
          </table:table-cell>
          <table:table-cell office:value-type="float" office:value="26122" calcext:value-type="float">
            <text:p>26122</text:p>
          </table:table-cell>
          <table:table-cell table:formula="of:=IF([.D324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C325])" office:value-type="string" office:string-value="A1AFD" calcext:value-type="string">
            <text:p>A1AFD</text:p>
          </table:table-cell>
          <table:table-cell office:value-type="float" office:value="662269" calcext:value-type="float">
            <text:p>662269</text:p>
          </table:table-cell>
          <table:table-cell office:value-type="float" office:value="4" calcext:value-type="float">
            <text:p>4</text:p>
          </table:table-cell>
          <table:table-cell table:formula="of:=IF([.D3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C326])" office:value-type="string" office:string-value="A1B01" calcext:value-type="string">
            <text:p>A1B01</text:p>
          </table:table-cell>
          <table:table-cell office:value-type="float" office:value="662273" calcext:value-type="float">
            <text:p>662273</text:p>
          </table:table-cell>
          <table:table-cell office:value-type="float" office:value="32" calcext:value-type="float">
            <text:p>32</text:p>
          </table:table-cell>
          <table:table-cell table:formula="of:=IF([.D3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C327])" office:value-type="string" office:string-value="A1B21" calcext:value-type="string">
            <text:p>A1B21</text:p>
          </table:table-cell>
          <table:table-cell office:value-type="float" office:value="662305" calcext:value-type="float">
            <text:p>662305</text:p>
          </table:table-cell>
          <table:table-cell office:value-type="float" office:value="13530" calcext:value-type="float">
            <text:p>13530</text:p>
          </table:table-cell>
          <table:table-cell table:formula="of:=IF([.D327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C328])" office:value-type="string" office:string-value="A4FFB" calcext:value-type="string">
            <text:p>A4FFB</text:p>
          </table:table-cell>
          <table:table-cell office:value-type="float" office:value="675835" calcext:value-type="float">
            <text:p>675835</text:p>
          </table:table-cell>
          <table:table-cell office:value-type="float" office:value="4" calcext:value-type="float">
            <text:p>4</text:p>
          </table:table-cell>
          <table:table-cell table:formula="of:=IF([.D3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C329])" office:value-type="string" office:string-value="A4FFF" calcext:value-type="string">
            <text:p>A4FFF</text:p>
          </table:table-cell>
          <table:table-cell office:value-type="float" office:value="675839" calcext:value-type="float">
            <text:p>675839</text:p>
          </table:table-cell>
          <table:table-cell office:value-type="float" office:value="32" calcext:value-type="float">
            <text:p>32</text:p>
          </table:table-cell>
          <table:table-cell table:formula="of:=IF([.D3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C330])" office:value-type="string" office:string-value="A501F" calcext:value-type="string">
            <text:p>A501F</text:p>
          </table:table-cell>
          <table:table-cell office:value-type="float" office:value="675871" calcext:value-type="float">
            <text:p>675871</text:p>
          </table:table-cell>
          <table:table-cell office:value-type="float" office:value="16200" calcext:value-type="float">
            <text:p>16200</text:p>
          </table:table-cell>
          <table:table-cell table:formula="of:=IF([.D33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C331])" office:value-type="string" office:string-value="A8F67" calcext:value-type="string">
            <text:p>A8F67</text:p>
          </table:table-cell>
          <table:table-cell office:value-type="float" office:value="692071" calcext:value-type="float">
            <text:p>692071</text:p>
          </table:table-cell>
          <table:table-cell office:value-type="float" office:value="4" calcext:value-type="float">
            <text:p>4</text:p>
          </table:table-cell>
          <table:table-cell table:formula="of:=IF([.D3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C332])" office:value-type="string" office:string-value="A8F6B" calcext:value-type="string">
            <text:p>A8F6B</text:p>
          </table:table-cell>
          <table:table-cell office:value-type="float" office:value="692075" calcext:value-type="float">
            <text:p>692075</text:p>
          </table:table-cell>
          <table:table-cell office:value-type="float" office:value="32" calcext:value-type="float">
            <text:p>32</text:p>
          </table:table-cell>
          <table:table-cell table:formula="of:=IF([.D3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C333])" office:value-type="string" office:string-value="A8F8B" calcext:value-type="string">
            <text:p>A8F8B</text:p>
          </table:table-cell>
          <table:table-cell office:value-type="float" office:value="692107" calcext:value-type="float">
            <text:p>692107</text:p>
          </table:table-cell>
          <table:table-cell office:value-type="float" office:value="16200" calcext:value-type="float">
            <text:p>16200</text:p>
          </table:table-cell>
          <table:table-cell table:formula="of:=IF([.D33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C334])" office:value-type="string" office:string-value="ACED3" calcext:value-type="string">
            <text:p>ACED3</text:p>
          </table:table-cell>
          <table:table-cell office:value-type="float" office:value="708307" calcext:value-type="float">
            <text:p>708307</text:p>
          </table:table-cell>
          <table:table-cell office:value-type="float" office:value="4" calcext:value-type="float">
            <text:p>4</text:p>
          </table:table-cell>
          <table:table-cell table:formula="of:=IF([.D3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C335])" office:value-type="string" office:string-value="ACED7" calcext:value-type="string">
            <text:p>ACED7</text:p>
          </table:table-cell>
          <table:table-cell office:value-type="float" office:value="708311" calcext:value-type="float">
            <text:p>708311</text:p>
          </table:table-cell>
          <table:table-cell office:value-type="float" office:value="32" calcext:value-type="float">
            <text:p>32</text:p>
          </table:table-cell>
          <table:table-cell table:formula="of:=IF([.D3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C336])" office:value-type="string" office:string-value="ACEF7" calcext:value-type="string">
            <text:p>ACEF7</text:p>
          </table:table-cell>
          <table:table-cell office:value-type="float" office:value="708343" calcext:value-type="float">
            <text:p>708343</text:p>
          </table:table-cell>
          <table:table-cell office:value-type="float" office:value="21996" calcext:value-type="float">
            <text:p>21996</text:p>
          </table:table-cell>
          <table:table-cell table:formula="of:=IF([.D336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C337])" office:value-type="string" office:string-value="B24E3" calcext:value-type="string">
            <text:p>B24E3</text:p>
          </table:table-cell>
          <table:table-cell office:value-type="float" office:value="730339" calcext:value-type="float">
            <text:p>730339</text:p>
          </table:table-cell>
          <table:table-cell office:value-type="float" office:value="4" calcext:value-type="float">
            <text:p>4</text:p>
          </table:table-cell>
          <table:table-cell table:formula="of:=IF([.D3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C338])" office:value-type="string" office:string-value="B24E7" calcext:value-type="string">
            <text:p>B24E7</text:p>
          </table:table-cell>
          <table:table-cell office:value-type="float" office:value="730343" calcext:value-type="float">
            <text:p>730343</text:p>
          </table:table-cell>
          <table:table-cell office:value-type="float" office:value="32" calcext:value-type="float">
            <text:p>32</text:p>
          </table:table-cell>
          <table:table-cell table:formula="of:=IF([.D3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C339])" office:value-type="string" office:string-value="B2507" calcext:value-type="string">
            <text:p>B2507</text:p>
          </table:table-cell>
          <table:table-cell office:value-type="float" office:value="730375" calcext:value-type="float">
            <text:p>730375</text:p>
          </table:table-cell>
          <table:table-cell office:value-type="float" office:value="11288" calcext:value-type="float">
            <text:p>11288</text:p>
          </table:table-cell>
          <table:table-cell table:formula="of:=IF([.D339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C340])" office:value-type="string" office:string-value="B511F" calcext:value-type="string">
            <text:p>B511F</text:p>
          </table:table-cell>
          <table:table-cell office:value-type="float" office:value="741663" calcext:value-type="float">
            <text:p>741663</text:p>
          </table:table-cell>
          <table:table-cell office:value-type="float" office:value="4" calcext:value-type="float">
            <text:p>4</text:p>
          </table:table-cell>
          <table:table-cell table:formula="of:=IF([.D3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C341])" office:value-type="string" office:string-value="B5123" calcext:value-type="string">
            <text:p>B5123</text:p>
          </table:table-cell>
          <table:table-cell office:value-type="float" office:value="741667" calcext:value-type="float">
            <text:p>741667</text:p>
          </table:table-cell>
          <table:table-cell office:value-type="float" office:value="32" calcext:value-type="float">
            <text:p>32</text:p>
          </table:table-cell>
          <table:table-cell table:formula="of:=IF([.D3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C342])" office:value-type="string" office:string-value="B5143" calcext:value-type="string">
            <text:p>B5143</text:p>
          </table:table-cell>
          <table:table-cell office:value-type="float" office:value="741699" calcext:value-type="float">
            <text:p>741699</text:p>
          </table:table-cell>
          <table:table-cell office:value-type="float" office:value="14592" calcext:value-type="float">
            <text:p>14592</text:p>
          </table:table-cell>
          <table:table-cell table:formula="of:=IF([.D342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C343])" office:value-type="string" office:string-value="B8A43" calcext:value-type="string">
            <text:p>B8A43</text:p>
          </table:table-cell>
          <table:table-cell office:value-type="float" office:value="756291" calcext:value-type="float">
            <text:p>756291</text:p>
          </table:table-cell>
          <table:table-cell office:value-type="float" office:value="4" calcext:value-type="float">
            <text:p>4</text:p>
          </table:table-cell>
          <table:table-cell table:formula="of:=IF([.D3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C344])" office:value-type="string" office:string-value="B8A47" calcext:value-type="string">
            <text:p>B8A47</text:p>
          </table:table-cell>
          <table:table-cell office:value-type="float" office:value="756295" calcext:value-type="float">
            <text:p>756295</text:p>
          </table:table-cell>
          <table:table-cell office:value-type="float" office:value="32" calcext:value-type="float">
            <text:p>32</text:p>
          </table:table-cell>
          <table:table-cell table:formula="of:=IF([.D3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C345])" office:value-type="string" office:string-value="B8A67" calcext:value-type="string">
            <text:p>B8A67</text:p>
          </table:table-cell>
          <table:table-cell office:value-type="float" office:value="756327" calcext:value-type="float">
            <text:p>756327</text:p>
          </table:table-cell>
          <table:table-cell office:value-type="float" office:value="6144" calcext:value-type="float">
            <text:p>6144</text:p>
          </table:table-cell>
          <table:table-cell table:formula="of:=IF([.D345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C346])" office:value-type="string" office:string-value="BA267" calcext:value-type="string">
            <text:p>BA267</text:p>
          </table:table-cell>
          <table:table-cell office:value-type="float" office:value="762471" calcext:value-type="float">
            <text:p>762471</text:p>
          </table:table-cell>
          <table:table-cell office:value-type="float" office:value="4" calcext:value-type="float">
            <text:p>4</text:p>
          </table:table-cell>
          <table:table-cell table:formula="of:=IF([.D3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C347])" office:value-type="string" office:string-value="BA26B" calcext:value-type="string">
            <text:p>BA26B</text:p>
          </table:table-cell>
          <table:table-cell office:value-type="float" office:value="762475" calcext:value-type="float">
            <text:p>762475</text:p>
          </table:table-cell>
          <table:table-cell office:value-type="float" office:value="32" calcext:value-type="float">
            <text:p>32</text:p>
          </table:table-cell>
          <table:table-cell table:formula="of:=IF([.D3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C348])" office:value-type="string" office:string-value="BA28B" calcext:value-type="string">
            <text:p>BA28B</text:p>
          </table:table-cell>
          <table:table-cell office:value-type="float" office:value="762507" calcext:value-type="float">
            <text:p>762507</text:p>
          </table:table-cell>
          <table:table-cell office:value-type="float" office:value="6144" calcext:value-type="float">
            <text:p>6144</text:p>
          </table:table-cell>
          <table:table-cell table:formula="of:=IF([.D348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C349])" office:value-type="string" office:string-value="BBA8B" calcext:value-type="string">
            <text:p>BBA8B</text:p>
          </table:table-cell>
          <table:table-cell office:value-type="float" office:value="768651" calcext:value-type="float">
            <text:p>768651</text:p>
          </table:table-cell>
          <table:table-cell office:value-type="float" office:value="4" calcext:value-type="float">
            <text:p>4</text:p>
          </table:table-cell>
          <table:table-cell table:formula="of:=IF([.D3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C350])" office:value-type="string" office:string-value="BBA8F" calcext:value-type="string">
            <text:p>BBA8F</text:p>
          </table:table-cell>
          <table:table-cell office:value-type="float" office:value="768655" calcext:value-type="float">
            <text:p>768655</text:p>
          </table:table-cell>
          <table:table-cell office:value-type="float" office:value="32" calcext:value-type="float">
            <text:p>32</text:p>
          </table:table-cell>
          <table:table-cell table:formula="of:=IF([.D3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C351])" office:value-type="string" office:string-value="BBAAF" calcext:value-type="string">
            <text:p>BBAAF</text:p>
          </table:table-cell>
          <table:table-cell office:value-type="float" office:value="768687" calcext:value-type="float">
            <text:p>768687</text:p>
          </table:table-cell>
          <table:table-cell office:value-type="float" office:value="6144" calcext:value-type="float">
            <text:p>6144</text:p>
          </table:table-cell>
          <table:table-cell table:formula="of:=IF([.D351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C352])" office:value-type="string" office:string-value="BD2AF" calcext:value-type="string">
            <text:p>BD2AF</text:p>
          </table:table-cell>
          <table:table-cell office:value-type="float" office:value="774831" calcext:value-type="float">
            <text:p>774831</text:p>
          </table:table-cell>
          <table:table-cell office:value-type="float" office:value="4" calcext:value-type="float">
            <text:p>4</text:p>
          </table:table-cell>
          <table:table-cell table:formula="of:=IF([.D3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C353])" office:value-type="string" office:string-value="BD2B3" calcext:value-type="string">
            <text:p>BD2B3</text:p>
          </table:table-cell>
          <table:table-cell office:value-type="float" office:value="774835" calcext:value-type="float">
            <text:p>774835</text:p>
          </table:table-cell>
          <table:table-cell office:value-type="float" office:value="32" calcext:value-type="float">
            <text:p>32</text:p>
          </table:table-cell>
          <table:table-cell table:formula="of:=IF([.D3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C354])" office:value-type="string" office:string-value="BD2D3" calcext:value-type="string">
            <text:p>BD2D3</text:p>
          </table:table-cell>
          <table:table-cell office:value-type="float" office:value="774867" calcext:value-type="float">
            <text:p>774867</text:p>
          </table:table-cell>
          <table:table-cell office:value-type="float" office:value="6144" calcext:value-type="float">
            <text:p>6144</text:p>
          </table:table-cell>
          <table:table-cell table:formula="of:=IF([.D354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C355])" office:value-type="string" office:string-value="BEAD3" calcext:value-type="string">
            <text:p>BEAD3</text:p>
          </table:table-cell>
          <table:table-cell office:value-type="float" office:value="781011" calcext:value-type="float">
            <text:p>781011</text:p>
          </table:table-cell>
          <table:table-cell office:value-type="float" office:value="4" calcext:value-type="float">
            <text:p>4</text:p>
          </table:table-cell>
          <table:table-cell table:formula="of:=IF([.D3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C356])" office:value-type="string" office:string-value="BEAD7" calcext:value-type="string">
            <text:p>BEAD7</text:p>
          </table:table-cell>
          <table:table-cell office:value-type="float" office:value="781015" calcext:value-type="float">
            <text:p>781015</text:p>
          </table:table-cell>
          <table:table-cell office:value-type="float" office:value="32" calcext:value-type="float">
            <text:p>32</text:p>
          </table:table-cell>
          <table:table-cell table:formula="of:=IF([.D3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C357])" office:value-type="string" office:string-value="BEAF7" calcext:value-type="string">
            <text:p>BEAF7</text:p>
          </table:table-cell>
          <table:table-cell office:value-type="float" office:value="781047" calcext:value-type="float">
            <text:p>781047</text:p>
          </table:table-cell>
          <table:table-cell office:value-type="float" office:value="8466" calcext:value-type="float">
            <text:p>8466</text:p>
          </table:table-cell>
          <table:table-cell table:formula="of:=IF([.D357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C358])" office:value-type="string" office:string-value="C0C09" calcext:value-type="string">
            <text:p>C0C09</text:p>
          </table:table-cell>
          <table:table-cell office:value-type="float" office:value="789513" calcext:value-type="float">
            <text:p>789513</text:p>
          </table:table-cell>
          <table:table-cell office:value-type="float" office:value="4" calcext:value-type="float">
            <text:p>4</text:p>
          </table:table-cell>
          <table:table-cell table:formula="of:=IF([.D3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C359])" office:value-type="string" office:string-value="C0C0D" calcext:value-type="string">
            <text:p>C0C0D</text:p>
          </table:table-cell>
          <table:table-cell office:value-type="float" office:value="789517" calcext:value-type="float">
            <text:p>789517</text:p>
          </table:table-cell>
          <table:table-cell office:value-type="float" office:value="32" calcext:value-type="float">
            <text:p>32</text:p>
          </table:table-cell>
          <table:table-cell table:formula="of:=IF([.D3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C360])" office:value-type="string" office:string-value="C0C2D" calcext:value-type="string">
            <text:p>C0C2D</text:p>
          </table:table-cell>
          <table:table-cell office:value-type="float" office:value="789549" calcext:value-type="float">
            <text:p>789549</text:p>
          </table:table-cell>
          <table:table-cell office:value-type="float" office:value="6808" calcext:value-type="float">
            <text:p>6808</text:p>
          </table:table-cell>
          <table:table-cell table:formula="of:=IF([.D36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C361])" office:value-type="string" office:string-value="C26C5" calcext:value-type="string">
            <text:p>C26C5</text:p>
          </table:table-cell>
          <table:table-cell office:value-type="float" office:value="796357" calcext:value-type="float">
            <text:p>796357</text:p>
          </table:table-cell>
          <table:table-cell office:value-type="float" office:value="4" calcext:value-type="float">
            <text:p>4</text:p>
          </table:table-cell>
          <table:table-cell table:formula="of:=IF([.D3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C362])" office:value-type="string" office:string-value="C26C9" calcext:value-type="string">
            <text:p>C26C9</text:p>
          </table:table-cell>
          <table:table-cell office:value-type="float" office:value="796361" calcext:value-type="float">
            <text:p>796361</text:p>
          </table:table-cell>
          <table:table-cell office:value-type="float" office:value="32" calcext:value-type="float">
            <text:p>32</text:p>
          </table:table-cell>
          <table:table-cell table:formula="of:=IF([.D3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C363])" office:value-type="string" office:string-value="C26E9" calcext:value-type="string">
            <text:p>C26E9</text:p>
          </table:table-cell>
          <table:table-cell office:value-type="float" office:value="796393" calcext:value-type="float">
            <text:p>796393</text:p>
          </table:table-cell>
          <table:table-cell office:value-type="float" office:value="9750" calcext:value-type="float">
            <text:p>9750</text:p>
          </table:table-cell>
          <table:table-cell table:formula="of:=IF([.D36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C364])" office:value-type="string" office:string-value="C4CFF" calcext:value-type="string">
            <text:p>C4CFF</text:p>
          </table:table-cell>
          <table:table-cell office:value-type="float" office:value="806143" calcext:value-type="float">
            <text:p>806143</text:p>
          </table:table-cell>
          <table:table-cell office:value-type="float" office:value="4" calcext:value-type="float">
            <text:p>4</text:p>
          </table:table-cell>
          <table:table-cell table:formula="of:=IF([.D3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C365])" office:value-type="string" office:string-value="C4D03" calcext:value-type="string">
            <text:p>C4D03</text:p>
          </table:table-cell>
          <table:table-cell office:value-type="float" office:value="806147" calcext:value-type="float">
            <text:p>806147</text:p>
          </table:table-cell>
          <table:table-cell office:value-type="float" office:value="32" calcext:value-type="float">
            <text:p>32</text:p>
          </table:table-cell>
          <table:table-cell table:formula="of:=IF([.D3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C366])" office:value-type="string" office:string-value="C4D23" calcext:value-type="string">
            <text:p>C4D23</text:p>
          </table:table-cell>
          <table:table-cell office:value-type="float" office:value="806179" calcext:value-type="float">
            <text:p>806179</text:p>
          </table:table-cell>
          <table:table-cell office:value-type="float" office:value="26128" calcext:value-type="float">
            <text:p>26128</text:p>
          </table:table-cell>
          <table:table-cell table:formula="of:=IF([.D366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C367])" office:value-type="string" office:string-value="CB333" calcext:value-type="string">
            <text:p>CB333</text:p>
          </table:table-cell>
          <table:table-cell office:value-type="float" office:value="832307" calcext:value-type="float">
            <text:p>832307</text:p>
          </table:table-cell>
          <table:table-cell office:value-type="float" office:value="4" calcext:value-type="float">
            <text:p>4</text:p>
          </table:table-cell>
          <table:table-cell table:formula="of:=IF([.D3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C368])" office:value-type="string" office:string-value="CB337" calcext:value-type="string">
            <text:p>CB337</text:p>
          </table:table-cell>
          <table:table-cell office:value-type="float" office:value="832311" calcext:value-type="float">
            <text:p>832311</text:p>
          </table:table-cell>
          <table:table-cell office:value-type="float" office:value="32" calcext:value-type="float">
            <text:p>32</text:p>
          </table:table-cell>
          <table:table-cell table:formula="of:=IF([.D3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C369])" office:value-type="string" office:string-value="CB357" calcext:value-type="string">
            <text:p>CB357</text:p>
          </table:table-cell>
          <table:table-cell office:value-type="float" office:value="832343" calcext:value-type="float">
            <text:p>832343</text:p>
          </table:table-cell>
          <table:table-cell office:value-type="float" office:value="32768" calcext:value-type="float">
            <text:p>32768</text:p>
          </table:table-cell>
          <table:table-cell table:formula="of:=IF([.D369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C370])" office:value-type="string" office:string-value="D3357" calcext:value-type="string">
            <text:p>D3357</text:p>
          </table:table-cell>
          <table:table-cell office:value-type="float" office:value="865111" calcext:value-type="float">
            <text:p>865111</text:p>
          </table:table-cell>
          <table:table-cell office:value-type="float" office:value="12716" calcext:value-type="float">
            <text:p>12716</text:p>
          </table:table-cell>
          <table:table-cell table:formula="of:=IF([.D37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C371])" office:value-type="string" office:string-value="D6503" calcext:value-type="string">
            <text:p>D6503</text:p>
          </table:table-cell>
          <table:table-cell office:value-type="float" office:value="877827" calcext:value-type="float">
            <text:p>877827</text:p>
          </table:table-cell>
          <table:table-cell office:value-type="float" office:value="4" calcext:value-type="float">
            <text:p>4</text:p>
          </table:table-cell>
          <table:table-cell table:formula="of:=IF([.D3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C372])" office:value-type="string" office:string-value="D6507" calcext:value-type="string">
            <text:p>D6507</text:p>
          </table:table-cell>
          <table:table-cell office:value-type="float" office:value="877831" calcext:value-type="float">
            <text:p>877831</text:p>
          </table:table-cell>
          <table:table-cell office:value-type="float" office:value="32" calcext:value-type="float">
            <text:p>32</text:p>
          </table:table-cell>
          <table:table-cell table:formula="of:=IF([.D3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C373])" office:value-type="string" office:string-value="D6527" calcext:value-type="string">
            <text:p>D6527</text:p>
          </table:table-cell>
          <table:table-cell office:value-type="float" office:value="877863" calcext:value-type="float">
            <text:p>877863</text:p>
          </table:table-cell>
          <table:table-cell office:value-type="float" office:value="32768" calcext:value-type="float">
            <text:p>32768</text:p>
          </table:table-cell>
          <table:table-cell table:formula="of:=IF([.D37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C374])" office:value-type="string" office:string-value="DE527" calcext:value-type="string">
            <text:p>DE527</text:p>
          </table:table-cell>
          <table:table-cell office:value-type="float" office:value="910631" calcext:value-type="float">
            <text:p>910631</text:p>
          </table:table-cell>
          <table:table-cell office:value-type="float" office:value="10318" calcext:value-type="float">
            <text:p>10318</text:p>
          </table:table-cell>
          <table:table-cell table:formula="of:=IF([.D374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C375])" office:value-type="string" office:string-value="E0D75" calcext:value-type="string">
            <text:p>E0D75</text:p>
          </table:table-cell>
          <table:table-cell office:value-type="float" office:value="920949" calcext:value-type="float">
            <text:p>920949</text:p>
          </table:table-cell>
          <table:table-cell office:value-type="float" office:value="4" calcext:value-type="float">
            <text:p>4</text:p>
          </table:table-cell>
          <table:table-cell table:formula="of:=IF([.D3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C376])" office:value-type="string" office:string-value="E0D79" calcext:value-type="string">
            <text:p>E0D79</text:p>
          </table:table-cell>
          <table:table-cell office:value-type="float" office:value="920953" calcext:value-type="float">
            <text:p>920953</text:p>
          </table:table-cell>
          <table:table-cell office:value-type="float" office:value="32" calcext:value-type="float">
            <text:p>32</text:p>
          </table:table-cell>
          <table:table-cell table:formula="of:=IF([.D3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C377])" office:value-type="string" office:string-value="E0D99" calcext:value-type="string">
            <text:p>E0D99</text:p>
          </table:table-cell>
          <table:table-cell office:value-type="float" office:value="920985" calcext:value-type="float">
            <text:p>920985</text:p>
          </table:table-cell>
          <table:table-cell office:value-type="float" office:value="16362" calcext:value-type="float">
            <text:p>16362</text:p>
          </table:table-cell>
          <table:table-cell table:formula="of:=IF([.D377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C378])" office:value-type="string" office:string-value="E4D83" calcext:value-type="string">
            <text:p>E4D83</text:p>
          </table:table-cell>
          <table:table-cell office:value-type="float" office:value="937347" calcext:value-type="float">
            <text:p>937347</text:p>
          </table:table-cell>
          <table:table-cell office:value-type="float" office:value="4" calcext:value-type="float">
            <text:p>4</text:p>
          </table:table-cell>
          <table:table-cell table:formula="of:=IF([.D3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C379])" office:value-type="string" office:string-value="E4D87" calcext:value-type="string">
            <text:p>E4D87</text:p>
          </table:table-cell>
          <table:table-cell office:value-type="float" office:value="937351" calcext:value-type="float">
            <text:p>937351</text:p>
          </table:table-cell>
          <table:table-cell office:value-type="float" office:value="32" calcext:value-type="float">
            <text:p>32</text:p>
          </table:table-cell>
          <table:table-cell table:formula="of:=IF([.D3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C380])" office:value-type="string" office:string-value="E4DA7" calcext:value-type="string">
            <text:p>E4DA7</text:p>
          </table:table-cell>
          <table:table-cell office:value-type="float" office:value="937383" calcext:value-type="float">
            <text:p>937383</text:p>
          </table:table-cell>
          <table:table-cell office:value-type="float" office:value="31464" calcext:value-type="float">
            <text:p>31464</text:p>
          </table:table-cell>
          <table:table-cell table:formula="of:=IF([.D380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C381])" office:value-type="string" office:string-value="EC88F" calcext:value-type="string">
            <text:p>EC88F</text:p>
          </table:table-cell>
          <table:table-cell office:value-type="float" office:value="968847" calcext:value-type="float">
            <text:p>968847</text:p>
          </table:table-cell>
          <table:table-cell office:value-type="float" office:value="4" calcext:value-type="float">
            <text:p>4</text:p>
          </table:table-cell>
          <table:table-cell table:formula="of:=IF([.D3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C382])" office:value-type="string" office:string-value="EC893" calcext:value-type="string">
            <text:p>EC893</text:p>
          </table:table-cell>
          <table:table-cell office:value-type="float" office:value="968851" calcext:value-type="float">
            <text:p>968851</text:p>
          </table:table-cell>
          <table:table-cell office:value-type="float" office:value="28" calcext:value-type="float">
            <text:p>28</text:p>
          </table:table-cell>
          <table:table-cell table:formula="of:=IF([.D3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C383])" office:value-type="string" office:string-value="EC8AF" calcext:value-type="string">
            <text:p>EC8AF</text:p>
          </table:table-cell>
          <table:table-cell office:value-type="float" office:value="968879" calcext:value-type="float">
            <text:p>968879</text:p>
          </table:table-cell>
          <table:table-cell office:value-type="float" office:value="4" calcext:value-type="float">
            <text:p>4</text:p>
          </table:table-cell>
          <table:table-cell table:formula="of:=IF([.D3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C384])" office:value-type="string" office:string-value="EC8B3" calcext:value-type="string">
            <text:p>EC8B3</text:p>
          </table:table-cell>
          <table:table-cell office:value-type="float" office:value="968883" calcext:value-type="float">
            <text:p>968883</text:p>
          </table:table-cell>
          <table:table-cell office:value-type="float" office:value="14" calcext:value-type="float">
            <text:p>14</text:p>
          </table:table-cell>
          <table:table-cell table:formula="of:=IF([.D3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C385])" office:value-type="string" office:string-value="EC8C1" calcext:value-type="string">
            <text:p>EC8C1</text:p>
          </table:table-cell>
          <table:table-cell office:value-type="float" office:value="968897" calcext:value-type="float">
            <text:p>968897</text:p>
          </table:table-cell>
          <table:table-cell office:value-type="float" office:value="4" calcext:value-type="float">
            <text:p>4</text:p>
          </table:table-cell>
          <table:table-cell table:formula="of:=IF([.D3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C386])" office:value-type="string" office:string-value="EC8C5" calcext:value-type="string">
            <text:p>EC8C5</text:p>
          </table:table-cell>
          <table:table-cell office:value-type="float" office:value="968901" calcext:value-type="float">
            <text:p>968901</text:p>
          </table:table-cell>
          <table:table-cell office:value-type="float" office:value="32" calcext:value-type="float">
            <text:p>32</text:p>
          </table:table-cell>
          <table:table-cell table:formula="of:=IF([.D3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C387])" office:value-type="string" office:string-value="EC8E5" calcext:value-type="string">
            <text:p>EC8E5</text:p>
          </table:table-cell>
          <table:table-cell office:value-type="float" office:value="968933" calcext:value-type="float">
            <text:p>968933</text:p>
          </table:table-cell>
          <table:table-cell office:value-type="float" office:value="4" calcext:value-type="float">
            <text:p>4</text:p>
          </table:table-cell>
          <table:table-cell table:formula="of:=IF([.D3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C388])" office:value-type="string" office:string-value="EC8E9" calcext:value-type="string">
            <text:p>EC8E9</text:p>
          </table:table-cell>
          <table:table-cell office:value-type="float" office:value="968937" calcext:value-type="float">
            <text:p>968937</text:p>
          </table:table-cell>
          <table:table-cell office:value-type="float" office:value="4" calcext:value-type="float">
            <text:p>4</text:p>
          </table:table-cell>
          <table:table-cell table:formula="of:=IF([.D3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C389])" office:value-type="string" office:string-value="EC8ED" calcext:value-type="string">
            <text:p>EC8ED</text:p>
          </table:table-cell>
          <table:table-cell office:value-type="float" office:value="968941" calcext:value-type="float">
            <text:p>968941</text:p>
          </table:table-cell>
          <table:table-cell office:value-type="float" office:value="4" calcext:value-type="float">
            <text:p>4</text:p>
          </table:table-cell>
          <table:table-cell table:formula="of:=IF([.D3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C390])" office:value-type="string" office:string-value="EC8F1" calcext:value-type="string">
            <text:p>EC8F1</text:p>
          </table:table-cell>
          <table:table-cell office:value-type="float" office:value="968945" calcext:value-type="float">
            <text:p>968945</text:p>
          </table:table-cell>
          <table:table-cell office:value-type="float" office:value="10" calcext:value-type="float">
            <text:p>10</text:p>
          </table:table-cell>
          <table:table-cell table:formula="of:=IF([.D3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C391])" office:value-type="string" office:string-value="EC8FB" calcext:value-type="string">
            <text:p>EC8FB</text:p>
          </table:table-cell>
          <table:table-cell office:value-type="float" office:value="968955" calcext:value-type="float">
            <text:p>968955</text:p>
          </table:table-cell>
          <table:table-cell office:value-type="float" office:value="4" calcext:value-type="float">
            <text:p>4</text:p>
          </table:table-cell>
          <table:table-cell table:formula="of:=IF([.D3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C392])" office:value-type="string" office:string-value="EC8FF" calcext:value-type="string">
            <text:p>EC8FF</text:p>
          </table:table-cell>
          <table:table-cell office:value-type="float" office:value="968959" calcext:value-type="float">
            <text:p>968959</text:p>
          </table:table-cell>
          <table:table-cell office:value-type="float" office:value="4" calcext:value-type="float">
            <text:p>4</text:p>
          </table:table-cell>
          <table:table-cell table:formula="of:=IF([.D3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C393])" office:value-type="string" office:string-value="EC903" calcext:value-type="string">
            <text:p>EC903</text:p>
          </table:table-cell>
          <table:table-cell office:value-type="float" office:value="968963" calcext:value-type="float">
            <text:p>968963</text:p>
          </table:table-cell>
          <table:table-cell office:value-type="float" office:value="4" calcext:value-type="float">
            <text:p>4</text:p>
          </table:table-cell>
          <table:table-cell table:formula="of:=IF([.D3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C394])" office:value-type="string" office:string-value="EC907" calcext:value-type="string">
            <text:p>EC907</text:p>
          </table:table-cell>
          <table:table-cell office:value-type="float" office:value="968967" calcext:value-type="float">
            <text:p>968967</text:p>
          </table:table-cell>
          <table:table-cell office:value-type="float" office:value="4" calcext:value-type="float">
            <text:p>4</text:p>
          </table:table-cell>
          <table:table-cell table:formula="of:=IF([.D3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C395])" office:value-type="string" office:string-value="EC90B" calcext:value-type="string">
            <text:p>EC90B</text:p>
          </table:table-cell>
          <table:table-cell office:value-type="float" office:value="968971" calcext:value-type="float">
            <text:p>968971</text:p>
          </table:table-cell>
          <table:table-cell office:value-type="float" office:value="4" calcext:value-type="float">
            <text:p>4</text:p>
          </table:table-cell>
          <table:table-cell table:formula="of:=IF([.D3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C396])" office:value-type="string" office:string-value="EC90F" calcext:value-type="string">
            <text:p>EC90F</text:p>
          </table:table-cell>
          <table:table-cell office:value-type="float" office:value="968975" calcext:value-type="float">
            <text:p>968975</text:p>
          </table:table-cell>
          <table:table-cell office:value-type="float" office:value="4" calcext:value-type="float">
            <text:p>4</text:p>
          </table:table-cell>
          <table:table-cell table:formula="of:=IF([.D3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C397])" office:value-type="string" office:string-value="EC913" calcext:value-type="string">
            <text:p>EC913</text:p>
          </table:table-cell>
          <table:table-cell office:value-type="float" office:value="968979" calcext:value-type="float">
            <text:p>968979</text:p>
          </table:table-cell>
          <table:table-cell office:value-type="float" office:value="4" calcext:value-type="float">
            <text:p>4</text:p>
          </table:table-cell>
          <table:table-cell table:formula="of:=IF([.D3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C398])" office:value-type="string" office:string-value="EC917" calcext:value-type="string">
            <text:p>EC917</text:p>
          </table:table-cell>
          <table:table-cell office:value-type="float" office:value="968983" calcext:value-type="float">
            <text:p>968983</text:p>
          </table:table-cell>
          <table:table-cell office:value-type="float" office:value="4" calcext:value-type="float">
            <text:p>4</text:p>
          </table:table-cell>
          <table:table-cell table:formula="of:=IF([.D3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C399])" office:value-type="string" office:string-value="EC91B" calcext:value-type="string">
            <text:p>EC91B</text:p>
          </table:table-cell>
          <table:table-cell office:value-type="float" office:value="968987" calcext:value-type="float">
            <text:p>968987</text:p>
          </table:table-cell>
          <table:table-cell office:value-type="float" office:value="4" calcext:value-type="float">
            <text:p>4</text:p>
          </table:table-cell>
          <table:table-cell table:formula="of:=IF([.D3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C400])" office:value-type="string" office:string-value="EC91F" calcext:value-type="string">
            <text:p>EC91F</text:p>
          </table:table-cell>
          <table:table-cell office:value-type="float" office:value="968991" calcext:value-type="float">
            <text:p>968991</text:p>
          </table:table-cell>
          <table:table-cell office:value-type="float" office:value="4" calcext:value-type="float">
            <text:p>4</text:p>
          </table:table-cell>
          <table:table-cell table:formula="of:=IF([.D4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C401])" office:value-type="string" office:string-value="EC923" calcext:value-type="string">
            <text:p>EC923</text:p>
          </table:table-cell>
          <table:table-cell office:value-type="float" office:value="968995" calcext:value-type="float">
            <text:p>968995</text:p>
          </table:table-cell>
          <table:table-cell office:value-type="float" office:value="4" calcext:value-type="float">
            <text:p>4</text:p>
          </table:table-cell>
          <table:table-cell table:formula="of:=IF([.D4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C402])" office:value-type="string" office:string-value="EC927" calcext:value-type="string">
            <text:p>EC927</text:p>
          </table:table-cell>
          <table:table-cell office:value-type="float" office:value="968999" calcext:value-type="float">
            <text:p>968999</text:p>
          </table:table-cell>
          <table:table-cell office:value-type="float" office:value="4" calcext:value-type="float">
            <text:p>4</text:p>
          </table:table-cell>
          <table:table-cell table:formula="of:=IF([.D4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C403])" office:value-type="string" office:string-value="EC92B" calcext:value-type="string">
            <text:p>EC92B</text:p>
          </table:table-cell>
          <table:table-cell office:value-type="float" office:value="969003" calcext:value-type="float">
            <text:p>969003</text:p>
          </table:table-cell>
          <table:table-cell office:value-type="float" office:value="4" calcext:value-type="float">
            <text:p>4</text:p>
          </table:table-cell>
          <table:table-cell table:formula="of:=IF([.D4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C404])" office:value-type="string" office:string-value="EC92F" calcext:value-type="string">
            <text:p>EC92F</text:p>
          </table:table-cell>
          <table:table-cell office:value-type="float" office:value="969007" calcext:value-type="float">
            <text:p>969007</text:p>
          </table:table-cell>
          <table:table-cell office:value-type="float" office:value="4" calcext:value-type="float">
            <text:p>4</text:p>
          </table:table-cell>
          <table:table-cell table:formula="of:=IF([.D4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C405])" office:value-type="string" office:string-value="EC933" calcext:value-type="string">
            <text:p>EC933</text:p>
          </table:table-cell>
          <table:table-cell office:value-type="float" office:value="969011" calcext:value-type="float">
            <text:p>969011</text:p>
          </table:table-cell>
          <table:table-cell office:value-type="float" office:value="4" calcext:value-type="float">
            <text:p>4</text:p>
          </table:table-cell>
          <table:table-cell table:formula="of:=IF([.D4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C406])" office:value-type="string" office:string-value="EC937" calcext:value-type="string">
            <text:p>EC937</text:p>
          </table:table-cell>
          <table:table-cell office:value-type="float" office:value="969015" calcext:value-type="float">
            <text:p>969015</text:p>
          </table:table-cell>
          <table:table-cell office:value-type="float" office:value="4" calcext:value-type="float">
            <text:p>4</text:p>
          </table:table-cell>
          <table:table-cell table:formula="of:=IF([.D4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C407])" office:value-type="string" office:string-value="EC93B" calcext:value-type="string">
            <text:p>EC93B</text:p>
          </table:table-cell>
          <table:table-cell office:value-type="float" office:value="969019" calcext:value-type="float">
            <text:p>969019</text:p>
          </table:table-cell>
          <table:table-cell office:value-type="float" office:value="4" calcext:value-type="float">
            <text:p>4</text:p>
          </table:table-cell>
          <table:table-cell table:formula="of:=IF([.D4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C408])" office:value-type="string" office:string-value="EC93F" calcext:value-type="string">
            <text:p>EC93F</text:p>
          </table:table-cell>
          <table:table-cell office:value-type="float" office:value="969023" calcext:value-type="float">
            <text:p>969023</text:p>
          </table:table-cell>
          <table:table-cell office:value-type="float" office:value="4" calcext:value-type="float">
            <text:p>4</text:p>
          </table:table-cell>
          <table:table-cell table:formula="of:=IF([.D4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C409])" office:value-type="string" office:string-value="EC943" calcext:value-type="string">
            <text:p>EC943</text:p>
          </table:table-cell>
          <table:table-cell office:value-type="float" office:value="969027" calcext:value-type="float">
            <text:p>969027</text:p>
          </table:table-cell>
          <table:table-cell office:value-type="float" office:value="4" calcext:value-type="float">
            <text:p>4</text:p>
          </table:table-cell>
          <table:table-cell table:formula="of:=IF([.D4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C410])" office:value-type="string" office:string-value="EC947" calcext:value-type="string">
            <text:p>EC947</text:p>
          </table:table-cell>
          <table:table-cell office:value-type="float" office:value="969031" calcext:value-type="float">
            <text:p>969031</text:p>
          </table:table-cell>
          <table:table-cell office:value-type="float" office:value="4" calcext:value-type="float">
            <text:p>4</text:p>
          </table:table-cell>
          <table:table-cell table:formula="of:=IF([.D4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C411])" office:value-type="string" office:string-value="EC94B" calcext:value-type="string">
            <text:p>EC94B</text:p>
          </table:table-cell>
          <table:table-cell office:value-type="float" office:value="969035" calcext:value-type="float">
            <text:p>969035</text:p>
          </table:table-cell>
          <table:table-cell office:value-type="float" office:value="4" calcext:value-type="float">
            <text:p>4</text:p>
          </table:table-cell>
          <table:table-cell table:formula="of:=IF([.D4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C412])" office:value-type="string" office:string-value="EC94F" calcext:value-type="string">
            <text:p>EC94F</text:p>
          </table:table-cell>
          <table:table-cell office:value-type="float" office:value="969039" calcext:value-type="float">
            <text:p>969039</text:p>
          </table:table-cell>
          <table:table-cell office:value-type="float" office:value="4" calcext:value-type="float">
            <text:p>4</text:p>
          </table:table-cell>
          <table:table-cell table:formula="of:=IF([.D4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C413])" office:value-type="string" office:string-value="EC953" calcext:value-type="string">
            <text:p>EC953</text:p>
          </table:table-cell>
          <table:table-cell office:value-type="float" office:value="969043" calcext:value-type="float">
            <text:p>969043</text:p>
          </table:table-cell>
          <table:table-cell office:value-type="float" office:value="4" calcext:value-type="float">
            <text:p>4</text:p>
          </table:table-cell>
          <table:table-cell table:formula="of:=IF([.D4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C414])" office:value-type="string" office:string-value="EC957" calcext:value-type="string">
            <text:p>EC957</text:p>
          </table:table-cell>
          <table:table-cell office:value-type="float" office:value="969047" calcext:value-type="float">
            <text:p>969047</text:p>
          </table:table-cell>
          <table:table-cell office:value-type="float" office:value="4" calcext:value-type="float">
            <text:p>4</text:p>
          </table:table-cell>
          <table:table-cell table:formula="of:=IF([.D4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C415])" office:value-type="string" office:string-value="EC95B" calcext:value-type="string">
            <text:p>EC95B</text:p>
          </table:table-cell>
          <table:table-cell office:value-type="float" office:value="969051" calcext:value-type="float">
            <text:p>969051</text:p>
          </table:table-cell>
          <table:table-cell office:value-type="float" office:value="4" calcext:value-type="float">
            <text:p>4</text:p>
          </table:table-cell>
          <table:table-cell table:formula="of:=IF([.D4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C416])" office:value-type="string" office:string-value="EC95F" calcext:value-type="string">
            <text:p>EC95F</text:p>
          </table:table-cell>
          <table:table-cell office:value-type="float" office:value="969055" calcext:value-type="float">
            <text:p>969055</text:p>
          </table:table-cell>
          <table:table-cell office:value-type="float" office:value="4" calcext:value-type="float">
            <text:p>4</text:p>
          </table:table-cell>
          <table:table-cell table:formula="of:=IF([.D4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C417])" office:value-type="string" office:string-value="EC963" calcext:value-type="string">
            <text:p>EC963</text:p>
          </table:table-cell>
          <table:table-cell office:value-type="float" office:value="969059" calcext:value-type="float">
            <text:p>969059</text:p>
          </table:table-cell>
          <table:table-cell office:value-type="float" office:value="4" calcext:value-type="float">
            <text:p>4</text:p>
          </table:table-cell>
          <table:table-cell table:formula="of:=IF([.D4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C418])" office:value-type="string" office:string-value="EC967" calcext:value-type="string">
            <text:p>EC967</text:p>
          </table:table-cell>
          <table:table-cell office:value-type="float" office:value="969063" calcext:value-type="float">
            <text:p>969063</text:p>
          </table:table-cell>
          <table:table-cell office:value-type="float" office:value="4" calcext:value-type="float">
            <text:p>4</text:p>
          </table:table-cell>
          <table:table-cell table:formula="of:=IF([.D4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C419])" office:value-type="string" office:string-value="EC96B" calcext:value-type="string">
            <text:p>EC96B</text:p>
          </table:table-cell>
          <table:table-cell office:value-type="float" office:value="969067" calcext:value-type="float">
            <text:p>969067</text:p>
          </table:table-cell>
          <table:table-cell office:value-type="float" office:value="4" calcext:value-type="float">
            <text:p>4</text:p>
          </table:table-cell>
          <table:table-cell table:formula="of:=IF([.D4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C420])" office:value-type="string" office:string-value="EC96F" calcext:value-type="string">
            <text:p>EC96F</text:p>
          </table:table-cell>
          <table:table-cell office:value-type="float" office:value="969071" calcext:value-type="float">
            <text:p>969071</text:p>
          </table:table-cell>
          <table:table-cell office:value-type="float" office:value="4" calcext:value-type="float">
            <text:p>4</text:p>
          </table:table-cell>
          <table:table-cell table:formula="of:=IF([.D4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C421])" office:value-type="string" office:string-value="EC973" calcext:value-type="string">
            <text:p>EC973</text:p>
          </table:table-cell>
          <table:table-cell office:value-type="float" office:value="969075" calcext:value-type="float">
            <text:p>969075</text:p>
          </table:table-cell>
          <table:table-cell office:value-type="float" office:value="4" calcext:value-type="float">
            <text:p>4</text:p>
          </table:table-cell>
          <table:table-cell table:formula="of:=IF([.D4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C422])" office:value-type="string" office:string-value="EC977" calcext:value-type="string">
            <text:p>EC977</text:p>
          </table:table-cell>
          <table:table-cell office:value-type="float" office:value="969079" calcext:value-type="float">
            <text:p>969079</text:p>
          </table:table-cell>
          <table:table-cell office:value-type="float" office:value="4" calcext:value-type="float">
            <text:p>4</text:p>
          </table:table-cell>
          <table:table-cell table:formula="of:=IF([.D4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C423])" office:value-type="string" office:string-value="EC97B" calcext:value-type="string">
            <text:p>EC97B</text:p>
          </table:table-cell>
          <table:table-cell office:value-type="float" office:value="969083" calcext:value-type="float">
            <text:p>969083</text:p>
          </table:table-cell>
          <table:table-cell office:value-type="float" office:value="4" calcext:value-type="float">
            <text:p>4</text:p>
          </table:table-cell>
          <table:table-cell table:formula="of:=IF([.D4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C424])" office:value-type="string" office:string-value="EC97F" calcext:value-type="string">
            <text:p>EC97F</text:p>
          </table:table-cell>
          <table:table-cell office:value-type="float" office:value="969087" calcext:value-type="float">
            <text:p>969087</text:p>
          </table:table-cell>
          <table:table-cell office:value-type="float" office:value="4" calcext:value-type="float">
            <text:p>4</text:p>
          </table:table-cell>
          <table:table-cell table:formula="of:=IF([.D4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C425])" office:value-type="string" office:string-value="EC983" calcext:value-type="string">
            <text:p>EC983</text:p>
          </table:table-cell>
          <table:table-cell office:value-type="float" office:value="969091" calcext:value-type="float">
            <text:p>969091</text:p>
          </table:table-cell>
          <table:table-cell office:value-type="float" office:value="4" calcext:value-type="float">
            <text:p>4</text:p>
          </table:table-cell>
          <table:table-cell table:formula="of:=IF([.D4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C426])" office:value-type="string" office:string-value="EC987" calcext:value-type="string">
            <text:p>EC987</text:p>
          </table:table-cell>
          <table:table-cell office:value-type="float" office:value="969095" calcext:value-type="float">
            <text:p>969095</text:p>
          </table:table-cell>
          <table:table-cell office:value-type="float" office:value="4" calcext:value-type="float">
            <text:p>4</text:p>
          </table:table-cell>
          <table:table-cell table:formula="of:=IF([.D4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C427])" office:value-type="string" office:string-value="EC98B" calcext:value-type="string">
            <text:p>EC98B</text:p>
          </table:table-cell>
          <table:table-cell office:value-type="float" office:value="969099" calcext:value-type="float">
            <text:p>969099</text:p>
          </table:table-cell>
          <table:table-cell office:value-type="float" office:value="4" calcext:value-type="float">
            <text:p>4</text:p>
          </table:table-cell>
          <table:table-cell table:formula="of:=IF([.D4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C428])" office:value-type="string" office:string-value="EC98F" calcext:value-type="string">
            <text:p>EC98F</text:p>
          </table:table-cell>
          <table:table-cell office:value-type="float" office:value="969103" calcext:value-type="float">
            <text:p>969103</text:p>
          </table:table-cell>
          <table:table-cell office:value-type="float" office:value="4" calcext:value-type="float">
            <text:p>4</text:p>
          </table:table-cell>
          <table:table-cell table:formula="of:=IF([.D4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C429])" office:value-type="string" office:string-value="EC993" calcext:value-type="string">
            <text:p>EC993</text:p>
          </table:table-cell>
          <table:table-cell office:value-type="float" office:value="969107" calcext:value-type="float">
            <text:p>969107</text:p>
          </table:table-cell>
          <table:table-cell office:value-type="float" office:value="4" calcext:value-type="float">
            <text:p>4</text:p>
          </table:table-cell>
          <table:table-cell table:formula="of:=IF([.D4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C430])" office:value-type="string" office:string-value="EC997" calcext:value-type="string">
            <text:p>EC997</text:p>
          </table:table-cell>
          <table:table-cell office:value-type="float" office:value="969111" calcext:value-type="float">
            <text:p>969111</text:p>
          </table:table-cell>
          <table:table-cell office:value-type="float" office:value="4" calcext:value-type="float">
            <text:p>4</text:p>
          </table:table-cell>
          <table:table-cell table:formula="of:=IF([.D4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C431])" office:value-type="string" office:string-value="EC99B" calcext:value-type="string">
            <text:p>EC99B</text:p>
          </table:table-cell>
          <table:table-cell office:value-type="float" office:value="969115" calcext:value-type="float">
            <text:p>969115</text:p>
          </table:table-cell>
          <table:table-cell office:value-type="float" office:value="4" calcext:value-type="float">
            <text:p>4</text:p>
          </table:table-cell>
          <table:table-cell table:formula="of:=IF([.D4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C432])" office:value-type="string" office:string-value="EC99F" calcext:value-type="string">
            <text:p>EC99F</text:p>
          </table:table-cell>
          <table:table-cell office:value-type="float" office:value="969119" calcext:value-type="float">
            <text:p>969119</text:p>
          </table:table-cell>
          <table:table-cell office:value-type="float" office:value="4" calcext:value-type="float">
            <text:p>4</text:p>
          </table:table-cell>
          <table:table-cell table:formula="of:=IF([.D4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C433])" office:value-type="string" office:string-value="EC9A3" calcext:value-type="string">
            <text:p>EC9A3</text:p>
          </table:table-cell>
          <table:table-cell office:value-type="float" office:value="969123" calcext:value-type="float">
            <text:p>969123</text:p>
          </table:table-cell>
          <table:table-cell office:value-type="float" office:value="4" calcext:value-type="float">
            <text:p>4</text:p>
          </table:table-cell>
          <table:table-cell table:formula="of:=IF([.D4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C434])" office:value-type="string" office:string-value="EC9A7" calcext:value-type="string">
            <text:p>EC9A7</text:p>
          </table:table-cell>
          <table:table-cell office:value-type="float" office:value="969127" calcext:value-type="float">
            <text:p>969127</text:p>
          </table:table-cell>
          <table:table-cell office:value-type="float" office:value="4" calcext:value-type="float">
            <text:p>4</text:p>
          </table:table-cell>
          <table:table-cell table:formula="of:=IF([.D4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C435])" office:value-type="string" office:string-value="EC9AB" calcext:value-type="string">
            <text:p>EC9AB</text:p>
          </table:table-cell>
          <table:table-cell office:value-type="float" office:value="969131" calcext:value-type="float">
            <text:p>969131</text:p>
          </table:table-cell>
          <table:table-cell office:value-type="float" office:value="4" calcext:value-type="float">
            <text:p>4</text:p>
          </table:table-cell>
          <table:table-cell table:formula="of:=IF([.D4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C436])" office:value-type="string" office:string-value="EC9AF" calcext:value-type="string">
            <text:p>EC9AF</text:p>
          </table:table-cell>
          <table:table-cell office:value-type="float" office:value="969135" calcext:value-type="float">
            <text:p>969135</text:p>
          </table:table-cell>
          <table:table-cell office:value-type="float" office:value="4" calcext:value-type="float">
            <text:p>4</text:p>
          </table:table-cell>
          <table:table-cell table:formula="of:=IF([.D4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C437])" office:value-type="string" office:string-value="EC9B3" calcext:value-type="string">
            <text:p>EC9B3</text:p>
          </table:table-cell>
          <table:table-cell office:value-type="float" office:value="969139" calcext:value-type="float">
            <text:p>969139</text:p>
          </table:table-cell>
          <table:table-cell office:value-type="float" office:value="4" calcext:value-type="float">
            <text:p>4</text:p>
          </table:table-cell>
          <table:table-cell table:formula="of:=IF([.D4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C438])" office:value-type="string" office:string-value="EC9B7" calcext:value-type="string">
            <text:p>EC9B7</text:p>
          </table:table-cell>
          <table:table-cell office:value-type="float" office:value="969143" calcext:value-type="float">
            <text:p>969143</text:p>
          </table:table-cell>
          <table:table-cell office:value-type="float" office:value="4" calcext:value-type="float">
            <text:p>4</text:p>
          </table:table-cell>
          <table:table-cell table:formula="of:=IF([.D4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C439])" office:value-type="string" office:string-value="EC9BB" calcext:value-type="string">
            <text:p>EC9BB</text:p>
          </table:table-cell>
          <table:table-cell office:value-type="float" office:value="969147" calcext:value-type="float">
            <text:p>969147</text:p>
          </table:table-cell>
          <table:table-cell office:value-type="float" office:value="4" calcext:value-type="float">
            <text:p>4</text:p>
          </table:table-cell>
          <table:table-cell table:formula="of:=IF([.D4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C440])" office:value-type="string" office:string-value="EC9BF" calcext:value-type="string">
            <text:p>EC9BF</text:p>
          </table:table-cell>
          <table:table-cell office:value-type="float" office:value="969151" calcext:value-type="float">
            <text:p>969151</text:p>
          </table:table-cell>
          <table:table-cell office:value-type="float" office:value="4" calcext:value-type="float">
            <text:p>4</text:p>
          </table:table-cell>
          <table:table-cell table:formula="of:=IF([.D4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C441])" office:value-type="string" office:string-value="EC9C3" calcext:value-type="string">
            <text:p>EC9C3</text:p>
          </table:table-cell>
          <table:table-cell office:value-type="float" office:value="969155" calcext:value-type="float">
            <text:p>969155</text:p>
          </table:table-cell>
          <table:table-cell office:value-type="float" office:value="4" calcext:value-type="float">
            <text:p>4</text:p>
          </table:table-cell>
          <table:table-cell table:formula="of:=IF([.D4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C442])" office:value-type="string" office:string-value="EC9C7" calcext:value-type="string">
            <text:p>EC9C7</text:p>
          </table:table-cell>
          <table:table-cell office:value-type="float" office:value="969159" calcext:value-type="float">
            <text:p>969159</text:p>
          </table:table-cell>
          <table:table-cell office:value-type="float" office:value="4" calcext:value-type="float">
            <text:p>4</text:p>
          </table:table-cell>
          <table:table-cell table:formula="of:=IF([.D4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C443])" office:value-type="string" office:string-value="EC9CB" calcext:value-type="string">
            <text:p>EC9CB</text:p>
          </table:table-cell>
          <table:table-cell office:value-type="float" office:value="969163" calcext:value-type="float">
            <text:p>969163</text:p>
          </table:table-cell>
          <table:table-cell office:value-type="float" office:value="4" calcext:value-type="float">
            <text:p>4</text:p>
          </table:table-cell>
          <table:table-cell table:formula="of:=IF([.D4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C444])" office:value-type="string" office:string-value="EC9CF" calcext:value-type="string">
            <text:p>EC9CF</text:p>
          </table:table-cell>
          <table:table-cell office:value-type="float" office:value="969167" calcext:value-type="float">
            <text:p>969167</text:p>
          </table:table-cell>
          <table:table-cell office:value-type="float" office:value="4" calcext:value-type="float">
            <text:p>4</text:p>
          </table:table-cell>
          <table:table-cell table:formula="of:=IF([.D4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C445])" office:value-type="string" office:string-value="EC9D3" calcext:value-type="string">
            <text:p>EC9D3</text:p>
          </table:table-cell>
          <table:table-cell office:value-type="float" office:value="969171" calcext:value-type="float">
            <text:p>969171</text:p>
          </table:table-cell>
          <table:table-cell office:value-type="float" office:value="4" calcext:value-type="float">
            <text:p>4</text:p>
          </table:table-cell>
          <table:table-cell table:formula="of:=IF([.D4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C446])" office:value-type="string" office:string-value="EC9D7" calcext:value-type="string">
            <text:p>EC9D7</text:p>
          </table:table-cell>
          <table:table-cell office:value-type="float" office:value="969175" calcext:value-type="float">
            <text:p>969175</text:p>
          </table:table-cell>
          <table:table-cell office:value-type="float" office:value="4" calcext:value-type="float">
            <text:p>4</text:p>
          </table:table-cell>
          <table:table-cell table:formula="of:=IF([.D4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C447])" office:value-type="string" office:string-value="EC9DB" calcext:value-type="string">
            <text:p>EC9DB</text:p>
          </table:table-cell>
          <table:table-cell office:value-type="float" office:value="969179" calcext:value-type="float">
            <text:p>969179</text:p>
          </table:table-cell>
          <table:table-cell office:value-type="float" office:value="4" calcext:value-type="float">
            <text:p>4</text:p>
          </table:table-cell>
          <table:table-cell table:formula="of:=IF([.D4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C448])" office:value-type="string" office:string-value="EC9DF" calcext:value-type="string">
            <text:p>EC9DF</text:p>
          </table:table-cell>
          <table:table-cell office:value-type="float" office:value="969183" calcext:value-type="float">
            <text:p>969183</text:p>
          </table:table-cell>
          <table:table-cell office:value-type="float" office:value="4" calcext:value-type="float">
            <text:p>4</text:p>
          </table:table-cell>
          <table:table-cell table:formula="of:=IF([.D4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C449])" office:value-type="string" office:string-value="EC9E3" calcext:value-type="string">
            <text:p>EC9E3</text:p>
          </table:table-cell>
          <table:table-cell office:value-type="float" office:value="969187" calcext:value-type="float">
            <text:p>969187</text:p>
          </table:table-cell>
          <table:table-cell office:value-type="float" office:value="4" calcext:value-type="float">
            <text:p>4</text:p>
          </table:table-cell>
          <table:table-cell table:formula="of:=IF([.D4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C450])" office:value-type="string" office:string-value="EC9E7" calcext:value-type="string">
            <text:p>EC9E7</text:p>
          </table:table-cell>
          <table:table-cell office:value-type="float" office:value="969191" calcext:value-type="float">
            <text:p>969191</text:p>
          </table:table-cell>
          <table:table-cell office:value-type="float" office:value="4" calcext:value-type="float">
            <text:p>4</text:p>
          </table:table-cell>
          <table:table-cell table:formula="of:=IF([.D4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C451])" office:value-type="string" office:string-value="EC9EB" calcext:value-type="string">
            <text:p>EC9EB</text:p>
          </table:table-cell>
          <table:table-cell office:value-type="float" office:value="969195" calcext:value-type="float">
            <text:p>969195</text:p>
          </table:table-cell>
          <table:table-cell office:value-type="float" office:value="4" calcext:value-type="float">
            <text:p>4</text:p>
          </table:table-cell>
          <table:table-cell table:formula="of:=IF([.D4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C452])" office:value-type="string" office:string-value="EC9EF" calcext:value-type="string">
            <text:p>EC9EF</text:p>
          </table:table-cell>
          <table:table-cell office:value-type="float" office:value="969199" calcext:value-type="float">
            <text:p>969199</text:p>
          </table:table-cell>
          <table:table-cell office:value-type="float" office:value="4" calcext:value-type="float">
            <text:p>4</text:p>
          </table:table-cell>
          <table:table-cell table:formula="of:=IF([.D4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C453])" office:value-type="string" office:string-value="EC9F3" calcext:value-type="string">
            <text:p>EC9F3</text:p>
          </table:table-cell>
          <table:table-cell office:value-type="float" office:value="969203" calcext:value-type="float">
            <text:p>969203</text:p>
          </table:table-cell>
          <table:table-cell office:value-type="float" office:value="4" calcext:value-type="float">
            <text:p>4</text:p>
          </table:table-cell>
          <table:table-cell table:formula="of:=IF([.D4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C454])" office:value-type="string" office:string-value="EC9F7" calcext:value-type="string">
            <text:p>EC9F7</text:p>
          </table:table-cell>
          <table:table-cell office:value-type="float" office:value="969207" calcext:value-type="float">
            <text:p>969207</text:p>
          </table:table-cell>
          <table:table-cell office:value-type="float" office:value="4" calcext:value-type="float">
            <text:p>4</text:p>
          </table:table-cell>
          <table:table-cell table:formula="of:=IF([.D4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C455])" office:value-type="string" office:string-value="EC9FB" calcext:value-type="string">
            <text:p>EC9FB</text:p>
          </table:table-cell>
          <table:table-cell office:value-type="float" office:value="969211" calcext:value-type="float">
            <text:p>969211</text:p>
          </table:table-cell>
          <table:table-cell office:value-type="float" office:value="4" calcext:value-type="float">
            <text:p>4</text:p>
          </table:table-cell>
          <table:table-cell table:formula="of:=IF([.D4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C456])" office:value-type="string" office:string-value="EC9FF" calcext:value-type="string">
            <text:p>EC9FF</text:p>
          </table:table-cell>
          <table:table-cell office:value-type="float" office:value="969215" calcext:value-type="float">
            <text:p>969215</text:p>
          </table:table-cell>
          <table:table-cell office:value-type="float" office:value="4" calcext:value-type="float">
            <text:p>4</text:p>
          </table:table-cell>
          <table:table-cell table:formula="of:=IF([.D4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C457])" office:value-type="string" office:string-value="ECA03" calcext:value-type="string">
            <text:p>ECA03</text:p>
          </table:table-cell>
          <table:table-cell office:value-type="float" office:value="969219" calcext:value-type="float">
            <text:p>969219</text:p>
          </table:table-cell>
          <table:table-cell office:value-type="float" office:value="4" calcext:value-type="float">
            <text:p>4</text:p>
          </table:table-cell>
          <table:table-cell table:formula="of:=IF([.D4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C458])" office:value-type="string" office:string-value="ECA07" calcext:value-type="string">
            <text:p>ECA07</text:p>
          </table:table-cell>
          <table:table-cell office:value-type="float" office:value="969223" calcext:value-type="float">
            <text:p>969223</text:p>
          </table:table-cell>
          <table:table-cell office:value-type="float" office:value="4" calcext:value-type="float">
            <text:p>4</text:p>
          </table:table-cell>
          <table:table-cell table:formula="of:=IF([.D4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C459])" office:value-type="string" office:string-value="ECA0B" calcext:value-type="string">
            <text:p>ECA0B</text:p>
          </table:table-cell>
          <table:table-cell office:value-type="float" office:value="969227" calcext:value-type="float">
            <text:p>969227</text:p>
          </table:table-cell>
          <table:table-cell office:value-type="float" office:value="4" calcext:value-type="float">
            <text:p>4</text:p>
          </table:table-cell>
          <table:table-cell table:formula="of:=IF([.D4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C460])" office:value-type="string" office:string-value="ECA0F" calcext:value-type="string">
            <text:p>ECA0F</text:p>
          </table:table-cell>
          <table:table-cell office:value-type="float" office:value="969231" calcext:value-type="float">
            <text:p>969231</text:p>
          </table:table-cell>
          <table:table-cell office:value-type="float" office:value="4" calcext:value-type="float">
            <text:p>4</text:p>
          </table:table-cell>
          <table:table-cell table:formula="of:=IF([.D4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C461])" office:value-type="string" office:string-value="ECA13" calcext:value-type="string">
            <text:p>ECA13</text:p>
          </table:table-cell>
          <table:table-cell office:value-type="float" office:value="969235" calcext:value-type="float">
            <text:p>969235</text:p>
          </table:table-cell>
          <table:table-cell office:value-type="float" office:value="4" calcext:value-type="float">
            <text:p>4</text:p>
          </table:table-cell>
          <table:table-cell table:formula="of:=IF([.D4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C462])" office:value-type="string" office:string-value="ECA17" calcext:value-type="string">
            <text:p>ECA17</text:p>
          </table:table-cell>
          <table:table-cell office:value-type="float" office:value="969239" calcext:value-type="float">
            <text:p>969239</text:p>
          </table:table-cell>
          <table:table-cell office:value-type="float" office:value="4" calcext:value-type="float">
            <text:p>4</text:p>
          </table:table-cell>
          <table:table-cell table:formula="of:=IF([.D4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C463])" office:value-type="string" office:string-value="ECA1B" calcext:value-type="string">
            <text:p>ECA1B</text:p>
          </table:table-cell>
          <table:table-cell office:value-type="float" office:value="969243" calcext:value-type="float">
            <text:p>969243</text:p>
          </table:table-cell>
          <table:table-cell office:value-type="float" office:value="4" calcext:value-type="float">
            <text:p>4</text:p>
          </table:table-cell>
          <table:table-cell table:formula="of:=IF([.D4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C464])" office:value-type="string" office:string-value="ECA1F" calcext:value-type="string">
            <text:p>ECA1F</text:p>
          </table:table-cell>
          <table:table-cell office:value-type="float" office:value="969247" calcext:value-type="float">
            <text:p>969247</text:p>
          </table:table-cell>
          <table:table-cell office:value-type="float" office:value="4" calcext:value-type="float">
            <text:p>4</text:p>
          </table:table-cell>
          <table:table-cell table:formula="of:=IF([.D4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C465])" office:value-type="string" office:string-value="ECA23" calcext:value-type="string">
            <text:p>ECA23</text:p>
          </table:table-cell>
          <table:table-cell office:value-type="float" office:value="969251" calcext:value-type="float">
            <text:p>969251</text:p>
          </table:table-cell>
          <table:table-cell office:value-type="float" office:value="4" calcext:value-type="float">
            <text:p>4</text:p>
          </table:table-cell>
          <table:table-cell table:formula="of:=IF([.D4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C466])" office:value-type="string" office:string-value="ECA27" calcext:value-type="string">
            <text:p>ECA27</text:p>
          </table:table-cell>
          <table:table-cell office:value-type="float" office:value="969255" calcext:value-type="float">
            <text:p>969255</text:p>
          </table:table-cell>
          <table:table-cell office:value-type="float" office:value="4" calcext:value-type="float">
            <text:p>4</text:p>
          </table:table-cell>
          <table:table-cell table:formula="of:=IF([.D4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C467])" office:value-type="string" office:string-value="ECA2B" calcext:value-type="string">
            <text:p>ECA2B</text:p>
          </table:table-cell>
          <table:table-cell office:value-type="float" office:value="969259" calcext:value-type="float">
            <text:p>969259</text:p>
          </table:table-cell>
          <table:table-cell office:value-type="float" office:value="4" calcext:value-type="float">
            <text:p>4</text:p>
          </table:table-cell>
          <table:table-cell table:formula="of:=IF([.D4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C468])" office:value-type="string" office:string-value="ECA2F" calcext:value-type="string">
            <text:p>ECA2F</text:p>
          </table:table-cell>
          <table:table-cell office:value-type="float" office:value="969263" calcext:value-type="float">
            <text:p>969263</text:p>
          </table:table-cell>
          <table:table-cell office:value-type="float" office:value="4" calcext:value-type="float">
            <text:p>4</text:p>
          </table:table-cell>
          <table:table-cell table:formula="of:=IF([.D4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C469])" office:value-type="string" office:string-value="ECA33" calcext:value-type="string">
            <text:p>ECA33</text:p>
          </table:table-cell>
          <table:table-cell office:value-type="float" office:value="969267" calcext:value-type="float">
            <text:p>969267</text:p>
          </table:table-cell>
          <table:table-cell office:value-type="float" office:value="4" calcext:value-type="float">
            <text:p>4</text:p>
          </table:table-cell>
          <table:table-cell table:formula="of:=IF([.D4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C470])" office:value-type="string" office:string-value="ECA37" calcext:value-type="string">
            <text:p>ECA37</text:p>
          </table:table-cell>
          <table:table-cell office:value-type="float" office:value="969271" calcext:value-type="float">
            <text:p>969271</text:p>
          </table:table-cell>
          <table:table-cell office:value-type="float" office:value="4" calcext:value-type="float">
            <text:p>4</text:p>
          </table:table-cell>
          <table:table-cell table:formula="of:=IF([.D4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C471])" office:value-type="string" office:string-value="ECA3B" calcext:value-type="string">
            <text:p>ECA3B</text:p>
          </table:table-cell>
          <table:table-cell office:value-type="float" office:value="969275" calcext:value-type="float">
            <text:p>969275</text:p>
          </table:table-cell>
          <table:table-cell office:value-type="float" office:value="4" calcext:value-type="float">
            <text:p>4</text:p>
          </table:table-cell>
          <table:table-cell table:formula="of:=IF([.D4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C472])" office:value-type="string" office:string-value="ECA3F" calcext:value-type="string">
            <text:p>ECA3F</text:p>
          </table:table-cell>
          <table:table-cell office:value-type="float" office:value="969279" calcext:value-type="float">
            <text:p>969279</text:p>
          </table:table-cell>
          <table:table-cell office:value-type="float" office:value="4" calcext:value-type="float">
            <text:p>4</text:p>
          </table:table-cell>
          <table:table-cell table:formula="of:=IF([.D4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C473])" office:value-type="string" office:string-value="ECA43" calcext:value-type="string">
            <text:p>ECA43</text:p>
          </table:table-cell>
          <table:table-cell office:value-type="float" office:value="969283" calcext:value-type="float">
            <text:p>969283</text:p>
          </table:table-cell>
          <table:table-cell office:value-type="float" office:value="4" calcext:value-type="float">
            <text:p>4</text:p>
          </table:table-cell>
          <table:table-cell table:formula="of:=IF([.D4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C474])" office:value-type="string" office:string-value="ECA47" calcext:value-type="string">
            <text:p>ECA47</text:p>
          </table:table-cell>
          <table:table-cell office:value-type="float" office:value="969287" calcext:value-type="float">
            <text:p>969287</text:p>
          </table:table-cell>
          <table:table-cell office:value-type="float" office:value="4" calcext:value-type="float">
            <text:p>4</text:p>
          </table:table-cell>
          <table:table-cell table:formula="of:=IF([.D4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C475])" office:value-type="string" office:string-value="ECA4B" calcext:value-type="string">
            <text:p>ECA4B</text:p>
          </table:table-cell>
          <table:table-cell office:value-type="float" office:value="969291" calcext:value-type="float">
            <text:p>969291</text:p>
          </table:table-cell>
          <table:table-cell office:value-type="float" office:value="4" calcext:value-type="float">
            <text:p>4</text:p>
          </table:table-cell>
          <table:table-cell table:formula="of:=IF([.D4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C476])" office:value-type="string" office:string-value="ECA4F" calcext:value-type="string">
            <text:p>ECA4F</text:p>
          </table:table-cell>
          <table:table-cell office:value-type="float" office:value="969295" calcext:value-type="float">
            <text:p>969295</text:p>
          </table:table-cell>
          <table:table-cell office:value-type="float" office:value="4" calcext:value-type="float">
            <text:p>4</text:p>
          </table:table-cell>
          <table:table-cell table:formula="of:=IF([.D4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C477])" office:value-type="string" office:string-value="ECA53" calcext:value-type="string">
            <text:p>ECA53</text:p>
          </table:table-cell>
          <table:table-cell office:value-type="float" office:value="969299" calcext:value-type="float">
            <text:p>969299</text:p>
          </table:table-cell>
          <table:table-cell office:value-type="float" office:value="4" calcext:value-type="float">
            <text:p>4</text:p>
          </table:table-cell>
          <table:table-cell table:formula="of:=IF([.D4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C478])" office:value-type="string" office:string-value="ECA57" calcext:value-type="string">
            <text:p>ECA57</text:p>
          </table:table-cell>
          <table:table-cell office:value-type="float" office:value="969303" calcext:value-type="float">
            <text:p>969303</text:p>
          </table:table-cell>
          <table:table-cell office:value-type="float" office:value="4" calcext:value-type="float">
            <text:p>4</text:p>
          </table:table-cell>
          <table:table-cell table:formula="of:=IF([.D4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C479])" office:value-type="string" office:string-value="ECA5B" calcext:value-type="string">
            <text:p>ECA5B</text:p>
          </table:table-cell>
          <table:table-cell office:value-type="float" office:value="969307" calcext:value-type="float">
            <text:p>969307</text:p>
          </table:table-cell>
          <table:table-cell office:value-type="float" office:value="4" calcext:value-type="float">
            <text:p>4</text:p>
          </table:table-cell>
          <table:table-cell table:formula="of:=IF([.D4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C480])" office:value-type="string" office:string-value="ECA5F" calcext:value-type="string">
            <text:p>ECA5F</text:p>
          </table:table-cell>
          <table:table-cell office:value-type="float" office:value="969311" calcext:value-type="float">
            <text:p>969311</text:p>
          </table:table-cell>
          <table:table-cell office:value-type="float" office:value="4" calcext:value-type="float">
            <text:p>4</text:p>
          </table:table-cell>
          <table:table-cell table:formula="of:=IF([.D4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C481])" office:value-type="string" office:string-value="ECA63" calcext:value-type="string">
            <text:p>ECA63</text:p>
          </table:table-cell>
          <table:table-cell office:value-type="float" office:value="969315" calcext:value-type="float">
            <text:p>969315</text:p>
          </table:table-cell>
          <table:table-cell office:value-type="float" office:value="4" calcext:value-type="float">
            <text:p>4</text:p>
          </table:table-cell>
          <table:table-cell table:formula="of:=IF([.D4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C482])" office:value-type="string" office:string-value="ECA67" calcext:value-type="string">
            <text:p>ECA67</text:p>
          </table:table-cell>
          <table:table-cell office:value-type="float" office:value="969319" calcext:value-type="float">
            <text:p>969319</text:p>
          </table:table-cell>
          <table:table-cell office:value-type="float" office:value="4" calcext:value-type="float">
            <text:p>4</text:p>
          </table:table-cell>
          <table:table-cell table:formula="of:=IF([.D4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C483])" office:value-type="string" office:string-value="ECA6B" calcext:value-type="string">
            <text:p>ECA6B</text:p>
          </table:table-cell>
          <table:table-cell office:value-type="float" office:value="969323" calcext:value-type="float">
            <text:p>969323</text:p>
          </table:table-cell>
          <table:table-cell office:value-type="float" office:value="550" calcext:value-type="float">
            <text:p>550</text:p>
          </table:table-cell>
          <table:table-cell table:formula="of:=IF([.D483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C484])" office:value-type="string" office:string-value="ECC91" calcext:value-type="string">
            <text:p>ECC91</text:p>
          </table:table-cell>
          <table:table-cell office:value-type="float" office:value="969873" calcext:value-type="float">
            <text:p>969873</text:p>
          </table:table-cell>
          <table:table-cell office:value-type="float" office:value="4" calcext:value-type="float">
            <text:p>4</text:p>
          </table:table-cell>
          <table:table-cell table:formula="of:=IF([.D4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C485])" office:value-type="string" office:string-value="ECC95" calcext:value-type="string">
            <text:p>ECC95</text:p>
          </table:table-cell>
          <table:table-cell office:value-type="float" office:value="969877" calcext:value-type="float">
            <text:p>969877</text:p>
          </table:table-cell>
          <table:table-cell office:value-type="float" office:value="4" calcext:value-type="float">
            <text:p>4</text:p>
          </table:table-cell>
          <table:table-cell table:formula="of:=IF([.D4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C486])" office:value-type="string" office:string-value="ECC99" calcext:value-type="string">
            <text:p>ECC99</text:p>
          </table:table-cell>
          <table:table-cell office:value-type="float" office:value="969881" calcext:value-type="float">
            <text:p>969881</text:p>
          </table:table-cell>
          <table:table-cell office:value-type="float" office:value="4" calcext:value-type="float">
            <text:p>4</text:p>
          </table:table-cell>
          <table:table-cell table:formula="of:=IF([.D4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C487])" office:value-type="string" office:string-value="ECC9D" calcext:value-type="string">
            <text:p>ECC9D</text:p>
          </table:table-cell>
          <table:table-cell office:value-type="float" office:value="969885" calcext:value-type="float">
            <text:p>969885</text:p>
          </table:table-cell>
          <table:table-cell office:value-type="float" office:value="4" calcext:value-type="float">
            <text:p>4</text:p>
          </table:table-cell>
          <table:table-cell table:formula="of:=IF([.D4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C488])" office:value-type="string" office:string-value="ECCA1" calcext:value-type="string">
            <text:p>ECCA1</text:p>
          </table:table-cell>
          <table:table-cell office:value-type="float" office:value="969889" calcext:value-type="float">
            <text:p>969889</text:p>
          </table:table-cell>
          <table:table-cell office:value-type="float" office:value="4" calcext:value-type="float">
            <text:p>4</text:p>
          </table:table-cell>
          <table:table-cell table:formula="of:=IF([.D4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C489])" office:value-type="string" office:string-value="ECCA5" calcext:value-type="string">
            <text:p>ECCA5</text:p>
          </table:table-cell>
          <table:table-cell office:value-type="float" office:value="969893" calcext:value-type="float">
            <text:p>969893</text:p>
          </table:table-cell>
          <table:table-cell office:value-type="float" office:value="4" calcext:value-type="float">
            <text:p>4</text:p>
          </table:table-cell>
          <table:table-cell table:formula="of:=IF([.D4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C490])" office:value-type="string" office:string-value="ECCA9" calcext:value-type="string">
            <text:p>ECCA9</text:p>
          </table:table-cell>
          <table:table-cell office:value-type="float" office:value="969897" calcext:value-type="float">
            <text:p>969897</text:p>
          </table:table-cell>
          <table:table-cell office:value-type="float" office:value="4" calcext:value-type="float">
            <text:p>4</text:p>
          </table:table-cell>
          <table:table-cell table:formula="of:=IF([.D4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C491])" office:value-type="string" office:string-value="ECCAD" calcext:value-type="string">
            <text:p>ECCAD</text:p>
          </table:table-cell>
          <table:table-cell office:value-type="float" office:value="969901" calcext:value-type="float">
            <text:p>969901</text:p>
          </table:table-cell>
          <table:table-cell office:value-type="float" office:value="4" calcext:value-type="float">
            <text:p>4</text:p>
          </table:table-cell>
          <table:table-cell table:formula="of:=IF([.D4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C492])" office:value-type="string" office:string-value="ECCB1" calcext:value-type="string">
            <text:p>ECCB1</text:p>
          </table:table-cell>
          <table:table-cell office:value-type="float" office:value="969905" calcext:value-type="float">
            <text:p>969905</text:p>
          </table:table-cell>
          <table:table-cell office:value-type="float" office:value="4" calcext:value-type="float">
            <text:p>4</text:p>
          </table:table-cell>
          <table:table-cell table:formula="of:=IF([.D4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C493])" office:value-type="string" office:string-value="ECCB5" calcext:value-type="string">
            <text:p>ECCB5</text:p>
          </table:table-cell>
          <table:table-cell office:value-type="float" office:value="969909" calcext:value-type="float">
            <text:p>969909</text:p>
          </table:table-cell>
          <table:table-cell office:value-type="float" office:value="36" calcext:value-type="float">
            <text:p>36</text:p>
          </table:table-cell>
          <table:table-cell table:formula="of:=IF([.D4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C494])" office:value-type="string" office:string-value="ECCD9" calcext:value-type="string">
            <text:p>ECCD9</text:p>
          </table:table-cell>
          <table:table-cell office:value-type="float" office:value="969945" calcext:value-type="float">
            <text:p>969945</text:p>
          </table:table-cell>
          <table:table-cell office:value-type="float" office:value="4" calcext:value-type="float">
            <text:p>4</text:p>
          </table:table-cell>
          <table:table-cell table:formula="of:=IF([.D4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C495])" office:value-type="string" office:string-value="ECCDD" calcext:value-type="string">
            <text:p>ECCDD</text:p>
          </table:table-cell>
          <table:table-cell office:value-type="float" office:value="969949" calcext:value-type="float">
            <text:p>969949</text:p>
          </table:table-cell>
          <table:table-cell office:value-type="float" office:value="4" calcext:value-type="float">
            <text:p>4</text:p>
          </table:table-cell>
          <table:table-cell table:formula="of:=IF([.D4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C496])" office:value-type="string" office:string-value="ECCE1" calcext:value-type="string">
            <text:p>ECCE1</text:p>
          </table:table-cell>
          <table:table-cell office:value-type="float" office:value="969953" calcext:value-type="float">
            <text:p>969953</text:p>
          </table:table-cell>
          <table:table-cell office:value-type="float" office:value="4" calcext:value-type="float">
            <text:p>4</text:p>
          </table:table-cell>
          <table:table-cell table:formula="of:=IF([.D4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C497])" office:value-type="string" office:string-value="ECCE5" calcext:value-type="string">
            <text:p>ECCE5</text:p>
          </table:table-cell>
          <table:table-cell office:value-type="float" office:value="969957" calcext:value-type="float">
            <text:p>969957</text:p>
          </table:table-cell>
          <table:table-cell office:value-type="float" office:value="8" calcext:value-type="float">
            <text:p>8</text:p>
          </table:table-cell>
          <table:table-cell table:formula="of:=IF([.D4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C498])" office:value-type="string" office:string-value="ECCED" calcext:value-type="string">
            <text:p>ECCED</text:p>
          </table:table-cell>
          <table:table-cell office:value-type="float" office:value="969965" calcext:value-type="float">
            <text:p>969965</text:p>
          </table:table-cell>
          <table:table-cell office:value-type="float" office:value="4" calcext:value-type="float">
            <text:p>4</text:p>
          </table:table-cell>
          <table:table-cell table:formula="of:=IF([.D4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C499])" office:value-type="string" office:string-value="ECCF1" calcext:value-type="string">
            <text:p>ECCF1</text:p>
          </table:table-cell>
          <table:table-cell office:value-type="float" office:value="969969" calcext:value-type="float">
            <text:p>969969</text:p>
          </table:table-cell>
          <table:table-cell office:value-type="float" office:value="4" calcext:value-type="float">
            <text:p>4</text:p>
          </table:table-cell>
          <table:table-cell table:formula="of:=IF([.D4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C500])" office:value-type="string" office:string-value="ECCF5" calcext:value-type="string">
            <text:p>ECCF5</text:p>
          </table:table-cell>
          <table:table-cell office:value-type="float" office:value="969973" calcext:value-type="float">
            <text:p>969973</text:p>
          </table:table-cell>
          <table:table-cell office:value-type="float" office:value="3" calcext:value-type="float">
            <text:p>3</text:p>
          </table:table-cell>
          <table:table-cell table:formula="of:=IF([.D5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C501])" office:value-type="string" office:string-value="ECCF8" calcext:value-type="string">
            <text:p>ECCF8</text:p>
          </table:table-cell>
          <table:table-cell office:value-type="float" office:value="969976" calcext:value-type="float">
            <text:p>969976</text:p>
          </table:table-cell>
          <table:table-cell office:value-type="float" office:value="4" calcext:value-type="float">
            <text:p>4</text:p>
          </table:table-cell>
          <table:table-cell table:formula="of:=IF([.D5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C502])" office:value-type="string" office:string-value="ECCFC" calcext:value-type="string">
            <text:p>ECCFC</text:p>
          </table:table-cell>
          <table:table-cell office:value-type="float" office:value="969980" calcext:value-type="float">
            <text:p>969980</text:p>
          </table:table-cell>
          <table:table-cell office:value-type="float" office:value="4" calcext:value-type="float">
            <text:p>4</text:p>
          </table:table-cell>
          <table:table-cell table:formula="of:=IF([.D5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C503])" office:value-type="string" office:string-value="ECD00" calcext:value-type="string">
            <text:p>ECD00</text:p>
          </table:table-cell>
          <table:table-cell office:value-type="float" office:value="969984" calcext:value-type="float">
            <text:p>969984</text:p>
          </table:table-cell>
          <table:table-cell office:value-type="float" office:value="4" calcext:value-type="float">
            <text:p>4</text:p>
          </table:table-cell>
          <table:table-cell table:formula="of:=IF([.D5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C504])" office:value-type="string" office:string-value="ECD04" calcext:value-type="string">
            <text:p>ECD04</text:p>
          </table:table-cell>
          <table:table-cell office:value-type="float" office:value="969988" calcext:value-type="float">
            <text:p>969988</text:p>
          </table:table-cell>
          <table:table-cell office:value-type="float" office:value="4" calcext:value-type="float">
            <text:p>4</text:p>
          </table:table-cell>
          <table:table-cell table:formula="of:=IF([.D5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C505])" office:value-type="string" office:string-value="ECD08" calcext:value-type="string">
            <text:p>ECD08</text:p>
          </table:table-cell>
          <table:table-cell office:value-type="float" office:value="969992" calcext:value-type="float">
            <text:p>969992</text:p>
          </table:table-cell>
          <table:table-cell office:value-type="float" office:value="4" calcext:value-type="float">
            <text:p>4</text:p>
          </table:table-cell>
          <table:table-cell table:formula="of:=IF([.D5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C506])" office:value-type="string" office:string-value="ECD0C" calcext:value-type="string">
            <text:p>ECD0C</text:p>
          </table:table-cell>
          <table:table-cell office:value-type="float" office:value="969996" calcext:value-type="float">
            <text:p>969996</text:p>
          </table:table-cell>
          <table:table-cell office:value-type="float" office:value="4" calcext:value-type="float">
            <text:p>4</text:p>
          </table:table-cell>
          <table:table-cell table:formula="of:=IF([.D5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C507])" office:value-type="string" office:string-value="ECD10" calcext:value-type="string">
            <text:p>ECD10</text:p>
          </table:table-cell>
          <table:table-cell office:value-type="float" office:value="970000" calcext:value-type="float">
            <text:p>970000</text:p>
          </table:table-cell>
          <table:table-cell office:value-type="float" office:value="4" calcext:value-type="float">
            <text:p>4</text:p>
          </table:table-cell>
          <table:table-cell table:formula="of:=IF([.D5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C508])" office:value-type="string" office:string-value="ECD14" calcext:value-type="string">
            <text:p>ECD14</text:p>
          </table:table-cell>
          <table:table-cell office:value-type="float" office:value="970004" calcext:value-type="float">
            <text:p>970004</text:p>
          </table:table-cell>
          <table:table-cell office:value-type="float" office:value="4" calcext:value-type="float">
            <text:p>4</text:p>
          </table:table-cell>
          <table:table-cell table:formula="of:=IF([.D5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C509])" office:value-type="string" office:string-value="ECD18" calcext:value-type="string">
            <text:p>ECD18</text:p>
          </table:table-cell>
          <table:table-cell office:value-type="float" office:value="970008" calcext:value-type="float">
            <text:p>970008</text:p>
          </table:table-cell>
          <table:table-cell office:value-type="float" office:value="4" calcext:value-type="float">
            <text:p>4</text:p>
          </table:table-cell>
          <table:table-cell table:formula="of:=IF([.D5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C510])" office:value-type="string" office:string-value="ECD1C" calcext:value-type="string">
            <text:p>ECD1C</text:p>
          </table:table-cell>
          <table:table-cell office:value-type="float" office:value="970012" calcext:value-type="float">
            <text:p>970012</text:p>
          </table:table-cell>
          <table:table-cell office:value-type="float" office:value="4" calcext:value-type="float">
            <text:p>4</text:p>
          </table:table-cell>
          <table:table-cell table:formula="of:=IF([.D5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C511])" office:value-type="string" office:string-value="ECD20" calcext:value-type="string">
            <text:p>ECD20</text:p>
          </table:table-cell>
          <table:table-cell office:value-type="float" office:value="970016" calcext:value-type="float">
            <text:p>970016</text:p>
          </table:table-cell>
          <table:table-cell office:value-type="float" office:value="1024" calcext:value-type="float">
            <text:p>1024</text:p>
          </table:table-cell>
          <table:table-cell table:formula="of:=IF([.D511]&gt;100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C512])" office:value-type="string" office:string-value="ED120" calcext:value-type="string">
            <text:p>ED120</text:p>
          </table:table-cell>
          <table:table-cell office:value-type="float" office:value="971040" calcext:value-type="float">
            <text:p>971040</text:p>
          </table:table-cell>
          <table:table-cell office:value-type="float" office:value="4" calcext:value-type="float">
            <text:p>4</text:p>
          </table:table-cell>
          <table:table-cell table:formula="of:=IF([.D5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C513])" office:value-type="string" office:string-value="ED124" calcext:value-type="string">
            <text:p>ED124</text:p>
          </table:table-cell>
          <table:table-cell office:value-type="float" office:value="971044" calcext:value-type="float">
            <text:p>971044</text:p>
          </table:table-cell>
          <table:table-cell office:value-type="float" office:value="4" calcext:value-type="float">
            <text:p>4</text:p>
          </table:table-cell>
          <table:table-cell table:formula="of:=IF([.D5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DEC2HEX([.C514])" office:value-type="string" office:string-value="ED128" calcext:value-type="string">
            <text:p>ED128</text:p>
          </table:table-cell>
          <table:table-cell office:value-type="float" office:value="971048" calcext:value-type="float">
            <text:p>971048</text:p>
          </table:table-cell>
          <table:table-cell office:value-type="float" office:value="4" calcext:value-type="float">
            <text:p>4</text:p>
          </table:table-cell>
          <table:table-cell table:formula="of:=IF([.D5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DEC2HEX([.C515])" office:value-type="string" office:string-value="ED12C" calcext:value-type="string">
            <text:p>ED12C</text:p>
          </table:table-cell>
          <table:table-cell office:value-type="float" office:value="971052" calcext:value-type="float">
            <text:p>971052</text:p>
          </table:table-cell>
          <table:table-cell office:value-type="float" office:value="4" calcext:value-type="float">
            <text:p>4</text:p>
          </table:table-cell>
          <table:table-cell table:formula="of:=IF([.D5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DEC2HEX([.C516])" office:value-type="string" office:string-value="ED130" calcext:value-type="string">
            <text:p>ED130</text:p>
          </table:table-cell>
          <table:table-cell office:value-type="float" office:value="971056" calcext:value-type="float">
            <text:p>971056</text:p>
          </table:table-cell>
          <table:table-cell office:value-type="float" office:value="4" calcext:value-type="float">
            <text:p>4</text:p>
          </table:table-cell>
          <table:table-cell table:formula="of:=IF([.D5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DEC2HEX([.C517])" office:value-type="string" office:string-value="ED134" calcext:value-type="string">
            <text:p>ED134</text:p>
          </table:table-cell>
          <table:table-cell office:value-type="float" office:value="971060" calcext:value-type="float">
            <text:p>971060</text:p>
          </table:table-cell>
          <table:table-cell office:value-type="float" office:value="4" calcext:value-type="float">
            <text:p>4</text:p>
          </table:table-cell>
          <table:table-cell table:formula="of:=IF([.D5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DEC2HEX([.C518])" office:value-type="string" office:string-value="ED138" calcext:value-type="string">
            <text:p>ED138</text:p>
          </table:table-cell>
          <table:table-cell office:value-type="float" office:value="971064" calcext:value-type="float">
            <text:p>971064</text:p>
          </table:table-cell>
          <table:table-cell office:value-type="float" office:value="4" calcext:value-type="float">
            <text:p>4</text:p>
          </table:table-cell>
          <table:table-cell table:formula="of:=IF([.D5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DEC2HEX([.C519])" office:value-type="string" office:string-value="ED13C" calcext:value-type="string">
            <text:p>ED13C</text:p>
          </table:table-cell>
          <table:table-cell office:value-type="float" office:value="971068" calcext:value-type="float">
            <text:p>971068</text:p>
          </table:table-cell>
          <table:table-cell office:value-type="float" office:value="1" calcext:value-type="float">
            <text:p>1</text:p>
          </table:table-cell>
          <table:table-cell table:formula="of:=IF([.D5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DEC2HEX([.C520])" office:value-type="string" office:string-value="ED13D" calcext:value-type="string">
            <text:p>ED13D</text:p>
          </table:table-cell>
          <table:table-cell office:value-type="float" office:value="971069" calcext:value-type="float">
            <text:p>971069</text:p>
          </table:table-cell>
          <table:table-cell office:value-type="float" office:value="1" calcext:value-type="float">
            <text:p>1</text:p>
          </table:table-cell>
          <table:table-cell table:formula="of:=IF([.D5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DEC2HEX([.C521])" office:value-type="string" office:string-value="ED13E" calcext:value-type="string">
            <text:p>ED13E</text:p>
          </table:table-cell>
          <table:table-cell office:value-type="float" office:value="971070" calcext:value-type="float">
            <text:p>971070</text:p>
          </table:table-cell>
          <table:table-cell office:value-type="float" office:value="4" calcext:value-type="float">
            <text:p>4</text:p>
          </table:table-cell>
          <table:table-cell table:formula="of:=IF([.D5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DEC2HEX([.C522])" office:value-type="string" office:string-value="ED142" calcext:value-type="string">
            <text:p>ED142</text:p>
          </table:table-cell>
          <table:table-cell office:value-type="float" office:value="971074" calcext:value-type="float">
            <text:p>971074</text:p>
          </table:table-cell>
          <table:table-cell office:value-type="float" office:value="4" calcext:value-type="float">
            <text:p>4</text:p>
          </table:table-cell>
          <table:table-cell table:formula="of:=IF([.D5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DEC2HEX([.C523])" office:value-type="string" office:string-value="ED146" calcext:value-type="string">
            <text:p>ED146</text:p>
          </table:table-cell>
          <table:table-cell office:value-type="float" office:value="971078" calcext:value-type="float">
            <text:p>971078</text:p>
          </table:table-cell>
          <table:table-cell office:value-type="float" office:value="4" calcext:value-type="float">
            <text:p>4</text:p>
          </table:table-cell>
          <table:table-cell table:formula="of:=IF([.D5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DEC2HEX([.C524])" office:value-type="string" office:string-value="ED14A" calcext:value-type="string">
            <text:p>ED14A</text:p>
          </table:table-cell>
          <table:table-cell office:value-type="float" office:value="971082" calcext:value-type="float">
            <text:p>971082</text:p>
          </table:table-cell>
          <table:table-cell office:value-type="float" office:value="4" calcext:value-type="float">
            <text:p>4</text:p>
          </table:table-cell>
          <table:table-cell table:formula="of:=IF([.D5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DEC2HEX([.C525])" office:value-type="string" office:string-value="ED14E" calcext:value-type="string">
            <text:p>ED14E</text:p>
          </table:table-cell>
          <table:table-cell office:value-type="float" office:value="971086" calcext:value-type="float">
            <text:p>971086</text:p>
          </table:table-cell>
          <table:table-cell office:value-type="float" office:value="4" calcext:value-type="float">
            <text:p>4</text:p>
          </table:table-cell>
          <table:table-cell table:formula="of:=IF([.D5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DEC2HEX([.C526])" office:value-type="string" office:string-value="ED152" calcext:value-type="string">
            <text:p>ED152</text:p>
          </table:table-cell>
          <table:table-cell office:value-type="float" office:value="971090" calcext:value-type="float">
            <text:p>971090</text:p>
          </table:table-cell>
          <table:table-cell office:value-type="float" office:value="4" calcext:value-type="float">
            <text:p>4</text:p>
          </table:table-cell>
          <table:table-cell table:formula="of:=IF([.D5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DEC2HEX([.C527])" office:value-type="string" office:string-value="ED156" calcext:value-type="string">
            <text:p>ED156</text:p>
          </table:table-cell>
          <table:table-cell office:value-type="float" office:value="971094" calcext:value-type="float">
            <text:p>971094</text:p>
          </table:table-cell>
          <table:table-cell office:value-type="float" office:value="4" calcext:value-type="float">
            <text:p>4</text:p>
          </table:table-cell>
          <table:table-cell table:formula="of:=IF([.D5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DEC2HEX([.C528])" office:value-type="string" office:string-value="ED15A" calcext:value-type="string">
            <text:p>ED15A</text:p>
          </table:table-cell>
          <table:table-cell office:value-type="float" office:value="971098" calcext:value-type="float">
            <text:p>971098</text:p>
          </table:table-cell>
          <table:table-cell office:value-type="float" office:value="4" calcext:value-type="float">
            <text:p>4</text:p>
          </table:table-cell>
          <table:table-cell table:formula="of:=IF([.D5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DEC2HEX([.C529])" office:value-type="string" office:string-value="ED15E" calcext:value-type="string">
            <text:p>ED15E</text:p>
          </table:table-cell>
          <table:table-cell office:value-type="float" office:value="971102" calcext:value-type="float">
            <text:p>971102</text:p>
          </table:table-cell>
          <table:table-cell office:value-type="float" office:value="4" calcext:value-type="float">
            <text:p>4</text:p>
          </table:table-cell>
          <table:table-cell table:formula="of:=IF([.D5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DEC2HEX([.C530])" office:value-type="string" office:string-value="ED162" calcext:value-type="string">
            <text:p>ED162</text:p>
          </table:table-cell>
          <table:table-cell office:value-type="float" office:value="971106" calcext:value-type="float">
            <text:p>971106</text:p>
          </table:table-cell>
          <table:table-cell office:value-type="float" office:value="4" calcext:value-type="float">
            <text:p>4</text:p>
          </table:table-cell>
          <table:table-cell table:formula="of:=IF([.D5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DEC2HEX([.C531])" office:value-type="string" office:string-value="ED166" calcext:value-type="string">
            <text:p>ED166</text:p>
          </table:table-cell>
          <table:table-cell office:value-type="float" office:value="971110" calcext:value-type="float">
            <text:p>971110</text:p>
          </table:table-cell>
          <table:table-cell office:value-type="float" office:value="4" calcext:value-type="float">
            <text:p>4</text:p>
          </table:table-cell>
          <table:table-cell table:formula="of:=IF([.D5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DEC2HEX([.C532])" office:value-type="string" office:string-value="ED16A" calcext:value-type="string">
            <text:p>ED16A</text:p>
          </table:table-cell>
          <table:table-cell office:value-type="float" office:value="971114" calcext:value-type="float">
            <text:p>971114</text:p>
          </table:table-cell>
          <table:table-cell office:value-type="float" office:value="4" calcext:value-type="float">
            <text:p>4</text:p>
          </table:table-cell>
          <table:table-cell table:formula="of:=IF([.D5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DEC2HEX([.C533])" office:value-type="string" office:string-value="ED16E" calcext:value-type="string">
            <text:p>ED16E</text:p>
          </table:table-cell>
          <table:table-cell office:value-type="float" office:value="971118" calcext:value-type="float">
            <text:p>971118</text:p>
          </table:table-cell>
          <table:table-cell office:value-type="float" office:value="1" calcext:value-type="float">
            <text:p>1</text:p>
          </table:table-cell>
          <table:table-cell table:formula="of:=IF([.D5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DEC2HEX([.C534])" office:value-type="string" office:string-value="ED16F" calcext:value-type="string">
            <text:p>ED16F</text:p>
          </table:table-cell>
          <table:table-cell office:value-type="float" office:value="971119" calcext:value-type="float">
            <text:p>971119</text:p>
          </table:table-cell>
          <table:table-cell office:value-type="float" office:value="4" calcext:value-type="float">
            <text:p>4</text:p>
          </table:table-cell>
          <table:table-cell table:formula="of:=IF([.D5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DEC2HEX([.C535])" office:value-type="string" office:string-value="ED173" calcext:value-type="string">
            <text:p>ED173</text:p>
          </table:table-cell>
          <table:table-cell office:value-type="float" office:value="971123" calcext:value-type="float">
            <text:p>971123</text:p>
          </table:table-cell>
          <table:table-cell office:value-type="float" office:value="4" calcext:value-type="float">
            <text:p>4</text:p>
          </table:table-cell>
          <table:table-cell table:formula="of:=IF([.D5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DEC2HEX([.C536])" office:value-type="string" office:string-value="ED177" calcext:value-type="string">
            <text:p>ED177</text:p>
          </table:table-cell>
          <table:table-cell office:value-type="float" office:value="971127" calcext:value-type="float">
            <text:p>971127</text:p>
          </table:table-cell>
          <table:table-cell office:value-type="float" office:value="4" calcext:value-type="float">
            <text:p>4</text:p>
          </table:table-cell>
          <table:table-cell table:formula="of:=IF([.D5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DEC2HEX([.C537])" office:value-type="string" office:string-value="ED17B" calcext:value-type="string">
            <text:p>ED17B</text:p>
          </table:table-cell>
          <table:table-cell office:value-type="float" office:value="971131" calcext:value-type="float">
            <text:p>971131</text:p>
          </table:table-cell>
          <table:table-cell office:value-type="float" office:value="4" calcext:value-type="float">
            <text:p>4</text:p>
          </table:table-cell>
          <table:table-cell table:formula="of:=IF([.D5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DEC2HEX([.C538])" office:value-type="string" office:string-value="ED17F" calcext:value-type="string">
            <text:p>ED17F</text:p>
          </table:table-cell>
          <table:table-cell office:value-type="float" office:value="971135" calcext:value-type="float">
            <text:p>971135</text:p>
          </table:table-cell>
          <table:table-cell office:value-type="float" office:value="4" calcext:value-type="float">
            <text:p>4</text:p>
          </table:table-cell>
          <table:table-cell table:formula="of:=IF([.D5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DEC2HEX([.C539])" office:value-type="string" office:string-value="ED183" calcext:value-type="string">
            <text:p>ED183</text:p>
          </table:table-cell>
          <table:table-cell office:value-type="float" office:value="971139" calcext:value-type="float">
            <text:p>971139</text:p>
          </table:table-cell>
          <table:table-cell office:value-type="float" office:value="4" calcext:value-type="float">
            <text:p>4</text:p>
          </table:table-cell>
          <table:table-cell table:formula="of:=IF([.D5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DEC2HEX([.C540])" office:value-type="string" office:string-value="ED187" calcext:value-type="string">
            <text:p>ED187</text:p>
          </table:table-cell>
          <table:table-cell office:value-type="float" office:value="971143" calcext:value-type="float">
            <text:p>971143</text:p>
          </table:table-cell>
          <table:table-cell office:value-type="float" office:value="8" calcext:value-type="float">
            <text:p>8</text:p>
          </table:table-cell>
          <table:table-cell table:formula="of:=IF([.D5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DEC2HEX([.C541])" office:value-type="string" office:string-value="ED18F" calcext:value-type="string">
            <text:p>ED18F</text:p>
          </table:table-cell>
          <table:table-cell office:value-type="float" office:value="971151" calcext:value-type="float">
            <text:p>971151</text:p>
          </table:table-cell>
          <table:table-cell office:value-type="float" office:value="4" calcext:value-type="float">
            <text:p>4</text:p>
          </table:table-cell>
          <table:table-cell table:formula="of:=IF([.D5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DEC2HEX([.C542])" office:value-type="string" office:string-value="ED193" calcext:value-type="string">
            <text:p>ED193</text:p>
          </table:table-cell>
          <table:table-cell office:value-type="float" office:value="971155" calcext:value-type="float">
            <text:p>971155</text:p>
          </table:table-cell>
          <table:table-cell office:value-type="float" office:value="4" calcext:value-type="float">
            <text:p>4</text:p>
          </table:table-cell>
          <table:table-cell table:formula="of:=IF([.D5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DEC2HEX([.C543])" office:value-type="string" office:string-value="ED197" calcext:value-type="string">
            <text:p>ED197</text:p>
          </table:table-cell>
          <table:table-cell office:value-type="float" office:value="971159" calcext:value-type="float">
            <text:p>971159</text:p>
          </table:table-cell>
          <table:table-cell office:value-type="float" office:value="4" calcext:value-type="float">
            <text:p>4</text:p>
          </table:table-cell>
          <table:table-cell table:formula="of:=IF([.D5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DEC2HEX([.C544])" office:value-type="string" office:string-value="ED19B" calcext:value-type="string">
            <text:p>ED19B</text:p>
          </table:table-cell>
          <table:table-cell office:value-type="float" office:value="971163" calcext:value-type="float">
            <text:p>971163</text:p>
          </table:table-cell>
          <table:table-cell office:value-type="float" office:value="4" calcext:value-type="float">
            <text:p>4</text:p>
          </table:table-cell>
          <table:table-cell table:formula="of:=IF([.D5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DEC2HEX([.C545])" office:value-type="string" office:string-value="ED19F" calcext:value-type="string">
            <text:p>ED19F</text:p>
          </table:table-cell>
          <table:table-cell office:value-type="float" office:value="971167" calcext:value-type="float">
            <text:p>971167</text:p>
          </table:table-cell>
          <table:table-cell office:value-type="float" office:value="4" calcext:value-type="float">
            <text:p>4</text:p>
          </table:table-cell>
          <table:table-cell table:formula="of:=IF([.D5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DEC2HEX([.C546])" office:value-type="string" office:string-value="ED1A3" calcext:value-type="string">
            <text:p>ED1A3</text:p>
          </table:table-cell>
          <table:table-cell office:value-type="float" office:value="971171" calcext:value-type="float">
            <text:p>971171</text:p>
          </table:table-cell>
          <table:table-cell office:value-type="float" office:value="4" calcext:value-type="float">
            <text:p>4</text:p>
          </table:table-cell>
          <table:table-cell table:formula="of:=IF([.D5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DEC2HEX([.C547])" office:value-type="string" office:string-value="ED1A7" calcext:value-type="string">
            <text:p>ED1A7</text:p>
          </table:table-cell>
          <table:table-cell office:value-type="float" office:value="971175" calcext:value-type="float">
            <text:p>971175</text:p>
          </table:table-cell>
          <table:table-cell office:value-type="float" office:value="4" calcext:value-type="float">
            <text:p>4</text:p>
          </table:table-cell>
          <table:table-cell table:formula="of:=IF([.D5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DEC2HEX([.C548])" office:value-type="string" office:string-value="ED1AB" calcext:value-type="string">
            <text:p>ED1AB</text:p>
          </table:table-cell>
          <table:table-cell office:value-type="float" office:value="971179" calcext:value-type="float">
            <text:p>971179</text:p>
          </table:table-cell>
          <table:table-cell office:value-type="float" office:value="1" calcext:value-type="float">
            <text:p>1</text:p>
          </table:table-cell>
          <table:table-cell table:formula="of:=IF([.D5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DEC2HEX([.C549])" office:value-type="string" office:string-value="ED1AC" calcext:value-type="string">
            <text:p>ED1AC</text:p>
          </table:table-cell>
          <table:table-cell office:value-type="float" office:value="971180" calcext:value-type="float">
            <text:p>971180</text:p>
          </table:table-cell>
          <table:table-cell office:value-type="float" office:value="4" calcext:value-type="float">
            <text:p>4</text:p>
          </table:table-cell>
          <table:table-cell table:formula="of:=IF([.D5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DEC2HEX([.C550])" office:value-type="string" office:string-value="ED1B0" calcext:value-type="string">
            <text:p>ED1B0</text:p>
          </table:table-cell>
          <table:table-cell office:value-type="float" office:value="971184" calcext:value-type="float">
            <text:p>971184</text:p>
          </table:table-cell>
          <table:table-cell office:value-type="float" office:value="4" calcext:value-type="float">
            <text:p>4</text:p>
          </table:table-cell>
          <table:table-cell table:formula="of:=IF([.D5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DEC2HEX([.C551])" office:value-type="string" office:string-value="ED1B4" calcext:value-type="string">
            <text:p>ED1B4</text:p>
          </table:table-cell>
          <table:table-cell office:value-type="float" office:value="971188" calcext:value-type="float">
            <text:p>971188</text:p>
          </table:table-cell>
          <table:table-cell office:value-type="float" office:value="4" calcext:value-type="float">
            <text:p>4</text:p>
          </table:table-cell>
          <table:table-cell table:formula="of:=IF([.D5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DEC2HEX([.C552])" office:value-type="string" office:string-value="ED1B8" calcext:value-type="string">
            <text:p>ED1B8</text:p>
          </table:table-cell>
          <table:table-cell office:value-type="float" office:value="971192" calcext:value-type="float">
            <text:p>971192</text:p>
          </table:table-cell>
          <table:table-cell office:value-type="float" office:value="4" calcext:value-type="float">
            <text:p>4</text:p>
          </table:table-cell>
          <table:table-cell table:formula="of:=IF([.D5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DEC2HEX([.C553])" office:value-type="string" office:string-value="ED1BC" calcext:value-type="string">
            <text:p>ED1BC</text:p>
          </table:table-cell>
          <table:table-cell office:value-type="float" office:value="971196" calcext:value-type="float">
            <text:p>971196</text:p>
          </table:table-cell>
          <table:table-cell office:value-type="float" office:value="4" calcext:value-type="float">
            <text:p>4</text:p>
          </table:table-cell>
          <table:table-cell table:formula="of:=IF([.D5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DEC2HEX([.C554])" office:value-type="string" office:string-value="ED1C0" calcext:value-type="string">
            <text:p>ED1C0</text:p>
          </table:table-cell>
          <table:table-cell office:value-type="float" office:value="971200" calcext:value-type="float">
            <text:p>971200</text:p>
          </table:table-cell>
          <table:table-cell office:value-type="float" office:value="4" calcext:value-type="float">
            <text:p>4</text:p>
          </table:table-cell>
          <table:table-cell table:formula="of:=IF([.D5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DEC2HEX([.C555])" office:value-type="string" office:string-value="ED1C4" calcext:value-type="string">
            <text:p>ED1C4</text:p>
          </table:table-cell>
          <table:table-cell office:value-type="float" office:value="971204" calcext:value-type="float">
            <text:p>971204</text:p>
          </table:table-cell>
          <table:table-cell office:value-type="float" office:value="10" calcext:value-type="float">
            <text:p>10</text:p>
          </table:table-cell>
          <table:table-cell table:formula="of:=IF([.D5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DEC2HEX([.C556])" office:value-type="string" office:string-value="ED1CE" calcext:value-type="string">
            <text:p>ED1CE</text:p>
          </table:table-cell>
          <table:table-cell office:value-type="float" office:value="971214" calcext:value-type="float">
            <text:p>971214</text:p>
          </table:table-cell>
          <table:table-cell office:value-type="float" office:value="4" calcext:value-type="float">
            <text:p>4</text:p>
          </table:table-cell>
          <table:table-cell table:formula="of:=IF([.D5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DEC2HEX([.C557])" office:value-type="string" office:string-value="ED1D2" calcext:value-type="string">
            <text:p>ED1D2</text:p>
          </table:table-cell>
          <table:table-cell office:value-type="float" office:value="971218" calcext:value-type="float">
            <text:p>971218</text:p>
          </table:table-cell>
          <table:table-cell office:value-type="float" office:value="4" calcext:value-type="float">
            <text:p>4</text:p>
          </table:table-cell>
          <table:table-cell table:formula="of:=IF([.D5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DEC2HEX([.C558])" office:value-type="string" office:string-value="ED1D6" calcext:value-type="string">
            <text:p>ED1D6</text:p>
          </table:table-cell>
          <table:table-cell office:value-type="float" office:value="971222" calcext:value-type="float">
            <text:p>971222</text:p>
          </table:table-cell>
          <table:table-cell office:value-type="float" office:value="4" calcext:value-type="float">
            <text:p>4</text:p>
          </table:table-cell>
          <table:table-cell table:formula="of:=IF([.D5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DEC2HEX([.C559])" office:value-type="string" office:string-value="ED1DA" calcext:value-type="string">
            <text:p>ED1DA</text:p>
          </table:table-cell>
          <table:table-cell office:value-type="float" office:value="971226" calcext:value-type="float">
            <text:p>971226</text:p>
          </table:table-cell>
          <table:table-cell office:value-type="float" office:value="4" calcext:value-type="float">
            <text:p>4</text:p>
          </table:table-cell>
          <table:table-cell table:formula="of:=IF([.D5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DEC2HEX([.C560])" office:value-type="string" office:string-value="ED1DE" calcext:value-type="string">
            <text:p>ED1DE</text:p>
          </table:table-cell>
          <table:table-cell office:value-type="float" office:value="971230" calcext:value-type="float">
            <text:p>971230</text:p>
          </table:table-cell>
          <table:table-cell office:value-type="float" office:value="4" calcext:value-type="float">
            <text:p>4</text:p>
          </table:table-cell>
          <table:table-cell table:formula="of:=IF([.D5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DEC2HEX([.C561])" office:value-type="string" office:string-value="ED1E2" calcext:value-type="string">
            <text:p>ED1E2</text:p>
          </table:table-cell>
          <table:table-cell office:value-type="float" office:value="971234" calcext:value-type="float">
            <text:p>971234</text:p>
          </table:table-cell>
          <table:table-cell office:value-type="float" office:value="4" calcext:value-type="float">
            <text:p>4</text:p>
          </table:table-cell>
          <table:table-cell table:formula="of:=IF([.D5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DEC2HEX([.C562])" office:value-type="string" office:string-value="ED1E6" calcext:value-type="string">
            <text:p>ED1E6</text:p>
          </table:table-cell>
          <table:table-cell office:value-type="float" office:value="971238" calcext:value-type="float">
            <text:p>971238</text:p>
          </table:table-cell>
          <table:table-cell office:value-type="float" office:value="4" calcext:value-type="float">
            <text:p>4</text:p>
          </table:table-cell>
          <table:table-cell table:formula="of:=IF([.D5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DEC2HEX([.C563])" office:value-type="string" office:string-value="ED1EA" calcext:value-type="string">
            <text:p>ED1EA</text:p>
          </table:table-cell>
          <table:table-cell office:value-type="float" office:value="971242" calcext:value-type="float">
            <text:p>971242</text:p>
          </table:table-cell>
          <table:table-cell office:value-type="float" office:value="1" calcext:value-type="float">
            <text:p>1</text:p>
          </table:table-cell>
          <table:table-cell table:formula="of:=IF([.D5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DEC2HEX([.C564])" office:value-type="string" office:string-value="ED1EB" calcext:value-type="string">
            <text:p>ED1EB</text:p>
          </table:table-cell>
          <table:table-cell office:value-type="float" office:value="971243" calcext:value-type="float">
            <text:p>971243</text:p>
          </table:table-cell>
          <table:table-cell office:value-type="float" office:value="4" calcext:value-type="float">
            <text:p>4</text:p>
          </table:table-cell>
          <table:table-cell table:formula="of:=IF([.D5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DEC2HEX([.C565])" office:value-type="string" office:string-value="ED1EF" calcext:value-type="string">
            <text:p>ED1EF</text:p>
          </table:table-cell>
          <table:table-cell office:value-type="float" office:value="971247" calcext:value-type="float">
            <text:p>971247</text:p>
          </table:table-cell>
          <table:table-cell office:value-type="float" office:value="4" calcext:value-type="float">
            <text:p>4</text:p>
          </table:table-cell>
          <table:table-cell table:formula="of:=IF([.D5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DEC2HEX([.C566])" office:value-type="string" office:string-value="ED1F3" calcext:value-type="string">
            <text:p>ED1F3</text:p>
          </table:table-cell>
          <table:table-cell office:value-type="float" office:value="971251" calcext:value-type="float">
            <text:p>971251</text:p>
          </table:table-cell>
          <table:table-cell office:value-type="float" office:value="4" calcext:value-type="float">
            <text:p>4</text:p>
          </table:table-cell>
          <table:table-cell table:formula="of:=IF([.D5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DEC2HEX([.C567])" office:value-type="string" office:string-value="ED1F7" calcext:value-type="string">
            <text:p>ED1F7</text:p>
          </table:table-cell>
          <table:table-cell office:value-type="float" office:value="971255" calcext:value-type="float">
            <text:p>971255</text:p>
          </table:table-cell>
          <table:table-cell office:value-type="float" office:value="4" calcext:value-type="float">
            <text:p>4</text:p>
          </table:table-cell>
          <table:table-cell table:formula="of:=IF([.D5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DEC2HEX([.C568])" office:value-type="string" office:string-value="ED1FB" calcext:value-type="string">
            <text:p>ED1FB</text:p>
          </table:table-cell>
          <table:table-cell office:value-type="float" office:value="971259" calcext:value-type="float">
            <text:p>971259</text:p>
          </table:table-cell>
          <table:table-cell office:value-type="float" office:value="4" calcext:value-type="float">
            <text:p>4</text:p>
          </table:table-cell>
          <table:table-cell table:formula="of:=IF([.D5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DEC2HEX([.C569])" office:value-type="string" office:string-value="ED1FF" calcext:value-type="string">
            <text:p>ED1FF</text:p>
          </table:table-cell>
          <table:table-cell office:value-type="float" office:value="971263" calcext:value-type="float">
            <text:p>971263</text:p>
          </table:table-cell>
          <table:table-cell office:value-type="float" office:value="4" calcext:value-type="float">
            <text:p>4</text:p>
          </table:table-cell>
          <table:table-cell table:formula="of:=IF([.D5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DEC2HEX([.C570])" office:value-type="string" office:string-value="ED203" calcext:value-type="string">
            <text:p>ED203</text:p>
          </table:table-cell>
          <table:table-cell office:value-type="float" office:value="971267" calcext:value-type="float">
            <text:p>971267</text:p>
          </table:table-cell>
          <table:table-cell office:value-type="float" office:value="10" calcext:value-type="float">
            <text:p>10</text:p>
          </table:table-cell>
          <table:table-cell table:formula="of:=IF([.D5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DEC2HEX([.C571])" office:value-type="string" office:string-value="ED20D" calcext:value-type="string">
            <text:p>ED20D</text:p>
          </table:table-cell>
          <table:table-cell office:value-type="float" office:value="971277" calcext:value-type="float">
            <text:p>971277</text:p>
          </table:table-cell>
          <table:table-cell office:value-type="float" office:value="4" calcext:value-type="float">
            <text:p>4</text:p>
          </table:table-cell>
          <table:table-cell table:formula="of:=IF([.D5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DEC2HEX([.C572])" office:value-type="string" office:string-value="ED211" calcext:value-type="string">
            <text:p>ED211</text:p>
          </table:table-cell>
          <table:table-cell office:value-type="float" office:value="971281" calcext:value-type="float">
            <text:p>971281</text:p>
          </table:table-cell>
          <table:table-cell office:value-type="float" office:value="4" calcext:value-type="float">
            <text:p>4</text:p>
          </table:table-cell>
          <table:table-cell table:formula="of:=IF([.D5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DEC2HEX([.C573])" office:value-type="string" office:string-value="ED215" calcext:value-type="string">
            <text:p>ED215</text:p>
          </table:table-cell>
          <table:table-cell office:value-type="float" office:value="971285" calcext:value-type="float">
            <text:p>971285</text:p>
          </table:table-cell>
          <table:table-cell office:value-type="float" office:value="4" calcext:value-type="float">
            <text:p>4</text:p>
          </table:table-cell>
          <table:table-cell table:formula="of:=IF([.D5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DEC2HEX([.C574])" office:value-type="string" office:string-value="ED219" calcext:value-type="string">
            <text:p>ED219</text:p>
          </table:table-cell>
          <table:table-cell office:value-type="float" office:value="971289" calcext:value-type="float">
            <text:p>971289</text:p>
          </table:table-cell>
          <table:table-cell office:value-type="float" office:value="4" calcext:value-type="float">
            <text:p>4</text:p>
          </table:table-cell>
          <table:table-cell table:formula="of:=IF([.D5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DEC2HEX([.C575])" office:value-type="string" office:string-value="ED21D" calcext:value-type="string">
            <text:p>ED21D</text:p>
          </table:table-cell>
          <table:table-cell office:value-type="float" office:value="971293" calcext:value-type="float">
            <text:p>971293</text:p>
          </table:table-cell>
          <table:table-cell office:value-type="float" office:value="4" calcext:value-type="float">
            <text:p>4</text:p>
          </table:table-cell>
          <table:table-cell table:formula="of:=IF([.D5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DEC2HEX([.C576])" office:value-type="string" office:string-value="ED221" calcext:value-type="string">
            <text:p>ED221</text:p>
          </table:table-cell>
          <table:table-cell office:value-type="float" office:value="971297" calcext:value-type="float">
            <text:p>971297</text:p>
          </table:table-cell>
          <table:table-cell office:value-type="float" office:value="4" calcext:value-type="float">
            <text:p>4</text:p>
          </table:table-cell>
          <table:table-cell table:formula="of:=IF([.D5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DEC2HEX([.C577])" office:value-type="string" office:string-value="ED225" calcext:value-type="string">
            <text:p>ED225</text:p>
          </table:table-cell>
          <table:table-cell office:value-type="float" office:value="971301" calcext:value-type="float">
            <text:p>971301</text:p>
          </table:table-cell>
          <table:table-cell office:value-type="float" office:value="4" calcext:value-type="float">
            <text:p>4</text:p>
          </table:table-cell>
          <table:table-cell table:formula="of:=IF([.D5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DEC2HEX([.C578])" office:value-type="string" office:string-value="ED229" calcext:value-type="string">
            <text:p>ED229</text:p>
          </table:table-cell>
          <table:table-cell office:value-type="float" office:value="971305" calcext:value-type="float">
            <text:p>971305</text:p>
          </table:table-cell>
          <table:table-cell office:value-type="float" office:value="1" calcext:value-type="float">
            <text:p>1</text:p>
          </table:table-cell>
          <table:table-cell table:formula="of:=IF([.D5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DEC2HEX([.C579])" office:value-type="string" office:string-value="ED22A" calcext:value-type="string">
            <text:p>ED22A</text:p>
          </table:table-cell>
          <table:table-cell office:value-type="float" office:value="971306" calcext:value-type="float">
            <text:p>971306</text:p>
          </table:table-cell>
          <table:table-cell office:value-type="float" office:value="4" calcext:value-type="float">
            <text:p>4</text:p>
          </table:table-cell>
          <table:table-cell table:formula="of:=IF([.D5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DEC2HEX([.C580])" office:value-type="string" office:string-value="ED22E" calcext:value-type="string">
            <text:p>ED22E</text:p>
          </table:table-cell>
          <table:table-cell office:value-type="float" office:value="971310" calcext:value-type="float">
            <text:p>971310</text:p>
          </table:table-cell>
          <table:table-cell office:value-type="float" office:value="4" calcext:value-type="float">
            <text:p>4</text:p>
          </table:table-cell>
          <table:table-cell table:formula="of:=IF([.D5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DEC2HEX([.C581])" office:value-type="string" office:string-value="ED232" calcext:value-type="string">
            <text:p>ED232</text:p>
          </table:table-cell>
          <table:table-cell office:value-type="float" office:value="971314" calcext:value-type="float">
            <text:p>971314</text:p>
          </table:table-cell>
          <table:table-cell office:value-type="float" office:value="4" calcext:value-type="float">
            <text:p>4</text:p>
          </table:table-cell>
          <table:table-cell table:formula="of:=IF([.D5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DEC2HEX([.C582])" office:value-type="string" office:string-value="ED236" calcext:value-type="string">
            <text:p>ED236</text:p>
          </table:table-cell>
          <table:table-cell office:value-type="float" office:value="971318" calcext:value-type="float">
            <text:p>971318</text:p>
          </table:table-cell>
          <table:table-cell office:value-type="float" office:value="4" calcext:value-type="float">
            <text:p>4</text:p>
          </table:table-cell>
          <table:table-cell table:formula="of:=IF([.D5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DEC2HEX([.C583])" office:value-type="string" office:string-value="ED23A" calcext:value-type="string">
            <text:p>ED23A</text:p>
          </table:table-cell>
          <table:table-cell office:value-type="float" office:value="971322" calcext:value-type="float">
            <text:p>971322</text:p>
          </table:table-cell>
          <table:table-cell office:value-type="float" office:value="4" calcext:value-type="float">
            <text:p>4</text:p>
          </table:table-cell>
          <table:table-cell table:formula="of:=IF([.D5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DEC2HEX([.C584])" office:value-type="string" office:string-value="ED23E" calcext:value-type="string">
            <text:p>ED23E</text:p>
          </table:table-cell>
          <table:table-cell office:value-type="float" office:value="971326" calcext:value-type="float">
            <text:p>971326</text:p>
          </table:table-cell>
          <table:table-cell office:value-type="float" office:value="4" calcext:value-type="float">
            <text:p>4</text:p>
          </table:table-cell>
          <table:table-cell table:formula="of:=IF([.D5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DEC2HEX([.C585])" office:value-type="string" office:string-value="ED242" calcext:value-type="string">
            <text:p>ED242</text:p>
          </table:table-cell>
          <table:table-cell office:value-type="float" office:value="971330" calcext:value-type="float">
            <text:p>971330</text:p>
          </table:table-cell>
          <table:table-cell office:value-type="float" office:value="10" calcext:value-type="float">
            <text:p>10</text:p>
          </table:table-cell>
          <table:table-cell table:formula="of:=IF([.D5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DEC2HEX([.C586])" office:value-type="string" office:string-value="ED24C" calcext:value-type="string">
            <text:p>ED24C</text:p>
          </table:table-cell>
          <table:table-cell office:value-type="float" office:value="971340" calcext:value-type="float">
            <text:p>971340</text:p>
          </table:table-cell>
          <table:table-cell office:value-type="float" office:value="4" calcext:value-type="float">
            <text:p>4</text:p>
          </table:table-cell>
          <table:table-cell table:formula="of:=IF([.D5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DEC2HEX([.C587])" office:value-type="string" office:string-value="ED250" calcext:value-type="string">
            <text:p>ED250</text:p>
          </table:table-cell>
          <table:table-cell office:value-type="float" office:value="971344" calcext:value-type="float">
            <text:p>971344</text:p>
          </table:table-cell>
          <table:table-cell office:value-type="float" office:value="4" calcext:value-type="float">
            <text:p>4</text:p>
          </table:table-cell>
          <table:table-cell table:formula="of:=IF([.D5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DEC2HEX([.C588])" office:value-type="string" office:string-value="ED254" calcext:value-type="string">
            <text:p>ED254</text:p>
          </table:table-cell>
          <table:table-cell office:value-type="float" office:value="971348" calcext:value-type="float">
            <text:p>971348</text:p>
          </table:table-cell>
          <table:table-cell office:value-type="float" office:value="4" calcext:value-type="float">
            <text:p>4</text:p>
          </table:table-cell>
          <table:table-cell table:formula="of:=IF([.D5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DEC2HEX([.C589])" office:value-type="string" office:string-value="ED258" calcext:value-type="string">
            <text:p>ED258</text:p>
          </table:table-cell>
          <table:table-cell office:value-type="float" office:value="971352" calcext:value-type="float">
            <text:p>971352</text:p>
          </table:table-cell>
          <table:table-cell office:value-type="float" office:value="4" calcext:value-type="float">
            <text:p>4</text:p>
          </table:table-cell>
          <table:table-cell table:formula="of:=IF([.D5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DEC2HEX([.C590])" office:value-type="string" office:string-value="ED25C" calcext:value-type="string">
            <text:p>ED25C</text:p>
          </table:table-cell>
          <table:table-cell office:value-type="float" office:value="971356" calcext:value-type="float">
            <text:p>971356</text:p>
          </table:table-cell>
          <table:table-cell office:value-type="float" office:value="4" calcext:value-type="float">
            <text:p>4</text:p>
          </table:table-cell>
          <table:table-cell table:formula="of:=IF([.D5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DEC2HEX([.C591])" office:value-type="string" office:string-value="ED260" calcext:value-type="string">
            <text:p>ED260</text:p>
          </table:table-cell>
          <table:table-cell office:value-type="float" office:value="971360" calcext:value-type="float">
            <text:p>971360</text:p>
          </table:table-cell>
          <table:table-cell office:value-type="float" office:value="4" calcext:value-type="float">
            <text:p>4</text:p>
          </table:table-cell>
          <table:table-cell table:formula="of:=IF([.D5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DEC2HEX([.C592])" office:value-type="string" office:string-value="ED264" calcext:value-type="string">
            <text:p>ED264</text:p>
          </table:table-cell>
          <table:table-cell office:value-type="float" office:value="971364" calcext:value-type="float">
            <text:p>971364</text:p>
          </table:table-cell>
          <table:table-cell office:value-type="float" office:value="4" calcext:value-type="float">
            <text:p>4</text:p>
          </table:table-cell>
          <table:table-cell table:formula="of:=IF([.D5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DEC2HEX([.C593])" office:value-type="string" office:string-value="ED268" calcext:value-type="string">
            <text:p>ED268</text:p>
          </table:table-cell>
          <table:table-cell office:value-type="float" office:value="971368" calcext:value-type="float">
            <text:p>971368</text:p>
          </table:table-cell>
          <table:table-cell office:value-type="float" office:value="1" calcext:value-type="float">
            <text:p>1</text:p>
          </table:table-cell>
          <table:table-cell table:formula="of:=IF([.D5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DEC2HEX([.C594])" office:value-type="string" office:string-value="ED269" calcext:value-type="string">
            <text:p>ED269</text:p>
          </table:table-cell>
          <table:table-cell office:value-type="float" office:value="971369" calcext:value-type="float">
            <text:p>971369</text:p>
          </table:table-cell>
          <table:table-cell office:value-type="float" office:value="4" calcext:value-type="float">
            <text:p>4</text:p>
          </table:table-cell>
          <table:table-cell table:formula="of:=IF([.D5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DEC2HEX([.C595])" office:value-type="string" office:string-value="ED26D" calcext:value-type="string">
            <text:p>ED26D</text:p>
          </table:table-cell>
          <table:table-cell office:value-type="float" office:value="971373" calcext:value-type="float">
            <text:p>971373</text:p>
          </table:table-cell>
          <table:table-cell office:value-type="float" office:value="4" calcext:value-type="float">
            <text:p>4</text:p>
          </table:table-cell>
          <table:table-cell table:formula="of:=IF([.D5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DEC2HEX([.C596])" office:value-type="string" office:string-value="ED271" calcext:value-type="string">
            <text:p>ED271</text:p>
          </table:table-cell>
          <table:table-cell office:value-type="float" office:value="971377" calcext:value-type="float">
            <text:p>971377</text:p>
          </table:table-cell>
          <table:table-cell office:value-type="float" office:value="4" calcext:value-type="float">
            <text:p>4</text:p>
          </table:table-cell>
          <table:table-cell table:formula="of:=IF([.D5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DEC2HEX([.C597])" office:value-type="string" office:string-value="ED275" calcext:value-type="string">
            <text:p>ED275</text:p>
          </table:table-cell>
          <table:table-cell office:value-type="float" office:value="971381" calcext:value-type="float">
            <text:p>971381</text:p>
          </table:table-cell>
          <table:table-cell office:value-type="float" office:value="4" calcext:value-type="float">
            <text:p>4</text:p>
          </table:table-cell>
          <table:table-cell table:formula="of:=IF([.D5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DEC2HEX([.C598])" office:value-type="string" office:string-value="ED279" calcext:value-type="string">
            <text:p>ED279</text:p>
          </table:table-cell>
          <table:table-cell office:value-type="float" office:value="971385" calcext:value-type="float">
            <text:p>971385</text:p>
          </table:table-cell>
          <table:table-cell office:value-type="float" office:value="4" calcext:value-type="float">
            <text:p>4</text:p>
          </table:table-cell>
          <table:table-cell table:formula="of:=IF([.D5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DEC2HEX([.C599])" office:value-type="string" office:string-value="ED27D" calcext:value-type="string">
            <text:p>ED27D</text:p>
          </table:table-cell>
          <table:table-cell office:value-type="float" office:value="971389" calcext:value-type="float">
            <text:p>971389</text:p>
          </table:table-cell>
          <table:table-cell office:value-type="float" office:value="4" calcext:value-type="float">
            <text:p>4</text:p>
          </table:table-cell>
          <table:table-cell table:formula="of:=IF([.D5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DEC2HEX([.C600])" office:value-type="string" office:string-value="ED281" calcext:value-type="string">
            <text:p>ED281</text:p>
          </table:table-cell>
          <table:table-cell office:value-type="float" office:value="971393" calcext:value-type="float">
            <text:p>971393</text:p>
          </table:table-cell>
          <table:table-cell office:value-type="float" office:value="10" calcext:value-type="float">
            <text:p>10</text:p>
          </table:table-cell>
          <table:table-cell table:formula="of:=IF([.D6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DEC2HEX([.C601])" office:value-type="string" office:string-value="ED28B" calcext:value-type="string">
            <text:p>ED28B</text:p>
          </table:table-cell>
          <table:table-cell office:value-type="float" office:value="971403" calcext:value-type="float">
            <text:p>971403</text:p>
          </table:table-cell>
          <table:table-cell office:value-type="float" office:value="4" calcext:value-type="float">
            <text:p>4</text:p>
          </table:table-cell>
          <table:table-cell table:formula="of:=IF([.D6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DEC2HEX([.C602])" office:value-type="string" office:string-value="ED28F" calcext:value-type="string">
            <text:p>ED28F</text:p>
          </table:table-cell>
          <table:table-cell office:value-type="float" office:value="971407" calcext:value-type="float">
            <text:p>971407</text:p>
          </table:table-cell>
          <table:table-cell office:value-type="float" office:value="4" calcext:value-type="float">
            <text:p>4</text:p>
          </table:table-cell>
          <table:table-cell table:formula="of:=IF([.D6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DEC2HEX([.C603])" office:value-type="string" office:string-value="ED293" calcext:value-type="string">
            <text:p>ED293</text:p>
          </table:table-cell>
          <table:table-cell office:value-type="float" office:value="971411" calcext:value-type="float">
            <text:p>971411</text:p>
          </table:table-cell>
          <table:table-cell office:value-type="float" office:value="4" calcext:value-type="float">
            <text:p>4</text:p>
          </table:table-cell>
          <table:table-cell table:formula="of:=IF([.D6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DEC2HEX([.C604])" office:value-type="string" office:string-value="ED297" calcext:value-type="string">
            <text:p>ED297</text:p>
          </table:table-cell>
          <table:table-cell office:value-type="float" office:value="971415" calcext:value-type="float">
            <text:p>971415</text:p>
          </table:table-cell>
          <table:table-cell office:value-type="float" office:value="4" calcext:value-type="float">
            <text:p>4</text:p>
          </table:table-cell>
          <table:table-cell table:formula="of:=IF([.D6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DEC2HEX([.C605])" office:value-type="string" office:string-value="ED29B" calcext:value-type="string">
            <text:p>ED29B</text:p>
          </table:table-cell>
          <table:table-cell office:value-type="float" office:value="971419" calcext:value-type="float">
            <text:p>971419</text:p>
          </table:table-cell>
          <table:table-cell office:value-type="float" office:value="4" calcext:value-type="float">
            <text:p>4</text:p>
          </table:table-cell>
          <table:table-cell table:formula="of:=IF([.D6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DEC2HEX([.C606])" office:value-type="string" office:string-value="ED29F" calcext:value-type="string">
            <text:p>ED29F</text:p>
          </table:table-cell>
          <table:table-cell office:value-type="float" office:value="971423" calcext:value-type="float">
            <text:p>971423</text:p>
          </table:table-cell>
          <table:table-cell office:value-type="float" office:value="4" calcext:value-type="float">
            <text:p>4</text:p>
          </table:table-cell>
          <table:table-cell table:formula="of:=IF([.D6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DEC2HEX([.C607])" office:value-type="string" office:string-value="ED2A3" calcext:value-type="string">
            <text:p>ED2A3</text:p>
          </table:table-cell>
          <table:table-cell office:value-type="float" office:value="971427" calcext:value-type="float">
            <text:p>971427</text:p>
          </table:table-cell>
          <table:table-cell office:value-type="float" office:value="4" calcext:value-type="float">
            <text:p>4</text:p>
          </table:table-cell>
          <table:table-cell table:formula="of:=IF([.D6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DEC2HEX([.C608])" office:value-type="string" office:string-value="ED2A7" calcext:value-type="string">
            <text:p>ED2A7</text:p>
          </table:table-cell>
          <table:table-cell office:value-type="float" office:value="971431" calcext:value-type="float">
            <text:p>971431</text:p>
          </table:table-cell>
          <table:table-cell office:value-type="float" office:value="1" calcext:value-type="float">
            <text:p>1</text:p>
          </table:table-cell>
          <table:table-cell table:formula="of:=IF([.D6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DEC2HEX([.C609])" office:value-type="string" office:string-value="ED2A8" calcext:value-type="string">
            <text:p>ED2A8</text:p>
          </table:table-cell>
          <table:table-cell office:value-type="float" office:value="971432" calcext:value-type="float">
            <text:p>971432</text:p>
          </table:table-cell>
          <table:table-cell office:value-type="float" office:value="4" calcext:value-type="float">
            <text:p>4</text:p>
          </table:table-cell>
          <table:table-cell table:formula="of:=IF([.D6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DEC2HEX([.C610])" office:value-type="string" office:string-value="ED2AC" calcext:value-type="string">
            <text:p>ED2AC</text:p>
          </table:table-cell>
          <table:table-cell office:value-type="float" office:value="971436" calcext:value-type="float">
            <text:p>971436</text:p>
          </table:table-cell>
          <table:table-cell office:value-type="float" office:value="4" calcext:value-type="float">
            <text:p>4</text:p>
          </table:table-cell>
          <table:table-cell table:formula="of:=IF([.D6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DEC2HEX([.C611])" office:value-type="string" office:string-value="ED2B0" calcext:value-type="string">
            <text:p>ED2B0</text:p>
          </table:table-cell>
          <table:table-cell office:value-type="float" office:value="971440" calcext:value-type="float">
            <text:p>971440</text:p>
          </table:table-cell>
          <table:table-cell office:value-type="float" office:value="4" calcext:value-type="float">
            <text:p>4</text:p>
          </table:table-cell>
          <table:table-cell table:formula="of:=IF([.D6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DEC2HEX([.C612])" office:value-type="string" office:string-value="ED2B4" calcext:value-type="string">
            <text:p>ED2B4</text:p>
          </table:table-cell>
          <table:table-cell office:value-type="float" office:value="971444" calcext:value-type="float">
            <text:p>971444</text:p>
          </table:table-cell>
          <table:table-cell office:value-type="float" office:value="4" calcext:value-type="float">
            <text:p>4</text:p>
          </table:table-cell>
          <table:table-cell table:formula="of:=IF([.D6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DEC2HEX([.C613])" office:value-type="string" office:string-value="ED2B8" calcext:value-type="string">
            <text:p>ED2B8</text:p>
          </table:table-cell>
          <table:table-cell office:value-type="float" office:value="971448" calcext:value-type="float">
            <text:p>971448</text:p>
          </table:table-cell>
          <table:table-cell office:value-type="float" office:value="4" calcext:value-type="float">
            <text:p>4</text:p>
          </table:table-cell>
          <table:table-cell table:formula="of:=IF([.D6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DEC2HEX([.C614])" office:value-type="string" office:string-value="ED2BC" calcext:value-type="string">
            <text:p>ED2BC</text:p>
          </table:table-cell>
          <table:table-cell office:value-type="float" office:value="971452" calcext:value-type="float">
            <text:p>971452</text:p>
          </table:table-cell>
          <table:table-cell office:value-type="float" office:value="4" calcext:value-type="float">
            <text:p>4</text:p>
          </table:table-cell>
          <table:table-cell table:formula="of:=IF([.D6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DEC2HEX([.C615])" office:value-type="string" office:string-value="ED2C0" calcext:value-type="string">
            <text:p>ED2C0</text:p>
          </table:table-cell>
          <table:table-cell office:value-type="float" office:value="971456" calcext:value-type="float">
            <text:p>971456</text:p>
          </table:table-cell>
          <table:table-cell office:value-type="float" office:value="10" calcext:value-type="float">
            <text:p>10</text:p>
          </table:table-cell>
          <table:table-cell table:formula="of:=IF([.D6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DEC2HEX([.C616])" office:value-type="string" office:string-value="ED2CA" calcext:value-type="string">
            <text:p>ED2CA</text:p>
          </table:table-cell>
          <table:table-cell office:value-type="float" office:value="971466" calcext:value-type="float">
            <text:p>971466</text:p>
          </table:table-cell>
          <table:table-cell office:value-type="float" office:value="4" calcext:value-type="float">
            <text:p>4</text:p>
          </table:table-cell>
          <table:table-cell table:formula="of:=IF([.D6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DEC2HEX([.C617])" office:value-type="string" office:string-value="ED2CE" calcext:value-type="string">
            <text:p>ED2CE</text:p>
          </table:table-cell>
          <table:table-cell office:value-type="float" office:value="971470" calcext:value-type="float">
            <text:p>971470</text:p>
          </table:table-cell>
          <table:table-cell office:value-type="float" office:value="4" calcext:value-type="float">
            <text:p>4</text:p>
          </table:table-cell>
          <table:table-cell table:formula="of:=IF([.D6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DEC2HEX([.C618])" office:value-type="string" office:string-value="ED2D2" calcext:value-type="string">
            <text:p>ED2D2</text:p>
          </table:table-cell>
          <table:table-cell office:value-type="float" office:value="971474" calcext:value-type="float">
            <text:p>971474</text:p>
          </table:table-cell>
          <table:table-cell office:value-type="float" office:value="4" calcext:value-type="float">
            <text:p>4</text:p>
          </table:table-cell>
          <table:table-cell table:formula="of:=IF([.D6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DEC2HEX([.C619])" office:value-type="string" office:string-value="ED2D6" calcext:value-type="string">
            <text:p>ED2D6</text:p>
          </table:table-cell>
          <table:table-cell office:value-type="float" office:value="971478" calcext:value-type="float">
            <text:p>971478</text:p>
          </table:table-cell>
          <table:table-cell office:value-type="float" office:value="4" calcext:value-type="float">
            <text:p>4</text:p>
          </table:table-cell>
          <table:table-cell table:formula="of:=IF([.D6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DEC2HEX([.C620])" office:value-type="string" office:string-value="ED2DA" calcext:value-type="string">
            <text:p>ED2DA</text:p>
          </table:table-cell>
          <table:table-cell office:value-type="float" office:value="971482" calcext:value-type="float">
            <text:p>971482</text:p>
          </table:table-cell>
          <table:table-cell office:value-type="float" office:value="4" calcext:value-type="float">
            <text:p>4</text:p>
          </table:table-cell>
          <table:table-cell table:formula="of:=IF([.D6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DEC2HEX([.C621])" office:value-type="string" office:string-value="ED2DE" calcext:value-type="string">
            <text:p>ED2DE</text:p>
          </table:table-cell>
          <table:table-cell office:value-type="float" office:value="971486" calcext:value-type="float">
            <text:p>971486</text:p>
          </table:table-cell>
          <table:table-cell office:value-type="float" office:value="4" calcext:value-type="float">
            <text:p>4</text:p>
          </table:table-cell>
          <table:table-cell table:formula="of:=IF([.D6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DEC2HEX([.C622])" office:value-type="string" office:string-value="ED2E2" calcext:value-type="string">
            <text:p>ED2E2</text:p>
          </table:table-cell>
          <table:table-cell office:value-type="float" office:value="971490" calcext:value-type="float">
            <text:p>971490</text:p>
          </table:table-cell>
          <table:table-cell office:value-type="float" office:value="4" calcext:value-type="float">
            <text:p>4</text:p>
          </table:table-cell>
          <table:table-cell table:formula="of:=IF([.D6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DEC2HEX([.C623])" office:value-type="string" office:string-value="ED2E6" calcext:value-type="string">
            <text:p>ED2E6</text:p>
          </table:table-cell>
          <table:table-cell office:value-type="float" office:value="971494" calcext:value-type="float">
            <text:p>971494</text:p>
          </table:table-cell>
          <table:table-cell office:value-type="float" office:value="1" calcext:value-type="float">
            <text:p>1</text:p>
          </table:table-cell>
          <table:table-cell table:formula="of:=IF([.D6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DEC2HEX([.C624])" office:value-type="string" office:string-value="ED2E7" calcext:value-type="string">
            <text:p>ED2E7</text:p>
          </table:table-cell>
          <table:table-cell office:value-type="float" office:value="971495" calcext:value-type="float">
            <text:p>971495</text:p>
          </table:table-cell>
          <table:table-cell office:value-type="float" office:value="4" calcext:value-type="float">
            <text:p>4</text:p>
          </table:table-cell>
          <table:table-cell table:formula="of:=IF([.D6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DEC2HEX([.C625])" office:value-type="string" office:string-value="ED2EB" calcext:value-type="string">
            <text:p>ED2EB</text:p>
          </table:table-cell>
          <table:table-cell office:value-type="float" office:value="971499" calcext:value-type="float">
            <text:p>971499</text:p>
          </table:table-cell>
          <table:table-cell office:value-type="float" office:value="4" calcext:value-type="float">
            <text:p>4</text:p>
          </table:table-cell>
          <table:table-cell table:formula="of:=IF([.D6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DEC2HEX([.C626])" office:value-type="string" office:string-value="ED2EF" calcext:value-type="string">
            <text:p>ED2EF</text:p>
          </table:table-cell>
          <table:table-cell office:value-type="float" office:value="971503" calcext:value-type="float">
            <text:p>971503</text:p>
          </table:table-cell>
          <table:table-cell office:value-type="float" office:value="4" calcext:value-type="float">
            <text:p>4</text:p>
          </table:table-cell>
          <table:table-cell table:formula="of:=IF([.D6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DEC2HEX([.C627])" office:value-type="string" office:string-value="ED2F3" calcext:value-type="string">
            <text:p>ED2F3</text:p>
          </table:table-cell>
          <table:table-cell office:value-type="float" office:value="971507" calcext:value-type="float">
            <text:p>971507</text:p>
          </table:table-cell>
          <table:table-cell office:value-type="float" office:value="4" calcext:value-type="float">
            <text:p>4</text:p>
          </table:table-cell>
          <table:table-cell table:formula="of:=IF([.D6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DEC2HEX([.C628])" office:value-type="string" office:string-value="ED2F7" calcext:value-type="string">
            <text:p>ED2F7</text:p>
          </table:table-cell>
          <table:table-cell office:value-type="float" office:value="971511" calcext:value-type="float">
            <text:p>971511</text:p>
          </table:table-cell>
          <table:table-cell office:value-type="float" office:value="4" calcext:value-type="float">
            <text:p>4</text:p>
          </table:table-cell>
          <table:table-cell table:formula="of:=IF([.D6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DEC2HEX([.C629])" office:value-type="string" office:string-value="ED2FB" calcext:value-type="string">
            <text:p>ED2FB</text:p>
          </table:table-cell>
          <table:table-cell office:value-type="float" office:value="971515" calcext:value-type="float">
            <text:p>971515</text:p>
          </table:table-cell>
          <table:table-cell office:value-type="float" office:value="4" calcext:value-type="float">
            <text:p>4</text:p>
          </table:table-cell>
          <table:table-cell table:formula="of:=IF([.D6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DEC2HEX([.C630])" office:value-type="string" office:string-value="ED2FF" calcext:value-type="string">
            <text:p>ED2FF</text:p>
          </table:table-cell>
          <table:table-cell office:value-type="float" office:value="971519" calcext:value-type="float">
            <text:p>971519</text:p>
          </table:table-cell>
          <table:table-cell office:value-type="float" office:value="10" calcext:value-type="float">
            <text:p>10</text:p>
          </table:table-cell>
          <table:table-cell table:formula="of:=IF([.D6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DEC2HEX([.C631])" office:value-type="string" office:string-value="ED309" calcext:value-type="string">
            <text:p>ED309</text:p>
          </table:table-cell>
          <table:table-cell office:value-type="float" office:value="971529" calcext:value-type="float">
            <text:p>971529</text:p>
          </table:table-cell>
          <table:table-cell office:value-type="float" office:value="4" calcext:value-type="float">
            <text:p>4</text:p>
          </table:table-cell>
          <table:table-cell table:formula="of:=IF([.D6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DEC2HEX([.C632])" office:value-type="string" office:string-value="ED30D" calcext:value-type="string">
            <text:p>ED30D</text:p>
          </table:table-cell>
          <table:table-cell office:value-type="float" office:value="971533" calcext:value-type="float">
            <text:p>971533</text:p>
          </table:table-cell>
          <table:table-cell office:value-type="float" office:value="4" calcext:value-type="float">
            <text:p>4</text:p>
          </table:table-cell>
          <table:table-cell table:formula="of:=IF([.D6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DEC2HEX([.C633])" office:value-type="string" office:string-value="ED311" calcext:value-type="string">
            <text:p>ED311</text:p>
          </table:table-cell>
          <table:table-cell office:value-type="float" office:value="971537" calcext:value-type="float">
            <text:p>971537</text:p>
          </table:table-cell>
          <table:table-cell office:value-type="float" office:value="4" calcext:value-type="float">
            <text:p>4</text:p>
          </table:table-cell>
          <table:table-cell table:formula="of:=IF([.D6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DEC2HEX([.C634])" office:value-type="string" office:string-value="ED315" calcext:value-type="string">
            <text:p>ED315</text:p>
          </table:table-cell>
          <table:table-cell office:value-type="float" office:value="971541" calcext:value-type="float">
            <text:p>971541</text:p>
          </table:table-cell>
          <table:table-cell office:value-type="float" office:value="4" calcext:value-type="float">
            <text:p>4</text:p>
          </table:table-cell>
          <table:table-cell table:formula="of:=IF([.D6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DEC2HEX([.C635])" office:value-type="string" office:string-value="ED319" calcext:value-type="string">
            <text:p>ED319</text:p>
          </table:table-cell>
          <table:table-cell office:value-type="float" office:value="971545" calcext:value-type="float">
            <text:p>971545</text:p>
          </table:table-cell>
          <table:table-cell office:value-type="float" office:value="4" calcext:value-type="float">
            <text:p>4</text:p>
          </table:table-cell>
          <table:table-cell table:formula="of:=IF([.D6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DEC2HEX([.C636])" office:value-type="string" office:string-value="ED31D" calcext:value-type="string">
            <text:p>ED31D</text:p>
          </table:table-cell>
          <table:table-cell office:value-type="float" office:value="971549" calcext:value-type="float">
            <text:p>971549</text:p>
          </table:table-cell>
          <table:table-cell office:value-type="float" office:value="4" calcext:value-type="float">
            <text:p>4</text:p>
          </table:table-cell>
          <table:table-cell table:formula="of:=IF([.D6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DEC2HEX([.C637])" office:value-type="string" office:string-value="ED321" calcext:value-type="string">
            <text:p>ED321</text:p>
          </table:table-cell>
          <table:table-cell office:value-type="float" office:value="971553" calcext:value-type="float">
            <text:p>971553</text:p>
          </table:table-cell>
          <table:table-cell office:value-type="float" office:value="4" calcext:value-type="float">
            <text:p>4</text:p>
          </table:table-cell>
          <table:table-cell table:formula="of:=IF([.D6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DEC2HEX([.C638])" office:value-type="string" office:string-value="ED325" calcext:value-type="string">
            <text:p>ED325</text:p>
          </table:table-cell>
          <table:table-cell office:value-type="float" office:value="971557" calcext:value-type="float">
            <text:p>971557</text:p>
          </table:table-cell>
          <table:table-cell office:value-type="float" office:value="1" calcext:value-type="float">
            <text:p>1</text:p>
          </table:table-cell>
          <table:table-cell table:formula="of:=IF([.D6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DEC2HEX([.C639])" office:value-type="string" office:string-value="ED326" calcext:value-type="string">
            <text:p>ED326</text:p>
          </table:table-cell>
          <table:table-cell office:value-type="float" office:value="971558" calcext:value-type="float">
            <text:p>971558</text:p>
          </table:table-cell>
          <table:table-cell office:value-type="float" office:value="4" calcext:value-type="float">
            <text:p>4</text:p>
          </table:table-cell>
          <table:table-cell table:formula="of:=IF([.D6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DEC2HEX([.C640])" office:value-type="string" office:string-value="ED32A" calcext:value-type="string">
            <text:p>ED32A</text:p>
          </table:table-cell>
          <table:table-cell office:value-type="float" office:value="971562" calcext:value-type="float">
            <text:p>971562</text:p>
          </table:table-cell>
          <table:table-cell office:value-type="float" office:value="4" calcext:value-type="float">
            <text:p>4</text:p>
          </table:table-cell>
          <table:table-cell table:formula="of:=IF([.D6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DEC2HEX([.C641])" office:value-type="string" office:string-value="ED32E" calcext:value-type="string">
            <text:p>ED32E</text:p>
          </table:table-cell>
          <table:table-cell office:value-type="float" office:value="971566" calcext:value-type="float">
            <text:p>971566</text:p>
          </table:table-cell>
          <table:table-cell office:value-type="float" office:value="4" calcext:value-type="float">
            <text:p>4</text:p>
          </table:table-cell>
          <table:table-cell table:formula="of:=IF([.D6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DEC2HEX([.C642])" office:value-type="string" office:string-value="ED332" calcext:value-type="string">
            <text:p>ED332</text:p>
          </table:table-cell>
          <table:table-cell office:value-type="float" office:value="971570" calcext:value-type="float">
            <text:p>971570</text:p>
          </table:table-cell>
          <table:table-cell office:value-type="float" office:value="4" calcext:value-type="float">
            <text:p>4</text:p>
          </table:table-cell>
          <table:table-cell table:formula="of:=IF([.D6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DEC2HEX([.C643])" office:value-type="string" office:string-value="ED336" calcext:value-type="string">
            <text:p>ED336</text:p>
          </table:table-cell>
          <table:table-cell office:value-type="float" office:value="971574" calcext:value-type="float">
            <text:p>971574</text:p>
          </table:table-cell>
          <table:table-cell office:value-type="float" office:value="4" calcext:value-type="float">
            <text:p>4</text:p>
          </table:table-cell>
          <table:table-cell table:formula="of:=IF([.D6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DEC2HEX([.C644])" office:value-type="string" office:string-value="ED33A" calcext:value-type="string">
            <text:p>ED33A</text:p>
          </table:table-cell>
          <table:table-cell office:value-type="float" office:value="971578" calcext:value-type="float">
            <text:p>971578</text:p>
          </table:table-cell>
          <table:table-cell office:value-type="float" office:value="4" calcext:value-type="float">
            <text:p>4</text:p>
          </table:table-cell>
          <table:table-cell table:formula="of:=IF([.D6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DEC2HEX([.C645])" office:value-type="string" office:string-value="ED33E" calcext:value-type="string">
            <text:p>ED33E</text:p>
          </table:table-cell>
          <table:table-cell office:value-type="float" office:value="971582" calcext:value-type="float">
            <text:p>971582</text:p>
          </table:table-cell>
          <table:table-cell office:value-type="float" office:value="10" calcext:value-type="float">
            <text:p>10</text:p>
          </table:table-cell>
          <table:table-cell table:formula="of:=IF([.D6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DEC2HEX([.C646])" office:value-type="string" office:string-value="ED348" calcext:value-type="string">
            <text:p>ED348</text:p>
          </table:table-cell>
          <table:table-cell office:value-type="float" office:value="971592" calcext:value-type="float">
            <text:p>971592</text:p>
          </table:table-cell>
          <table:table-cell office:value-type="float" office:value="4" calcext:value-type="float">
            <text:p>4</text:p>
          </table:table-cell>
          <table:table-cell table:formula="of:=IF([.D6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DEC2HEX([.C647])" office:value-type="string" office:string-value="ED34C" calcext:value-type="string">
            <text:p>ED34C</text:p>
          </table:table-cell>
          <table:table-cell office:value-type="float" office:value="971596" calcext:value-type="float">
            <text:p>971596</text:p>
          </table:table-cell>
          <table:table-cell office:value-type="float" office:value="4" calcext:value-type="float">
            <text:p>4</text:p>
          </table:table-cell>
          <table:table-cell table:formula="of:=IF([.D6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DEC2HEX([.C648])" office:value-type="string" office:string-value="ED350" calcext:value-type="string">
            <text:p>ED350</text:p>
          </table:table-cell>
          <table:table-cell office:value-type="float" office:value="971600" calcext:value-type="float">
            <text:p>971600</text:p>
          </table:table-cell>
          <table:table-cell office:value-type="float" office:value="4" calcext:value-type="float">
            <text:p>4</text:p>
          </table:table-cell>
          <table:table-cell table:formula="of:=IF([.D6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DEC2HEX([.C649])" office:value-type="string" office:string-value="ED354" calcext:value-type="string">
            <text:p>ED354</text:p>
          </table:table-cell>
          <table:table-cell office:value-type="float" office:value="971604" calcext:value-type="float">
            <text:p>971604</text:p>
          </table:table-cell>
          <table:table-cell office:value-type="float" office:value="4" calcext:value-type="float">
            <text:p>4</text:p>
          </table:table-cell>
          <table:table-cell table:formula="of:=IF([.D6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DEC2HEX([.C650])" office:value-type="string" office:string-value="ED358" calcext:value-type="string">
            <text:p>ED358</text:p>
          </table:table-cell>
          <table:table-cell office:value-type="float" office:value="971608" calcext:value-type="float">
            <text:p>971608</text:p>
          </table:table-cell>
          <table:table-cell office:value-type="float" office:value="4" calcext:value-type="float">
            <text:p>4</text:p>
          </table:table-cell>
          <table:table-cell table:formula="of:=IF([.D6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DEC2HEX([.C651])" office:value-type="string" office:string-value="ED35C" calcext:value-type="string">
            <text:p>ED35C</text:p>
          </table:table-cell>
          <table:table-cell office:value-type="float" office:value="971612" calcext:value-type="float">
            <text:p>971612</text:p>
          </table:table-cell>
          <table:table-cell office:value-type="float" office:value="4" calcext:value-type="float">
            <text:p>4</text:p>
          </table:table-cell>
          <table:table-cell table:formula="of:=IF([.D6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DEC2HEX([.C652])" office:value-type="string" office:string-value="ED360" calcext:value-type="string">
            <text:p>ED360</text:p>
          </table:table-cell>
          <table:table-cell office:value-type="float" office:value="971616" calcext:value-type="float">
            <text:p>971616</text:p>
          </table:table-cell>
          <table:table-cell office:value-type="float" office:value="4" calcext:value-type="float">
            <text:p>4</text:p>
          </table:table-cell>
          <table:table-cell table:formula="of:=IF([.D6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DEC2HEX([.C653])" office:value-type="string" office:string-value="ED364" calcext:value-type="string">
            <text:p>ED364</text:p>
          </table:table-cell>
          <table:table-cell office:value-type="float" office:value="971620" calcext:value-type="float">
            <text:p>971620</text:p>
          </table:table-cell>
          <table:table-cell office:value-type="float" office:value="1" calcext:value-type="float">
            <text:p>1</text:p>
          </table:table-cell>
          <table:table-cell table:formula="of:=IF([.D6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DEC2HEX([.C654])" office:value-type="string" office:string-value="ED365" calcext:value-type="string">
            <text:p>ED365</text:p>
          </table:table-cell>
          <table:table-cell office:value-type="float" office:value="971621" calcext:value-type="float">
            <text:p>971621</text:p>
          </table:table-cell>
          <table:table-cell office:value-type="float" office:value="4" calcext:value-type="float">
            <text:p>4</text:p>
          </table:table-cell>
          <table:table-cell table:formula="of:=IF([.D6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DEC2HEX([.C655])" office:value-type="string" office:string-value="ED369" calcext:value-type="string">
            <text:p>ED369</text:p>
          </table:table-cell>
          <table:table-cell office:value-type="float" office:value="971625" calcext:value-type="float">
            <text:p>971625</text:p>
          </table:table-cell>
          <table:table-cell office:value-type="float" office:value="4" calcext:value-type="float">
            <text:p>4</text:p>
          </table:table-cell>
          <table:table-cell table:formula="of:=IF([.D6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DEC2HEX([.C656])" office:value-type="string" office:string-value="ED36D" calcext:value-type="string">
            <text:p>ED36D</text:p>
          </table:table-cell>
          <table:table-cell office:value-type="float" office:value="971629" calcext:value-type="float">
            <text:p>971629</text:p>
          </table:table-cell>
          <table:table-cell office:value-type="float" office:value="4" calcext:value-type="float">
            <text:p>4</text:p>
          </table:table-cell>
          <table:table-cell table:formula="of:=IF([.D6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DEC2HEX([.C657])" office:value-type="string" office:string-value="ED371" calcext:value-type="string">
            <text:p>ED371</text:p>
          </table:table-cell>
          <table:table-cell office:value-type="float" office:value="971633" calcext:value-type="float">
            <text:p>971633</text:p>
          </table:table-cell>
          <table:table-cell office:value-type="float" office:value="4" calcext:value-type="float">
            <text:p>4</text:p>
          </table:table-cell>
          <table:table-cell table:formula="of:=IF([.D6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DEC2HEX([.C658])" office:value-type="string" office:string-value="ED375" calcext:value-type="string">
            <text:p>ED375</text:p>
          </table:table-cell>
          <table:table-cell office:value-type="float" office:value="971637" calcext:value-type="float">
            <text:p>971637</text:p>
          </table:table-cell>
          <table:table-cell office:value-type="float" office:value="4" calcext:value-type="float">
            <text:p>4</text:p>
          </table:table-cell>
          <table:table-cell table:formula="of:=IF([.D6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DEC2HEX([.C659])" office:value-type="string" office:string-value="ED379" calcext:value-type="string">
            <text:p>ED379</text:p>
          </table:table-cell>
          <table:table-cell office:value-type="float" office:value="971641" calcext:value-type="float">
            <text:p>971641</text:p>
          </table:table-cell>
          <table:table-cell office:value-type="float" office:value="4" calcext:value-type="float">
            <text:p>4</text:p>
          </table:table-cell>
          <table:table-cell table:formula="of:=IF([.D6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DEC2HEX([.C660])" office:value-type="string" office:string-value="ED37D" calcext:value-type="string">
            <text:p>ED37D</text:p>
          </table:table-cell>
          <table:table-cell office:value-type="float" office:value="971645" calcext:value-type="float">
            <text:p>971645</text:p>
          </table:table-cell>
          <table:table-cell office:value-type="float" office:value="10" calcext:value-type="float">
            <text:p>10</text:p>
          </table:table-cell>
          <table:table-cell table:formula="of:=IF([.D6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DEC2HEX([.C661])" office:value-type="string" office:string-value="ED387" calcext:value-type="string">
            <text:p>ED387</text:p>
          </table:table-cell>
          <table:table-cell office:value-type="float" office:value="971655" calcext:value-type="float">
            <text:p>971655</text:p>
          </table:table-cell>
          <table:table-cell office:value-type="float" office:value="4" calcext:value-type="float">
            <text:p>4</text:p>
          </table:table-cell>
          <table:table-cell table:formula="of:=IF([.D6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DEC2HEX([.C662])" office:value-type="string" office:string-value="ED38B" calcext:value-type="string">
            <text:p>ED38B</text:p>
          </table:table-cell>
          <table:table-cell office:value-type="float" office:value="971659" calcext:value-type="float">
            <text:p>971659</text:p>
          </table:table-cell>
          <table:table-cell office:value-type="float" office:value="4" calcext:value-type="float">
            <text:p>4</text:p>
          </table:table-cell>
          <table:table-cell table:formula="of:=IF([.D6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DEC2HEX([.C663])" office:value-type="string" office:string-value="ED38F" calcext:value-type="string">
            <text:p>ED38F</text:p>
          </table:table-cell>
          <table:table-cell office:value-type="float" office:value="971663" calcext:value-type="float">
            <text:p>971663</text:p>
          </table:table-cell>
          <table:table-cell office:value-type="float" office:value="4" calcext:value-type="float">
            <text:p>4</text:p>
          </table:table-cell>
          <table:table-cell table:formula="of:=IF([.D6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DEC2HEX([.C664])" office:value-type="string" office:string-value="ED393" calcext:value-type="string">
            <text:p>ED393</text:p>
          </table:table-cell>
          <table:table-cell office:value-type="float" office:value="971667" calcext:value-type="float">
            <text:p>971667</text:p>
          </table:table-cell>
          <table:table-cell office:value-type="float" office:value="4" calcext:value-type="float">
            <text:p>4</text:p>
          </table:table-cell>
          <table:table-cell table:formula="of:=IF([.D6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DEC2HEX([.C665])" office:value-type="string" office:string-value="ED397" calcext:value-type="string">
            <text:p>ED397</text:p>
          </table:table-cell>
          <table:table-cell office:value-type="float" office:value="971671" calcext:value-type="float">
            <text:p>971671</text:p>
          </table:table-cell>
          <table:table-cell office:value-type="float" office:value="4" calcext:value-type="float">
            <text:p>4</text:p>
          </table:table-cell>
          <table:table-cell table:formula="of:=IF([.D6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DEC2HEX([.C666])" office:value-type="string" office:string-value="ED39B" calcext:value-type="string">
            <text:p>ED39B</text:p>
          </table:table-cell>
          <table:table-cell office:value-type="float" office:value="971675" calcext:value-type="float">
            <text:p>971675</text:p>
          </table:table-cell>
          <table:table-cell office:value-type="float" office:value="4" calcext:value-type="float">
            <text:p>4</text:p>
          </table:table-cell>
          <table:table-cell table:formula="of:=IF([.D6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DEC2HEX([.C667])" office:value-type="string" office:string-value="ED39F" calcext:value-type="string">
            <text:p>ED39F</text:p>
          </table:table-cell>
          <table:table-cell office:value-type="float" office:value="971679" calcext:value-type="float">
            <text:p>971679</text:p>
          </table:table-cell>
          <table:table-cell office:value-type="float" office:value="4" calcext:value-type="float">
            <text:p>4</text:p>
          </table:table-cell>
          <table:table-cell table:formula="of:=IF([.D6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DEC2HEX([.C668])" office:value-type="string" office:string-value="ED3A3" calcext:value-type="string">
            <text:p>ED3A3</text:p>
          </table:table-cell>
          <table:table-cell office:value-type="float" office:value="971683" calcext:value-type="float">
            <text:p>971683</text:p>
          </table:table-cell>
          <table:table-cell office:value-type="float" office:value="1" calcext:value-type="float">
            <text:p>1</text:p>
          </table:table-cell>
          <table:table-cell table:formula="of:=IF([.D6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DEC2HEX([.C669])" office:value-type="string" office:string-value="ED3A4" calcext:value-type="string">
            <text:p>ED3A4</text:p>
          </table:table-cell>
          <table:table-cell office:value-type="float" office:value="971684" calcext:value-type="float">
            <text:p>971684</text:p>
          </table:table-cell>
          <table:table-cell office:value-type="float" office:value="4" calcext:value-type="float">
            <text:p>4</text:p>
          </table:table-cell>
          <table:table-cell table:formula="of:=IF([.D6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DEC2HEX([.C670])" office:value-type="string" office:string-value="ED3A8" calcext:value-type="string">
            <text:p>ED3A8</text:p>
          </table:table-cell>
          <table:table-cell office:value-type="float" office:value="971688" calcext:value-type="float">
            <text:p>971688</text:p>
          </table:table-cell>
          <table:table-cell office:value-type="float" office:value="4" calcext:value-type="float">
            <text:p>4</text:p>
          </table:table-cell>
          <table:table-cell table:formula="of:=IF([.D6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DEC2HEX([.C671])" office:value-type="string" office:string-value="ED3AC" calcext:value-type="string">
            <text:p>ED3AC</text:p>
          </table:table-cell>
          <table:table-cell office:value-type="float" office:value="971692" calcext:value-type="float">
            <text:p>971692</text:p>
          </table:table-cell>
          <table:table-cell office:value-type="float" office:value="4" calcext:value-type="float">
            <text:p>4</text:p>
          </table:table-cell>
          <table:table-cell table:formula="of:=IF([.D6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DEC2HEX([.C672])" office:value-type="string" office:string-value="ED3B0" calcext:value-type="string">
            <text:p>ED3B0</text:p>
          </table:table-cell>
          <table:table-cell office:value-type="float" office:value="971696" calcext:value-type="float">
            <text:p>971696</text:p>
          </table:table-cell>
          <table:table-cell office:value-type="float" office:value="4" calcext:value-type="float">
            <text:p>4</text:p>
          </table:table-cell>
          <table:table-cell table:formula="of:=IF([.D6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DEC2HEX([.C673])" office:value-type="string" office:string-value="ED3B4" calcext:value-type="string">
            <text:p>ED3B4</text:p>
          </table:table-cell>
          <table:table-cell office:value-type="float" office:value="971700" calcext:value-type="float">
            <text:p>971700</text:p>
          </table:table-cell>
          <table:table-cell office:value-type="float" office:value="4" calcext:value-type="float">
            <text:p>4</text:p>
          </table:table-cell>
          <table:table-cell table:formula="of:=IF([.D6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DEC2HEX([.C674])" office:value-type="string" office:string-value="ED3B8" calcext:value-type="string">
            <text:p>ED3B8</text:p>
          </table:table-cell>
          <table:table-cell office:value-type="float" office:value="971704" calcext:value-type="float">
            <text:p>971704</text:p>
          </table:table-cell>
          <table:table-cell office:value-type="float" office:value="4" calcext:value-type="float">
            <text:p>4</text:p>
          </table:table-cell>
          <table:table-cell table:formula="of:=IF([.D6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DEC2HEX([.C675])" office:value-type="string" office:string-value="ED3BC" calcext:value-type="string">
            <text:p>ED3BC</text:p>
          </table:table-cell>
          <table:table-cell office:value-type="float" office:value="971708" calcext:value-type="float">
            <text:p>971708</text:p>
          </table:table-cell>
          <table:table-cell office:value-type="float" office:value="11" calcext:value-type="float">
            <text:p>11</text:p>
          </table:table-cell>
          <table:table-cell table:formula="of:=IF([.D6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DEC2HEX([.C676])" office:value-type="string" office:string-value="ED3C7" calcext:value-type="string">
            <text:p>ED3C7</text:p>
          </table:table-cell>
          <table:table-cell office:value-type="float" office:value="971719" calcext:value-type="float">
            <text:p>971719</text:p>
          </table:table-cell>
          <table:table-cell office:value-type="float" office:value="4" calcext:value-type="float">
            <text:p>4</text:p>
          </table:table-cell>
          <table:table-cell table:formula="of:=IF([.D6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DEC2HEX([.C677])" office:value-type="string" office:string-value="ED3CB" calcext:value-type="string">
            <text:p>ED3CB</text:p>
          </table:table-cell>
          <table:table-cell office:value-type="float" office:value="971723" calcext:value-type="float">
            <text:p>971723</text:p>
          </table:table-cell>
          <table:table-cell office:value-type="float" office:value="4" calcext:value-type="float">
            <text:p>4</text:p>
          </table:table-cell>
          <table:table-cell table:formula="of:=IF([.D6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DEC2HEX([.C678])" office:value-type="string" office:string-value="ED3CF" calcext:value-type="string">
            <text:p>ED3CF</text:p>
          </table:table-cell>
          <table:table-cell office:value-type="float" office:value="971727" calcext:value-type="float">
            <text:p>971727</text:p>
          </table:table-cell>
          <table:table-cell office:value-type="float" office:value="4" calcext:value-type="float">
            <text:p>4</text:p>
          </table:table-cell>
          <table:table-cell table:formula="of:=IF([.D6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DEC2HEX([.C679])" office:value-type="string" office:string-value="ED3D3" calcext:value-type="string">
            <text:p>ED3D3</text:p>
          </table:table-cell>
          <table:table-cell office:value-type="float" office:value="971731" calcext:value-type="float">
            <text:p>971731</text:p>
          </table:table-cell>
          <table:table-cell office:value-type="float" office:value="4" calcext:value-type="float">
            <text:p>4</text:p>
          </table:table-cell>
          <table:table-cell table:formula="of:=IF([.D6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DEC2HEX([.C680])" office:value-type="string" office:string-value="ED3D7" calcext:value-type="string">
            <text:p>ED3D7</text:p>
          </table:table-cell>
          <table:table-cell office:value-type="float" office:value="971735" calcext:value-type="float">
            <text:p>971735</text:p>
          </table:table-cell>
          <table:table-cell office:value-type="float" office:value="4" calcext:value-type="float">
            <text:p>4</text:p>
          </table:table-cell>
          <table:table-cell table:formula="of:=IF([.D6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DEC2HEX([.C681])" office:value-type="string" office:string-value="ED3DB" calcext:value-type="string">
            <text:p>ED3DB</text:p>
          </table:table-cell>
          <table:table-cell office:value-type="float" office:value="971739" calcext:value-type="float">
            <text:p>971739</text:p>
          </table:table-cell>
          <table:table-cell office:value-type="float" office:value="4" calcext:value-type="float">
            <text:p>4</text:p>
          </table:table-cell>
          <table:table-cell table:formula="of:=IF([.D6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DEC2HEX([.C682])" office:value-type="string" office:string-value="ED3DF" calcext:value-type="string">
            <text:p>ED3DF</text:p>
          </table:table-cell>
          <table:table-cell office:value-type="float" office:value="971743" calcext:value-type="float">
            <text:p>971743</text:p>
          </table:table-cell>
          <table:table-cell office:value-type="float" office:value="4" calcext:value-type="float">
            <text:p>4</text:p>
          </table:table-cell>
          <table:table-cell table:formula="of:=IF([.D6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DEC2HEX([.C683])" office:value-type="string" office:string-value="ED3E3" calcext:value-type="string">
            <text:p>ED3E3</text:p>
          </table:table-cell>
          <table:table-cell office:value-type="float" office:value="971747" calcext:value-type="float">
            <text:p>971747</text:p>
          </table:table-cell>
          <table:table-cell office:value-type="float" office:value="1" calcext:value-type="float">
            <text:p>1</text:p>
          </table:table-cell>
          <table:table-cell table:formula="of:=IF([.D6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DEC2HEX([.C684])" office:value-type="string" office:string-value="ED3E4" calcext:value-type="string">
            <text:p>ED3E4</text:p>
          </table:table-cell>
          <table:table-cell office:value-type="float" office:value="971748" calcext:value-type="float">
            <text:p>971748</text:p>
          </table:table-cell>
          <table:table-cell office:value-type="float" office:value="4" calcext:value-type="float">
            <text:p>4</text:p>
          </table:table-cell>
          <table:table-cell table:formula="of:=IF([.D6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DEC2HEX([.C685])" office:value-type="string" office:string-value="ED3E8" calcext:value-type="string">
            <text:p>ED3E8</text:p>
          </table:table-cell>
          <table:table-cell office:value-type="float" office:value="971752" calcext:value-type="float">
            <text:p>971752</text:p>
          </table:table-cell>
          <table:table-cell office:value-type="float" office:value="4" calcext:value-type="float">
            <text:p>4</text:p>
          </table:table-cell>
          <table:table-cell table:formula="of:=IF([.D6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DEC2HEX([.C686])" office:value-type="string" office:string-value="ED3EC" calcext:value-type="string">
            <text:p>ED3EC</text:p>
          </table:table-cell>
          <table:table-cell office:value-type="float" office:value="971756" calcext:value-type="float">
            <text:p>971756</text:p>
          </table:table-cell>
          <table:table-cell office:value-type="float" office:value="4" calcext:value-type="float">
            <text:p>4</text:p>
          </table:table-cell>
          <table:table-cell table:formula="of:=IF([.D6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DEC2HEX([.C687])" office:value-type="string" office:string-value="ED3F0" calcext:value-type="string">
            <text:p>ED3F0</text:p>
          </table:table-cell>
          <table:table-cell office:value-type="float" office:value="971760" calcext:value-type="float">
            <text:p>971760</text:p>
          </table:table-cell>
          <table:table-cell office:value-type="float" office:value="4" calcext:value-type="float">
            <text:p>4</text:p>
          </table:table-cell>
          <table:table-cell table:formula="of:=IF([.D6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DEC2HEX([.C688])" office:value-type="string" office:string-value="ED3F4" calcext:value-type="string">
            <text:p>ED3F4</text:p>
          </table:table-cell>
          <table:table-cell office:value-type="float" office:value="971764" calcext:value-type="float">
            <text:p>971764</text:p>
          </table:table-cell>
          <table:table-cell office:value-type="float" office:value="4" calcext:value-type="float">
            <text:p>4</text:p>
          </table:table-cell>
          <table:table-cell table:formula="of:=IF([.D6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DEC2HEX([.C689])" office:value-type="string" office:string-value="ED3F8" calcext:value-type="string">
            <text:p>ED3F8</text:p>
          </table:table-cell>
          <table:table-cell office:value-type="float" office:value="971768" calcext:value-type="float">
            <text:p>971768</text:p>
          </table:table-cell>
          <table:table-cell office:value-type="float" office:value="4" calcext:value-type="float">
            <text:p>4</text:p>
          </table:table-cell>
          <table:table-cell table:formula="of:=IF([.D6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DEC2HEX([.C690])" office:value-type="string" office:string-value="ED3FC" calcext:value-type="string">
            <text:p>ED3FC</text:p>
          </table:table-cell>
          <table:table-cell office:value-type="float" office:value="971772" calcext:value-type="float">
            <text:p>971772</text:p>
          </table:table-cell>
          <table:table-cell office:value-type="float" office:value="11" calcext:value-type="float">
            <text:p>11</text:p>
          </table:table-cell>
          <table:table-cell table:formula="of:=IF([.D6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DEC2HEX([.C691])" office:value-type="string" office:string-value="ED407" calcext:value-type="string">
            <text:p>ED407</text:p>
          </table:table-cell>
          <table:table-cell office:value-type="float" office:value="971783" calcext:value-type="float">
            <text:p>971783</text:p>
          </table:table-cell>
          <table:table-cell office:value-type="float" office:value="4" calcext:value-type="float">
            <text:p>4</text:p>
          </table:table-cell>
          <table:table-cell table:formula="of:=IF([.D6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DEC2HEX([.C692])" office:value-type="string" office:string-value="ED40B" calcext:value-type="string">
            <text:p>ED40B</text:p>
          </table:table-cell>
          <table:table-cell office:value-type="float" office:value="971787" calcext:value-type="float">
            <text:p>971787</text:p>
          </table:table-cell>
          <table:table-cell office:value-type="float" office:value="4" calcext:value-type="float">
            <text:p>4</text:p>
          </table:table-cell>
          <table:table-cell table:formula="of:=IF([.D6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DEC2HEX([.C693])" office:value-type="string" office:string-value="ED40F" calcext:value-type="string">
            <text:p>ED40F</text:p>
          </table:table-cell>
          <table:table-cell office:value-type="float" office:value="971791" calcext:value-type="float">
            <text:p>971791</text:p>
          </table:table-cell>
          <table:table-cell office:value-type="float" office:value="4" calcext:value-type="float">
            <text:p>4</text:p>
          </table:table-cell>
          <table:table-cell table:formula="of:=IF([.D6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DEC2HEX([.C694])" office:value-type="string" office:string-value="ED413" calcext:value-type="string">
            <text:p>ED413</text:p>
          </table:table-cell>
          <table:table-cell office:value-type="float" office:value="971795" calcext:value-type="float">
            <text:p>971795</text:p>
          </table:table-cell>
          <table:table-cell office:value-type="float" office:value="4" calcext:value-type="float">
            <text:p>4</text:p>
          </table:table-cell>
          <table:table-cell table:formula="of:=IF([.D6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DEC2HEX([.C695])" office:value-type="string" office:string-value="ED417" calcext:value-type="string">
            <text:p>ED417</text:p>
          </table:table-cell>
          <table:table-cell office:value-type="float" office:value="971799" calcext:value-type="float">
            <text:p>971799</text:p>
          </table:table-cell>
          <table:table-cell office:value-type="float" office:value="4" calcext:value-type="float">
            <text:p>4</text:p>
          </table:table-cell>
          <table:table-cell table:formula="of:=IF([.D6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DEC2HEX([.C696])" office:value-type="string" office:string-value="ED41B" calcext:value-type="string">
            <text:p>ED41B</text:p>
          </table:table-cell>
          <table:table-cell office:value-type="float" office:value="971803" calcext:value-type="float">
            <text:p>971803</text:p>
          </table:table-cell>
          <table:table-cell office:value-type="float" office:value="4" calcext:value-type="float">
            <text:p>4</text:p>
          </table:table-cell>
          <table:table-cell table:formula="of:=IF([.D6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DEC2HEX([.C697])" office:value-type="string" office:string-value="ED41F" calcext:value-type="string">
            <text:p>ED41F</text:p>
          </table:table-cell>
          <table:table-cell office:value-type="float" office:value="971807" calcext:value-type="float">
            <text:p>971807</text:p>
          </table:table-cell>
          <table:table-cell office:value-type="float" office:value="4" calcext:value-type="float">
            <text:p>4</text:p>
          </table:table-cell>
          <table:table-cell table:formula="of:=IF([.D6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DEC2HEX([.C698])" office:value-type="string" office:string-value="ED423" calcext:value-type="string">
            <text:p>ED423</text:p>
          </table:table-cell>
          <table:table-cell office:value-type="float" office:value="971811" calcext:value-type="float">
            <text:p>971811</text:p>
          </table:table-cell>
          <table:table-cell office:value-type="float" office:value="1" calcext:value-type="float">
            <text:p>1</text:p>
          </table:table-cell>
          <table:table-cell table:formula="of:=IF([.D6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DEC2HEX([.C699])" office:value-type="string" office:string-value="ED424" calcext:value-type="string">
            <text:p>ED424</text:p>
          </table:table-cell>
          <table:table-cell office:value-type="float" office:value="971812" calcext:value-type="float">
            <text:p>971812</text:p>
          </table:table-cell>
          <table:table-cell office:value-type="float" office:value="4" calcext:value-type="float">
            <text:p>4</text:p>
          </table:table-cell>
          <table:table-cell table:formula="of:=IF([.D6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DEC2HEX([.C700])" office:value-type="string" office:string-value="ED428" calcext:value-type="string">
            <text:p>ED428</text:p>
          </table:table-cell>
          <table:table-cell office:value-type="float" office:value="971816" calcext:value-type="float">
            <text:p>971816</text:p>
          </table:table-cell>
          <table:table-cell office:value-type="float" office:value="4" calcext:value-type="float">
            <text:p>4</text:p>
          </table:table-cell>
          <table:table-cell table:formula="of:=IF([.D7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DEC2HEX([.C701])" office:value-type="string" office:string-value="ED42C" calcext:value-type="string">
            <text:p>ED42C</text:p>
          </table:table-cell>
          <table:table-cell office:value-type="float" office:value="971820" calcext:value-type="float">
            <text:p>971820</text:p>
          </table:table-cell>
          <table:table-cell office:value-type="float" office:value="4" calcext:value-type="float">
            <text:p>4</text:p>
          </table:table-cell>
          <table:table-cell table:formula="of:=IF([.D7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DEC2HEX([.C702])" office:value-type="string" office:string-value="ED430" calcext:value-type="string">
            <text:p>ED430</text:p>
          </table:table-cell>
          <table:table-cell office:value-type="float" office:value="971824" calcext:value-type="float">
            <text:p>971824</text:p>
          </table:table-cell>
          <table:table-cell office:value-type="float" office:value="4" calcext:value-type="float">
            <text:p>4</text:p>
          </table:table-cell>
          <table:table-cell table:formula="of:=IF([.D7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DEC2HEX([.C703])" office:value-type="string" office:string-value="ED434" calcext:value-type="string">
            <text:p>ED434</text:p>
          </table:table-cell>
          <table:table-cell office:value-type="float" office:value="971828" calcext:value-type="float">
            <text:p>971828</text:p>
          </table:table-cell>
          <table:table-cell office:value-type="float" office:value="4" calcext:value-type="float">
            <text:p>4</text:p>
          </table:table-cell>
          <table:table-cell table:formula="of:=IF([.D7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DEC2HEX([.C704])" office:value-type="string" office:string-value="ED438" calcext:value-type="string">
            <text:p>ED438</text:p>
          </table:table-cell>
          <table:table-cell office:value-type="float" office:value="971832" calcext:value-type="float">
            <text:p>971832</text:p>
          </table:table-cell>
          <table:table-cell office:value-type="float" office:value="4" calcext:value-type="float">
            <text:p>4</text:p>
          </table:table-cell>
          <table:table-cell table:formula="of:=IF([.D7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DEC2HEX([.C705])" office:value-type="string" office:string-value="ED43C" calcext:value-type="string">
            <text:p>ED43C</text:p>
          </table:table-cell>
          <table:table-cell office:value-type="float" office:value="971836" calcext:value-type="float">
            <text:p>971836</text:p>
          </table:table-cell>
          <table:table-cell office:value-type="float" office:value="11" calcext:value-type="float">
            <text:p>11</text:p>
          </table:table-cell>
          <table:table-cell table:formula="of:=IF([.D7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DEC2HEX([.C706])" office:value-type="string" office:string-value="ED447" calcext:value-type="string">
            <text:p>ED447</text:p>
          </table:table-cell>
          <table:table-cell office:value-type="float" office:value="971847" calcext:value-type="float">
            <text:p>971847</text:p>
          </table:table-cell>
          <table:table-cell office:value-type="float" office:value="4" calcext:value-type="float">
            <text:p>4</text:p>
          </table:table-cell>
          <table:table-cell table:formula="of:=IF([.D7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DEC2HEX([.C707])" office:value-type="string" office:string-value="ED44B" calcext:value-type="string">
            <text:p>ED44B</text:p>
          </table:table-cell>
          <table:table-cell office:value-type="float" office:value="971851" calcext:value-type="float">
            <text:p>971851</text:p>
          </table:table-cell>
          <table:table-cell office:value-type="float" office:value="4" calcext:value-type="float">
            <text:p>4</text:p>
          </table:table-cell>
          <table:table-cell table:formula="of:=IF([.D7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DEC2HEX([.C708])" office:value-type="string" office:string-value="ED44F" calcext:value-type="string">
            <text:p>ED44F</text:p>
          </table:table-cell>
          <table:table-cell office:value-type="float" office:value="971855" calcext:value-type="float">
            <text:p>971855</text:p>
          </table:table-cell>
          <table:table-cell office:value-type="float" office:value="4" calcext:value-type="float">
            <text:p>4</text:p>
          </table:table-cell>
          <table:table-cell table:formula="of:=IF([.D7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DEC2HEX([.C709])" office:value-type="string" office:string-value="ED453" calcext:value-type="string">
            <text:p>ED453</text:p>
          </table:table-cell>
          <table:table-cell office:value-type="float" office:value="971859" calcext:value-type="float">
            <text:p>971859</text:p>
          </table:table-cell>
          <table:table-cell office:value-type="float" office:value="4" calcext:value-type="float">
            <text:p>4</text:p>
          </table:table-cell>
          <table:table-cell table:formula="of:=IF([.D7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DEC2HEX([.C710])" office:value-type="string" office:string-value="ED457" calcext:value-type="string">
            <text:p>ED457</text:p>
          </table:table-cell>
          <table:table-cell office:value-type="float" office:value="971863" calcext:value-type="float">
            <text:p>971863</text:p>
          </table:table-cell>
          <table:table-cell office:value-type="float" office:value="4" calcext:value-type="float">
            <text:p>4</text:p>
          </table:table-cell>
          <table:table-cell table:formula="of:=IF([.D7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DEC2HEX([.C711])" office:value-type="string" office:string-value="ED45B" calcext:value-type="string">
            <text:p>ED45B</text:p>
          </table:table-cell>
          <table:table-cell office:value-type="float" office:value="971867" calcext:value-type="float">
            <text:p>971867</text:p>
          </table:table-cell>
          <table:table-cell office:value-type="float" office:value="4" calcext:value-type="float">
            <text:p>4</text:p>
          </table:table-cell>
          <table:table-cell table:formula="of:=IF([.D7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DEC2HEX([.C712])" office:value-type="string" office:string-value="ED45F" calcext:value-type="string">
            <text:p>ED45F</text:p>
          </table:table-cell>
          <table:table-cell office:value-type="float" office:value="971871" calcext:value-type="float">
            <text:p>971871</text:p>
          </table:table-cell>
          <table:table-cell office:value-type="float" office:value="4" calcext:value-type="float">
            <text:p>4</text:p>
          </table:table-cell>
          <table:table-cell table:formula="of:=IF([.D7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DEC2HEX([.C713])" office:value-type="string" office:string-value="ED463" calcext:value-type="string">
            <text:p>ED463</text:p>
          </table:table-cell>
          <table:table-cell office:value-type="float" office:value="971875" calcext:value-type="float">
            <text:p>971875</text:p>
          </table:table-cell>
          <table:table-cell office:value-type="float" office:value="1" calcext:value-type="float">
            <text:p>1</text:p>
          </table:table-cell>
          <table:table-cell table:formula="of:=IF([.D7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DEC2HEX([.C714])" office:value-type="string" office:string-value="ED464" calcext:value-type="string">
            <text:p>ED464</text:p>
          </table:table-cell>
          <table:table-cell office:value-type="float" office:value="971876" calcext:value-type="float">
            <text:p>971876</text:p>
          </table:table-cell>
          <table:table-cell office:value-type="float" office:value="4" calcext:value-type="float">
            <text:p>4</text:p>
          </table:table-cell>
          <table:table-cell table:formula="of:=IF([.D7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DEC2HEX([.C715])" office:value-type="string" office:string-value="ED468" calcext:value-type="string">
            <text:p>ED468</text:p>
          </table:table-cell>
          <table:table-cell office:value-type="float" office:value="971880" calcext:value-type="float">
            <text:p>971880</text:p>
          </table:table-cell>
          <table:table-cell office:value-type="float" office:value="4" calcext:value-type="float">
            <text:p>4</text:p>
          </table:table-cell>
          <table:table-cell table:formula="of:=IF([.D7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DEC2HEX([.C716])" office:value-type="string" office:string-value="ED46C" calcext:value-type="string">
            <text:p>ED46C</text:p>
          </table:table-cell>
          <table:table-cell office:value-type="float" office:value="971884" calcext:value-type="float">
            <text:p>971884</text:p>
          </table:table-cell>
          <table:table-cell office:value-type="float" office:value="4" calcext:value-type="float">
            <text:p>4</text:p>
          </table:table-cell>
          <table:table-cell table:formula="of:=IF([.D7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DEC2HEX([.C717])" office:value-type="string" office:string-value="ED470" calcext:value-type="string">
            <text:p>ED470</text:p>
          </table:table-cell>
          <table:table-cell office:value-type="float" office:value="971888" calcext:value-type="float">
            <text:p>971888</text:p>
          </table:table-cell>
          <table:table-cell office:value-type="float" office:value="4" calcext:value-type="float">
            <text:p>4</text:p>
          </table:table-cell>
          <table:table-cell table:formula="of:=IF([.D7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DEC2HEX([.C718])" office:value-type="string" office:string-value="ED474" calcext:value-type="string">
            <text:p>ED474</text:p>
          </table:table-cell>
          <table:table-cell office:value-type="float" office:value="971892" calcext:value-type="float">
            <text:p>971892</text:p>
          </table:table-cell>
          <table:table-cell office:value-type="float" office:value="4" calcext:value-type="float">
            <text:p>4</text:p>
          </table:table-cell>
          <table:table-cell table:formula="of:=IF([.D7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DEC2HEX([.C719])" office:value-type="string" office:string-value="ED478" calcext:value-type="string">
            <text:p>ED478</text:p>
          </table:table-cell>
          <table:table-cell office:value-type="float" office:value="971896" calcext:value-type="float">
            <text:p>971896</text:p>
          </table:table-cell>
          <table:table-cell office:value-type="float" office:value="4" calcext:value-type="float">
            <text:p>4</text:p>
          </table:table-cell>
          <table:table-cell table:formula="of:=IF([.D7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DEC2HEX([.C720])" office:value-type="string" office:string-value="ED47C" calcext:value-type="string">
            <text:p>ED47C</text:p>
          </table:table-cell>
          <table:table-cell office:value-type="float" office:value="971900" calcext:value-type="float">
            <text:p>971900</text:p>
          </table:table-cell>
          <table:table-cell office:value-type="float" office:value="11" calcext:value-type="float">
            <text:p>11</text:p>
          </table:table-cell>
          <table:table-cell table:formula="of:=IF([.D7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DEC2HEX([.C721])" office:value-type="string" office:string-value="ED487" calcext:value-type="string">
            <text:p>ED487</text:p>
          </table:table-cell>
          <table:table-cell office:value-type="float" office:value="971911" calcext:value-type="float">
            <text:p>971911</text:p>
          </table:table-cell>
          <table:table-cell office:value-type="float" office:value="4" calcext:value-type="float">
            <text:p>4</text:p>
          </table:table-cell>
          <table:table-cell table:formula="of:=IF([.D7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DEC2HEX([.C722])" office:value-type="string" office:string-value="ED48B" calcext:value-type="string">
            <text:p>ED48B</text:p>
          </table:table-cell>
          <table:table-cell office:value-type="float" office:value="971915" calcext:value-type="float">
            <text:p>971915</text:p>
          </table:table-cell>
          <table:table-cell office:value-type="float" office:value="4" calcext:value-type="float">
            <text:p>4</text:p>
          </table:table-cell>
          <table:table-cell table:formula="of:=IF([.D7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DEC2HEX([.C723])" office:value-type="string" office:string-value="ED48F" calcext:value-type="string">
            <text:p>ED48F</text:p>
          </table:table-cell>
          <table:table-cell office:value-type="float" office:value="971919" calcext:value-type="float">
            <text:p>971919</text:p>
          </table:table-cell>
          <table:table-cell office:value-type="float" office:value="4" calcext:value-type="float">
            <text:p>4</text:p>
          </table:table-cell>
          <table:table-cell table:formula="of:=IF([.D7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DEC2HEX([.C724])" office:value-type="string" office:string-value="ED493" calcext:value-type="string">
            <text:p>ED493</text:p>
          </table:table-cell>
          <table:table-cell office:value-type="float" office:value="971923" calcext:value-type="float">
            <text:p>971923</text:p>
          </table:table-cell>
          <table:table-cell office:value-type="float" office:value="4" calcext:value-type="float">
            <text:p>4</text:p>
          </table:table-cell>
          <table:table-cell table:formula="of:=IF([.D7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DEC2HEX([.C725])" office:value-type="string" office:string-value="ED497" calcext:value-type="string">
            <text:p>ED497</text:p>
          </table:table-cell>
          <table:table-cell office:value-type="float" office:value="971927" calcext:value-type="float">
            <text:p>971927</text:p>
          </table:table-cell>
          <table:table-cell office:value-type="float" office:value="4" calcext:value-type="float">
            <text:p>4</text:p>
          </table:table-cell>
          <table:table-cell table:formula="of:=IF([.D7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DEC2HEX([.C726])" office:value-type="string" office:string-value="ED49B" calcext:value-type="string">
            <text:p>ED49B</text:p>
          </table:table-cell>
          <table:table-cell office:value-type="float" office:value="971931" calcext:value-type="float">
            <text:p>971931</text:p>
          </table:table-cell>
          <table:table-cell office:value-type="float" office:value="4" calcext:value-type="float">
            <text:p>4</text:p>
          </table:table-cell>
          <table:table-cell table:formula="of:=IF([.D7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DEC2HEX([.C727])" office:value-type="string" office:string-value="ED49F" calcext:value-type="string">
            <text:p>ED49F</text:p>
          </table:table-cell>
          <table:table-cell office:value-type="float" office:value="971935" calcext:value-type="float">
            <text:p>971935</text:p>
          </table:table-cell>
          <table:table-cell office:value-type="float" office:value="4" calcext:value-type="float">
            <text:p>4</text:p>
          </table:table-cell>
          <table:table-cell table:formula="of:=IF([.D7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DEC2HEX([.C728])" office:value-type="string" office:string-value="ED4A3" calcext:value-type="string">
            <text:p>ED4A3</text:p>
          </table:table-cell>
          <table:table-cell office:value-type="float" office:value="971939" calcext:value-type="float">
            <text:p>971939</text:p>
          </table:table-cell>
          <table:table-cell office:value-type="float" office:value="1" calcext:value-type="float">
            <text:p>1</text:p>
          </table:table-cell>
          <table:table-cell table:formula="of:=IF([.D7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DEC2HEX([.C729])" office:value-type="string" office:string-value="ED4A4" calcext:value-type="string">
            <text:p>ED4A4</text:p>
          </table:table-cell>
          <table:table-cell office:value-type="float" office:value="971940" calcext:value-type="float">
            <text:p>971940</text:p>
          </table:table-cell>
          <table:table-cell office:value-type="float" office:value="4" calcext:value-type="float">
            <text:p>4</text:p>
          </table:table-cell>
          <table:table-cell table:formula="of:=IF([.D7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DEC2HEX([.C730])" office:value-type="string" office:string-value="ED4A8" calcext:value-type="string">
            <text:p>ED4A8</text:p>
          </table:table-cell>
          <table:table-cell office:value-type="float" office:value="971944" calcext:value-type="float">
            <text:p>971944</text:p>
          </table:table-cell>
          <table:table-cell office:value-type="float" office:value="4" calcext:value-type="float">
            <text:p>4</text:p>
          </table:table-cell>
          <table:table-cell table:formula="of:=IF([.D7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DEC2HEX([.C731])" office:value-type="string" office:string-value="ED4AC" calcext:value-type="string">
            <text:p>ED4AC</text:p>
          </table:table-cell>
          <table:table-cell office:value-type="float" office:value="971948" calcext:value-type="float">
            <text:p>971948</text:p>
          </table:table-cell>
          <table:table-cell office:value-type="float" office:value="4" calcext:value-type="float">
            <text:p>4</text:p>
          </table:table-cell>
          <table:table-cell table:formula="of:=IF([.D7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DEC2HEX([.C732])" office:value-type="string" office:string-value="ED4B0" calcext:value-type="string">
            <text:p>ED4B0</text:p>
          </table:table-cell>
          <table:table-cell office:value-type="float" office:value="971952" calcext:value-type="float">
            <text:p>971952</text:p>
          </table:table-cell>
          <table:table-cell office:value-type="float" office:value="4" calcext:value-type="float">
            <text:p>4</text:p>
          </table:table-cell>
          <table:table-cell table:formula="of:=IF([.D7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DEC2HEX([.C733])" office:value-type="string" office:string-value="ED4B4" calcext:value-type="string">
            <text:p>ED4B4</text:p>
          </table:table-cell>
          <table:table-cell office:value-type="float" office:value="971956" calcext:value-type="float">
            <text:p>971956</text:p>
          </table:table-cell>
          <table:table-cell office:value-type="float" office:value="4" calcext:value-type="float">
            <text:p>4</text:p>
          </table:table-cell>
          <table:table-cell table:formula="of:=IF([.D7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DEC2HEX([.C734])" office:value-type="string" office:string-value="ED4B8" calcext:value-type="string">
            <text:p>ED4B8</text:p>
          </table:table-cell>
          <table:table-cell office:value-type="float" office:value="971960" calcext:value-type="float">
            <text:p>971960</text:p>
          </table:table-cell>
          <table:table-cell office:value-type="float" office:value="4" calcext:value-type="float">
            <text:p>4</text:p>
          </table:table-cell>
          <table:table-cell table:formula="of:=IF([.D7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DEC2HEX([.C735])" office:value-type="string" office:string-value="ED4BC" calcext:value-type="string">
            <text:p>ED4BC</text:p>
          </table:table-cell>
          <table:table-cell office:value-type="float" office:value="971964" calcext:value-type="float">
            <text:p>971964</text:p>
          </table:table-cell>
          <table:table-cell office:value-type="float" office:value="11" calcext:value-type="float">
            <text:p>11</text:p>
          </table:table-cell>
          <table:table-cell table:formula="of:=IF([.D7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DEC2HEX([.C736])" office:value-type="string" office:string-value="ED4C7" calcext:value-type="string">
            <text:p>ED4C7</text:p>
          </table:table-cell>
          <table:table-cell office:value-type="float" office:value="971975" calcext:value-type="float">
            <text:p>971975</text:p>
          </table:table-cell>
          <table:table-cell office:value-type="float" office:value="4" calcext:value-type="float">
            <text:p>4</text:p>
          </table:table-cell>
          <table:table-cell table:formula="of:=IF([.D7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DEC2HEX([.C737])" office:value-type="string" office:string-value="ED4CB" calcext:value-type="string">
            <text:p>ED4CB</text:p>
          </table:table-cell>
          <table:table-cell office:value-type="float" office:value="971979" calcext:value-type="float">
            <text:p>971979</text:p>
          </table:table-cell>
          <table:table-cell office:value-type="float" office:value="4" calcext:value-type="float">
            <text:p>4</text:p>
          </table:table-cell>
          <table:table-cell table:formula="of:=IF([.D7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DEC2HEX([.C738])" office:value-type="string" office:string-value="ED4CF" calcext:value-type="string">
            <text:p>ED4CF</text:p>
          </table:table-cell>
          <table:table-cell office:value-type="float" office:value="971983" calcext:value-type="float">
            <text:p>971983</text:p>
          </table:table-cell>
          <table:table-cell office:value-type="float" office:value="4" calcext:value-type="float">
            <text:p>4</text:p>
          </table:table-cell>
          <table:table-cell table:formula="of:=IF([.D7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DEC2HEX([.C739])" office:value-type="string" office:string-value="ED4D3" calcext:value-type="string">
            <text:p>ED4D3</text:p>
          </table:table-cell>
          <table:table-cell office:value-type="float" office:value="971987" calcext:value-type="float">
            <text:p>971987</text:p>
          </table:table-cell>
          <table:table-cell office:value-type="float" office:value="4" calcext:value-type="float">
            <text:p>4</text:p>
          </table:table-cell>
          <table:table-cell table:formula="of:=IF([.D7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DEC2HEX([.C740])" office:value-type="string" office:string-value="ED4D7" calcext:value-type="string">
            <text:p>ED4D7</text:p>
          </table:table-cell>
          <table:table-cell office:value-type="float" office:value="971991" calcext:value-type="float">
            <text:p>971991</text:p>
          </table:table-cell>
          <table:table-cell office:value-type="float" office:value="4" calcext:value-type="float">
            <text:p>4</text:p>
          </table:table-cell>
          <table:table-cell table:formula="of:=IF([.D7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DEC2HEX([.C741])" office:value-type="string" office:string-value="ED4DB" calcext:value-type="string">
            <text:p>ED4DB</text:p>
          </table:table-cell>
          <table:table-cell office:value-type="float" office:value="971995" calcext:value-type="float">
            <text:p>971995</text:p>
          </table:table-cell>
          <table:table-cell office:value-type="float" office:value="4" calcext:value-type="float">
            <text:p>4</text:p>
          </table:table-cell>
          <table:table-cell table:formula="of:=IF([.D7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DEC2HEX([.C742])" office:value-type="string" office:string-value="ED4DF" calcext:value-type="string">
            <text:p>ED4DF</text:p>
          </table:table-cell>
          <table:table-cell office:value-type="float" office:value="971999" calcext:value-type="float">
            <text:p>971999</text:p>
          </table:table-cell>
          <table:table-cell office:value-type="float" office:value="4" calcext:value-type="float">
            <text:p>4</text:p>
          </table:table-cell>
          <table:table-cell table:formula="of:=IF([.D7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DEC2HEX([.C743])" office:value-type="string" office:string-value="ED4E3" calcext:value-type="string">
            <text:p>ED4E3</text:p>
          </table:table-cell>
          <table:table-cell office:value-type="float" office:value="972003" calcext:value-type="float">
            <text:p>972003</text:p>
          </table:table-cell>
          <table:table-cell office:value-type="float" office:value="1" calcext:value-type="float">
            <text:p>1</text:p>
          </table:table-cell>
          <table:table-cell table:formula="of:=IF([.D7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DEC2HEX([.C744])" office:value-type="string" office:string-value="ED4E4" calcext:value-type="string">
            <text:p>ED4E4</text:p>
          </table:table-cell>
          <table:table-cell office:value-type="float" office:value="972004" calcext:value-type="float">
            <text:p>972004</text:p>
          </table:table-cell>
          <table:table-cell office:value-type="float" office:value="4" calcext:value-type="float">
            <text:p>4</text:p>
          </table:table-cell>
          <table:table-cell table:formula="of:=IF([.D7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DEC2HEX([.C745])" office:value-type="string" office:string-value="ED4E8" calcext:value-type="string">
            <text:p>ED4E8</text:p>
          </table:table-cell>
          <table:table-cell office:value-type="float" office:value="972008" calcext:value-type="float">
            <text:p>972008</text:p>
          </table:table-cell>
          <table:table-cell office:value-type="float" office:value="4" calcext:value-type="float">
            <text:p>4</text:p>
          </table:table-cell>
          <table:table-cell table:formula="of:=IF([.D7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DEC2HEX([.C746])" office:value-type="string" office:string-value="ED4EC" calcext:value-type="string">
            <text:p>ED4EC</text:p>
          </table:table-cell>
          <table:table-cell office:value-type="float" office:value="972012" calcext:value-type="float">
            <text:p>972012</text:p>
          </table:table-cell>
          <table:table-cell office:value-type="float" office:value="4" calcext:value-type="float">
            <text:p>4</text:p>
          </table:table-cell>
          <table:table-cell table:formula="of:=IF([.D7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DEC2HEX([.C747])" office:value-type="string" office:string-value="ED4F0" calcext:value-type="string">
            <text:p>ED4F0</text:p>
          </table:table-cell>
          <table:table-cell office:value-type="float" office:value="972016" calcext:value-type="float">
            <text:p>972016</text:p>
          </table:table-cell>
          <table:table-cell office:value-type="float" office:value="4" calcext:value-type="float">
            <text:p>4</text:p>
          </table:table-cell>
          <table:table-cell table:formula="of:=IF([.D7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DEC2HEX([.C748])" office:value-type="string" office:string-value="ED4F4" calcext:value-type="string">
            <text:p>ED4F4</text:p>
          </table:table-cell>
          <table:table-cell office:value-type="float" office:value="972020" calcext:value-type="float">
            <text:p>972020</text:p>
          </table:table-cell>
          <table:table-cell office:value-type="float" office:value="4" calcext:value-type="float">
            <text:p>4</text:p>
          </table:table-cell>
          <table:table-cell table:formula="of:=IF([.D7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DEC2HEX([.C749])" office:value-type="string" office:string-value="ED4F8" calcext:value-type="string">
            <text:p>ED4F8</text:p>
          </table:table-cell>
          <table:table-cell office:value-type="float" office:value="972024" calcext:value-type="float">
            <text:p>972024</text:p>
          </table:table-cell>
          <table:table-cell office:value-type="float" office:value="4" calcext:value-type="float">
            <text:p>4</text:p>
          </table:table-cell>
          <table:table-cell table:formula="of:=IF([.D7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DEC2HEX([.C750])" office:value-type="string" office:string-value="ED4FC" calcext:value-type="string">
            <text:p>ED4FC</text:p>
          </table:table-cell>
          <table:table-cell office:value-type="float" office:value="972028" calcext:value-type="float">
            <text:p>972028</text:p>
          </table:table-cell>
          <table:table-cell office:value-type="float" office:value="11" calcext:value-type="float">
            <text:p>11</text:p>
          </table:table-cell>
          <table:table-cell table:formula="of:=IF([.D7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DEC2HEX([.C751])" office:value-type="string" office:string-value="ED507" calcext:value-type="string">
            <text:p>ED507</text:p>
          </table:table-cell>
          <table:table-cell office:value-type="float" office:value="972039" calcext:value-type="float">
            <text:p>972039</text:p>
          </table:table-cell>
          <table:table-cell office:value-type="float" office:value="4" calcext:value-type="float">
            <text:p>4</text:p>
          </table:table-cell>
          <table:table-cell table:formula="of:=IF([.D7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DEC2HEX([.C752])" office:value-type="string" office:string-value="ED50B" calcext:value-type="string">
            <text:p>ED50B</text:p>
          </table:table-cell>
          <table:table-cell office:value-type="float" office:value="972043" calcext:value-type="float">
            <text:p>972043</text:p>
          </table:table-cell>
          <table:table-cell office:value-type="float" office:value="4" calcext:value-type="float">
            <text:p>4</text:p>
          </table:table-cell>
          <table:table-cell table:formula="of:=IF([.D7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DEC2HEX([.C753])" office:value-type="string" office:string-value="ED50F" calcext:value-type="string">
            <text:p>ED50F</text:p>
          </table:table-cell>
          <table:table-cell office:value-type="float" office:value="972047" calcext:value-type="float">
            <text:p>972047</text:p>
          </table:table-cell>
          <table:table-cell office:value-type="float" office:value="4" calcext:value-type="float">
            <text:p>4</text:p>
          </table:table-cell>
          <table:table-cell table:formula="of:=IF([.D7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DEC2HEX([.C754])" office:value-type="string" office:string-value="ED513" calcext:value-type="string">
            <text:p>ED513</text:p>
          </table:table-cell>
          <table:table-cell office:value-type="float" office:value="972051" calcext:value-type="float">
            <text:p>972051</text:p>
          </table:table-cell>
          <table:table-cell office:value-type="float" office:value="4" calcext:value-type="float">
            <text:p>4</text:p>
          </table:table-cell>
          <table:table-cell table:formula="of:=IF([.D7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DEC2HEX([.C755])" office:value-type="string" office:string-value="ED517" calcext:value-type="string">
            <text:p>ED517</text:p>
          </table:table-cell>
          <table:table-cell office:value-type="float" office:value="972055" calcext:value-type="float">
            <text:p>972055</text:p>
          </table:table-cell>
          <table:table-cell office:value-type="float" office:value="4" calcext:value-type="float">
            <text:p>4</text:p>
          </table:table-cell>
          <table:table-cell table:formula="of:=IF([.D7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DEC2HEX([.C756])" office:value-type="string" office:string-value="ED51B" calcext:value-type="string">
            <text:p>ED51B</text:p>
          </table:table-cell>
          <table:table-cell office:value-type="float" office:value="972059" calcext:value-type="float">
            <text:p>972059</text:p>
          </table:table-cell>
          <table:table-cell office:value-type="float" office:value="4" calcext:value-type="float">
            <text:p>4</text:p>
          </table:table-cell>
          <table:table-cell table:formula="of:=IF([.D7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DEC2HEX([.C757])" office:value-type="string" office:string-value="ED51F" calcext:value-type="string">
            <text:p>ED51F</text:p>
          </table:table-cell>
          <table:table-cell office:value-type="float" office:value="972063" calcext:value-type="float">
            <text:p>972063</text:p>
          </table:table-cell>
          <table:table-cell office:value-type="float" office:value="4" calcext:value-type="float">
            <text:p>4</text:p>
          </table:table-cell>
          <table:table-cell table:formula="of:=IF([.D7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DEC2HEX([.C758])" office:value-type="string" office:string-value="ED523" calcext:value-type="string">
            <text:p>ED523</text:p>
          </table:table-cell>
          <table:table-cell office:value-type="float" office:value="972067" calcext:value-type="float">
            <text:p>972067</text:p>
          </table:table-cell>
          <table:table-cell office:value-type="float" office:value="1" calcext:value-type="float">
            <text:p>1</text:p>
          </table:table-cell>
          <table:table-cell table:formula="of:=IF([.D7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DEC2HEX([.C759])" office:value-type="string" office:string-value="ED524" calcext:value-type="string">
            <text:p>ED524</text:p>
          </table:table-cell>
          <table:table-cell office:value-type="float" office:value="972068" calcext:value-type="float">
            <text:p>972068</text:p>
          </table:table-cell>
          <table:table-cell office:value-type="float" office:value="4" calcext:value-type="float">
            <text:p>4</text:p>
          </table:table-cell>
          <table:table-cell table:formula="of:=IF([.D7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DEC2HEX([.C760])" office:value-type="string" office:string-value="ED528" calcext:value-type="string">
            <text:p>ED528</text:p>
          </table:table-cell>
          <table:table-cell office:value-type="float" office:value="972072" calcext:value-type="float">
            <text:p>972072</text:p>
          </table:table-cell>
          <table:table-cell office:value-type="float" office:value="4" calcext:value-type="float">
            <text:p>4</text:p>
          </table:table-cell>
          <table:table-cell table:formula="of:=IF([.D7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DEC2HEX([.C761])" office:value-type="string" office:string-value="ED52C" calcext:value-type="string">
            <text:p>ED52C</text:p>
          </table:table-cell>
          <table:table-cell office:value-type="float" office:value="972076" calcext:value-type="float">
            <text:p>972076</text:p>
          </table:table-cell>
          <table:table-cell office:value-type="float" office:value="4" calcext:value-type="float">
            <text:p>4</text:p>
          </table:table-cell>
          <table:table-cell table:formula="of:=IF([.D7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DEC2HEX([.C762])" office:value-type="string" office:string-value="ED530" calcext:value-type="string">
            <text:p>ED530</text:p>
          </table:table-cell>
          <table:table-cell office:value-type="float" office:value="972080" calcext:value-type="float">
            <text:p>972080</text:p>
          </table:table-cell>
          <table:table-cell office:value-type="float" office:value="4" calcext:value-type="float">
            <text:p>4</text:p>
          </table:table-cell>
          <table:table-cell table:formula="of:=IF([.D7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DEC2HEX([.C763])" office:value-type="string" office:string-value="ED534" calcext:value-type="string">
            <text:p>ED534</text:p>
          </table:table-cell>
          <table:table-cell office:value-type="float" office:value="972084" calcext:value-type="float">
            <text:p>972084</text:p>
          </table:table-cell>
          <table:table-cell office:value-type="float" office:value="4" calcext:value-type="float">
            <text:p>4</text:p>
          </table:table-cell>
          <table:table-cell table:formula="of:=IF([.D7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DEC2HEX([.C764])" office:value-type="string" office:string-value="ED538" calcext:value-type="string">
            <text:p>ED538</text:p>
          </table:table-cell>
          <table:table-cell office:value-type="float" office:value="972088" calcext:value-type="float">
            <text:p>972088</text:p>
          </table:table-cell>
          <table:table-cell office:value-type="float" office:value="4" calcext:value-type="float">
            <text:p>4</text:p>
          </table:table-cell>
          <table:table-cell table:formula="of:=IF([.D7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DEC2HEX([.C765])" office:value-type="string" office:string-value="ED53C" calcext:value-type="string">
            <text:p>ED53C</text:p>
          </table:table-cell>
          <table:table-cell office:value-type="float" office:value="972092" calcext:value-type="float">
            <text:p>972092</text:p>
          </table:table-cell>
          <table:table-cell office:value-type="float" office:value="11" calcext:value-type="float">
            <text:p>11</text:p>
          </table:table-cell>
          <table:table-cell table:formula="of:=IF([.D7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DEC2HEX([.C766])" office:value-type="string" office:string-value="ED547" calcext:value-type="string">
            <text:p>ED547</text:p>
          </table:table-cell>
          <table:table-cell office:value-type="float" office:value="972103" calcext:value-type="float">
            <text:p>972103</text:p>
          </table:table-cell>
          <table:table-cell office:value-type="float" office:value="4" calcext:value-type="float">
            <text:p>4</text:p>
          </table:table-cell>
          <table:table-cell table:formula="of:=IF([.D7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DEC2HEX([.C767])" office:value-type="string" office:string-value="ED54B" calcext:value-type="string">
            <text:p>ED54B</text:p>
          </table:table-cell>
          <table:table-cell office:value-type="float" office:value="972107" calcext:value-type="float">
            <text:p>972107</text:p>
          </table:table-cell>
          <table:table-cell office:value-type="float" office:value="4" calcext:value-type="float">
            <text:p>4</text:p>
          </table:table-cell>
          <table:table-cell table:formula="of:=IF([.D7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DEC2HEX([.C768])" office:value-type="string" office:string-value="ED54F" calcext:value-type="string">
            <text:p>ED54F</text:p>
          </table:table-cell>
          <table:table-cell office:value-type="float" office:value="972111" calcext:value-type="float">
            <text:p>972111</text:p>
          </table:table-cell>
          <table:table-cell office:value-type="float" office:value="4" calcext:value-type="float">
            <text:p>4</text:p>
          </table:table-cell>
          <table:table-cell table:formula="of:=IF([.D7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DEC2HEX([.C769])" office:value-type="string" office:string-value="ED553" calcext:value-type="string">
            <text:p>ED553</text:p>
          </table:table-cell>
          <table:table-cell office:value-type="float" office:value="972115" calcext:value-type="float">
            <text:p>972115</text:p>
          </table:table-cell>
          <table:table-cell office:value-type="float" office:value="4" calcext:value-type="float">
            <text:p>4</text:p>
          </table:table-cell>
          <table:table-cell table:formula="of:=IF([.D7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DEC2HEX([.C770])" office:value-type="string" office:string-value="ED557" calcext:value-type="string">
            <text:p>ED557</text:p>
          </table:table-cell>
          <table:table-cell office:value-type="float" office:value="972119" calcext:value-type="float">
            <text:p>972119</text:p>
          </table:table-cell>
          <table:table-cell office:value-type="float" office:value="4" calcext:value-type="float">
            <text:p>4</text:p>
          </table:table-cell>
          <table:table-cell table:formula="of:=IF([.D7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DEC2HEX([.C771])" office:value-type="string" office:string-value="ED55B" calcext:value-type="string">
            <text:p>ED55B</text:p>
          </table:table-cell>
          <table:table-cell office:value-type="float" office:value="972123" calcext:value-type="float">
            <text:p>972123</text:p>
          </table:table-cell>
          <table:table-cell office:value-type="float" office:value="4" calcext:value-type="float">
            <text:p>4</text:p>
          </table:table-cell>
          <table:table-cell table:formula="of:=IF([.D7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DEC2HEX([.C772])" office:value-type="string" office:string-value="ED55F" calcext:value-type="string">
            <text:p>ED55F</text:p>
          </table:table-cell>
          <table:table-cell office:value-type="float" office:value="972127" calcext:value-type="float">
            <text:p>972127</text:p>
          </table:table-cell>
          <table:table-cell office:value-type="float" office:value="4" calcext:value-type="float">
            <text:p>4</text:p>
          </table:table-cell>
          <table:table-cell table:formula="of:=IF([.D7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DEC2HEX([.C773])" office:value-type="string" office:string-value="ED563" calcext:value-type="string">
            <text:p>ED563</text:p>
          </table:table-cell>
          <table:table-cell office:value-type="float" office:value="972131" calcext:value-type="float">
            <text:p>972131</text:p>
          </table:table-cell>
          <table:table-cell office:value-type="float" office:value="1" calcext:value-type="float">
            <text:p>1</text:p>
          </table:table-cell>
          <table:table-cell table:formula="of:=IF([.D7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DEC2HEX([.C774])" office:value-type="string" office:string-value="ED564" calcext:value-type="string">
            <text:p>ED564</text:p>
          </table:table-cell>
          <table:table-cell office:value-type="float" office:value="972132" calcext:value-type="float">
            <text:p>972132</text:p>
          </table:table-cell>
          <table:table-cell office:value-type="float" office:value="4" calcext:value-type="float">
            <text:p>4</text:p>
          </table:table-cell>
          <table:table-cell table:formula="of:=IF([.D7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DEC2HEX([.C775])" office:value-type="string" office:string-value="ED568" calcext:value-type="string">
            <text:p>ED568</text:p>
          </table:table-cell>
          <table:table-cell office:value-type="float" office:value="972136" calcext:value-type="float">
            <text:p>972136</text:p>
          </table:table-cell>
          <table:table-cell office:value-type="float" office:value="4" calcext:value-type="float">
            <text:p>4</text:p>
          </table:table-cell>
          <table:table-cell table:formula="of:=IF([.D7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DEC2HEX([.C776])" office:value-type="string" office:string-value="ED56C" calcext:value-type="string">
            <text:p>ED56C</text:p>
          </table:table-cell>
          <table:table-cell office:value-type="float" office:value="972140" calcext:value-type="float">
            <text:p>972140</text:p>
          </table:table-cell>
          <table:table-cell office:value-type="float" office:value="4" calcext:value-type="float">
            <text:p>4</text:p>
          </table:table-cell>
          <table:table-cell table:formula="of:=IF([.D7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DEC2HEX([.C777])" office:value-type="string" office:string-value="ED570" calcext:value-type="string">
            <text:p>ED570</text:p>
          </table:table-cell>
          <table:table-cell office:value-type="float" office:value="972144" calcext:value-type="float">
            <text:p>972144</text:p>
          </table:table-cell>
          <table:table-cell office:value-type="float" office:value="4" calcext:value-type="float">
            <text:p>4</text:p>
          </table:table-cell>
          <table:table-cell table:formula="of:=IF([.D7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DEC2HEX([.C778])" office:value-type="string" office:string-value="ED574" calcext:value-type="string">
            <text:p>ED574</text:p>
          </table:table-cell>
          <table:table-cell office:value-type="float" office:value="972148" calcext:value-type="float">
            <text:p>972148</text:p>
          </table:table-cell>
          <table:table-cell office:value-type="float" office:value="4" calcext:value-type="float">
            <text:p>4</text:p>
          </table:table-cell>
          <table:table-cell table:formula="of:=IF([.D7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DEC2HEX([.C779])" office:value-type="string" office:string-value="ED578" calcext:value-type="string">
            <text:p>ED578</text:p>
          </table:table-cell>
          <table:table-cell office:value-type="float" office:value="972152" calcext:value-type="float">
            <text:p>972152</text:p>
          </table:table-cell>
          <table:table-cell office:value-type="float" office:value="4" calcext:value-type="float">
            <text:p>4</text:p>
          </table:table-cell>
          <table:table-cell table:formula="of:=IF([.D7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DEC2HEX([.C780])" office:value-type="string" office:string-value="ED57C" calcext:value-type="string">
            <text:p>ED57C</text:p>
          </table:table-cell>
          <table:table-cell office:value-type="float" office:value="972156" calcext:value-type="float">
            <text:p>972156</text:p>
          </table:table-cell>
          <table:table-cell office:value-type="float" office:value="11" calcext:value-type="float">
            <text:p>11</text:p>
          </table:table-cell>
          <table:table-cell table:formula="of:=IF([.D7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DEC2HEX([.C781])" office:value-type="string" office:string-value="ED587" calcext:value-type="string">
            <text:p>ED587</text:p>
          </table:table-cell>
          <table:table-cell office:value-type="float" office:value="972167" calcext:value-type="float">
            <text:p>972167</text:p>
          </table:table-cell>
          <table:table-cell office:value-type="float" office:value="4" calcext:value-type="float">
            <text:p>4</text:p>
          </table:table-cell>
          <table:table-cell table:formula="of:=IF([.D7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DEC2HEX([.C782])" office:value-type="string" office:string-value="ED58B" calcext:value-type="string">
            <text:p>ED58B</text:p>
          </table:table-cell>
          <table:table-cell office:value-type="float" office:value="972171" calcext:value-type="float">
            <text:p>972171</text:p>
          </table:table-cell>
          <table:table-cell office:value-type="float" office:value="4" calcext:value-type="float">
            <text:p>4</text:p>
          </table:table-cell>
          <table:table-cell table:formula="of:=IF([.D7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DEC2HEX([.C783])" office:value-type="string" office:string-value="ED58F" calcext:value-type="string">
            <text:p>ED58F</text:p>
          </table:table-cell>
          <table:table-cell office:value-type="float" office:value="972175" calcext:value-type="float">
            <text:p>972175</text:p>
          </table:table-cell>
          <table:table-cell office:value-type="float" office:value="4" calcext:value-type="float">
            <text:p>4</text:p>
          </table:table-cell>
          <table:table-cell table:formula="of:=IF([.D7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DEC2HEX([.C784])" office:value-type="string" office:string-value="ED593" calcext:value-type="string">
            <text:p>ED593</text:p>
          </table:table-cell>
          <table:table-cell office:value-type="float" office:value="972179" calcext:value-type="float">
            <text:p>972179</text:p>
          </table:table-cell>
          <table:table-cell office:value-type="float" office:value="4" calcext:value-type="float">
            <text:p>4</text:p>
          </table:table-cell>
          <table:table-cell table:formula="of:=IF([.D7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DEC2HEX([.C785])" office:value-type="string" office:string-value="ED597" calcext:value-type="string">
            <text:p>ED597</text:p>
          </table:table-cell>
          <table:table-cell office:value-type="float" office:value="972183" calcext:value-type="float">
            <text:p>972183</text:p>
          </table:table-cell>
          <table:table-cell office:value-type="float" office:value="4" calcext:value-type="float">
            <text:p>4</text:p>
          </table:table-cell>
          <table:table-cell table:formula="of:=IF([.D7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DEC2HEX([.C786])" office:value-type="string" office:string-value="ED59B" calcext:value-type="string">
            <text:p>ED59B</text:p>
          </table:table-cell>
          <table:table-cell office:value-type="float" office:value="972187" calcext:value-type="float">
            <text:p>972187</text:p>
          </table:table-cell>
          <table:table-cell office:value-type="float" office:value="4" calcext:value-type="float">
            <text:p>4</text:p>
          </table:table-cell>
          <table:table-cell table:formula="of:=IF([.D7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DEC2HEX([.C787])" office:value-type="string" office:string-value="ED59F" calcext:value-type="string">
            <text:p>ED59F</text:p>
          </table:table-cell>
          <table:table-cell office:value-type="float" office:value="972191" calcext:value-type="float">
            <text:p>972191</text:p>
          </table:table-cell>
          <table:table-cell office:value-type="float" office:value="4" calcext:value-type="float">
            <text:p>4</text:p>
          </table:table-cell>
          <table:table-cell table:formula="of:=IF([.D7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DEC2HEX([.C788])" office:value-type="string" office:string-value="ED5A3" calcext:value-type="string">
            <text:p>ED5A3</text:p>
          </table:table-cell>
          <table:table-cell office:value-type="float" office:value="972195" calcext:value-type="float">
            <text:p>972195</text:p>
          </table:table-cell>
          <table:table-cell office:value-type="float" office:value="1" calcext:value-type="float">
            <text:p>1</text:p>
          </table:table-cell>
          <table:table-cell table:formula="of:=IF([.D7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DEC2HEX([.C789])" office:value-type="string" office:string-value="ED5A4" calcext:value-type="string">
            <text:p>ED5A4</text:p>
          </table:table-cell>
          <table:table-cell office:value-type="float" office:value="972196" calcext:value-type="float">
            <text:p>972196</text:p>
          </table:table-cell>
          <table:table-cell office:value-type="float" office:value="4" calcext:value-type="float">
            <text:p>4</text:p>
          </table:table-cell>
          <table:table-cell table:formula="of:=IF([.D7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DEC2HEX([.C790])" office:value-type="string" office:string-value="ED5A8" calcext:value-type="string">
            <text:p>ED5A8</text:p>
          </table:table-cell>
          <table:table-cell office:value-type="float" office:value="972200" calcext:value-type="float">
            <text:p>972200</text:p>
          </table:table-cell>
          <table:table-cell office:value-type="float" office:value="4" calcext:value-type="float">
            <text:p>4</text:p>
          </table:table-cell>
          <table:table-cell table:formula="of:=IF([.D7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DEC2HEX([.C791])" office:value-type="string" office:string-value="ED5AC" calcext:value-type="string">
            <text:p>ED5AC</text:p>
          </table:table-cell>
          <table:table-cell office:value-type="float" office:value="972204" calcext:value-type="float">
            <text:p>972204</text:p>
          </table:table-cell>
          <table:table-cell office:value-type="float" office:value="4" calcext:value-type="float">
            <text:p>4</text:p>
          </table:table-cell>
          <table:table-cell table:formula="of:=IF([.D7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DEC2HEX([.C792])" office:value-type="string" office:string-value="ED5B0" calcext:value-type="string">
            <text:p>ED5B0</text:p>
          </table:table-cell>
          <table:table-cell office:value-type="float" office:value="972208" calcext:value-type="float">
            <text:p>972208</text:p>
          </table:table-cell>
          <table:table-cell office:value-type="float" office:value="4" calcext:value-type="float">
            <text:p>4</text:p>
          </table:table-cell>
          <table:table-cell table:formula="of:=IF([.D7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DEC2HEX([.C793])" office:value-type="string" office:string-value="ED5B4" calcext:value-type="string">
            <text:p>ED5B4</text:p>
          </table:table-cell>
          <table:table-cell office:value-type="float" office:value="972212" calcext:value-type="float">
            <text:p>972212</text:p>
          </table:table-cell>
          <table:table-cell office:value-type="float" office:value="4" calcext:value-type="float">
            <text:p>4</text:p>
          </table:table-cell>
          <table:table-cell table:formula="of:=IF([.D7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DEC2HEX([.C794])" office:value-type="string" office:string-value="ED5B8" calcext:value-type="string">
            <text:p>ED5B8</text:p>
          </table:table-cell>
          <table:table-cell office:value-type="float" office:value="972216" calcext:value-type="float">
            <text:p>972216</text:p>
          </table:table-cell>
          <table:table-cell office:value-type="float" office:value="4" calcext:value-type="float">
            <text:p>4</text:p>
          </table:table-cell>
          <table:table-cell table:formula="of:=IF([.D7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DEC2HEX([.C795])" office:value-type="string" office:string-value="ED5BC" calcext:value-type="string">
            <text:p>ED5BC</text:p>
          </table:table-cell>
          <table:table-cell office:value-type="float" office:value="972220" calcext:value-type="float">
            <text:p>972220</text:p>
          </table:table-cell>
          <table:table-cell office:value-type="float" office:value="11" calcext:value-type="float">
            <text:p>11</text:p>
          </table:table-cell>
          <table:table-cell table:formula="of:=IF([.D7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DEC2HEX([.C796])" office:value-type="string" office:string-value="ED5C7" calcext:value-type="string">
            <text:p>ED5C7</text:p>
          </table:table-cell>
          <table:table-cell office:value-type="float" office:value="972231" calcext:value-type="float">
            <text:p>972231</text:p>
          </table:table-cell>
          <table:table-cell office:value-type="float" office:value="4" calcext:value-type="float">
            <text:p>4</text:p>
          </table:table-cell>
          <table:table-cell table:formula="of:=IF([.D7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DEC2HEX([.C797])" office:value-type="string" office:string-value="ED5CB" calcext:value-type="string">
            <text:p>ED5CB</text:p>
          </table:table-cell>
          <table:table-cell office:value-type="float" office:value="972235" calcext:value-type="float">
            <text:p>972235</text:p>
          </table:table-cell>
          <table:table-cell office:value-type="float" office:value="4" calcext:value-type="float">
            <text:p>4</text:p>
          </table:table-cell>
          <table:table-cell table:formula="of:=IF([.D7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DEC2HEX([.C798])" office:value-type="string" office:string-value="ED5CF" calcext:value-type="string">
            <text:p>ED5CF</text:p>
          </table:table-cell>
          <table:table-cell office:value-type="float" office:value="972239" calcext:value-type="float">
            <text:p>972239</text:p>
          </table:table-cell>
          <table:table-cell office:value-type="float" office:value="4" calcext:value-type="float">
            <text:p>4</text:p>
          </table:table-cell>
          <table:table-cell table:formula="of:=IF([.D7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DEC2HEX([.C799])" office:value-type="string" office:string-value="ED5D3" calcext:value-type="string">
            <text:p>ED5D3</text:p>
          </table:table-cell>
          <table:table-cell office:value-type="float" office:value="972243" calcext:value-type="float">
            <text:p>972243</text:p>
          </table:table-cell>
          <table:table-cell office:value-type="float" office:value="4" calcext:value-type="float">
            <text:p>4</text:p>
          </table:table-cell>
          <table:table-cell table:formula="of:=IF([.D7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DEC2HEX([.C800])" office:value-type="string" office:string-value="ED5D7" calcext:value-type="string">
            <text:p>ED5D7</text:p>
          </table:table-cell>
          <table:table-cell office:value-type="float" office:value="972247" calcext:value-type="float">
            <text:p>972247</text:p>
          </table:table-cell>
          <table:table-cell office:value-type="float" office:value="4" calcext:value-type="float">
            <text:p>4</text:p>
          </table:table-cell>
          <table:table-cell table:formula="of:=IF([.D8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DEC2HEX([.C801])" office:value-type="string" office:string-value="ED5DB" calcext:value-type="string">
            <text:p>ED5DB</text:p>
          </table:table-cell>
          <table:table-cell office:value-type="float" office:value="972251" calcext:value-type="float">
            <text:p>972251</text:p>
          </table:table-cell>
          <table:table-cell office:value-type="float" office:value="4" calcext:value-type="float">
            <text:p>4</text:p>
          </table:table-cell>
          <table:table-cell table:formula="of:=IF([.D8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DEC2HEX([.C802])" office:value-type="string" office:string-value="ED5DF" calcext:value-type="string">
            <text:p>ED5DF</text:p>
          </table:table-cell>
          <table:table-cell office:value-type="float" office:value="972255" calcext:value-type="float">
            <text:p>972255</text:p>
          </table:table-cell>
          <table:table-cell office:value-type="float" office:value="4" calcext:value-type="float">
            <text:p>4</text:p>
          </table:table-cell>
          <table:table-cell table:formula="of:=IF([.D8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DEC2HEX([.C803])" office:value-type="string" office:string-value="ED5E3" calcext:value-type="string">
            <text:p>ED5E3</text:p>
          </table:table-cell>
          <table:table-cell office:value-type="float" office:value="972259" calcext:value-type="float">
            <text:p>972259</text:p>
          </table:table-cell>
          <table:table-cell office:value-type="float" office:value="1" calcext:value-type="float">
            <text:p>1</text:p>
          </table:table-cell>
          <table:table-cell table:formula="of:=IF([.D8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DEC2HEX([.C804])" office:value-type="string" office:string-value="ED5E4" calcext:value-type="string">
            <text:p>ED5E4</text:p>
          </table:table-cell>
          <table:table-cell office:value-type="float" office:value="972260" calcext:value-type="float">
            <text:p>972260</text:p>
          </table:table-cell>
          <table:table-cell office:value-type="float" office:value="4" calcext:value-type="float">
            <text:p>4</text:p>
          </table:table-cell>
          <table:table-cell table:formula="of:=IF([.D8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DEC2HEX([.C805])" office:value-type="string" office:string-value="ED5E8" calcext:value-type="string">
            <text:p>ED5E8</text:p>
          </table:table-cell>
          <table:table-cell office:value-type="float" office:value="972264" calcext:value-type="float">
            <text:p>972264</text:p>
          </table:table-cell>
          <table:table-cell office:value-type="float" office:value="4" calcext:value-type="float">
            <text:p>4</text:p>
          </table:table-cell>
          <table:table-cell table:formula="of:=IF([.D8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DEC2HEX([.C806])" office:value-type="string" office:string-value="ED5EC" calcext:value-type="string">
            <text:p>ED5EC</text:p>
          </table:table-cell>
          <table:table-cell office:value-type="float" office:value="972268" calcext:value-type="float">
            <text:p>972268</text:p>
          </table:table-cell>
          <table:table-cell office:value-type="float" office:value="4" calcext:value-type="float">
            <text:p>4</text:p>
          </table:table-cell>
          <table:table-cell table:formula="of:=IF([.D8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DEC2HEX([.C807])" office:value-type="string" office:string-value="ED5F0" calcext:value-type="string">
            <text:p>ED5F0</text:p>
          </table:table-cell>
          <table:table-cell office:value-type="float" office:value="972272" calcext:value-type="float">
            <text:p>972272</text:p>
          </table:table-cell>
          <table:table-cell office:value-type="float" office:value="4" calcext:value-type="float">
            <text:p>4</text:p>
          </table:table-cell>
          <table:table-cell table:formula="of:=IF([.D8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DEC2HEX([.C808])" office:value-type="string" office:string-value="ED5F4" calcext:value-type="string">
            <text:p>ED5F4</text:p>
          </table:table-cell>
          <table:table-cell office:value-type="float" office:value="972276" calcext:value-type="float">
            <text:p>972276</text:p>
          </table:table-cell>
          <table:table-cell office:value-type="float" office:value="4" calcext:value-type="float">
            <text:p>4</text:p>
          </table:table-cell>
          <table:table-cell table:formula="of:=IF([.D8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DEC2HEX([.C809])" office:value-type="string" office:string-value="ED5F8" calcext:value-type="string">
            <text:p>ED5F8</text:p>
          </table:table-cell>
          <table:table-cell office:value-type="float" office:value="972280" calcext:value-type="float">
            <text:p>972280</text:p>
          </table:table-cell>
          <table:table-cell office:value-type="float" office:value="4" calcext:value-type="float">
            <text:p>4</text:p>
          </table:table-cell>
          <table:table-cell table:formula="of:=IF([.D8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DEC2HEX([.C810])" office:value-type="string" office:string-value="ED5FC" calcext:value-type="string">
            <text:p>ED5FC</text:p>
          </table:table-cell>
          <table:table-cell office:value-type="float" office:value="972284" calcext:value-type="float">
            <text:p>972284</text:p>
          </table:table-cell>
          <table:table-cell office:value-type="float" office:value="11" calcext:value-type="float">
            <text:p>11</text:p>
          </table:table-cell>
          <table:table-cell table:formula="of:=IF([.D8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DEC2HEX([.C811])" office:value-type="string" office:string-value="ED607" calcext:value-type="string">
            <text:p>ED607</text:p>
          </table:table-cell>
          <table:table-cell office:value-type="float" office:value="972295" calcext:value-type="float">
            <text:p>972295</text:p>
          </table:table-cell>
          <table:table-cell office:value-type="float" office:value="4" calcext:value-type="float">
            <text:p>4</text:p>
          </table:table-cell>
          <table:table-cell table:formula="of:=IF([.D8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DEC2HEX([.C812])" office:value-type="string" office:string-value="ED60B" calcext:value-type="string">
            <text:p>ED60B</text:p>
          </table:table-cell>
          <table:table-cell office:value-type="float" office:value="972299" calcext:value-type="float">
            <text:p>972299</text:p>
          </table:table-cell>
          <table:table-cell office:value-type="float" office:value="4" calcext:value-type="float">
            <text:p>4</text:p>
          </table:table-cell>
          <table:table-cell table:formula="of:=IF([.D8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DEC2HEX([.C813])" office:value-type="string" office:string-value="ED60F" calcext:value-type="string">
            <text:p>ED60F</text:p>
          </table:table-cell>
          <table:table-cell office:value-type="float" office:value="972303" calcext:value-type="float">
            <text:p>972303</text:p>
          </table:table-cell>
          <table:table-cell office:value-type="float" office:value="4" calcext:value-type="float">
            <text:p>4</text:p>
          </table:table-cell>
          <table:table-cell table:formula="of:=IF([.D8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DEC2HEX([.C814])" office:value-type="string" office:string-value="ED613" calcext:value-type="string">
            <text:p>ED613</text:p>
          </table:table-cell>
          <table:table-cell office:value-type="float" office:value="972307" calcext:value-type="float">
            <text:p>972307</text:p>
          </table:table-cell>
          <table:table-cell office:value-type="float" office:value="4" calcext:value-type="float">
            <text:p>4</text:p>
          </table:table-cell>
          <table:table-cell table:formula="of:=IF([.D8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DEC2HEX([.C815])" office:value-type="string" office:string-value="ED617" calcext:value-type="string">
            <text:p>ED617</text:p>
          </table:table-cell>
          <table:table-cell office:value-type="float" office:value="972311" calcext:value-type="float">
            <text:p>972311</text:p>
          </table:table-cell>
          <table:table-cell office:value-type="float" office:value="4" calcext:value-type="float">
            <text:p>4</text:p>
          </table:table-cell>
          <table:table-cell table:formula="of:=IF([.D8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DEC2HEX([.C816])" office:value-type="string" office:string-value="ED61B" calcext:value-type="string">
            <text:p>ED61B</text:p>
          </table:table-cell>
          <table:table-cell office:value-type="float" office:value="972315" calcext:value-type="float">
            <text:p>972315</text:p>
          </table:table-cell>
          <table:table-cell office:value-type="float" office:value="4" calcext:value-type="float">
            <text:p>4</text:p>
          </table:table-cell>
          <table:table-cell table:formula="of:=IF([.D8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DEC2HEX([.C817])" office:value-type="string" office:string-value="ED61F" calcext:value-type="string">
            <text:p>ED61F</text:p>
          </table:table-cell>
          <table:table-cell office:value-type="float" office:value="972319" calcext:value-type="float">
            <text:p>972319</text:p>
          </table:table-cell>
          <table:table-cell office:value-type="float" office:value="4" calcext:value-type="float">
            <text:p>4</text:p>
          </table:table-cell>
          <table:table-cell table:formula="of:=IF([.D8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DEC2HEX([.C818])" office:value-type="string" office:string-value="ED623" calcext:value-type="string">
            <text:p>ED623</text:p>
          </table:table-cell>
          <table:table-cell office:value-type="float" office:value="972323" calcext:value-type="float">
            <text:p>972323</text:p>
          </table:table-cell>
          <table:table-cell office:value-type="float" office:value="1" calcext:value-type="float">
            <text:p>1</text:p>
          </table:table-cell>
          <table:table-cell table:formula="of:=IF([.D8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DEC2HEX([.C819])" office:value-type="string" office:string-value="ED624" calcext:value-type="string">
            <text:p>ED624</text:p>
          </table:table-cell>
          <table:table-cell office:value-type="float" office:value="972324" calcext:value-type="float">
            <text:p>972324</text:p>
          </table:table-cell>
          <table:table-cell office:value-type="float" office:value="4" calcext:value-type="float">
            <text:p>4</text:p>
          </table:table-cell>
          <table:table-cell table:formula="of:=IF([.D8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DEC2HEX([.C820])" office:value-type="string" office:string-value="ED628" calcext:value-type="string">
            <text:p>ED628</text:p>
          </table:table-cell>
          <table:table-cell office:value-type="float" office:value="972328" calcext:value-type="float">
            <text:p>972328</text:p>
          </table:table-cell>
          <table:table-cell office:value-type="float" office:value="4" calcext:value-type="float">
            <text:p>4</text:p>
          </table:table-cell>
          <table:table-cell table:formula="of:=IF([.D8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DEC2HEX([.C821])" office:value-type="string" office:string-value="ED62C" calcext:value-type="string">
            <text:p>ED62C</text:p>
          </table:table-cell>
          <table:table-cell office:value-type="float" office:value="972332" calcext:value-type="float">
            <text:p>972332</text:p>
          </table:table-cell>
          <table:table-cell office:value-type="float" office:value="4" calcext:value-type="float">
            <text:p>4</text:p>
          </table:table-cell>
          <table:table-cell table:formula="of:=IF([.D8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DEC2HEX([.C822])" office:value-type="string" office:string-value="ED630" calcext:value-type="string">
            <text:p>ED630</text:p>
          </table:table-cell>
          <table:table-cell office:value-type="float" office:value="972336" calcext:value-type="float">
            <text:p>972336</text:p>
          </table:table-cell>
          <table:table-cell office:value-type="float" office:value="4" calcext:value-type="float">
            <text:p>4</text:p>
          </table:table-cell>
          <table:table-cell table:formula="of:=IF([.D8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DEC2HEX([.C823])" office:value-type="string" office:string-value="ED634" calcext:value-type="string">
            <text:p>ED634</text:p>
          </table:table-cell>
          <table:table-cell office:value-type="float" office:value="972340" calcext:value-type="float">
            <text:p>972340</text:p>
          </table:table-cell>
          <table:table-cell office:value-type="float" office:value="4" calcext:value-type="float">
            <text:p>4</text:p>
          </table:table-cell>
          <table:table-cell table:formula="of:=IF([.D8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DEC2HEX([.C824])" office:value-type="string" office:string-value="ED638" calcext:value-type="string">
            <text:p>ED638</text:p>
          </table:table-cell>
          <table:table-cell office:value-type="float" office:value="972344" calcext:value-type="float">
            <text:p>972344</text:p>
          </table:table-cell>
          <table:table-cell office:value-type="float" office:value="4" calcext:value-type="float">
            <text:p>4</text:p>
          </table:table-cell>
          <table:table-cell table:formula="of:=IF([.D8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DEC2HEX([.C825])" office:value-type="string" office:string-value="ED63C" calcext:value-type="string">
            <text:p>ED63C</text:p>
          </table:table-cell>
          <table:table-cell office:value-type="float" office:value="972348" calcext:value-type="float">
            <text:p>972348</text:p>
          </table:table-cell>
          <table:table-cell office:value-type="float" office:value="11" calcext:value-type="float">
            <text:p>11</text:p>
          </table:table-cell>
          <table:table-cell table:formula="of:=IF([.D8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DEC2HEX([.C826])" office:value-type="string" office:string-value="ED647" calcext:value-type="string">
            <text:p>ED647</text:p>
          </table:table-cell>
          <table:table-cell office:value-type="float" office:value="972359" calcext:value-type="float">
            <text:p>972359</text:p>
          </table:table-cell>
          <table:table-cell office:value-type="float" office:value="4" calcext:value-type="float">
            <text:p>4</text:p>
          </table:table-cell>
          <table:table-cell table:formula="of:=IF([.D8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DEC2HEX([.C827])" office:value-type="string" office:string-value="ED64B" calcext:value-type="string">
            <text:p>ED64B</text:p>
          </table:table-cell>
          <table:table-cell office:value-type="float" office:value="972363" calcext:value-type="float">
            <text:p>972363</text:p>
          </table:table-cell>
          <table:table-cell office:value-type="float" office:value="4" calcext:value-type="float">
            <text:p>4</text:p>
          </table:table-cell>
          <table:table-cell table:formula="of:=IF([.D8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DEC2HEX([.C828])" office:value-type="string" office:string-value="ED64F" calcext:value-type="string">
            <text:p>ED64F</text:p>
          </table:table-cell>
          <table:table-cell office:value-type="float" office:value="972367" calcext:value-type="float">
            <text:p>972367</text:p>
          </table:table-cell>
          <table:table-cell office:value-type="float" office:value="4" calcext:value-type="float">
            <text:p>4</text:p>
          </table:table-cell>
          <table:table-cell table:formula="of:=IF([.D8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DEC2HEX([.C829])" office:value-type="string" office:string-value="ED653" calcext:value-type="string">
            <text:p>ED653</text:p>
          </table:table-cell>
          <table:table-cell office:value-type="float" office:value="972371" calcext:value-type="float">
            <text:p>972371</text:p>
          </table:table-cell>
          <table:table-cell office:value-type="float" office:value="4" calcext:value-type="float">
            <text:p>4</text:p>
          </table:table-cell>
          <table:table-cell table:formula="of:=IF([.D8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DEC2HEX([.C830])" office:value-type="string" office:string-value="ED657" calcext:value-type="string">
            <text:p>ED657</text:p>
          </table:table-cell>
          <table:table-cell office:value-type="float" office:value="972375" calcext:value-type="float">
            <text:p>972375</text:p>
          </table:table-cell>
          <table:table-cell office:value-type="float" office:value="4" calcext:value-type="float">
            <text:p>4</text:p>
          </table:table-cell>
          <table:table-cell table:formula="of:=IF([.D8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DEC2HEX([.C831])" office:value-type="string" office:string-value="ED65B" calcext:value-type="string">
            <text:p>ED65B</text:p>
          </table:table-cell>
          <table:table-cell office:value-type="float" office:value="972379" calcext:value-type="float">
            <text:p>972379</text:p>
          </table:table-cell>
          <table:table-cell office:value-type="float" office:value="4" calcext:value-type="float">
            <text:p>4</text:p>
          </table:table-cell>
          <table:table-cell table:formula="of:=IF([.D8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DEC2HEX([.C832])" office:value-type="string" office:string-value="ED65F" calcext:value-type="string">
            <text:p>ED65F</text:p>
          </table:table-cell>
          <table:table-cell office:value-type="float" office:value="972383" calcext:value-type="float">
            <text:p>972383</text:p>
          </table:table-cell>
          <table:table-cell office:value-type="float" office:value="4" calcext:value-type="float">
            <text:p>4</text:p>
          </table:table-cell>
          <table:table-cell table:formula="of:=IF([.D8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DEC2HEX([.C833])" office:value-type="string" office:string-value="ED663" calcext:value-type="string">
            <text:p>ED663</text:p>
          </table:table-cell>
          <table:table-cell office:value-type="float" office:value="972387" calcext:value-type="float">
            <text:p>972387</text:p>
          </table:table-cell>
          <table:table-cell office:value-type="float" office:value="1" calcext:value-type="float">
            <text:p>1</text:p>
          </table:table-cell>
          <table:table-cell table:formula="of:=IF([.D8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DEC2HEX([.C834])" office:value-type="string" office:string-value="ED664" calcext:value-type="string">
            <text:p>ED664</text:p>
          </table:table-cell>
          <table:table-cell office:value-type="float" office:value="972388" calcext:value-type="float">
            <text:p>972388</text:p>
          </table:table-cell>
          <table:table-cell office:value-type="float" office:value="4" calcext:value-type="float">
            <text:p>4</text:p>
          </table:table-cell>
          <table:table-cell table:formula="of:=IF([.D8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DEC2HEX([.C835])" office:value-type="string" office:string-value="ED668" calcext:value-type="string">
            <text:p>ED668</text:p>
          </table:table-cell>
          <table:table-cell office:value-type="float" office:value="972392" calcext:value-type="float">
            <text:p>972392</text:p>
          </table:table-cell>
          <table:table-cell office:value-type="float" office:value="4" calcext:value-type="float">
            <text:p>4</text:p>
          </table:table-cell>
          <table:table-cell table:formula="of:=IF([.D8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DEC2HEX([.C836])" office:value-type="string" office:string-value="ED66C" calcext:value-type="string">
            <text:p>ED66C</text:p>
          </table:table-cell>
          <table:table-cell office:value-type="float" office:value="972396" calcext:value-type="float">
            <text:p>972396</text:p>
          </table:table-cell>
          <table:table-cell office:value-type="float" office:value="4" calcext:value-type="float">
            <text:p>4</text:p>
          </table:table-cell>
          <table:table-cell table:formula="of:=IF([.D8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DEC2HEX([.C837])" office:value-type="string" office:string-value="ED670" calcext:value-type="string">
            <text:p>ED670</text:p>
          </table:table-cell>
          <table:table-cell office:value-type="float" office:value="972400" calcext:value-type="float">
            <text:p>972400</text:p>
          </table:table-cell>
          <table:table-cell office:value-type="float" office:value="4" calcext:value-type="float">
            <text:p>4</text:p>
          </table:table-cell>
          <table:table-cell table:formula="of:=IF([.D8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DEC2HEX([.C838])" office:value-type="string" office:string-value="ED674" calcext:value-type="string">
            <text:p>ED674</text:p>
          </table:table-cell>
          <table:table-cell office:value-type="float" office:value="972404" calcext:value-type="float">
            <text:p>972404</text:p>
          </table:table-cell>
          <table:table-cell office:value-type="float" office:value="4" calcext:value-type="float">
            <text:p>4</text:p>
          </table:table-cell>
          <table:table-cell table:formula="of:=IF([.D8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DEC2HEX([.C839])" office:value-type="string" office:string-value="ED678" calcext:value-type="string">
            <text:p>ED678</text:p>
          </table:table-cell>
          <table:table-cell office:value-type="float" office:value="972408" calcext:value-type="float">
            <text:p>972408</text:p>
          </table:table-cell>
          <table:table-cell office:value-type="float" office:value="4" calcext:value-type="float">
            <text:p>4</text:p>
          </table:table-cell>
          <table:table-cell table:formula="of:=IF([.D8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DEC2HEX([.C840])" office:value-type="string" office:string-value="ED67C" calcext:value-type="string">
            <text:p>ED67C</text:p>
          </table:table-cell>
          <table:table-cell office:value-type="float" office:value="972412" calcext:value-type="float">
            <text:p>972412</text:p>
          </table:table-cell>
          <table:table-cell office:value-type="float" office:value="11" calcext:value-type="float">
            <text:p>11</text:p>
          </table:table-cell>
          <table:table-cell table:formula="of:=IF([.D8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DEC2HEX([.C841])" office:value-type="string" office:string-value="ED687" calcext:value-type="string">
            <text:p>ED687</text:p>
          </table:table-cell>
          <table:table-cell office:value-type="float" office:value="972423" calcext:value-type="float">
            <text:p>972423</text:p>
          </table:table-cell>
          <table:table-cell office:value-type="float" office:value="4" calcext:value-type="float">
            <text:p>4</text:p>
          </table:table-cell>
          <table:table-cell table:formula="of:=IF([.D8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DEC2HEX([.C842])" office:value-type="string" office:string-value="ED68B" calcext:value-type="string">
            <text:p>ED68B</text:p>
          </table:table-cell>
          <table:table-cell office:value-type="float" office:value="972427" calcext:value-type="float">
            <text:p>972427</text:p>
          </table:table-cell>
          <table:table-cell office:value-type="float" office:value="4" calcext:value-type="float">
            <text:p>4</text:p>
          </table:table-cell>
          <table:table-cell table:formula="of:=IF([.D8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DEC2HEX([.C843])" office:value-type="string" office:string-value="ED68F" calcext:value-type="string">
            <text:p>ED68F</text:p>
          </table:table-cell>
          <table:table-cell office:value-type="float" office:value="972431" calcext:value-type="float">
            <text:p>972431</text:p>
          </table:table-cell>
          <table:table-cell office:value-type="float" office:value="4" calcext:value-type="float">
            <text:p>4</text:p>
          </table:table-cell>
          <table:table-cell table:formula="of:=IF([.D8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DEC2HEX([.C844])" office:value-type="string" office:string-value="ED693" calcext:value-type="string">
            <text:p>ED693</text:p>
          </table:table-cell>
          <table:table-cell office:value-type="float" office:value="972435" calcext:value-type="float">
            <text:p>972435</text:p>
          </table:table-cell>
          <table:table-cell office:value-type="float" office:value="4" calcext:value-type="float">
            <text:p>4</text:p>
          </table:table-cell>
          <table:table-cell table:formula="of:=IF([.D8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DEC2HEX([.C845])" office:value-type="string" office:string-value="ED697" calcext:value-type="string">
            <text:p>ED697</text:p>
          </table:table-cell>
          <table:table-cell office:value-type="float" office:value="972439" calcext:value-type="float">
            <text:p>972439</text:p>
          </table:table-cell>
          <table:table-cell office:value-type="float" office:value="4" calcext:value-type="float">
            <text:p>4</text:p>
          </table:table-cell>
          <table:table-cell table:formula="of:=IF([.D8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DEC2HEX([.C846])" office:value-type="string" office:string-value="ED69B" calcext:value-type="string">
            <text:p>ED69B</text:p>
          </table:table-cell>
          <table:table-cell office:value-type="float" office:value="972443" calcext:value-type="float">
            <text:p>972443</text:p>
          </table:table-cell>
          <table:table-cell office:value-type="float" office:value="4" calcext:value-type="float">
            <text:p>4</text:p>
          </table:table-cell>
          <table:table-cell table:formula="of:=IF([.D8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DEC2HEX([.C847])" office:value-type="string" office:string-value="ED69F" calcext:value-type="string">
            <text:p>ED69F</text:p>
          </table:table-cell>
          <table:table-cell office:value-type="float" office:value="972447" calcext:value-type="float">
            <text:p>972447</text:p>
          </table:table-cell>
          <table:table-cell office:value-type="float" office:value="4" calcext:value-type="float">
            <text:p>4</text:p>
          </table:table-cell>
          <table:table-cell table:formula="of:=IF([.D8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DEC2HEX([.C848])" office:value-type="string" office:string-value="ED6A3" calcext:value-type="string">
            <text:p>ED6A3</text:p>
          </table:table-cell>
          <table:table-cell office:value-type="float" office:value="972451" calcext:value-type="float">
            <text:p>972451</text:p>
          </table:table-cell>
          <table:table-cell office:value-type="float" office:value="1" calcext:value-type="float">
            <text:p>1</text:p>
          </table:table-cell>
          <table:table-cell table:formula="of:=IF([.D8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DEC2HEX([.C849])" office:value-type="string" office:string-value="ED6A4" calcext:value-type="string">
            <text:p>ED6A4</text:p>
          </table:table-cell>
          <table:table-cell office:value-type="float" office:value="972452" calcext:value-type="float">
            <text:p>972452</text:p>
          </table:table-cell>
          <table:table-cell office:value-type="float" office:value="4" calcext:value-type="float">
            <text:p>4</text:p>
          </table:table-cell>
          <table:table-cell table:formula="of:=IF([.D8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DEC2HEX([.C850])" office:value-type="string" office:string-value="ED6A8" calcext:value-type="string">
            <text:p>ED6A8</text:p>
          </table:table-cell>
          <table:table-cell office:value-type="float" office:value="972456" calcext:value-type="float">
            <text:p>972456</text:p>
          </table:table-cell>
          <table:table-cell office:value-type="float" office:value="4" calcext:value-type="float">
            <text:p>4</text:p>
          </table:table-cell>
          <table:table-cell table:formula="of:=IF([.D8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DEC2HEX([.C851])" office:value-type="string" office:string-value="ED6AC" calcext:value-type="string">
            <text:p>ED6AC</text:p>
          </table:table-cell>
          <table:table-cell office:value-type="float" office:value="972460" calcext:value-type="float">
            <text:p>972460</text:p>
          </table:table-cell>
          <table:table-cell office:value-type="float" office:value="4" calcext:value-type="float">
            <text:p>4</text:p>
          </table:table-cell>
          <table:table-cell table:formula="of:=IF([.D8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DEC2HEX([.C852])" office:value-type="string" office:string-value="ED6B0" calcext:value-type="string">
            <text:p>ED6B0</text:p>
          </table:table-cell>
          <table:table-cell office:value-type="float" office:value="972464" calcext:value-type="float">
            <text:p>972464</text:p>
          </table:table-cell>
          <table:table-cell office:value-type="float" office:value="4" calcext:value-type="float">
            <text:p>4</text:p>
          </table:table-cell>
          <table:table-cell table:formula="of:=IF([.D8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DEC2HEX([.C853])" office:value-type="string" office:string-value="ED6B4" calcext:value-type="string">
            <text:p>ED6B4</text:p>
          </table:table-cell>
          <table:table-cell office:value-type="float" office:value="972468" calcext:value-type="float">
            <text:p>972468</text:p>
          </table:table-cell>
          <table:table-cell office:value-type="float" office:value="4" calcext:value-type="float">
            <text:p>4</text:p>
          </table:table-cell>
          <table:table-cell table:formula="of:=IF([.D8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DEC2HEX([.C854])" office:value-type="string" office:string-value="ED6B8" calcext:value-type="string">
            <text:p>ED6B8</text:p>
          </table:table-cell>
          <table:table-cell office:value-type="float" office:value="972472" calcext:value-type="float">
            <text:p>972472</text:p>
          </table:table-cell>
          <table:table-cell office:value-type="float" office:value="4" calcext:value-type="float">
            <text:p>4</text:p>
          </table:table-cell>
          <table:table-cell table:formula="of:=IF([.D8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DEC2HEX([.C855])" office:value-type="string" office:string-value="ED6BC" calcext:value-type="string">
            <text:p>ED6BC</text:p>
          </table:table-cell>
          <table:table-cell office:value-type="float" office:value="972476" calcext:value-type="float">
            <text:p>972476</text:p>
          </table:table-cell>
          <table:table-cell office:value-type="float" office:value="11" calcext:value-type="float">
            <text:p>11</text:p>
          </table:table-cell>
          <table:table-cell table:formula="of:=IF([.D8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DEC2HEX([.C856])" office:value-type="string" office:string-value="ED6C7" calcext:value-type="string">
            <text:p>ED6C7</text:p>
          </table:table-cell>
          <table:table-cell office:value-type="float" office:value="972487" calcext:value-type="float">
            <text:p>972487</text:p>
          </table:table-cell>
          <table:table-cell office:value-type="float" office:value="4" calcext:value-type="float">
            <text:p>4</text:p>
          </table:table-cell>
          <table:table-cell table:formula="of:=IF([.D8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DEC2HEX([.C857])" office:value-type="string" office:string-value="ED6CB" calcext:value-type="string">
            <text:p>ED6CB</text:p>
          </table:table-cell>
          <table:table-cell office:value-type="float" office:value="972491" calcext:value-type="float">
            <text:p>972491</text:p>
          </table:table-cell>
          <table:table-cell office:value-type="float" office:value="4" calcext:value-type="float">
            <text:p>4</text:p>
          </table:table-cell>
          <table:table-cell table:formula="of:=IF([.D8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DEC2HEX([.C858])" office:value-type="string" office:string-value="ED6CF" calcext:value-type="string">
            <text:p>ED6CF</text:p>
          </table:table-cell>
          <table:table-cell office:value-type="float" office:value="972495" calcext:value-type="float">
            <text:p>972495</text:p>
          </table:table-cell>
          <table:table-cell office:value-type="float" office:value="4" calcext:value-type="float">
            <text:p>4</text:p>
          </table:table-cell>
          <table:table-cell table:formula="of:=IF([.D8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DEC2HEX([.C859])" office:value-type="string" office:string-value="ED6D3" calcext:value-type="string">
            <text:p>ED6D3</text:p>
          </table:table-cell>
          <table:table-cell office:value-type="float" office:value="972499" calcext:value-type="float">
            <text:p>972499</text:p>
          </table:table-cell>
          <table:table-cell office:value-type="float" office:value="4" calcext:value-type="float">
            <text:p>4</text:p>
          </table:table-cell>
          <table:table-cell table:formula="of:=IF([.D8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DEC2HEX([.C860])" office:value-type="string" office:string-value="ED6D7" calcext:value-type="string">
            <text:p>ED6D7</text:p>
          </table:table-cell>
          <table:table-cell office:value-type="float" office:value="972503" calcext:value-type="float">
            <text:p>972503</text:p>
          </table:table-cell>
          <table:table-cell office:value-type="float" office:value="4" calcext:value-type="float">
            <text:p>4</text:p>
          </table:table-cell>
          <table:table-cell table:formula="of:=IF([.D8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DEC2HEX([.C861])" office:value-type="string" office:string-value="ED6DB" calcext:value-type="string">
            <text:p>ED6DB</text:p>
          </table:table-cell>
          <table:table-cell office:value-type="float" office:value="972507" calcext:value-type="float">
            <text:p>972507</text:p>
          </table:table-cell>
          <table:table-cell office:value-type="float" office:value="4" calcext:value-type="float">
            <text:p>4</text:p>
          </table:table-cell>
          <table:table-cell table:formula="of:=IF([.D8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DEC2HEX([.C862])" office:value-type="string" office:string-value="ED6DF" calcext:value-type="string">
            <text:p>ED6DF</text:p>
          </table:table-cell>
          <table:table-cell office:value-type="float" office:value="972511" calcext:value-type="float">
            <text:p>972511</text:p>
          </table:table-cell>
          <table:table-cell office:value-type="float" office:value="4" calcext:value-type="float">
            <text:p>4</text:p>
          </table:table-cell>
          <table:table-cell table:formula="of:=IF([.D8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DEC2HEX([.C863])" office:value-type="string" office:string-value="ED6E3" calcext:value-type="string">
            <text:p>ED6E3</text:p>
          </table:table-cell>
          <table:table-cell office:value-type="float" office:value="972515" calcext:value-type="float">
            <text:p>972515</text:p>
          </table:table-cell>
          <table:table-cell office:value-type="float" office:value="1" calcext:value-type="float">
            <text:p>1</text:p>
          </table:table-cell>
          <table:table-cell table:formula="of:=IF([.D8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DEC2HEX([.C864])" office:value-type="string" office:string-value="ED6E4" calcext:value-type="string">
            <text:p>ED6E4</text:p>
          </table:table-cell>
          <table:table-cell office:value-type="float" office:value="972516" calcext:value-type="float">
            <text:p>972516</text:p>
          </table:table-cell>
          <table:table-cell office:value-type="float" office:value="4" calcext:value-type="float">
            <text:p>4</text:p>
          </table:table-cell>
          <table:table-cell table:formula="of:=IF([.D8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DEC2HEX([.C865])" office:value-type="string" office:string-value="ED6E8" calcext:value-type="string">
            <text:p>ED6E8</text:p>
          </table:table-cell>
          <table:table-cell office:value-type="float" office:value="972520" calcext:value-type="float">
            <text:p>972520</text:p>
          </table:table-cell>
          <table:table-cell office:value-type="float" office:value="4" calcext:value-type="float">
            <text:p>4</text:p>
          </table:table-cell>
          <table:table-cell table:formula="of:=IF([.D8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DEC2HEX([.C866])" office:value-type="string" office:string-value="ED6EC" calcext:value-type="string">
            <text:p>ED6EC</text:p>
          </table:table-cell>
          <table:table-cell office:value-type="float" office:value="972524" calcext:value-type="float">
            <text:p>972524</text:p>
          </table:table-cell>
          <table:table-cell office:value-type="float" office:value="4" calcext:value-type="float">
            <text:p>4</text:p>
          </table:table-cell>
          <table:table-cell table:formula="of:=IF([.D8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DEC2HEX([.C867])" office:value-type="string" office:string-value="ED6F0" calcext:value-type="string">
            <text:p>ED6F0</text:p>
          </table:table-cell>
          <table:table-cell office:value-type="float" office:value="972528" calcext:value-type="float">
            <text:p>972528</text:p>
          </table:table-cell>
          <table:table-cell office:value-type="float" office:value="4" calcext:value-type="float">
            <text:p>4</text:p>
          </table:table-cell>
          <table:table-cell table:formula="of:=IF([.D8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DEC2HEX([.C868])" office:value-type="string" office:string-value="ED6F4" calcext:value-type="string">
            <text:p>ED6F4</text:p>
          </table:table-cell>
          <table:table-cell office:value-type="float" office:value="972532" calcext:value-type="float">
            <text:p>972532</text:p>
          </table:table-cell>
          <table:table-cell office:value-type="float" office:value="4" calcext:value-type="float">
            <text:p>4</text:p>
          </table:table-cell>
          <table:table-cell table:formula="of:=IF([.D8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DEC2HEX([.C869])" office:value-type="string" office:string-value="ED6F8" calcext:value-type="string">
            <text:p>ED6F8</text:p>
          </table:table-cell>
          <table:table-cell office:value-type="float" office:value="972536" calcext:value-type="float">
            <text:p>972536</text:p>
          </table:table-cell>
          <table:table-cell office:value-type="float" office:value="4" calcext:value-type="float">
            <text:p>4</text:p>
          </table:table-cell>
          <table:table-cell table:formula="of:=IF([.D8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DEC2HEX([.C870])" office:value-type="string" office:string-value="ED6FC" calcext:value-type="string">
            <text:p>ED6FC</text:p>
          </table:table-cell>
          <table:table-cell office:value-type="float" office:value="972540" calcext:value-type="float">
            <text:p>972540</text:p>
          </table:table-cell>
          <table:table-cell office:value-type="float" office:value="11" calcext:value-type="float">
            <text:p>11</text:p>
          </table:table-cell>
          <table:table-cell table:formula="of:=IF([.D8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DEC2HEX([.C871])" office:value-type="string" office:string-value="ED707" calcext:value-type="string">
            <text:p>ED707</text:p>
          </table:table-cell>
          <table:table-cell office:value-type="float" office:value="972551" calcext:value-type="float">
            <text:p>972551</text:p>
          </table:table-cell>
          <table:table-cell office:value-type="float" office:value="4" calcext:value-type="float">
            <text:p>4</text:p>
          </table:table-cell>
          <table:table-cell table:formula="of:=IF([.D8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DEC2HEX([.C872])" office:value-type="string" office:string-value="ED70B" calcext:value-type="string">
            <text:p>ED70B</text:p>
          </table:table-cell>
          <table:table-cell office:value-type="float" office:value="972555" calcext:value-type="float">
            <text:p>972555</text:p>
          </table:table-cell>
          <table:table-cell office:value-type="float" office:value="4" calcext:value-type="float">
            <text:p>4</text:p>
          </table:table-cell>
          <table:table-cell table:formula="of:=IF([.D8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DEC2HEX([.C873])" office:value-type="string" office:string-value="ED70F" calcext:value-type="string">
            <text:p>ED70F</text:p>
          </table:table-cell>
          <table:table-cell office:value-type="float" office:value="972559" calcext:value-type="float">
            <text:p>972559</text:p>
          </table:table-cell>
          <table:table-cell office:value-type="float" office:value="4" calcext:value-type="float">
            <text:p>4</text:p>
          </table:table-cell>
          <table:table-cell table:formula="of:=IF([.D8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DEC2HEX([.C874])" office:value-type="string" office:string-value="ED713" calcext:value-type="string">
            <text:p>ED713</text:p>
          </table:table-cell>
          <table:table-cell office:value-type="float" office:value="972563" calcext:value-type="float">
            <text:p>972563</text:p>
          </table:table-cell>
          <table:table-cell office:value-type="float" office:value="4" calcext:value-type="float">
            <text:p>4</text:p>
          </table:table-cell>
          <table:table-cell table:formula="of:=IF([.D8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DEC2HEX([.C875])" office:value-type="string" office:string-value="ED717" calcext:value-type="string">
            <text:p>ED717</text:p>
          </table:table-cell>
          <table:table-cell office:value-type="float" office:value="972567" calcext:value-type="float">
            <text:p>972567</text:p>
          </table:table-cell>
          <table:table-cell office:value-type="float" office:value="4" calcext:value-type="float">
            <text:p>4</text:p>
          </table:table-cell>
          <table:table-cell table:formula="of:=IF([.D8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DEC2HEX([.C876])" office:value-type="string" office:string-value="ED71B" calcext:value-type="string">
            <text:p>ED71B</text:p>
          </table:table-cell>
          <table:table-cell office:value-type="float" office:value="972571" calcext:value-type="float">
            <text:p>972571</text:p>
          </table:table-cell>
          <table:table-cell office:value-type="float" office:value="4" calcext:value-type="float">
            <text:p>4</text:p>
          </table:table-cell>
          <table:table-cell table:formula="of:=IF([.D8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DEC2HEX([.C877])" office:value-type="string" office:string-value="ED71F" calcext:value-type="string">
            <text:p>ED71F</text:p>
          </table:table-cell>
          <table:table-cell office:value-type="float" office:value="972575" calcext:value-type="float">
            <text:p>972575</text:p>
          </table:table-cell>
          <table:table-cell office:value-type="float" office:value="4" calcext:value-type="float">
            <text:p>4</text:p>
          </table:table-cell>
          <table:table-cell table:formula="of:=IF([.D8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DEC2HEX([.C878])" office:value-type="string" office:string-value="ED723" calcext:value-type="string">
            <text:p>ED723</text:p>
          </table:table-cell>
          <table:table-cell office:value-type="float" office:value="972579" calcext:value-type="float">
            <text:p>972579</text:p>
          </table:table-cell>
          <table:table-cell office:value-type="float" office:value="1" calcext:value-type="float">
            <text:p>1</text:p>
          </table:table-cell>
          <table:table-cell table:formula="of:=IF([.D8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DEC2HEX([.C879])" office:value-type="string" office:string-value="ED724" calcext:value-type="string">
            <text:p>ED724</text:p>
          </table:table-cell>
          <table:table-cell office:value-type="float" office:value="972580" calcext:value-type="float">
            <text:p>972580</text:p>
          </table:table-cell>
          <table:table-cell office:value-type="float" office:value="4" calcext:value-type="float">
            <text:p>4</text:p>
          </table:table-cell>
          <table:table-cell table:formula="of:=IF([.D8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DEC2HEX([.C880])" office:value-type="string" office:string-value="ED728" calcext:value-type="string">
            <text:p>ED728</text:p>
          </table:table-cell>
          <table:table-cell office:value-type="float" office:value="972584" calcext:value-type="float">
            <text:p>972584</text:p>
          </table:table-cell>
          <table:table-cell office:value-type="float" office:value="4" calcext:value-type="float">
            <text:p>4</text:p>
          </table:table-cell>
          <table:table-cell table:formula="of:=IF([.D8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DEC2HEX([.C881])" office:value-type="string" office:string-value="ED72C" calcext:value-type="string">
            <text:p>ED72C</text:p>
          </table:table-cell>
          <table:table-cell office:value-type="float" office:value="972588" calcext:value-type="float">
            <text:p>972588</text:p>
          </table:table-cell>
          <table:table-cell office:value-type="float" office:value="4" calcext:value-type="float">
            <text:p>4</text:p>
          </table:table-cell>
          <table:table-cell table:formula="of:=IF([.D8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DEC2HEX([.C882])" office:value-type="string" office:string-value="ED730" calcext:value-type="string">
            <text:p>ED730</text:p>
          </table:table-cell>
          <table:table-cell office:value-type="float" office:value="972592" calcext:value-type="float">
            <text:p>972592</text:p>
          </table:table-cell>
          <table:table-cell office:value-type="float" office:value="4" calcext:value-type="float">
            <text:p>4</text:p>
          </table:table-cell>
          <table:table-cell table:formula="of:=IF([.D8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DEC2HEX([.C883])" office:value-type="string" office:string-value="ED734" calcext:value-type="string">
            <text:p>ED734</text:p>
          </table:table-cell>
          <table:table-cell office:value-type="float" office:value="972596" calcext:value-type="float">
            <text:p>972596</text:p>
          </table:table-cell>
          <table:table-cell office:value-type="float" office:value="4" calcext:value-type="float">
            <text:p>4</text:p>
          </table:table-cell>
          <table:table-cell table:formula="of:=IF([.D8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DEC2HEX([.C884])" office:value-type="string" office:string-value="ED738" calcext:value-type="string">
            <text:p>ED738</text:p>
          </table:table-cell>
          <table:table-cell office:value-type="float" office:value="972600" calcext:value-type="float">
            <text:p>972600</text:p>
          </table:table-cell>
          <table:table-cell office:value-type="float" office:value="4" calcext:value-type="float">
            <text:p>4</text:p>
          </table:table-cell>
          <table:table-cell table:formula="of:=IF([.D8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DEC2HEX([.C885])" office:value-type="string" office:string-value="ED73C" calcext:value-type="string">
            <text:p>ED73C</text:p>
          </table:table-cell>
          <table:table-cell office:value-type="float" office:value="972604" calcext:value-type="float">
            <text:p>972604</text:p>
          </table:table-cell>
          <table:table-cell office:value-type="float" office:value="11" calcext:value-type="float">
            <text:p>11</text:p>
          </table:table-cell>
          <table:table-cell table:formula="of:=IF([.D8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DEC2HEX([.C886])" office:value-type="string" office:string-value="ED747" calcext:value-type="string">
            <text:p>ED747</text:p>
          </table:table-cell>
          <table:table-cell office:value-type="float" office:value="972615" calcext:value-type="float">
            <text:p>972615</text:p>
          </table:table-cell>
          <table:table-cell office:value-type="float" office:value="4" calcext:value-type="float">
            <text:p>4</text:p>
          </table:table-cell>
          <table:table-cell table:formula="of:=IF([.D8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DEC2HEX([.C887])" office:value-type="string" office:string-value="ED74B" calcext:value-type="string">
            <text:p>ED74B</text:p>
          </table:table-cell>
          <table:table-cell office:value-type="float" office:value="972619" calcext:value-type="float">
            <text:p>972619</text:p>
          </table:table-cell>
          <table:table-cell office:value-type="float" office:value="4" calcext:value-type="float">
            <text:p>4</text:p>
          </table:table-cell>
          <table:table-cell table:formula="of:=IF([.D8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DEC2HEX([.C888])" office:value-type="string" office:string-value="ED74F" calcext:value-type="string">
            <text:p>ED74F</text:p>
          </table:table-cell>
          <table:table-cell office:value-type="float" office:value="972623" calcext:value-type="float">
            <text:p>972623</text:p>
          </table:table-cell>
          <table:table-cell office:value-type="float" office:value="4" calcext:value-type="float">
            <text:p>4</text:p>
          </table:table-cell>
          <table:table-cell table:formula="of:=IF([.D8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DEC2HEX([.C889])" office:value-type="string" office:string-value="ED753" calcext:value-type="string">
            <text:p>ED753</text:p>
          </table:table-cell>
          <table:table-cell office:value-type="float" office:value="972627" calcext:value-type="float">
            <text:p>972627</text:p>
          </table:table-cell>
          <table:table-cell office:value-type="float" office:value="4" calcext:value-type="float">
            <text:p>4</text:p>
          </table:table-cell>
          <table:table-cell table:formula="of:=IF([.D8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DEC2HEX([.C890])" office:value-type="string" office:string-value="ED757" calcext:value-type="string">
            <text:p>ED757</text:p>
          </table:table-cell>
          <table:table-cell office:value-type="float" office:value="972631" calcext:value-type="float">
            <text:p>972631</text:p>
          </table:table-cell>
          <table:table-cell office:value-type="float" office:value="4" calcext:value-type="float">
            <text:p>4</text:p>
          </table:table-cell>
          <table:table-cell table:formula="of:=IF([.D8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DEC2HEX([.C891])" office:value-type="string" office:string-value="ED75B" calcext:value-type="string">
            <text:p>ED75B</text:p>
          </table:table-cell>
          <table:table-cell office:value-type="float" office:value="972635" calcext:value-type="float">
            <text:p>972635</text:p>
          </table:table-cell>
          <table:table-cell office:value-type="float" office:value="4" calcext:value-type="float">
            <text:p>4</text:p>
          </table:table-cell>
          <table:table-cell table:formula="of:=IF([.D8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DEC2HEX([.C892])" office:value-type="string" office:string-value="ED75F" calcext:value-type="string">
            <text:p>ED75F</text:p>
          </table:table-cell>
          <table:table-cell office:value-type="float" office:value="972639" calcext:value-type="float">
            <text:p>972639</text:p>
          </table:table-cell>
          <table:table-cell office:value-type="float" office:value="4" calcext:value-type="float">
            <text:p>4</text:p>
          </table:table-cell>
          <table:table-cell table:formula="of:=IF([.D8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DEC2HEX([.C893])" office:value-type="string" office:string-value="ED763" calcext:value-type="string">
            <text:p>ED763</text:p>
          </table:table-cell>
          <table:table-cell office:value-type="float" office:value="972643" calcext:value-type="float">
            <text:p>972643</text:p>
          </table:table-cell>
          <table:table-cell office:value-type="float" office:value="1" calcext:value-type="float">
            <text:p>1</text:p>
          </table:table-cell>
          <table:table-cell table:formula="of:=IF([.D8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DEC2HEX([.C894])" office:value-type="string" office:string-value="ED764" calcext:value-type="string">
            <text:p>ED764</text:p>
          </table:table-cell>
          <table:table-cell office:value-type="float" office:value="972644" calcext:value-type="float">
            <text:p>972644</text:p>
          </table:table-cell>
          <table:table-cell office:value-type="float" office:value="4" calcext:value-type="float">
            <text:p>4</text:p>
          </table:table-cell>
          <table:table-cell table:formula="of:=IF([.D8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DEC2HEX([.C895])" office:value-type="string" office:string-value="ED768" calcext:value-type="string">
            <text:p>ED768</text:p>
          </table:table-cell>
          <table:table-cell office:value-type="float" office:value="972648" calcext:value-type="float">
            <text:p>972648</text:p>
          </table:table-cell>
          <table:table-cell office:value-type="float" office:value="4" calcext:value-type="float">
            <text:p>4</text:p>
          </table:table-cell>
          <table:table-cell table:formula="of:=IF([.D8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DEC2HEX([.C896])" office:value-type="string" office:string-value="ED76C" calcext:value-type="string">
            <text:p>ED76C</text:p>
          </table:table-cell>
          <table:table-cell office:value-type="float" office:value="972652" calcext:value-type="float">
            <text:p>972652</text:p>
          </table:table-cell>
          <table:table-cell office:value-type="float" office:value="4" calcext:value-type="float">
            <text:p>4</text:p>
          </table:table-cell>
          <table:table-cell table:formula="of:=IF([.D8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DEC2HEX([.C897])" office:value-type="string" office:string-value="ED770" calcext:value-type="string">
            <text:p>ED770</text:p>
          </table:table-cell>
          <table:table-cell office:value-type="float" office:value="972656" calcext:value-type="float">
            <text:p>972656</text:p>
          </table:table-cell>
          <table:table-cell office:value-type="float" office:value="4" calcext:value-type="float">
            <text:p>4</text:p>
          </table:table-cell>
          <table:table-cell table:formula="of:=IF([.D8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DEC2HEX([.C898])" office:value-type="string" office:string-value="ED774" calcext:value-type="string">
            <text:p>ED774</text:p>
          </table:table-cell>
          <table:table-cell office:value-type="float" office:value="972660" calcext:value-type="float">
            <text:p>972660</text:p>
          </table:table-cell>
          <table:table-cell office:value-type="float" office:value="4" calcext:value-type="float">
            <text:p>4</text:p>
          </table:table-cell>
          <table:table-cell table:formula="of:=IF([.D8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DEC2HEX([.C899])" office:value-type="string" office:string-value="ED778" calcext:value-type="string">
            <text:p>ED778</text:p>
          </table:table-cell>
          <table:table-cell office:value-type="float" office:value="972664" calcext:value-type="float">
            <text:p>972664</text:p>
          </table:table-cell>
          <table:table-cell office:value-type="float" office:value="4" calcext:value-type="float">
            <text:p>4</text:p>
          </table:table-cell>
          <table:table-cell table:formula="of:=IF([.D8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DEC2HEX([.C900])" office:value-type="string" office:string-value="ED77C" calcext:value-type="string">
            <text:p>ED77C</text:p>
          </table:table-cell>
          <table:table-cell office:value-type="float" office:value="972668" calcext:value-type="float">
            <text:p>972668</text:p>
          </table:table-cell>
          <table:table-cell office:value-type="float" office:value="11" calcext:value-type="float">
            <text:p>11</text:p>
          </table:table-cell>
          <table:table-cell table:formula="of:=IF([.D9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DEC2HEX([.C901])" office:value-type="string" office:string-value="ED787" calcext:value-type="string">
            <text:p>ED787</text:p>
          </table:table-cell>
          <table:table-cell office:value-type="float" office:value="972679" calcext:value-type="float">
            <text:p>972679</text:p>
          </table:table-cell>
          <table:table-cell office:value-type="float" office:value="4" calcext:value-type="float">
            <text:p>4</text:p>
          </table:table-cell>
          <table:table-cell table:formula="of:=IF([.D9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DEC2HEX([.C902])" office:value-type="string" office:string-value="ED78B" calcext:value-type="string">
            <text:p>ED78B</text:p>
          </table:table-cell>
          <table:table-cell office:value-type="float" office:value="972683" calcext:value-type="float">
            <text:p>972683</text:p>
          </table:table-cell>
          <table:table-cell office:value-type="float" office:value="4" calcext:value-type="float">
            <text:p>4</text:p>
          </table:table-cell>
          <table:table-cell table:formula="of:=IF([.D9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DEC2HEX([.C903])" office:value-type="string" office:string-value="ED78F" calcext:value-type="string">
            <text:p>ED78F</text:p>
          </table:table-cell>
          <table:table-cell office:value-type="float" office:value="972687" calcext:value-type="float">
            <text:p>972687</text:p>
          </table:table-cell>
          <table:table-cell office:value-type="float" office:value="4" calcext:value-type="float">
            <text:p>4</text:p>
          </table:table-cell>
          <table:table-cell table:formula="of:=IF([.D9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DEC2HEX([.C904])" office:value-type="string" office:string-value="ED793" calcext:value-type="string">
            <text:p>ED793</text:p>
          </table:table-cell>
          <table:table-cell office:value-type="float" office:value="972691" calcext:value-type="float">
            <text:p>972691</text:p>
          </table:table-cell>
          <table:table-cell office:value-type="float" office:value="4" calcext:value-type="float">
            <text:p>4</text:p>
          </table:table-cell>
          <table:table-cell table:formula="of:=IF([.D9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DEC2HEX([.C905])" office:value-type="string" office:string-value="ED797" calcext:value-type="string">
            <text:p>ED797</text:p>
          </table:table-cell>
          <table:table-cell office:value-type="float" office:value="972695" calcext:value-type="float">
            <text:p>972695</text:p>
          </table:table-cell>
          <table:table-cell office:value-type="float" office:value="4" calcext:value-type="float">
            <text:p>4</text:p>
          </table:table-cell>
          <table:table-cell table:formula="of:=IF([.D9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DEC2HEX([.C906])" office:value-type="string" office:string-value="ED79B" calcext:value-type="string">
            <text:p>ED79B</text:p>
          </table:table-cell>
          <table:table-cell office:value-type="float" office:value="972699" calcext:value-type="float">
            <text:p>972699</text:p>
          </table:table-cell>
          <table:table-cell office:value-type="float" office:value="4" calcext:value-type="float">
            <text:p>4</text:p>
          </table:table-cell>
          <table:table-cell table:formula="of:=IF([.D9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DEC2HEX([.C907])" office:value-type="string" office:string-value="ED79F" calcext:value-type="string">
            <text:p>ED79F</text:p>
          </table:table-cell>
          <table:table-cell office:value-type="float" office:value="972703" calcext:value-type="float">
            <text:p>972703</text:p>
          </table:table-cell>
          <table:table-cell office:value-type="float" office:value="4" calcext:value-type="float">
            <text:p>4</text:p>
          </table:table-cell>
          <table:table-cell table:formula="of:=IF([.D9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DEC2HEX([.C908])" office:value-type="string" office:string-value="ED7A3" calcext:value-type="string">
            <text:p>ED7A3</text:p>
          </table:table-cell>
          <table:table-cell office:value-type="float" office:value="972707" calcext:value-type="float">
            <text:p>972707</text:p>
          </table:table-cell>
          <table:table-cell office:value-type="float" office:value="1" calcext:value-type="float">
            <text:p>1</text:p>
          </table:table-cell>
          <table:table-cell table:formula="of:=IF([.D9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DEC2HEX([.C909])" office:value-type="string" office:string-value="ED7A4" calcext:value-type="string">
            <text:p>ED7A4</text:p>
          </table:table-cell>
          <table:table-cell office:value-type="float" office:value="972708" calcext:value-type="float">
            <text:p>972708</text:p>
          </table:table-cell>
          <table:table-cell office:value-type="float" office:value="4" calcext:value-type="float">
            <text:p>4</text:p>
          </table:table-cell>
          <table:table-cell table:formula="of:=IF([.D9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DEC2HEX([.C910])" office:value-type="string" office:string-value="ED7A8" calcext:value-type="string">
            <text:p>ED7A8</text:p>
          </table:table-cell>
          <table:table-cell office:value-type="float" office:value="972712" calcext:value-type="float">
            <text:p>972712</text:p>
          </table:table-cell>
          <table:table-cell office:value-type="float" office:value="4" calcext:value-type="float">
            <text:p>4</text:p>
          </table:table-cell>
          <table:table-cell table:formula="of:=IF([.D9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DEC2HEX([.C911])" office:value-type="string" office:string-value="ED7AC" calcext:value-type="string">
            <text:p>ED7AC</text:p>
          </table:table-cell>
          <table:table-cell office:value-type="float" office:value="972716" calcext:value-type="float">
            <text:p>972716</text:p>
          </table:table-cell>
          <table:table-cell office:value-type="float" office:value="4" calcext:value-type="float">
            <text:p>4</text:p>
          </table:table-cell>
          <table:table-cell table:formula="of:=IF([.D9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DEC2HEX([.C912])" office:value-type="string" office:string-value="ED7B0" calcext:value-type="string">
            <text:p>ED7B0</text:p>
          </table:table-cell>
          <table:table-cell office:value-type="float" office:value="972720" calcext:value-type="float">
            <text:p>972720</text:p>
          </table:table-cell>
          <table:table-cell office:value-type="float" office:value="4" calcext:value-type="float">
            <text:p>4</text:p>
          </table:table-cell>
          <table:table-cell table:formula="of:=IF([.D9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DEC2HEX([.C913])" office:value-type="string" office:string-value="ED7B4" calcext:value-type="string">
            <text:p>ED7B4</text:p>
          </table:table-cell>
          <table:table-cell office:value-type="float" office:value="972724" calcext:value-type="float">
            <text:p>972724</text:p>
          </table:table-cell>
          <table:table-cell office:value-type="float" office:value="4" calcext:value-type="float">
            <text:p>4</text:p>
          </table:table-cell>
          <table:table-cell table:formula="of:=IF([.D9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DEC2HEX([.C914])" office:value-type="string" office:string-value="ED7B8" calcext:value-type="string">
            <text:p>ED7B8</text:p>
          </table:table-cell>
          <table:table-cell office:value-type="float" office:value="972728" calcext:value-type="float">
            <text:p>972728</text:p>
          </table:table-cell>
          <table:table-cell office:value-type="float" office:value="4" calcext:value-type="float">
            <text:p>4</text:p>
          </table:table-cell>
          <table:table-cell table:formula="of:=IF([.D9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DEC2HEX([.C915])" office:value-type="string" office:string-value="ED7BC" calcext:value-type="string">
            <text:p>ED7BC</text:p>
          </table:table-cell>
          <table:table-cell office:value-type="float" office:value="972732" calcext:value-type="float">
            <text:p>972732</text:p>
          </table:table-cell>
          <table:table-cell office:value-type="float" office:value="11" calcext:value-type="float">
            <text:p>11</text:p>
          </table:table-cell>
          <table:table-cell table:formula="of:=IF([.D9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DEC2HEX([.C916])" office:value-type="string" office:string-value="ED7C7" calcext:value-type="string">
            <text:p>ED7C7</text:p>
          </table:table-cell>
          <table:table-cell office:value-type="float" office:value="972743" calcext:value-type="float">
            <text:p>972743</text:p>
          </table:table-cell>
          <table:table-cell office:value-type="float" office:value="4" calcext:value-type="float">
            <text:p>4</text:p>
          </table:table-cell>
          <table:table-cell table:formula="of:=IF([.D9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DEC2HEX([.C917])" office:value-type="string" office:string-value="ED7CB" calcext:value-type="string">
            <text:p>ED7CB</text:p>
          </table:table-cell>
          <table:table-cell office:value-type="float" office:value="972747" calcext:value-type="float">
            <text:p>972747</text:p>
          </table:table-cell>
          <table:table-cell office:value-type="float" office:value="4" calcext:value-type="float">
            <text:p>4</text:p>
          </table:table-cell>
          <table:table-cell table:formula="of:=IF([.D9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DEC2HEX([.C918])" office:value-type="string" office:string-value="ED7CF" calcext:value-type="string">
            <text:p>ED7CF</text:p>
          </table:table-cell>
          <table:table-cell office:value-type="float" office:value="972751" calcext:value-type="float">
            <text:p>972751</text:p>
          </table:table-cell>
          <table:table-cell office:value-type="float" office:value="4" calcext:value-type="float">
            <text:p>4</text:p>
          </table:table-cell>
          <table:table-cell table:formula="of:=IF([.D9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DEC2HEX([.C919])" office:value-type="string" office:string-value="ED7D3" calcext:value-type="string">
            <text:p>ED7D3</text:p>
          </table:table-cell>
          <table:table-cell office:value-type="float" office:value="972755" calcext:value-type="float">
            <text:p>972755</text:p>
          </table:table-cell>
          <table:table-cell office:value-type="float" office:value="4" calcext:value-type="float">
            <text:p>4</text:p>
          </table:table-cell>
          <table:table-cell table:formula="of:=IF([.D9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DEC2HEX([.C920])" office:value-type="string" office:string-value="ED7D7" calcext:value-type="string">
            <text:p>ED7D7</text:p>
          </table:table-cell>
          <table:table-cell office:value-type="float" office:value="972759" calcext:value-type="float">
            <text:p>972759</text:p>
          </table:table-cell>
          <table:table-cell office:value-type="float" office:value="4" calcext:value-type="float">
            <text:p>4</text:p>
          </table:table-cell>
          <table:table-cell table:formula="of:=IF([.D9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DEC2HEX([.C921])" office:value-type="string" office:string-value="ED7DB" calcext:value-type="string">
            <text:p>ED7DB</text:p>
          </table:table-cell>
          <table:table-cell office:value-type="float" office:value="972763" calcext:value-type="float">
            <text:p>972763</text:p>
          </table:table-cell>
          <table:table-cell office:value-type="float" office:value="4" calcext:value-type="float">
            <text:p>4</text:p>
          </table:table-cell>
          <table:table-cell table:formula="of:=IF([.D9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DEC2HEX([.C922])" office:value-type="string" office:string-value="ED7DF" calcext:value-type="string">
            <text:p>ED7DF</text:p>
          </table:table-cell>
          <table:table-cell office:value-type="float" office:value="972767" calcext:value-type="float">
            <text:p>972767</text:p>
          </table:table-cell>
          <table:table-cell office:value-type="float" office:value="4" calcext:value-type="float">
            <text:p>4</text:p>
          </table:table-cell>
          <table:table-cell table:formula="of:=IF([.D9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DEC2HEX([.C923])" office:value-type="string" office:string-value="ED7E3" calcext:value-type="string">
            <text:p>ED7E3</text:p>
          </table:table-cell>
          <table:table-cell office:value-type="float" office:value="972771" calcext:value-type="float">
            <text:p>972771</text:p>
          </table:table-cell>
          <table:table-cell office:value-type="float" office:value="1" calcext:value-type="float">
            <text:p>1</text:p>
          </table:table-cell>
          <table:table-cell table:formula="of:=IF([.D9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DEC2HEX([.C924])" office:value-type="string" office:string-value="ED7E4" calcext:value-type="string">
            <text:p>ED7E4</text:p>
          </table:table-cell>
          <table:table-cell office:value-type="float" office:value="972772" calcext:value-type="float">
            <text:p>972772</text:p>
          </table:table-cell>
          <table:table-cell office:value-type="float" office:value="4" calcext:value-type="float">
            <text:p>4</text:p>
          </table:table-cell>
          <table:table-cell table:formula="of:=IF([.D9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DEC2HEX([.C925])" office:value-type="string" office:string-value="ED7E8" calcext:value-type="string">
            <text:p>ED7E8</text:p>
          </table:table-cell>
          <table:table-cell office:value-type="float" office:value="972776" calcext:value-type="float">
            <text:p>972776</text:p>
          </table:table-cell>
          <table:table-cell office:value-type="float" office:value="4" calcext:value-type="float">
            <text:p>4</text:p>
          </table:table-cell>
          <table:table-cell table:formula="of:=IF([.D9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DEC2HEX([.C926])" office:value-type="string" office:string-value="ED7EC" calcext:value-type="string">
            <text:p>ED7EC</text:p>
          </table:table-cell>
          <table:table-cell office:value-type="float" office:value="972780" calcext:value-type="float">
            <text:p>972780</text:p>
          </table:table-cell>
          <table:table-cell office:value-type="float" office:value="4" calcext:value-type="float">
            <text:p>4</text:p>
          </table:table-cell>
          <table:table-cell table:formula="of:=IF([.D9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DEC2HEX([.C927])" office:value-type="string" office:string-value="ED7F0" calcext:value-type="string">
            <text:p>ED7F0</text:p>
          </table:table-cell>
          <table:table-cell office:value-type="float" office:value="972784" calcext:value-type="float">
            <text:p>972784</text:p>
          </table:table-cell>
          <table:table-cell office:value-type="float" office:value="4" calcext:value-type="float">
            <text:p>4</text:p>
          </table:table-cell>
          <table:table-cell table:formula="of:=IF([.D9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DEC2HEX([.C928])" office:value-type="string" office:string-value="ED7F4" calcext:value-type="string">
            <text:p>ED7F4</text:p>
          </table:table-cell>
          <table:table-cell office:value-type="float" office:value="972788" calcext:value-type="float">
            <text:p>972788</text:p>
          </table:table-cell>
          <table:table-cell office:value-type="float" office:value="4" calcext:value-type="float">
            <text:p>4</text:p>
          </table:table-cell>
          <table:table-cell table:formula="of:=IF([.D9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DEC2HEX([.C929])" office:value-type="string" office:string-value="ED7F8" calcext:value-type="string">
            <text:p>ED7F8</text:p>
          </table:table-cell>
          <table:table-cell office:value-type="float" office:value="972792" calcext:value-type="float">
            <text:p>972792</text:p>
          </table:table-cell>
          <table:table-cell office:value-type="float" office:value="4" calcext:value-type="float">
            <text:p>4</text:p>
          </table:table-cell>
          <table:table-cell table:formula="of:=IF([.D9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DEC2HEX([.C930])" office:value-type="string" office:string-value="ED7FC" calcext:value-type="string">
            <text:p>ED7FC</text:p>
          </table:table-cell>
          <table:table-cell office:value-type="float" office:value="972796" calcext:value-type="float">
            <text:p>972796</text:p>
          </table:table-cell>
          <table:table-cell office:value-type="float" office:value="11" calcext:value-type="float">
            <text:p>11</text:p>
          </table:table-cell>
          <table:table-cell table:formula="of:=IF([.D9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DEC2HEX([.C931])" office:value-type="string" office:string-value="ED807" calcext:value-type="string">
            <text:p>ED807</text:p>
          </table:table-cell>
          <table:table-cell office:value-type="float" office:value="972807" calcext:value-type="float">
            <text:p>972807</text:p>
          </table:table-cell>
          <table:table-cell office:value-type="float" office:value="4" calcext:value-type="float">
            <text:p>4</text:p>
          </table:table-cell>
          <table:table-cell table:formula="of:=IF([.D9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DEC2HEX([.C932])" office:value-type="string" office:string-value="ED80B" calcext:value-type="string">
            <text:p>ED80B</text:p>
          </table:table-cell>
          <table:table-cell office:value-type="float" office:value="972811" calcext:value-type="float">
            <text:p>972811</text:p>
          </table:table-cell>
          <table:table-cell office:value-type="float" office:value="4" calcext:value-type="float">
            <text:p>4</text:p>
          </table:table-cell>
          <table:table-cell table:formula="of:=IF([.D9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DEC2HEX([.C933])" office:value-type="string" office:string-value="ED80F" calcext:value-type="string">
            <text:p>ED80F</text:p>
          </table:table-cell>
          <table:table-cell office:value-type="float" office:value="972815" calcext:value-type="float">
            <text:p>972815</text:p>
          </table:table-cell>
          <table:table-cell office:value-type="float" office:value="4" calcext:value-type="float">
            <text:p>4</text:p>
          </table:table-cell>
          <table:table-cell table:formula="of:=IF([.D9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DEC2HEX([.C934])" office:value-type="string" office:string-value="ED813" calcext:value-type="string">
            <text:p>ED813</text:p>
          </table:table-cell>
          <table:table-cell office:value-type="float" office:value="972819" calcext:value-type="float">
            <text:p>972819</text:p>
          </table:table-cell>
          <table:table-cell office:value-type="float" office:value="4" calcext:value-type="float">
            <text:p>4</text:p>
          </table:table-cell>
          <table:table-cell table:formula="of:=IF([.D9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DEC2HEX([.C935])" office:value-type="string" office:string-value="ED817" calcext:value-type="string">
            <text:p>ED817</text:p>
          </table:table-cell>
          <table:table-cell office:value-type="float" office:value="972823" calcext:value-type="float">
            <text:p>972823</text:p>
          </table:table-cell>
          <table:table-cell office:value-type="float" office:value="4" calcext:value-type="float">
            <text:p>4</text:p>
          </table:table-cell>
          <table:table-cell table:formula="of:=IF([.D9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DEC2HEX([.C936])" office:value-type="string" office:string-value="ED81B" calcext:value-type="string">
            <text:p>ED81B</text:p>
          </table:table-cell>
          <table:table-cell office:value-type="float" office:value="972827" calcext:value-type="float">
            <text:p>972827</text:p>
          </table:table-cell>
          <table:table-cell office:value-type="float" office:value="4" calcext:value-type="float">
            <text:p>4</text:p>
          </table:table-cell>
          <table:table-cell table:formula="of:=IF([.D9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DEC2HEX([.C937])" office:value-type="string" office:string-value="ED81F" calcext:value-type="string">
            <text:p>ED81F</text:p>
          </table:table-cell>
          <table:table-cell office:value-type="float" office:value="972831" calcext:value-type="float">
            <text:p>972831</text:p>
          </table:table-cell>
          <table:table-cell office:value-type="float" office:value="4" calcext:value-type="float">
            <text:p>4</text:p>
          </table:table-cell>
          <table:table-cell table:formula="of:=IF([.D9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DEC2HEX([.C938])" office:value-type="string" office:string-value="ED823" calcext:value-type="string">
            <text:p>ED823</text:p>
          </table:table-cell>
          <table:table-cell office:value-type="float" office:value="972835" calcext:value-type="float">
            <text:p>972835</text:p>
          </table:table-cell>
          <table:table-cell office:value-type="float" office:value="1" calcext:value-type="float">
            <text:p>1</text:p>
          </table:table-cell>
          <table:table-cell table:formula="of:=IF([.D9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DEC2HEX([.C939])" office:value-type="string" office:string-value="ED824" calcext:value-type="string">
            <text:p>ED824</text:p>
          </table:table-cell>
          <table:table-cell office:value-type="float" office:value="972836" calcext:value-type="float">
            <text:p>972836</text:p>
          </table:table-cell>
          <table:table-cell office:value-type="float" office:value="4" calcext:value-type="float">
            <text:p>4</text:p>
          </table:table-cell>
          <table:table-cell table:formula="of:=IF([.D9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DEC2HEX([.C940])" office:value-type="string" office:string-value="ED828" calcext:value-type="string">
            <text:p>ED828</text:p>
          </table:table-cell>
          <table:table-cell office:value-type="float" office:value="972840" calcext:value-type="float">
            <text:p>972840</text:p>
          </table:table-cell>
          <table:table-cell office:value-type="float" office:value="4" calcext:value-type="float">
            <text:p>4</text:p>
          </table:table-cell>
          <table:table-cell table:formula="of:=IF([.D9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DEC2HEX([.C941])" office:value-type="string" office:string-value="ED82C" calcext:value-type="string">
            <text:p>ED82C</text:p>
          </table:table-cell>
          <table:table-cell office:value-type="float" office:value="972844" calcext:value-type="float">
            <text:p>972844</text:p>
          </table:table-cell>
          <table:table-cell office:value-type="float" office:value="4" calcext:value-type="float">
            <text:p>4</text:p>
          </table:table-cell>
          <table:table-cell table:formula="of:=IF([.D9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DEC2HEX([.C942])" office:value-type="string" office:string-value="ED830" calcext:value-type="string">
            <text:p>ED830</text:p>
          </table:table-cell>
          <table:table-cell office:value-type="float" office:value="972848" calcext:value-type="float">
            <text:p>972848</text:p>
          </table:table-cell>
          <table:table-cell office:value-type="float" office:value="4" calcext:value-type="float">
            <text:p>4</text:p>
          </table:table-cell>
          <table:table-cell table:formula="of:=IF([.D9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DEC2HEX([.C943])" office:value-type="string" office:string-value="ED834" calcext:value-type="string">
            <text:p>ED834</text:p>
          </table:table-cell>
          <table:table-cell office:value-type="float" office:value="972852" calcext:value-type="float">
            <text:p>972852</text:p>
          </table:table-cell>
          <table:table-cell office:value-type="float" office:value="4" calcext:value-type="float">
            <text:p>4</text:p>
          </table:table-cell>
          <table:table-cell table:formula="of:=IF([.D9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DEC2HEX([.C944])" office:value-type="string" office:string-value="ED838" calcext:value-type="string">
            <text:p>ED838</text:p>
          </table:table-cell>
          <table:table-cell office:value-type="float" office:value="972856" calcext:value-type="float">
            <text:p>972856</text:p>
          </table:table-cell>
          <table:table-cell office:value-type="float" office:value="4" calcext:value-type="float">
            <text:p>4</text:p>
          </table:table-cell>
          <table:table-cell table:formula="of:=IF([.D9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DEC2HEX([.C945])" office:value-type="string" office:string-value="ED83C" calcext:value-type="string">
            <text:p>ED83C</text:p>
          </table:table-cell>
          <table:table-cell office:value-type="float" office:value="972860" calcext:value-type="float">
            <text:p>972860</text:p>
          </table:table-cell>
          <table:table-cell office:value-type="float" office:value="11" calcext:value-type="float">
            <text:p>11</text:p>
          </table:table-cell>
          <table:table-cell table:formula="of:=IF([.D9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DEC2HEX([.C946])" office:value-type="string" office:string-value="ED847" calcext:value-type="string">
            <text:p>ED847</text:p>
          </table:table-cell>
          <table:table-cell office:value-type="float" office:value="972871" calcext:value-type="float">
            <text:p>972871</text:p>
          </table:table-cell>
          <table:table-cell office:value-type="float" office:value="4" calcext:value-type="float">
            <text:p>4</text:p>
          </table:table-cell>
          <table:table-cell table:formula="of:=IF([.D9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DEC2HEX([.C947])" office:value-type="string" office:string-value="ED84B" calcext:value-type="string">
            <text:p>ED84B</text:p>
          </table:table-cell>
          <table:table-cell office:value-type="float" office:value="972875" calcext:value-type="float">
            <text:p>972875</text:p>
          </table:table-cell>
          <table:table-cell office:value-type="float" office:value="4" calcext:value-type="float">
            <text:p>4</text:p>
          </table:table-cell>
          <table:table-cell table:formula="of:=IF([.D9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DEC2HEX([.C948])" office:value-type="string" office:string-value="ED84F" calcext:value-type="string">
            <text:p>ED84F</text:p>
          </table:table-cell>
          <table:table-cell office:value-type="float" office:value="972879" calcext:value-type="float">
            <text:p>972879</text:p>
          </table:table-cell>
          <table:table-cell office:value-type="float" office:value="4" calcext:value-type="float">
            <text:p>4</text:p>
          </table:table-cell>
          <table:table-cell table:formula="of:=IF([.D9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DEC2HEX([.C949])" office:value-type="string" office:string-value="ED853" calcext:value-type="string">
            <text:p>ED853</text:p>
          </table:table-cell>
          <table:table-cell office:value-type="float" office:value="972883" calcext:value-type="float">
            <text:p>972883</text:p>
          </table:table-cell>
          <table:table-cell office:value-type="float" office:value="4" calcext:value-type="float">
            <text:p>4</text:p>
          </table:table-cell>
          <table:table-cell table:formula="of:=IF([.D9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DEC2HEX([.C950])" office:value-type="string" office:string-value="ED857" calcext:value-type="string">
            <text:p>ED857</text:p>
          </table:table-cell>
          <table:table-cell office:value-type="float" office:value="972887" calcext:value-type="float">
            <text:p>972887</text:p>
          </table:table-cell>
          <table:table-cell office:value-type="float" office:value="4" calcext:value-type="float">
            <text:p>4</text:p>
          </table:table-cell>
          <table:table-cell table:formula="of:=IF([.D9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DEC2HEX([.C951])" office:value-type="string" office:string-value="ED85B" calcext:value-type="string">
            <text:p>ED85B</text:p>
          </table:table-cell>
          <table:table-cell office:value-type="float" office:value="972891" calcext:value-type="float">
            <text:p>972891</text:p>
          </table:table-cell>
          <table:table-cell office:value-type="float" office:value="4" calcext:value-type="float">
            <text:p>4</text:p>
          </table:table-cell>
          <table:table-cell table:formula="of:=IF([.D9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DEC2HEX([.C952])" office:value-type="string" office:string-value="ED85F" calcext:value-type="string">
            <text:p>ED85F</text:p>
          </table:table-cell>
          <table:table-cell office:value-type="float" office:value="972895" calcext:value-type="float">
            <text:p>972895</text:p>
          </table:table-cell>
          <table:table-cell office:value-type="float" office:value="4" calcext:value-type="float">
            <text:p>4</text:p>
          </table:table-cell>
          <table:table-cell table:formula="of:=IF([.D9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DEC2HEX([.C953])" office:value-type="string" office:string-value="ED863" calcext:value-type="string">
            <text:p>ED863</text:p>
          </table:table-cell>
          <table:table-cell office:value-type="float" office:value="972899" calcext:value-type="float">
            <text:p>972899</text:p>
          </table:table-cell>
          <table:table-cell office:value-type="float" office:value="1" calcext:value-type="float">
            <text:p>1</text:p>
          </table:table-cell>
          <table:table-cell table:formula="of:=IF([.D9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DEC2HEX([.C954])" office:value-type="string" office:string-value="ED864" calcext:value-type="string">
            <text:p>ED864</text:p>
          </table:table-cell>
          <table:table-cell office:value-type="float" office:value="972900" calcext:value-type="float">
            <text:p>972900</text:p>
          </table:table-cell>
          <table:table-cell office:value-type="float" office:value="4" calcext:value-type="float">
            <text:p>4</text:p>
          </table:table-cell>
          <table:table-cell table:formula="of:=IF([.D9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DEC2HEX([.C955])" office:value-type="string" office:string-value="ED868" calcext:value-type="string">
            <text:p>ED868</text:p>
          </table:table-cell>
          <table:table-cell office:value-type="float" office:value="972904" calcext:value-type="float">
            <text:p>972904</text:p>
          </table:table-cell>
          <table:table-cell office:value-type="float" office:value="4" calcext:value-type="float">
            <text:p>4</text:p>
          </table:table-cell>
          <table:table-cell table:formula="of:=IF([.D9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DEC2HEX([.C956])" office:value-type="string" office:string-value="ED86C" calcext:value-type="string">
            <text:p>ED86C</text:p>
          </table:table-cell>
          <table:table-cell office:value-type="float" office:value="972908" calcext:value-type="float">
            <text:p>972908</text:p>
          </table:table-cell>
          <table:table-cell office:value-type="float" office:value="4" calcext:value-type="float">
            <text:p>4</text:p>
          </table:table-cell>
          <table:table-cell table:formula="of:=IF([.D9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DEC2HEX([.C957])" office:value-type="string" office:string-value="ED870" calcext:value-type="string">
            <text:p>ED870</text:p>
          </table:table-cell>
          <table:table-cell office:value-type="float" office:value="972912" calcext:value-type="float">
            <text:p>972912</text:p>
          </table:table-cell>
          <table:table-cell office:value-type="float" office:value="4" calcext:value-type="float">
            <text:p>4</text:p>
          </table:table-cell>
          <table:table-cell table:formula="of:=IF([.D9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DEC2HEX([.C958])" office:value-type="string" office:string-value="ED874" calcext:value-type="string">
            <text:p>ED874</text:p>
          </table:table-cell>
          <table:table-cell office:value-type="float" office:value="972916" calcext:value-type="float">
            <text:p>972916</text:p>
          </table:table-cell>
          <table:table-cell office:value-type="float" office:value="4" calcext:value-type="float">
            <text:p>4</text:p>
          </table:table-cell>
          <table:table-cell table:formula="of:=IF([.D9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DEC2HEX([.C959])" office:value-type="string" office:string-value="ED878" calcext:value-type="string">
            <text:p>ED878</text:p>
          </table:table-cell>
          <table:table-cell office:value-type="float" office:value="972920" calcext:value-type="float">
            <text:p>972920</text:p>
          </table:table-cell>
          <table:table-cell office:value-type="float" office:value="4" calcext:value-type="float">
            <text:p>4</text:p>
          </table:table-cell>
          <table:table-cell table:formula="of:=IF([.D9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DEC2HEX([.C960])" office:value-type="string" office:string-value="ED87C" calcext:value-type="string">
            <text:p>ED87C</text:p>
          </table:table-cell>
          <table:table-cell office:value-type="float" office:value="972924" calcext:value-type="float">
            <text:p>972924</text:p>
          </table:table-cell>
          <table:table-cell office:value-type="float" office:value="11" calcext:value-type="float">
            <text:p>11</text:p>
          </table:table-cell>
          <table:table-cell table:formula="of:=IF([.D9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DEC2HEX([.C961])" office:value-type="string" office:string-value="ED887" calcext:value-type="string">
            <text:p>ED887</text:p>
          </table:table-cell>
          <table:table-cell office:value-type="float" office:value="972935" calcext:value-type="float">
            <text:p>972935</text:p>
          </table:table-cell>
          <table:table-cell office:value-type="float" office:value="4" calcext:value-type="float">
            <text:p>4</text:p>
          </table:table-cell>
          <table:table-cell table:formula="of:=IF([.D9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DEC2HEX([.C962])" office:value-type="string" office:string-value="ED88B" calcext:value-type="string">
            <text:p>ED88B</text:p>
          </table:table-cell>
          <table:table-cell office:value-type="float" office:value="972939" calcext:value-type="float">
            <text:p>972939</text:p>
          </table:table-cell>
          <table:table-cell office:value-type="float" office:value="4" calcext:value-type="float">
            <text:p>4</text:p>
          </table:table-cell>
          <table:table-cell table:formula="of:=IF([.D9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DEC2HEX([.C963])" office:value-type="string" office:string-value="ED88F" calcext:value-type="string">
            <text:p>ED88F</text:p>
          </table:table-cell>
          <table:table-cell office:value-type="float" office:value="972943" calcext:value-type="float">
            <text:p>972943</text:p>
          </table:table-cell>
          <table:table-cell office:value-type="float" office:value="4" calcext:value-type="float">
            <text:p>4</text:p>
          </table:table-cell>
          <table:table-cell table:formula="of:=IF([.D9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DEC2HEX([.C964])" office:value-type="string" office:string-value="ED893" calcext:value-type="string">
            <text:p>ED893</text:p>
          </table:table-cell>
          <table:table-cell office:value-type="float" office:value="972947" calcext:value-type="float">
            <text:p>972947</text:p>
          </table:table-cell>
          <table:table-cell office:value-type="float" office:value="4" calcext:value-type="float">
            <text:p>4</text:p>
          </table:table-cell>
          <table:table-cell table:formula="of:=IF([.D9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DEC2HEX([.C965])" office:value-type="string" office:string-value="ED897" calcext:value-type="string">
            <text:p>ED897</text:p>
          </table:table-cell>
          <table:table-cell office:value-type="float" office:value="972951" calcext:value-type="float">
            <text:p>972951</text:p>
          </table:table-cell>
          <table:table-cell office:value-type="float" office:value="4" calcext:value-type="float">
            <text:p>4</text:p>
          </table:table-cell>
          <table:table-cell table:formula="of:=IF([.D9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DEC2HEX([.C966])" office:value-type="string" office:string-value="ED89B" calcext:value-type="string">
            <text:p>ED89B</text:p>
          </table:table-cell>
          <table:table-cell office:value-type="float" office:value="972955" calcext:value-type="float">
            <text:p>972955</text:p>
          </table:table-cell>
          <table:table-cell office:value-type="float" office:value="4" calcext:value-type="float">
            <text:p>4</text:p>
          </table:table-cell>
          <table:table-cell table:formula="of:=IF([.D9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DEC2HEX([.C967])" office:value-type="string" office:string-value="ED89F" calcext:value-type="string">
            <text:p>ED89F</text:p>
          </table:table-cell>
          <table:table-cell office:value-type="float" office:value="972959" calcext:value-type="float">
            <text:p>972959</text:p>
          </table:table-cell>
          <table:table-cell office:value-type="float" office:value="4" calcext:value-type="float">
            <text:p>4</text:p>
          </table:table-cell>
          <table:table-cell table:formula="of:=IF([.D9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DEC2HEX([.C968])" office:value-type="string" office:string-value="ED8A3" calcext:value-type="string">
            <text:p>ED8A3</text:p>
          </table:table-cell>
          <table:table-cell office:value-type="float" office:value="972963" calcext:value-type="float">
            <text:p>972963</text:p>
          </table:table-cell>
          <table:table-cell office:value-type="float" office:value="1" calcext:value-type="float">
            <text:p>1</text:p>
          </table:table-cell>
          <table:table-cell table:formula="of:=IF([.D9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DEC2HEX([.C969])" office:value-type="string" office:string-value="ED8A4" calcext:value-type="string">
            <text:p>ED8A4</text:p>
          </table:table-cell>
          <table:table-cell office:value-type="float" office:value="972964" calcext:value-type="float">
            <text:p>972964</text:p>
          </table:table-cell>
          <table:table-cell office:value-type="float" office:value="4" calcext:value-type="float">
            <text:p>4</text:p>
          </table:table-cell>
          <table:table-cell table:formula="of:=IF([.D9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DEC2HEX([.C970])" office:value-type="string" office:string-value="ED8A8" calcext:value-type="string">
            <text:p>ED8A8</text:p>
          </table:table-cell>
          <table:table-cell office:value-type="float" office:value="972968" calcext:value-type="float">
            <text:p>972968</text:p>
          </table:table-cell>
          <table:table-cell office:value-type="float" office:value="4" calcext:value-type="float">
            <text:p>4</text:p>
          </table:table-cell>
          <table:table-cell table:formula="of:=IF([.D9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DEC2HEX([.C971])" office:value-type="string" office:string-value="ED8AC" calcext:value-type="string">
            <text:p>ED8AC</text:p>
          </table:table-cell>
          <table:table-cell office:value-type="float" office:value="972972" calcext:value-type="float">
            <text:p>972972</text:p>
          </table:table-cell>
          <table:table-cell office:value-type="float" office:value="4" calcext:value-type="float">
            <text:p>4</text:p>
          </table:table-cell>
          <table:table-cell table:formula="of:=IF([.D9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DEC2HEX([.C972])" office:value-type="string" office:string-value="ED8B0" calcext:value-type="string">
            <text:p>ED8B0</text:p>
          </table:table-cell>
          <table:table-cell office:value-type="float" office:value="972976" calcext:value-type="float">
            <text:p>972976</text:p>
          </table:table-cell>
          <table:table-cell office:value-type="float" office:value="4" calcext:value-type="float">
            <text:p>4</text:p>
          </table:table-cell>
          <table:table-cell table:formula="of:=IF([.D9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DEC2HEX([.C973])" office:value-type="string" office:string-value="ED8B4" calcext:value-type="string">
            <text:p>ED8B4</text:p>
          </table:table-cell>
          <table:table-cell office:value-type="float" office:value="972980" calcext:value-type="float">
            <text:p>972980</text:p>
          </table:table-cell>
          <table:table-cell office:value-type="float" office:value="4" calcext:value-type="float">
            <text:p>4</text:p>
          </table:table-cell>
          <table:table-cell table:formula="of:=IF([.D9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DEC2HEX([.C974])" office:value-type="string" office:string-value="ED8B8" calcext:value-type="string">
            <text:p>ED8B8</text:p>
          </table:table-cell>
          <table:table-cell office:value-type="float" office:value="972984" calcext:value-type="float">
            <text:p>972984</text:p>
          </table:table-cell>
          <table:table-cell office:value-type="float" office:value="4" calcext:value-type="float">
            <text:p>4</text:p>
          </table:table-cell>
          <table:table-cell table:formula="of:=IF([.D9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DEC2HEX([.C975])" office:value-type="string" office:string-value="ED8BC" calcext:value-type="string">
            <text:p>ED8BC</text:p>
          </table:table-cell>
          <table:table-cell office:value-type="float" office:value="972988" calcext:value-type="float">
            <text:p>972988</text:p>
          </table:table-cell>
          <table:table-cell office:value-type="float" office:value="11" calcext:value-type="float">
            <text:p>11</text:p>
          </table:table-cell>
          <table:table-cell table:formula="of:=IF([.D9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DEC2HEX([.C976])" office:value-type="string" office:string-value="ED8C7" calcext:value-type="string">
            <text:p>ED8C7</text:p>
          </table:table-cell>
          <table:table-cell office:value-type="float" office:value="972999" calcext:value-type="float">
            <text:p>972999</text:p>
          </table:table-cell>
          <table:table-cell office:value-type="float" office:value="4" calcext:value-type="float">
            <text:p>4</text:p>
          </table:table-cell>
          <table:table-cell table:formula="of:=IF([.D9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DEC2HEX([.C977])" office:value-type="string" office:string-value="ED8CB" calcext:value-type="string">
            <text:p>ED8CB</text:p>
          </table:table-cell>
          <table:table-cell office:value-type="float" office:value="973003" calcext:value-type="float">
            <text:p>973003</text:p>
          </table:table-cell>
          <table:table-cell office:value-type="float" office:value="4" calcext:value-type="float">
            <text:p>4</text:p>
          </table:table-cell>
          <table:table-cell table:formula="of:=IF([.D9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DEC2HEX([.C978])" office:value-type="string" office:string-value="ED8CF" calcext:value-type="string">
            <text:p>ED8CF</text:p>
          </table:table-cell>
          <table:table-cell office:value-type="float" office:value="973007" calcext:value-type="float">
            <text:p>973007</text:p>
          </table:table-cell>
          <table:table-cell office:value-type="float" office:value="4" calcext:value-type="float">
            <text:p>4</text:p>
          </table:table-cell>
          <table:table-cell table:formula="of:=IF([.D9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DEC2HEX([.C979])" office:value-type="string" office:string-value="ED8D3" calcext:value-type="string">
            <text:p>ED8D3</text:p>
          </table:table-cell>
          <table:table-cell office:value-type="float" office:value="973011" calcext:value-type="float">
            <text:p>973011</text:p>
          </table:table-cell>
          <table:table-cell office:value-type="float" office:value="4" calcext:value-type="float">
            <text:p>4</text:p>
          </table:table-cell>
          <table:table-cell table:formula="of:=IF([.D9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DEC2HEX([.C980])" office:value-type="string" office:string-value="ED8D7" calcext:value-type="string">
            <text:p>ED8D7</text:p>
          </table:table-cell>
          <table:table-cell office:value-type="float" office:value="973015" calcext:value-type="float">
            <text:p>973015</text:p>
          </table:table-cell>
          <table:table-cell office:value-type="float" office:value="4" calcext:value-type="float">
            <text:p>4</text:p>
          </table:table-cell>
          <table:table-cell table:formula="of:=IF([.D9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DEC2HEX([.C981])" office:value-type="string" office:string-value="ED8DB" calcext:value-type="string">
            <text:p>ED8DB</text:p>
          </table:table-cell>
          <table:table-cell office:value-type="float" office:value="973019" calcext:value-type="float">
            <text:p>973019</text:p>
          </table:table-cell>
          <table:table-cell office:value-type="float" office:value="4" calcext:value-type="float">
            <text:p>4</text:p>
          </table:table-cell>
          <table:table-cell table:formula="of:=IF([.D9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DEC2HEX([.C982])" office:value-type="string" office:string-value="ED8DF" calcext:value-type="string">
            <text:p>ED8DF</text:p>
          </table:table-cell>
          <table:table-cell office:value-type="float" office:value="973023" calcext:value-type="float">
            <text:p>973023</text:p>
          </table:table-cell>
          <table:table-cell office:value-type="float" office:value="4" calcext:value-type="float">
            <text:p>4</text:p>
          </table:table-cell>
          <table:table-cell table:formula="of:=IF([.D9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DEC2HEX([.C983])" office:value-type="string" office:string-value="ED8E3" calcext:value-type="string">
            <text:p>ED8E3</text:p>
          </table:table-cell>
          <table:table-cell office:value-type="float" office:value="973027" calcext:value-type="float">
            <text:p>973027</text:p>
          </table:table-cell>
          <table:table-cell office:value-type="float" office:value="1" calcext:value-type="float">
            <text:p>1</text:p>
          </table:table-cell>
          <table:table-cell table:formula="of:=IF([.D9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DEC2HEX([.C984])" office:value-type="string" office:string-value="ED8E4" calcext:value-type="string">
            <text:p>ED8E4</text:p>
          </table:table-cell>
          <table:table-cell office:value-type="float" office:value="973028" calcext:value-type="float">
            <text:p>973028</text:p>
          </table:table-cell>
          <table:table-cell office:value-type="float" office:value="4" calcext:value-type="float">
            <text:p>4</text:p>
          </table:table-cell>
          <table:table-cell table:formula="of:=IF([.D9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DEC2HEX([.C985])" office:value-type="string" office:string-value="ED8E8" calcext:value-type="string">
            <text:p>ED8E8</text:p>
          </table:table-cell>
          <table:table-cell office:value-type="float" office:value="973032" calcext:value-type="float">
            <text:p>973032</text:p>
          </table:table-cell>
          <table:table-cell office:value-type="float" office:value="4" calcext:value-type="float">
            <text:p>4</text:p>
          </table:table-cell>
          <table:table-cell table:formula="of:=IF([.D9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DEC2HEX([.C986])" office:value-type="string" office:string-value="ED8EC" calcext:value-type="string">
            <text:p>ED8EC</text:p>
          </table:table-cell>
          <table:table-cell office:value-type="float" office:value="973036" calcext:value-type="float">
            <text:p>973036</text:p>
          </table:table-cell>
          <table:table-cell office:value-type="float" office:value="4" calcext:value-type="float">
            <text:p>4</text:p>
          </table:table-cell>
          <table:table-cell table:formula="of:=IF([.D9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DEC2HEX([.C987])" office:value-type="string" office:string-value="ED8F0" calcext:value-type="string">
            <text:p>ED8F0</text:p>
          </table:table-cell>
          <table:table-cell office:value-type="float" office:value="973040" calcext:value-type="float">
            <text:p>973040</text:p>
          </table:table-cell>
          <table:table-cell office:value-type="float" office:value="4" calcext:value-type="float">
            <text:p>4</text:p>
          </table:table-cell>
          <table:table-cell table:formula="of:=IF([.D9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DEC2HEX([.C988])" office:value-type="string" office:string-value="ED8F4" calcext:value-type="string">
            <text:p>ED8F4</text:p>
          </table:table-cell>
          <table:table-cell office:value-type="float" office:value="973044" calcext:value-type="float">
            <text:p>973044</text:p>
          </table:table-cell>
          <table:table-cell office:value-type="float" office:value="4" calcext:value-type="float">
            <text:p>4</text:p>
          </table:table-cell>
          <table:table-cell table:formula="of:=IF([.D9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DEC2HEX([.C989])" office:value-type="string" office:string-value="ED8F8" calcext:value-type="string">
            <text:p>ED8F8</text:p>
          </table:table-cell>
          <table:table-cell office:value-type="float" office:value="973048" calcext:value-type="float">
            <text:p>973048</text:p>
          </table:table-cell>
          <table:table-cell office:value-type="float" office:value="4" calcext:value-type="float">
            <text:p>4</text:p>
          </table:table-cell>
          <table:table-cell table:formula="of:=IF([.D9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DEC2HEX([.C990])" office:value-type="string" office:string-value="ED8FC" calcext:value-type="string">
            <text:p>ED8FC</text:p>
          </table:table-cell>
          <table:table-cell office:value-type="float" office:value="973052" calcext:value-type="float">
            <text:p>973052</text:p>
          </table:table-cell>
          <table:table-cell office:value-type="float" office:value="11" calcext:value-type="float">
            <text:p>11</text:p>
          </table:table-cell>
          <table:table-cell table:formula="of:=IF([.D9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DEC2HEX([.C991])" office:value-type="string" office:string-value="ED907" calcext:value-type="string">
            <text:p>ED907</text:p>
          </table:table-cell>
          <table:table-cell office:value-type="float" office:value="973063" calcext:value-type="float">
            <text:p>973063</text:p>
          </table:table-cell>
          <table:table-cell office:value-type="float" office:value="4" calcext:value-type="float">
            <text:p>4</text:p>
          </table:table-cell>
          <table:table-cell table:formula="of:=IF([.D9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DEC2HEX([.C992])" office:value-type="string" office:string-value="ED90B" calcext:value-type="string">
            <text:p>ED90B</text:p>
          </table:table-cell>
          <table:table-cell office:value-type="float" office:value="973067" calcext:value-type="float">
            <text:p>973067</text:p>
          </table:table-cell>
          <table:table-cell office:value-type="float" office:value="4" calcext:value-type="float">
            <text:p>4</text:p>
          </table:table-cell>
          <table:table-cell table:formula="of:=IF([.D9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DEC2HEX([.C993])" office:value-type="string" office:string-value="ED90F" calcext:value-type="string">
            <text:p>ED90F</text:p>
          </table:table-cell>
          <table:table-cell office:value-type="float" office:value="973071" calcext:value-type="float">
            <text:p>973071</text:p>
          </table:table-cell>
          <table:table-cell office:value-type="float" office:value="4" calcext:value-type="float">
            <text:p>4</text:p>
          </table:table-cell>
          <table:table-cell table:formula="of:=IF([.D9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DEC2HEX([.C994])" office:value-type="string" office:string-value="ED913" calcext:value-type="string">
            <text:p>ED913</text:p>
          </table:table-cell>
          <table:table-cell office:value-type="float" office:value="973075" calcext:value-type="float">
            <text:p>973075</text:p>
          </table:table-cell>
          <table:table-cell office:value-type="float" office:value="4" calcext:value-type="float">
            <text:p>4</text:p>
          </table:table-cell>
          <table:table-cell table:formula="of:=IF([.D9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DEC2HEX([.C995])" office:value-type="string" office:string-value="ED917" calcext:value-type="string">
            <text:p>ED917</text:p>
          </table:table-cell>
          <table:table-cell office:value-type="float" office:value="973079" calcext:value-type="float">
            <text:p>973079</text:p>
          </table:table-cell>
          <table:table-cell office:value-type="float" office:value="4" calcext:value-type="float">
            <text:p>4</text:p>
          </table:table-cell>
          <table:table-cell table:formula="of:=IF([.D9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DEC2HEX([.C996])" office:value-type="string" office:string-value="ED91B" calcext:value-type="string">
            <text:p>ED91B</text:p>
          </table:table-cell>
          <table:table-cell office:value-type="float" office:value="973083" calcext:value-type="float">
            <text:p>973083</text:p>
          </table:table-cell>
          <table:table-cell office:value-type="float" office:value="4" calcext:value-type="float">
            <text:p>4</text:p>
          </table:table-cell>
          <table:table-cell table:formula="of:=IF([.D9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DEC2HEX([.C997])" office:value-type="string" office:string-value="ED91F" calcext:value-type="string">
            <text:p>ED91F</text:p>
          </table:table-cell>
          <table:table-cell office:value-type="float" office:value="973087" calcext:value-type="float">
            <text:p>973087</text:p>
          </table:table-cell>
          <table:table-cell office:value-type="float" office:value="4" calcext:value-type="float">
            <text:p>4</text:p>
          </table:table-cell>
          <table:table-cell table:formula="of:=IF([.D9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DEC2HEX([.C998])" office:value-type="string" office:string-value="ED923" calcext:value-type="string">
            <text:p>ED923</text:p>
          </table:table-cell>
          <table:table-cell office:value-type="float" office:value="973091" calcext:value-type="float">
            <text:p>973091</text:p>
          </table:table-cell>
          <table:table-cell office:value-type="float" office:value="1" calcext:value-type="float">
            <text:p>1</text:p>
          </table:table-cell>
          <table:table-cell table:formula="of:=IF([.D9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DEC2HEX([.C999])" office:value-type="string" office:string-value="ED924" calcext:value-type="string">
            <text:p>ED924</text:p>
          </table:table-cell>
          <table:table-cell office:value-type="float" office:value="973092" calcext:value-type="float">
            <text:p>973092</text:p>
          </table:table-cell>
          <table:table-cell office:value-type="float" office:value="4" calcext:value-type="float">
            <text:p>4</text:p>
          </table:table-cell>
          <table:table-cell table:formula="of:=IF([.D9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DEC2HEX([.C1000])" office:value-type="string" office:string-value="ED928" calcext:value-type="string">
            <text:p>ED928</text:p>
          </table:table-cell>
          <table:table-cell office:value-type="float" office:value="973096" calcext:value-type="float">
            <text:p>973096</text:p>
          </table:table-cell>
          <table:table-cell office:value-type="float" office:value="4" calcext:value-type="float">
            <text:p>4</text:p>
          </table:table-cell>
          <table:table-cell table:formula="of:=IF([.D10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DEC2HEX([.C1001])" office:value-type="string" office:string-value="ED92C" calcext:value-type="string">
            <text:p>ED92C</text:p>
          </table:table-cell>
          <table:table-cell office:value-type="float" office:value="973100" calcext:value-type="float">
            <text:p>973100</text:p>
          </table:table-cell>
          <table:table-cell office:value-type="float" office:value="4" calcext:value-type="float">
            <text:p>4</text:p>
          </table:table-cell>
          <table:table-cell table:formula="of:=IF([.D10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DEC2HEX([.C1002])" office:value-type="string" office:string-value="ED930" calcext:value-type="string">
            <text:p>ED930</text:p>
          </table:table-cell>
          <table:table-cell office:value-type="float" office:value="973104" calcext:value-type="float">
            <text:p>973104</text:p>
          </table:table-cell>
          <table:table-cell office:value-type="float" office:value="4" calcext:value-type="float">
            <text:p>4</text:p>
          </table:table-cell>
          <table:table-cell table:formula="of:=IF([.D10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DEC2HEX([.C1003])" office:value-type="string" office:string-value="ED934" calcext:value-type="string">
            <text:p>ED934</text:p>
          </table:table-cell>
          <table:table-cell office:value-type="float" office:value="973108" calcext:value-type="float">
            <text:p>973108</text:p>
          </table:table-cell>
          <table:table-cell office:value-type="float" office:value="4" calcext:value-type="float">
            <text:p>4</text:p>
          </table:table-cell>
          <table:table-cell table:formula="of:=IF([.D10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DEC2HEX([.C1004])" office:value-type="string" office:string-value="ED938" calcext:value-type="string">
            <text:p>ED938</text:p>
          </table:table-cell>
          <table:table-cell office:value-type="float" office:value="973112" calcext:value-type="float">
            <text:p>973112</text:p>
          </table:table-cell>
          <table:table-cell office:value-type="float" office:value="4" calcext:value-type="float">
            <text:p>4</text:p>
          </table:table-cell>
          <table:table-cell table:formula="of:=IF([.D10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DEC2HEX([.C1005])" office:value-type="string" office:string-value="ED93C" calcext:value-type="string">
            <text:p>ED93C</text:p>
          </table:table-cell>
          <table:table-cell office:value-type="float" office:value="973116" calcext:value-type="float">
            <text:p>973116</text:p>
          </table:table-cell>
          <table:table-cell office:value-type="float" office:value="11" calcext:value-type="float">
            <text:p>11</text:p>
          </table:table-cell>
          <table:table-cell table:formula="of:=IF([.D10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DEC2HEX([.C1006])" office:value-type="string" office:string-value="ED947" calcext:value-type="string">
            <text:p>ED947</text:p>
          </table:table-cell>
          <table:table-cell office:value-type="float" office:value="973127" calcext:value-type="float">
            <text:p>973127</text:p>
          </table:table-cell>
          <table:table-cell office:value-type="float" office:value="4" calcext:value-type="float">
            <text:p>4</text:p>
          </table:table-cell>
          <table:table-cell table:formula="of:=IF([.D10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DEC2HEX([.C1007])" office:value-type="string" office:string-value="ED94B" calcext:value-type="string">
            <text:p>ED94B</text:p>
          </table:table-cell>
          <table:table-cell office:value-type="float" office:value="973131" calcext:value-type="float">
            <text:p>973131</text:p>
          </table:table-cell>
          <table:table-cell office:value-type="float" office:value="4" calcext:value-type="float">
            <text:p>4</text:p>
          </table:table-cell>
          <table:table-cell table:formula="of:=IF([.D10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DEC2HEX([.C1008])" office:value-type="string" office:string-value="ED94F" calcext:value-type="string">
            <text:p>ED94F</text:p>
          </table:table-cell>
          <table:table-cell office:value-type="float" office:value="973135" calcext:value-type="float">
            <text:p>973135</text:p>
          </table:table-cell>
          <table:table-cell office:value-type="float" office:value="4" calcext:value-type="float">
            <text:p>4</text:p>
          </table:table-cell>
          <table:table-cell table:formula="of:=IF([.D10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DEC2HEX([.C1009])" office:value-type="string" office:string-value="ED953" calcext:value-type="string">
            <text:p>ED953</text:p>
          </table:table-cell>
          <table:table-cell office:value-type="float" office:value="973139" calcext:value-type="float">
            <text:p>973139</text:p>
          </table:table-cell>
          <table:table-cell office:value-type="float" office:value="4" calcext:value-type="float">
            <text:p>4</text:p>
          </table:table-cell>
          <table:table-cell table:formula="of:=IF([.D10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DEC2HEX([.C1010])" office:value-type="string" office:string-value="ED957" calcext:value-type="string">
            <text:p>ED957</text:p>
          </table:table-cell>
          <table:table-cell office:value-type="float" office:value="973143" calcext:value-type="float">
            <text:p>973143</text:p>
          </table:table-cell>
          <table:table-cell office:value-type="float" office:value="4" calcext:value-type="float">
            <text:p>4</text:p>
          </table:table-cell>
          <table:table-cell table:formula="of:=IF([.D10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DEC2HEX([.C1011])" office:value-type="string" office:string-value="ED95B" calcext:value-type="string">
            <text:p>ED95B</text:p>
          </table:table-cell>
          <table:table-cell office:value-type="float" office:value="973147" calcext:value-type="float">
            <text:p>973147</text:p>
          </table:table-cell>
          <table:table-cell office:value-type="float" office:value="4" calcext:value-type="float">
            <text:p>4</text:p>
          </table:table-cell>
          <table:table-cell table:formula="of:=IF([.D10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DEC2HEX([.C1012])" office:value-type="string" office:string-value="ED95F" calcext:value-type="string">
            <text:p>ED95F</text:p>
          </table:table-cell>
          <table:table-cell office:value-type="float" office:value="973151" calcext:value-type="float">
            <text:p>973151</text:p>
          </table:table-cell>
          <table:table-cell office:value-type="float" office:value="4" calcext:value-type="float">
            <text:p>4</text:p>
          </table:table-cell>
          <table:table-cell table:formula="of:=IF([.D10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DEC2HEX([.C1013])" office:value-type="string" office:string-value="ED963" calcext:value-type="string">
            <text:p>ED963</text:p>
          </table:table-cell>
          <table:table-cell office:value-type="float" office:value="973155" calcext:value-type="float">
            <text:p>973155</text:p>
          </table:table-cell>
          <table:table-cell office:value-type="float" office:value="1" calcext:value-type="float">
            <text:p>1</text:p>
          </table:table-cell>
          <table:table-cell table:formula="of:=IF([.D10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DEC2HEX([.C1014])" office:value-type="string" office:string-value="ED964" calcext:value-type="string">
            <text:p>ED964</text:p>
          </table:table-cell>
          <table:table-cell office:value-type="float" office:value="973156" calcext:value-type="float">
            <text:p>973156</text:p>
          </table:table-cell>
          <table:table-cell office:value-type="float" office:value="4" calcext:value-type="float">
            <text:p>4</text:p>
          </table:table-cell>
          <table:table-cell table:formula="of:=IF([.D10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DEC2HEX([.C1015])" office:value-type="string" office:string-value="ED968" calcext:value-type="string">
            <text:p>ED968</text:p>
          </table:table-cell>
          <table:table-cell office:value-type="float" office:value="973160" calcext:value-type="float">
            <text:p>973160</text:p>
          </table:table-cell>
          <table:table-cell office:value-type="float" office:value="4" calcext:value-type="float">
            <text:p>4</text:p>
          </table:table-cell>
          <table:table-cell table:formula="of:=IF([.D10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DEC2HEX([.C1016])" office:value-type="string" office:string-value="ED96C" calcext:value-type="string">
            <text:p>ED96C</text:p>
          </table:table-cell>
          <table:table-cell office:value-type="float" office:value="973164" calcext:value-type="float">
            <text:p>973164</text:p>
          </table:table-cell>
          <table:table-cell office:value-type="float" office:value="4" calcext:value-type="float">
            <text:p>4</text:p>
          </table:table-cell>
          <table:table-cell table:formula="of:=IF([.D10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DEC2HEX([.C1017])" office:value-type="string" office:string-value="ED970" calcext:value-type="string">
            <text:p>ED970</text:p>
          </table:table-cell>
          <table:table-cell office:value-type="float" office:value="973168" calcext:value-type="float">
            <text:p>973168</text:p>
          </table:table-cell>
          <table:table-cell office:value-type="float" office:value="4" calcext:value-type="float">
            <text:p>4</text:p>
          </table:table-cell>
          <table:table-cell table:formula="of:=IF([.D10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DEC2HEX([.C1018])" office:value-type="string" office:string-value="ED974" calcext:value-type="string">
            <text:p>ED974</text:p>
          </table:table-cell>
          <table:table-cell office:value-type="float" office:value="973172" calcext:value-type="float">
            <text:p>973172</text:p>
          </table:table-cell>
          <table:table-cell office:value-type="float" office:value="4" calcext:value-type="float">
            <text:p>4</text:p>
          </table:table-cell>
          <table:table-cell table:formula="of:=IF([.D10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DEC2HEX([.C1019])" office:value-type="string" office:string-value="ED978" calcext:value-type="string">
            <text:p>ED978</text:p>
          </table:table-cell>
          <table:table-cell office:value-type="float" office:value="973176" calcext:value-type="float">
            <text:p>973176</text:p>
          </table:table-cell>
          <table:table-cell office:value-type="float" office:value="4" calcext:value-type="float">
            <text:p>4</text:p>
          </table:table-cell>
          <table:table-cell table:formula="of:=IF([.D10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DEC2HEX([.C1020])" office:value-type="string" office:string-value="ED97C" calcext:value-type="string">
            <text:p>ED97C</text:p>
          </table:table-cell>
          <table:table-cell office:value-type="float" office:value="973180" calcext:value-type="float">
            <text:p>973180</text:p>
          </table:table-cell>
          <table:table-cell office:value-type="float" office:value="11" calcext:value-type="float">
            <text:p>11</text:p>
          </table:table-cell>
          <table:table-cell table:formula="of:=IF([.D10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DEC2HEX([.C1021])" office:value-type="string" office:string-value="ED987" calcext:value-type="string">
            <text:p>ED987</text:p>
          </table:table-cell>
          <table:table-cell office:value-type="float" office:value="973191" calcext:value-type="float">
            <text:p>973191</text:p>
          </table:table-cell>
          <table:table-cell office:value-type="float" office:value="4" calcext:value-type="float">
            <text:p>4</text:p>
          </table:table-cell>
          <table:table-cell table:formula="of:=IF([.D10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DEC2HEX([.C1022])" office:value-type="string" office:string-value="ED98B" calcext:value-type="string">
            <text:p>ED98B</text:p>
          </table:table-cell>
          <table:table-cell office:value-type="float" office:value="973195" calcext:value-type="float">
            <text:p>973195</text:p>
          </table:table-cell>
          <table:table-cell office:value-type="float" office:value="4" calcext:value-type="float">
            <text:p>4</text:p>
          </table:table-cell>
          <table:table-cell table:formula="of:=IF([.D10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DEC2HEX([.C1023])" office:value-type="string" office:string-value="ED98F" calcext:value-type="string">
            <text:p>ED98F</text:p>
          </table:table-cell>
          <table:table-cell office:value-type="float" office:value="973199" calcext:value-type="float">
            <text:p>973199</text:p>
          </table:table-cell>
          <table:table-cell office:value-type="float" office:value="4" calcext:value-type="float">
            <text:p>4</text:p>
          </table:table-cell>
          <table:table-cell table:formula="of:=IF([.D10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DEC2HEX([.C1024])" office:value-type="string" office:string-value="ED993" calcext:value-type="string">
            <text:p>ED993</text:p>
          </table:table-cell>
          <table:table-cell office:value-type="float" office:value="973203" calcext:value-type="float">
            <text:p>973203</text:p>
          </table:table-cell>
          <table:table-cell office:value-type="float" office:value="4" calcext:value-type="float">
            <text:p>4</text:p>
          </table:table-cell>
          <table:table-cell table:formula="of:=IF([.D10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DEC2HEX([.C1025])" office:value-type="string" office:string-value="ED997" calcext:value-type="string">
            <text:p>ED997</text:p>
          </table:table-cell>
          <table:table-cell office:value-type="float" office:value="973207" calcext:value-type="float">
            <text:p>973207</text:p>
          </table:table-cell>
          <table:table-cell office:value-type="float" office:value="4" calcext:value-type="float">
            <text:p>4</text:p>
          </table:table-cell>
          <table:table-cell table:formula="of:=IF([.D10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DEC2HEX([.C1026])" office:value-type="string" office:string-value="ED99B" calcext:value-type="string">
            <text:p>ED99B</text:p>
          </table:table-cell>
          <table:table-cell office:value-type="float" office:value="973211" calcext:value-type="float">
            <text:p>973211</text:p>
          </table:table-cell>
          <table:table-cell office:value-type="float" office:value="4" calcext:value-type="float">
            <text:p>4</text:p>
          </table:table-cell>
          <table:table-cell table:formula="of:=IF([.D10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DEC2HEX([.C1027])" office:value-type="string" office:string-value="ED99F" calcext:value-type="string">
            <text:p>ED99F</text:p>
          </table:table-cell>
          <table:table-cell office:value-type="float" office:value="973215" calcext:value-type="float">
            <text:p>973215</text:p>
          </table:table-cell>
          <table:table-cell office:value-type="float" office:value="4" calcext:value-type="float">
            <text:p>4</text:p>
          </table:table-cell>
          <table:table-cell table:formula="of:=IF([.D10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DEC2HEX([.C1028])" office:value-type="string" office:string-value="ED9A3" calcext:value-type="string">
            <text:p>ED9A3</text:p>
          </table:table-cell>
          <table:table-cell office:value-type="float" office:value="973219" calcext:value-type="float">
            <text:p>973219</text:p>
          </table:table-cell>
          <table:table-cell office:value-type="float" office:value="1" calcext:value-type="float">
            <text:p>1</text:p>
          </table:table-cell>
          <table:table-cell table:formula="of:=IF([.D10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DEC2HEX([.C1029])" office:value-type="string" office:string-value="ED9A4" calcext:value-type="string">
            <text:p>ED9A4</text:p>
          </table:table-cell>
          <table:table-cell office:value-type="float" office:value="973220" calcext:value-type="float">
            <text:p>973220</text:p>
          </table:table-cell>
          <table:table-cell office:value-type="float" office:value="4" calcext:value-type="float">
            <text:p>4</text:p>
          </table:table-cell>
          <table:table-cell table:formula="of:=IF([.D10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DEC2HEX([.C1030])" office:value-type="string" office:string-value="ED9A8" calcext:value-type="string">
            <text:p>ED9A8</text:p>
          </table:table-cell>
          <table:table-cell office:value-type="float" office:value="973224" calcext:value-type="float">
            <text:p>973224</text:p>
          </table:table-cell>
          <table:table-cell office:value-type="float" office:value="4" calcext:value-type="float">
            <text:p>4</text:p>
          </table:table-cell>
          <table:table-cell table:formula="of:=IF([.D10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DEC2HEX([.C1031])" office:value-type="string" office:string-value="ED9AC" calcext:value-type="string">
            <text:p>ED9AC</text:p>
          </table:table-cell>
          <table:table-cell office:value-type="float" office:value="973228" calcext:value-type="float">
            <text:p>973228</text:p>
          </table:table-cell>
          <table:table-cell office:value-type="float" office:value="4" calcext:value-type="float">
            <text:p>4</text:p>
          </table:table-cell>
          <table:table-cell table:formula="of:=IF([.D10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DEC2HEX([.C1032])" office:value-type="string" office:string-value="ED9B0" calcext:value-type="string">
            <text:p>ED9B0</text:p>
          </table:table-cell>
          <table:table-cell office:value-type="float" office:value="973232" calcext:value-type="float">
            <text:p>973232</text:p>
          </table:table-cell>
          <table:table-cell office:value-type="float" office:value="4" calcext:value-type="float">
            <text:p>4</text:p>
          </table:table-cell>
          <table:table-cell table:formula="of:=IF([.D10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DEC2HEX([.C1033])" office:value-type="string" office:string-value="ED9B4" calcext:value-type="string">
            <text:p>ED9B4</text:p>
          </table:table-cell>
          <table:table-cell office:value-type="float" office:value="973236" calcext:value-type="float">
            <text:p>973236</text:p>
          </table:table-cell>
          <table:table-cell office:value-type="float" office:value="4" calcext:value-type="float">
            <text:p>4</text:p>
          </table:table-cell>
          <table:table-cell table:formula="of:=IF([.D10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DEC2HEX([.C1034])" office:value-type="string" office:string-value="ED9B8" calcext:value-type="string">
            <text:p>ED9B8</text:p>
          </table:table-cell>
          <table:table-cell office:value-type="float" office:value="973240" calcext:value-type="float">
            <text:p>973240</text:p>
          </table:table-cell>
          <table:table-cell office:value-type="float" office:value="4" calcext:value-type="float">
            <text:p>4</text:p>
          </table:table-cell>
          <table:table-cell table:formula="of:=IF([.D10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DEC2HEX([.C1035])" office:value-type="string" office:string-value="ED9BC" calcext:value-type="string">
            <text:p>ED9BC</text:p>
          </table:table-cell>
          <table:table-cell office:value-type="float" office:value="973244" calcext:value-type="float">
            <text:p>973244</text:p>
          </table:table-cell>
          <table:table-cell office:value-type="float" office:value="11" calcext:value-type="float">
            <text:p>11</text:p>
          </table:table-cell>
          <table:table-cell table:formula="of:=IF([.D10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DEC2HEX([.C1036])" office:value-type="string" office:string-value="ED9C7" calcext:value-type="string">
            <text:p>ED9C7</text:p>
          </table:table-cell>
          <table:table-cell office:value-type="float" office:value="973255" calcext:value-type="float">
            <text:p>973255</text:p>
          </table:table-cell>
          <table:table-cell office:value-type="float" office:value="4" calcext:value-type="float">
            <text:p>4</text:p>
          </table:table-cell>
          <table:table-cell table:formula="of:=IF([.D10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DEC2HEX([.C1037])" office:value-type="string" office:string-value="ED9CB" calcext:value-type="string">
            <text:p>ED9CB</text:p>
          </table:table-cell>
          <table:table-cell office:value-type="float" office:value="973259" calcext:value-type="float">
            <text:p>973259</text:p>
          </table:table-cell>
          <table:table-cell office:value-type="float" office:value="4" calcext:value-type="float">
            <text:p>4</text:p>
          </table:table-cell>
          <table:table-cell table:formula="of:=IF([.D10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DEC2HEX([.C1038])" office:value-type="string" office:string-value="ED9CF" calcext:value-type="string">
            <text:p>ED9CF</text:p>
          </table:table-cell>
          <table:table-cell office:value-type="float" office:value="973263" calcext:value-type="float">
            <text:p>973263</text:p>
          </table:table-cell>
          <table:table-cell office:value-type="float" office:value="4" calcext:value-type="float">
            <text:p>4</text:p>
          </table:table-cell>
          <table:table-cell table:formula="of:=IF([.D10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DEC2HEX([.C1039])" office:value-type="string" office:string-value="ED9D3" calcext:value-type="string">
            <text:p>ED9D3</text:p>
          </table:table-cell>
          <table:table-cell office:value-type="float" office:value="973267" calcext:value-type="float">
            <text:p>973267</text:p>
          </table:table-cell>
          <table:table-cell office:value-type="float" office:value="4" calcext:value-type="float">
            <text:p>4</text:p>
          </table:table-cell>
          <table:table-cell table:formula="of:=IF([.D10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DEC2HEX([.C1040])" office:value-type="string" office:string-value="ED9D7" calcext:value-type="string">
            <text:p>ED9D7</text:p>
          </table:table-cell>
          <table:table-cell office:value-type="float" office:value="973271" calcext:value-type="float">
            <text:p>973271</text:p>
          </table:table-cell>
          <table:table-cell office:value-type="float" office:value="4" calcext:value-type="float">
            <text:p>4</text:p>
          </table:table-cell>
          <table:table-cell table:formula="of:=IF([.D10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DEC2HEX([.C1041])" office:value-type="string" office:string-value="ED9DB" calcext:value-type="string">
            <text:p>ED9DB</text:p>
          </table:table-cell>
          <table:table-cell office:value-type="float" office:value="973275" calcext:value-type="float">
            <text:p>973275</text:p>
          </table:table-cell>
          <table:table-cell office:value-type="float" office:value="4" calcext:value-type="float">
            <text:p>4</text:p>
          </table:table-cell>
          <table:table-cell table:formula="of:=IF([.D10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DEC2HEX([.C1042])" office:value-type="string" office:string-value="ED9DF" calcext:value-type="string">
            <text:p>ED9DF</text:p>
          </table:table-cell>
          <table:table-cell office:value-type="float" office:value="973279" calcext:value-type="float">
            <text:p>973279</text:p>
          </table:table-cell>
          <table:table-cell office:value-type="float" office:value="4" calcext:value-type="float">
            <text:p>4</text:p>
          </table:table-cell>
          <table:table-cell table:formula="of:=IF([.D10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DEC2HEX([.C1043])" office:value-type="string" office:string-value="ED9E3" calcext:value-type="string">
            <text:p>ED9E3</text:p>
          </table:table-cell>
          <table:table-cell office:value-type="float" office:value="973283" calcext:value-type="float">
            <text:p>973283</text:p>
          </table:table-cell>
          <table:table-cell office:value-type="float" office:value="1" calcext:value-type="float">
            <text:p>1</text:p>
          </table:table-cell>
          <table:table-cell table:formula="of:=IF([.D10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DEC2HEX([.C1044])" office:value-type="string" office:string-value="ED9E4" calcext:value-type="string">
            <text:p>ED9E4</text:p>
          </table:table-cell>
          <table:table-cell office:value-type="float" office:value="973284" calcext:value-type="float">
            <text:p>973284</text:p>
          </table:table-cell>
          <table:table-cell office:value-type="float" office:value="4" calcext:value-type="float">
            <text:p>4</text:p>
          </table:table-cell>
          <table:table-cell table:formula="of:=IF([.D10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DEC2HEX([.C1045])" office:value-type="string" office:string-value="ED9E8" calcext:value-type="string">
            <text:p>ED9E8</text:p>
          </table:table-cell>
          <table:table-cell office:value-type="float" office:value="973288" calcext:value-type="float">
            <text:p>973288</text:p>
          </table:table-cell>
          <table:table-cell office:value-type="float" office:value="4" calcext:value-type="float">
            <text:p>4</text:p>
          </table:table-cell>
          <table:table-cell table:formula="of:=IF([.D10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DEC2HEX([.C1046])" office:value-type="string" office:string-value="ED9EC" calcext:value-type="string">
            <text:p>ED9EC</text:p>
          </table:table-cell>
          <table:table-cell office:value-type="float" office:value="973292" calcext:value-type="float">
            <text:p>973292</text:p>
          </table:table-cell>
          <table:table-cell office:value-type="float" office:value="4" calcext:value-type="float">
            <text:p>4</text:p>
          </table:table-cell>
          <table:table-cell table:formula="of:=IF([.D10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DEC2HEX([.C1047])" office:value-type="string" office:string-value="ED9F0" calcext:value-type="string">
            <text:p>ED9F0</text:p>
          </table:table-cell>
          <table:table-cell office:value-type="float" office:value="973296" calcext:value-type="float">
            <text:p>973296</text:p>
          </table:table-cell>
          <table:table-cell office:value-type="float" office:value="4" calcext:value-type="float">
            <text:p>4</text:p>
          </table:table-cell>
          <table:table-cell table:formula="of:=IF([.D10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DEC2HEX([.C1048])" office:value-type="string" office:string-value="ED9F4" calcext:value-type="string">
            <text:p>ED9F4</text:p>
          </table:table-cell>
          <table:table-cell office:value-type="float" office:value="973300" calcext:value-type="float">
            <text:p>973300</text:p>
          </table:table-cell>
          <table:table-cell office:value-type="float" office:value="4" calcext:value-type="float">
            <text:p>4</text:p>
          </table:table-cell>
          <table:table-cell table:formula="of:=IF([.D10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DEC2HEX([.C1049])" office:value-type="string" office:string-value="ED9F8" calcext:value-type="string">
            <text:p>ED9F8</text:p>
          </table:table-cell>
          <table:table-cell office:value-type="float" office:value="973304" calcext:value-type="float">
            <text:p>973304</text:p>
          </table:table-cell>
          <table:table-cell office:value-type="float" office:value="4" calcext:value-type="float">
            <text:p>4</text:p>
          </table:table-cell>
          <table:table-cell table:formula="of:=IF([.D10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DEC2HEX([.C1050])" office:value-type="string" office:string-value="ED9FC" calcext:value-type="string">
            <text:p>ED9FC</text:p>
          </table:table-cell>
          <table:table-cell office:value-type="float" office:value="973308" calcext:value-type="float">
            <text:p>973308</text:p>
          </table:table-cell>
          <table:table-cell office:value-type="float" office:value="11" calcext:value-type="float">
            <text:p>11</text:p>
          </table:table-cell>
          <table:table-cell table:formula="of:=IF([.D10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DEC2HEX([.C1051])" office:value-type="string" office:string-value="EDA07" calcext:value-type="string">
            <text:p>EDA07</text:p>
          </table:table-cell>
          <table:table-cell office:value-type="float" office:value="973319" calcext:value-type="float">
            <text:p>973319</text:p>
          </table:table-cell>
          <table:table-cell office:value-type="float" office:value="4" calcext:value-type="float">
            <text:p>4</text:p>
          </table:table-cell>
          <table:table-cell table:formula="of:=IF([.D10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DEC2HEX([.C1052])" office:value-type="string" office:string-value="EDA0B" calcext:value-type="string">
            <text:p>EDA0B</text:p>
          </table:table-cell>
          <table:table-cell office:value-type="float" office:value="973323" calcext:value-type="float">
            <text:p>973323</text:p>
          </table:table-cell>
          <table:table-cell office:value-type="float" office:value="4" calcext:value-type="float">
            <text:p>4</text:p>
          </table:table-cell>
          <table:table-cell table:formula="of:=IF([.D10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DEC2HEX([.C1053])" office:value-type="string" office:string-value="EDA0F" calcext:value-type="string">
            <text:p>EDA0F</text:p>
          </table:table-cell>
          <table:table-cell office:value-type="float" office:value="973327" calcext:value-type="float">
            <text:p>973327</text:p>
          </table:table-cell>
          <table:table-cell office:value-type="float" office:value="4" calcext:value-type="float">
            <text:p>4</text:p>
          </table:table-cell>
          <table:table-cell table:formula="of:=IF([.D10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DEC2HEX([.C1054])" office:value-type="string" office:string-value="EDA13" calcext:value-type="string">
            <text:p>EDA13</text:p>
          </table:table-cell>
          <table:table-cell office:value-type="float" office:value="973331" calcext:value-type="float">
            <text:p>973331</text:p>
          </table:table-cell>
          <table:table-cell office:value-type="float" office:value="4" calcext:value-type="float">
            <text:p>4</text:p>
          </table:table-cell>
          <table:table-cell table:formula="of:=IF([.D10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DEC2HEX([.C1055])" office:value-type="string" office:string-value="EDA17" calcext:value-type="string">
            <text:p>EDA17</text:p>
          </table:table-cell>
          <table:table-cell office:value-type="float" office:value="973335" calcext:value-type="float">
            <text:p>973335</text:p>
          </table:table-cell>
          <table:table-cell office:value-type="float" office:value="4" calcext:value-type="float">
            <text:p>4</text:p>
          </table:table-cell>
          <table:table-cell table:formula="of:=IF([.D10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DEC2HEX([.C1056])" office:value-type="string" office:string-value="EDA1B" calcext:value-type="string">
            <text:p>EDA1B</text:p>
          </table:table-cell>
          <table:table-cell office:value-type="float" office:value="973339" calcext:value-type="float">
            <text:p>973339</text:p>
          </table:table-cell>
          <table:table-cell office:value-type="float" office:value="4" calcext:value-type="float">
            <text:p>4</text:p>
          </table:table-cell>
          <table:table-cell table:formula="of:=IF([.D10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DEC2HEX([.C1057])" office:value-type="string" office:string-value="EDA1F" calcext:value-type="string">
            <text:p>EDA1F</text:p>
          </table:table-cell>
          <table:table-cell office:value-type="float" office:value="973343" calcext:value-type="float">
            <text:p>973343</text:p>
          </table:table-cell>
          <table:table-cell office:value-type="float" office:value="4" calcext:value-type="float">
            <text:p>4</text:p>
          </table:table-cell>
          <table:table-cell table:formula="of:=IF([.D10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DEC2HEX([.C1058])" office:value-type="string" office:string-value="EDA23" calcext:value-type="string">
            <text:p>EDA23</text:p>
          </table:table-cell>
          <table:table-cell office:value-type="float" office:value="973347" calcext:value-type="float">
            <text:p>973347</text:p>
          </table:table-cell>
          <table:table-cell office:value-type="float" office:value="1" calcext:value-type="float">
            <text:p>1</text:p>
          </table:table-cell>
          <table:table-cell table:formula="of:=IF([.D10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DEC2HEX([.C1059])" office:value-type="string" office:string-value="EDA24" calcext:value-type="string">
            <text:p>EDA24</text:p>
          </table:table-cell>
          <table:table-cell office:value-type="float" office:value="973348" calcext:value-type="float">
            <text:p>973348</text:p>
          </table:table-cell>
          <table:table-cell office:value-type="float" office:value="4" calcext:value-type="float">
            <text:p>4</text:p>
          </table:table-cell>
          <table:table-cell table:formula="of:=IF([.D10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DEC2HEX([.C1060])" office:value-type="string" office:string-value="EDA28" calcext:value-type="string">
            <text:p>EDA28</text:p>
          </table:table-cell>
          <table:table-cell office:value-type="float" office:value="973352" calcext:value-type="float">
            <text:p>973352</text:p>
          </table:table-cell>
          <table:table-cell office:value-type="float" office:value="4" calcext:value-type="float">
            <text:p>4</text:p>
          </table:table-cell>
          <table:table-cell table:formula="of:=IF([.D10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DEC2HEX([.C1061])" office:value-type="string" office:string-value="EDA2C" calcext:value-type="string">
            <text:p>EDA2C</text:p>
          </table:table-cell>
          <table:table-cell office:value-type="float" office:value="973356" calcext:value-type="float">
            <text:p>973356</text:p>
          </table:table-cell>
          <table:table-cell office:value-type="float" office:value="4" calcext:value-type="float">
            <text:p>4</text:p>
          </table:table-cell>
          <table:table-cell table:formula="of:=IF([.D10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DEC2HEX([.C1062])" office:value-type="string" office:string-value="EDA30" calcext:value-type="string">
            <text:p>EDA30</text:p>
          </table:table-cell>
          <table:table-cell office:value-type="float" office:value="973360" calcext:value-type="float">
            <text:p>973360</text:p>
          </table:table-cell>
          <table:table-cell office:value-type="float" office:value="4" calcext:value-type="float">
            <text:p>4</text:p>
          </table:table-cell>
          <table:table-cell table:formula="of:=IF([.D10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DEC2HEX([.C1063])" office:value-type="string" office:string-value="EDA34" calcext:value-type="string">
            <text:p>EDA34</text:p>
          </table:table-cell>
          <table:table-cell office:value-type="float" office:value="973364" calcext:value-type="float">
            <text:p>973364</text:p>
          </table:table-cell>
          <table:table-cell office:value-type="float" office:value="4" calcext:value-type="float">
            <text:p>4</text:p>
          </table:table-cell>
          <table:table-cell table:formula="of:=IF([.D10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DEC2HEX([.C1064])" office:value-type="string" office:string-value="EDA38" calcext:value-type="string">
            <text:p>EDA38</text:p>
          </table:table-cell>
          <table:table-cell office:value-type="float" office:value="973368" calcext:value-type="float">
            <text:p>973368</text:p>
          </table:table-cell>
          <table:table-cell office:value-type="float" office:value="4" calcext:value-type="float">
            <text:p>4</text:p>
          </table:table-cell>
          <table:table-cell table:formula="of:=IF([.D10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DEC2HEX([.C1065])" office:value-type="string" office:string-value="EDA3C" calcext:value-type="string">
            <text:p>EDA3C</text:p>
          </table:table-cell>
          <table:table-cell office:value-type="float" office:value="973372" calcext:value-type="float">
            <text:p>973372</text:p>
          </table:table-cell>
          <table:table-cell office:value-type="float" office:value="11" calcext:value-type="float">
            <text:p>11</text:p>
          </table:table-cell>
          <table:table-cell table:formula="of:=IF([.D10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DEC2HEX([.C1066])" office:value-type="string" office:string-value="EDA47" calcext:value-type="string">
            <text:p>EDA47</text:p>
          </table:table-cell>
          <table:table-cell office:value-type="float" office:value="973383" calcext:value-type="float">
            <text:p>973383</text:p>
          </table:table-cell>
          <table:table-cell office:value-type="float" office:value="4" calcext:value-type="float">
            <text:p>4</text:p>
          </table:table-cell>
          <table:table-cell table:formula="of:=IF([.D10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DEC2HEX([.C1067])" office:value-type="string" office:string-value="EDA4B" calcext:value-type="string">
            <text:p>EDA4B</text:p>
          </table:table-cell>
          <table:table-cell office:value-type="float" office:value="973387" calcext:value-type="float">
            <text:p>973387</text:p>
          </table:table-cell>
          <table:table-cell office:value-type="float" office:value="4" calcext:value-type="float">
            <text:p>4</text:p>
          </table:table-cell>
          <table:table-cell table:formula="of:=IF([.D10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DEC2HEX([.C1068])" office:value-type="string" office:string-value="EDA4F" calcext:value-type="string">
            <text:p>EDA4F</text:p>
          </table:table-cell>
          <table:table-cell office:value-type="float" office:value="973391" calcext:value-type="float">
            <text:p>973391</text:p>
          </table:table-cell>
          <table:table-cell office:value-type="float" office:value="4" calcext:value-type="float">
            <text:p>4</text:p>
          </table:table-cell>
          <table:table-cell table:formula="of:=IF([.D10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DEC2HEX([.C1069])" office:value-type="string" office:string-value="EDA53" calcext:value-type="string">
            <text:p>EDA53</text:p>
          </table:table-cell>
          <table:table-cell office:value-type="float" office:value="973395" calcext:value-type="float">
            <text:p>973395</text:p>
          </table:table-cell>
          <table:table-cell office:value-type="float" office:value="4" calcext:value-type="float">
            <text:p>4</text:p>
          </table:table-cell>
          <table:table-cell table:formula="of:=IF([.D10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DEC2HEX([.C1070])" office:value-type="string" office:string-value="EDA57" calcext:value-type="string">
            <text:p>EDA57</text:p>
          </table:table-cell>
          <table:table-cell office:value-type="float" office:value="973399" calcext:value-type="float">
            <text:p>973399</text:p>
          </table:table-cell>
          <table:table-cell office:value-type="float" office:value="4" calcext:value-type="float">
            <text:p>4</text:p>
          </table:table-cell>
          <table:table-cell table:formula="of:=IF([.D10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DEC2HEX([.C1071])" office:value-type="string" office:string-value="EDA5B" calcext:value-type="string">
            <text:p>EDA5B</text:p>
          </table:table-cell>
          <table:table-cell office:value-type="float" office:value="973403" calcext:value-type="float">
            <text:p>973403</text:p>
          </table:table-cell>
          <table:table-cell office:value-type="float" office:value="4" calcext:value-type="float">
            <text:p>4</text:p>
          </table:table-cell>
          <table:table-cell table:formula="of:=IF([.D10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DEC2HEX([.C1072])" office:value-type="string" office:string-value="EDA5F" calcext:value-type="string">
            <text:p>EDA5F</text:p>
          </table:table-cell>
          <table:table-cell office:value-type="float" office:value="973407" calcext:value-type="float">
            <text:p>973407</text:p>
          </table:table-cell>
          <table:table-cell office:value-type="float" office:value="4" calcext:value-type="float">
            <text:p>4</text:p>
          </table:table-cell>
          <table:table-cell table:formula="of:=IF([.D10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DEC2HEX([.C1073])" office:value-type="string" office:string-value="EDA63" calcext:value-type="string">
            <text:p>EDA63</text:p>
          </table:table-cell>
          <table:table-cell office:value-type="float" office:value="973411" calcext:value-type="float">
            <text:p>973411</text:p>
          </table:table-cell>
          <table:table-cell office:value-type="float" office:value="1" calcext:value-type="float">
            <text:p>1</text:p>
          </table:table-cell>
          <table:table-cell table:formula="of:=IF([.D10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DEC2HEX([.C1074])" office:value-type="string" office:string-value="EDA64" calcext:value-type="string">
            <text:p>EDA64</text:p>
          </table:table-cell>
          <table:table-cell office:value-type="float" office:value="973412" calcext:value-type="float">
            <text:p>973412</text:p>
          </table:table-cell>
          <table:table-cell office:value-type="float" office:value="4" calcext:value-type="float">
            <text:p>4</text:p>
          </table:table-cell>
          <table:table-cell table:formula="of:=IF([.D10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DEC2HEX([.C1075])" office:value-type="string" office:string-value="EDA68" calcext:value-type="string">
            <text:p>EDA68</text:p>
          </table:table-cell>
          <table:table-cell office:value-type="float" office:value="973416" calcext:value-type="float">
            <text:p>973416</text:p>
          </table:table-cell>
          <table:table-cell office:value-type="float" office:value="4" calcext:value-type="float">
            <text:p>4</text:p>
          </table:table-cell>
          <table:table-cell table:formula="of:=IF([.D10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DEC2HEX([.C1076])" office:value-type="string" office:string-value="EDA6C" calcext:value-type="string">
            <text:p>EDA6C</text:p>
          </table:table-cell>
          <table:table-cell office:value-type="float" office:value="973420" calcext:value-type="float">
            <text:p>973420</text:p>
          </table:table-cell>
          <table:table-cell office:value-type="float" office:value="4" calcext:value-type="float">
            <text:p>4</text:p>
          </table:table-cell>
          <table:table-cell table:formula="of:=IF([.D10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DEC2HEX([.C1077])" office:value-type="string" office:string-value="EDA70" calcext:value-type="string">
            <text:p>EDA70</text:p>
          </table:table-cell>
          <table:table-cell office:value-type="float" office:value="973424" calcext:value-type="float">
            <text:p>973424</text:p>
          </table:table-cell>
          <table:table-cell office:value-type="float" office:value="4" calcext:value-type="float">
            <text:p>4</text:p>
          </table:table-cell>
          <table:table-cell table:formula="of:=IF([.D10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DEC2HEX([.C1078])" office:value-type="string" office:string-value="EDA74" calcext:value-type="string">
            <text:p>EDA74</text:p>
          </table:table-cell>
          <table:table-cell office:value-type="float" office:value="973428" calcext:value-type="float">
            <text:p>973428</text:p>
          </table:table-cell>
          <table:table-cell office:value-type="float" office:value="4" calcext:value-type="float">
            <text:p>4</text:p>
          </table:table-cell>
          <table:table-cell table:formula="of:=IF([.D10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DEC2HEX([.C1079])" office:value-type="string" office:string-value="EDA78" calcext:value-type="string">
            <text:p>EDA78</text:p>
          </table:table-cell>
          <table:table-cell office:value-type="float" office:value="973432" calcext:value-type="float">
            <text:p>973432</text:p>
          </table:table-cell>
          <table:table-cell office:value-type="float" office:value="4" calcext:value-type="float">
            <text:p>4</text:p>
          </table:table-cell>
          <table:table-cell table:formula="of:=IF([.D10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DEC2HEX([.C1080])" office:value-type="string" office:string-value="EDA7C" calcext:value-type="string">
            <text:p>EDA7C</text:p>
          </table:table-cell>
          <table:table-cell office:value-type="float" office:value="973436" calcext:value-type="float">
            <text:p>973436</text:p>
          </table:table-cell>
          <table:table-cell office:value-type="float" office:value="11" calcext:value-type="float">
            <text:p>11</text:p>
          </table:table-cell>
          <table:table-cell table:formula="of:=IF([.D10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DEC2HEX([.C1081])" office:value-type="string" office:string-value="EDA87" calcext:value-type="string">
            <text:p>EDA87</text:p>
          </table:table-cell>
          <table:table-cell office:value-type="float" office:value="973447" calcext:value-type="float">
            <text:p>973447</text:p>
          </table:table-cell>
          <table:table-cell office:value-type="float" office:value="4" calcext:value-type="float">
            <text:p>4</text:p>
          </table:table-cell>
          <table:table-cell table:formula="of:=IF([.D10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DEC2HEX([.C1082])" office:value-type="string" office:string-value="EDA8B" calcext:value-type="string">
            <text:p>EDA8B</text:p>
          </table:table-cell>
          <table:table-cell office:value-type="float" office:value="973451" calcext:value-type="float">
            <text:p>973451</text:p>
          </table:table-cell>
          <table:table-cell office:value-type="float" office:value="4" calcext:value-type="float">
            <text:p>4</text:p>
          </table:table-cell>
          <table:table-cell table:formula="of:=IF([.D10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DEC2HEX([.C1083])" office:value-type="string" office:string-value="EDA8F" calcext:value-type="string">
            <text:p>EDA8F</text:p>
          </table:table-cell>
          <table:table-cell office:value-type="float" office:value="973455" calcext:value-type="float">
            <text:p>973455</text:p>
          </table:table-cell>
          <table:table-cell office:value-type="float" office:value="4" calcext:value-type="float">
            <text:p>4</text:p>
          </table:table-cell>
          <table:table-cell table:formula="of:=IF([.D10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DEC2HEX([.C1084])" office:value-type="string" office:string-value="EDA93" calcext:value-type="string">
            <text:p>EDA93</text:p>
          </table:table-cell>
          <table:table-cell office:value-type="float" office:value="973459" calcext:value-type="float">
            <text:p>973459</text:p>
          </table:table-cell>
          <table:table-cell office:value-type="float" office:value="4" calcext:value-type="float">
            <text:p>4</text:p>
          </table:table-cell>
          <table:table-cell table:formula="of:=IF([.D10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DEC2HEX([.C1085])" office:value-type="string" office:string-value="EDA97" calcext:value-type="string">
            <text:p>EDA97</text:p>
          </table:table-cell>
          <table:table-cell office:value-type="float" office:value="973463" calcext:value-type="float">
            <text:p>973463</text:p>
          </table:table-cell>
          <table:table-cell office:value-type="float" office:value="4" calcext:value-type="float">
            <text:p>4</text:p>
          </table:table-cell>
          <table:table-cell table:formula="of:=IF([.D10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DEC2HEX([.C1086])" office:value-type="string" office:string-value="EDA9B" calcext:value-type="string">
            <text:p>EDA9B</text:p>
          </table:table-cell>
          <table:table-cell office:value-type="float" office:value="973467" calcext:value-type="float">
            <text:p>973467</text:p>
          </table:table-cell>
          <table:table-cell office:value-type="float" office:value="4" calcext:value-type="float">
            <text:p>4</text:p>
          </table:table-cell>
          <table:table-cell table:formula="of:=IF([.D10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DEC2HEX([.C1087])" office:value-type="string" office:string-value="EDA9F" calcext:value-type="string">
            <text:p>EDA9F</text:p>
          </table:table-cell>
          <table:table-cell office:value-type="float" office:value="973471" calcext:value-type="float">
            <text:p>973471</text:p>
          </table:table-cell>
          <table:table-cell office:value-type="float" office:value="4" calcext:value-type="float">
            <text:p>4</text:p>
          </table:table-cell>
          <table:table-cell table:formula="of:=IF([.D10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DEC2HEX([.C1088])" office:value-type="string" office:string-value="EDAA3" calcext:value-type="string">
            <text:p>EDAA3</text:p>
          </table:table-cell>
          <table:table-cell office:value-type="float" office:value="973475" calcext:value-type="float">
            <text:p>973475</text:p>
          </table:table-cell>
          <table:table-cell office:value-type="float" office:value="1" calcext:value-type="float">
            <text:p>1</text:p>
          </table:table-cell>
          <table:table-cell table:formula="of:=IF([.D10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DEC2HEX([.C1089])" office:value-type="string" office:string-value="EDAA4" calcext:value-type="string">
            <text:p>EDAA4</text:p>
          </table:table-cell>
          <table:table-cell office:value-type="float" office:value="973476" calcext:value-type="float">
            <text:p>973476</text:p>
          </table:table-cell>
          <table:table-cell office:value-type="float" office:value="4" calcext:value-type="float">
            <text:p>4</text:p>
          </table:table-cell>
          <table:table-cell table:formula="of:=IF([.D10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DEC2HEX([.C1090])" office:value-type="string" office:string-value="EDAA8" calcext:value-type="string">
            <text:p>EDAA8</text:p>
          </table:table-cell>
          <table:table-cell office:value-type="float" office:value="973480" calcext:value-type="float">
            <text:p>973480</text:p>
          </table:table-cell>
          <table:table-cell office:value-type="float" office:value="4" calcext:value-type="float">
            <text:p>4</text:p>
          </table:table-cell>
          <table:table-cell table:formula="of:=IF([.D10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DEC2HEX([.C1091])" office:value-type="string" office:string-value="EDAAC" calcext:value-type="string">
            <text:p>EDAAC</text:p>
          </table:table-cell>
          <table:table-cell office:value-type="float" office:value="973484" calcext:value-type="float">
            <text:p>973484</text:p>
          </table:table-cell>
          <table:table-cell office:value-type="float" office:value="4" calcext:value-type="float">
            <text:p>4</text:p>
          </table:table-cell>
          <table:table-cell table:formula="of:=IF([.D10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DEC2HEX([.C1092])" office:value-type="string" office:string-value="EDAB0" calcext:value-type="string">
            <text:p>EDAB0</text:p>
          </table:table-cell>
          <table:table-cell office:value-type="float" office:value="973488" calcext:value-type="float">
            <text:p>973488</text:p>
          </table:table-cell>
          <table:table-cell office:value-type="float" office:value="4" calcext:value-type="float">
            <text:p>4</text:p>
          </table:table-cell>
          <table:table-cell table:formula="of:=IF([.D10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DEC2HEX([.C1093])" office:value-type="string" office:string-value="EDAB4" calcext:value-type="string">
            <text:p>EDAB4</text:p>
          </table:table-cell>
          <table:table-cell office:value-type="float" office:value="973492" calcext:value-type="float">
            <text:p>973492</text:p>
          </table:table-cell>
          <table:table-cell office:value-type="float" office:value="4" calcext:value-type="float">
            <text:p>4</text:p>
          </table:table-cell>
          <table:table-cell table:formula="of:=IF([.D10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DEC2HEX([.C1094])" office:value-type="string" office:string-value="EDAB8" calcext:value-type="string">
            <text:p>EDAB8</text:p>
          </table:table-cell>
          <table:table-cell office:value-type="float" office:value="973496" calcext:value-type="float">
            <text:p>973496</text:p>
          </table:table-cell>
          <table:table-cell office:value-type="float" office:value="4" calcext:value-type="float">
            <text:p>4</text:p>
          </table:table-cell>
          <table:table-cell table:formula="of:=IF([.D10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DEC2HEX([.C1095])" office:value-type="string" office:string-value="EDABC" calcext:value-type="string">
            <text:p>EDABC</text:p>
          </table:table-cell>
          <table:table-cell office:value-type="float" office:value="973500" calcext:value-type="float">
            <text:p>973500</text:p>
          </table:table-cell>
          <table:table-cell office:value-type="float" office:value="11" calcext:value-type="float">
            <text:p>11</text:p>
          </table:table-cell>
          <table:table-cell table:formula="of:=IF([.D10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DEC2HEX([.C1096])" office:value-type="string" office:string-value="EDAC7" calcext:value-type="string">
            <text:p>EDAC7</text:p>
          </table:table-cell>
          <table:table-cell office:value-type="float" office:value="973511" calcext:value-type="float">
            <text:p>973511</text:p>
          </table:table-cell>
          <table:table-cell office:value-type="float" office:value="4" calcext:value-type="float">
            <text:p>4</text:p>
          </table:table-cell>
          <table:table-cell table:formula="of:=IF([.D10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DEC2HEX([.C1097])" office:value-type="string" office:string-value="EDACB" calcext:value-type="string">
            <text:p>EDACB</text:p>
          </table:table-cell>
          <table:table-cell office:value-type="float" office:value="973515" calcext:value-type="float">
            <text:p>973515</text:p>
          </table:table-cell>
          <table:table-cell office:value-type="float" office:value="4" calcext:value-type="float">
            <text:p>4</text:p>
          </table:table-cell>
          <table:table-cell table:formula="of:=IF([.D10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DEC2HEX([.C1098])" office:value-type="string" office:string-value="EDACF" calcext:value-type="string">
            <text:p>EDACF</text:p>
          </table:table-cell>
          <table:table-cell office:value-type="float" office:value="973519" calcext:value-type="float">
            <text:p>973519</text:p>
          </table:table-cell>
          <table:table-cell office:value-type="float" office:value="4" calcext:value-type="float">
            <text:p>4</text:p>
          </table:table-cell>
          <table:table-cell table:formula="of:=IF([.D10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DEC2HEX([.C1099])" office:value-type="string" office:string-value="EDAD3" calcext:value-type="string">
            <text:p>EDAD3</text:p>
          </table:table-cell>
          <table:table-cell office:value-type="float" office:value="973523" calcext:value-type="float">
            <text:p>973523</text:p>
          </table:table-cell>
          <table:table-cell office:value-type="float" office:value="4" calcext:value-type="float">
            <text:p>4</text:p>
          </table:table-cell>
          <table:table-cell table:formula="of:=IF([.D10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DEC2HEX([.C1100])" office:value-type="string" office:string-value="EDAD7" calcext:value-type="string">
            <text:p>EDAD7</text:p>
          </table:table-cell>
          <table:table-cell office:value-type="float" office:value="973527" calcext:value-type="float">
            <text:p>973527</text:p>
          </table:table-cell>
          <table:table-cell office:value-type="float" office:value="4" calcext:value-type="float">
            <text:p>4</text:p>
          </table:table-cell>
          <table:table-cell table:formula="of:=IF([.D11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DEC2HEX([.C1101])" office:value-type="string" office:string-value="EDADB" calcext:value-type="string">
            <text:p>EDADB</text:p>
          </table:table-cell>
          <table:table-cell office:value-type="float" office:value="973531" calcext:value-type="float">
            <text:p>973531</text:p>
          </table:table-cell>
          <table:table-cell office:value-type="float" office:value="4" calcext:value-type="float">
            <text:p>4</text:p>
          </table:table-cell>
          <table:table-cell table:formula="of:=IF([.D11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DEC2HEX([.C1102])" office:value-type="string" office:string-value="EDADF" calcext:value-type="string">
            <text:p>EDADF</text:p>
          </table:table-cell>
          <table:table-cell office:value-type="float" office:value="973535" calcext:value-type="float">
            <text:p>973535</text:p>
          </table:table-cell>
          <table:table-cell office:value-type="float" office:value="4" calcext:value-type="float">
            <text:p>4</text:p>
          </table:table-cell>
          <table:table-cell table:formula="of:=IF([.D11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DEC2HEX([.C1103])" office:value-type="string" office:string-value="EDAE3" calcext:value-type="string">
            <text:p>EDAE3</text:p>
          </table:table-cell>
          <table:table-cell office:value-type="float" office:value="973539" calcext:value-type="float">
            <text:p>973539</text:p>
          </table:table-cell>
          <table:table-cell office:value-type="float" office:value="1" calcext:value-type="float">
            <text:p>1</text:p>
          </table:table-cell>
          <table:table-cell table:formula="of:=IF([.D11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DEC2HEX([.C1104])" office:value-type="string" office:string-value="EDAE4" calcext:value-type="string">
            <text:p>EDAE4</text:p>
          </table:table-cell>
          <table:table-cell office:value-type="float" office:value="973540" calcext:value-type="float">
            <text:p>973540</text:p>
          </table:table-cell>
          <table:table-cell office:value-type="float" office:value="4" calcext:value-type="float">
            <text:p>4</text:p>
          </table:table-cell>
          <table:table-cell table:formula="of:=IF([.D11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DEC2HEX([.C1105])" office:value-type="string" office:string-value="EDAE8" calcext:value-type="string">
            <text:p>EDAE8</text:p>
          </table:table-cell>
          <table:table-cell office:value-type="float" office:value="973544" calcext:value-type="float">
            <text:p>973544</text:p>
          </table:table-cell>
          <table:table-cell office:value-type="float" office:value="4" calcext:value-type="float">
            <text:p>4</text:p>
          </table:table-cell>
          <table:table-cell table:formula="of:=IF([.D11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DEC2HEX([.C1106])" office:value-type="string" office:string-value="EDAEC" calcext:value-type="string">
            <text:p>EDAEC</text:p>
          </table:table-cell>
          <table:table-cell office:value-type="float" office:value="973548" calcext:value-type="float">
            <text:p>973548</text:p>
          </table:table-cell>
          <table:table-cell office:value-type="float" office:value="4" calcext:value-type="float">
            <text:p>4</text:p>
          </table:table-cell>
          <table:table-cell table:formula="of:=IF([.D11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DEC2HEX([.C1107])" office:value-type="string" office:string-value="EDAF0" calcext:value-type="string">
            <text:p>EDAF0</text:p>
          </table:table-cell>
          <table:table-cell office:value-type="float" office:value="973552" calcext:value-type="float">
            <text:p>973552</text:p>
          </table:table-cell>
          <table:table-cell office:value-type="float" office:value="4" calcext:value-type="float">
            <text:p>4</text:p>
          </table:table-cell>
          <table:table-cell table:formula="of:=IF([.D11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DEC2HEX([.C1108])" office:value-type="string" office:string-value="EDAF4" calcext:value-type="string">
            <text:p>EDAF4</text:p>
          </table:table-cell>
          <table:table-cell office:value-type="float" office:value="973556" calcext:value-type="float">
            <text:p>973556</text:p>
          </table:table-cell>
          <table:table-cell office:value-type="float" office:value="4" calcext:value-type="float">
            <text:p>4</text:p>
          </table:table-cell>
          <table:table-cell table:formula="of:=IF([.D11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DEC2HEX([.C1109])" office:value-type="string" office:string-value="EDAF8" calcext:value-type="string">
            <text:p>EDAF8</text:p>
          </table:table-cell>
          <table:table-cell office:value-type="float" office:value="973560" calcext:value-type="float">
            <text:p>973560</text:p>
          </table:table-cell>
          <table:table-cell office:value-type="float" office:value="4" calcext:value-type="float">
            <text:p>4</text:p>
          </table:table-cell>
          <table:table-cell table:formula="of:=IF([.D11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DEC2HEX([.C1110])" office:value-type="string" office:string-value="EDAFC" calcext:value-type="string">
            <text:p>EDAFC</text:p>
          </table:table-cell>
          <table:table-cell office:value-type="float" office:value="973564" calcext:value-type="float">
            <text:p>973564</text:p>
          </table:table-cell>
          <table:table-cell office:value-type="float" office:value="11" calcext:value-type="float">
            <text:p>11</text:p>
          </table:table-cell>
          <table:table-cell table:formula="of:=IF([.D11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DEC2HEX([.C1111])" office:value-type="string" office:string-value="EDB07" calcext:value-type="string">
            <text:p>EDB07</text:p>
          </table:table-cell>
          <table:table-cell office:value-type="float" office:value="973575" calcext:value-type="float">
            <text:p>973575</text:p>
          </table:table-cell>
          <table:table-cell office:value-type="float" office:value="4" calcext:value-type="float">
            <text:p>4</text:p>
          </table:table-cell>
          <table:table-cell table:formula="of:=IF([.D11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DEC2HEX([.C1112])" office:value-type="string" office:string-value="EDB0B" calcext:value-type="string">
            <text:p>EDB0B</text:p>
          </table:table-cell>
          <table:table-cell office:value-type="float" office:value="973579" calcext:value-type="float">
            <text:p>973579</text:p>
          </table:table-cell>
          <table:table-cell office:value-type="float" office:value="4" calcext:value-type="float">
            <text:p>4</text:p>
          </table:table-cell>
          <table:table-cell table:formula="of:=IF([.D11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DEC2HEX([.C1113])" office:value-type="string" office:string-value="EDB0F" calcext:value-type="string">
            <text:p>EDB0F</text:p>
          </table:table-cell>
          <table:table-cell office:value-type="float" office:value="973583" calcext:value-type="float">
            <text:p>973583</text:p>
          </table:table-cell>
          <table:table-cell office:value-type="float" office:value="4" calcext:value-type="float">
            <text:p>4</text:p>
          </table:table-cell>
          <table:table-cell table:formula="of:=IF([.D11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DEC2HEX([.C1114])" office:value-type="string" office:string-value="EDB13" calcext:value-type="string">
            <text:p>EDB13</text:p>
          </table:table-cell>
          <table:table-cell office:value-type="float" office:value="973587" calcext:value-type="float">
            <text:p>973587</text:p>
          </table:table-cell>
          <table:table-cell office:value-type="float" office:value="4" calcext:value-type="float">
            <text:p>4</text:p>
          </table:table-cell>
          <table:table-cell table:formula="of:=IF([.D11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DEC2HEX([.C1115])" office:value-type="string" office:string-value="EDB17" calcext:value-type="string">
            <text:p>EDB17</text:p>
          </table:table-cell>
          <table:table-cell office:value-type="float" office:value="973591" calcext:value-type="float">
            <text:p>973591</text:p>
          </table:table-cell>
          <table:table-cell office:value-type="float" office:value="4" calcext:value-type="float">
            <text:p>4</text:p>
          </table:table-cell>
          <table:table-cell table:formula="of:=IF([.D11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DEC2HEX([.C1116])" office:value-type="string" office:string-value="EDB1B" calcext:value-type="string">
            <text:p>EDB1B</text:p>
          </table:table-cell>
          <table:table-cell office:value-type="float" office:value="973595" calcext:value-type="float">
            <text:p>973595</text:p>
          </table:table-cell>
          <table:table-cell office:value-type="float" office:value="4" calcext:value-type="float">
            <text:p>4</text:p>
          </table:table-cell>
          <table:table-cell table:formula="of:=IF([.D11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DEC2HEX([.C1117])" office:value-type="string" office:string-value="EDB1F" calcext:value-type="string">
            <text:p>EDB1F</text:p>
          </table:table-cell>
          <table:table-cell office:value-type="float" office:value="973599" calcext:value-type="float">
            <text:p>973599</text:p>
          </table:table-cell>
          <table:table-cell office:value-type="float" office:value="4" calcext:value-type="float">
            <text:p>4</text:p>
          </table:table-cell>
          <table:table-cell table:formula="of:=IF([.D11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DEC2HEX([.C1118])" office:value-type="string" office:string-value="EDB23" calcext:value-type="string">
            <text:p>EDB23</text:p>
          </table:table-cell>
          <table:table-cell office:value-type="float" office:value="973603" calcext:value-type="float">
            <text:p>973603</text:p>
          </table:table-cell>
          <table:table-cell office:value-type="float" office:value="1" calcext:value-type="float">
            <text:p>1</text:p>
          </table:table-cell>
          <table:table-cell table:formula="of:=IF([.D11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DEC2HEX([.C1119])" office:value-type="string" office:string-value="EDB24" calcext:value-type="string">
            <text:p>EDB24</text:p>
          </table:table-cell>
          <table:table-cell office:value-type="float" office:value="973604" calcext:value-type="float">
            <text:p>973604</text:p>
          </table:table-cell>
          <table:table-cell office:value-type="float" office:value="4" calcext:value-type="float">
            <text:p>4</text:p>
          </table:table-cell>
          <table:table-cell table:formula="of:=IF([.D11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DEC2HEX([.C1120])" office:value-type="string" office:string-value="EDB28" calcext:value-type="string">
            <text:p>EDB28</text:p>
          </table:table-cell>
          <table:table-cell office:value-type="float" office:value="973608" calcext:value-type="float">
            <text:p>973608</text:p>
          </table:table-cell>
          <table:table-cell office:value-type="float" office:value="4" calcext:value-type="float">
            <text:p>4</text:p>
          </table:table-cell>
          <table:table-cell table:formula="of:=IF([.D11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DEC2HEX([.C1121])" office:value-type="string" office:string-value="EDB2C" calcext:value-type="string">
            <text:p>EDB2C</text:p>
          </table:table-cell>
          <table:table-cell office:value-type="float" office:value="973612" calcext:value-type="float">
            <text:p>973612</text:p>
          </table:table-cell>
          <table:table-cell office:value-type="float" office:value="4" calcext:value-type="float">
            <text:p>4</text:p>
          </table:table-cell>
          <table:table-cell table:formula="of:=IF([.D11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DEC2HEX([.C1122])" office:value-type="string" office:string-value="EDB30" calcext:value-type="string">
            <text:p>EDB30</text:p>
          </table:table-cell>
          <table:table-cell office:value-type="float" office:value="973616" calcext:value-type="float">
            <text:p>973616</text:p>
          </table:table-cell>
          <table:table-cell office:value-type="float" office:value="4" calcext:value-type="float">
            <text:p>4</text:p>
          </table:table-cell>
          <table:table-cell table:formula="of:=IF([.D11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DEC2HEX([.C1123])" office:value-type="string" office:string-value="EDB34" calcext:value-type="string">
            <text:p>EDB34</text:p>
          </table:table-cell>
          <table:table-cell office:value-type="float" office:value="973620" calcext:value-type="float">
            <text:p>973620</text:p>
          </table:table-cell>
          <table:table-cell office:value-type="float" office:value="4" calcext:value-type="float">
            <text:p>4</text:p>
          </table:table-cell>
          <table:table-cell table:formula="of:=IF([.D11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DEC2HEX([.C1124])" office:value-type="string" office:string-value="EDB38" calcext:value-type="string">
            <text:p>EDB38</text:p>
          </table:table-cell>
          <table:table-cell office:value-type="float" office:value="973624" calcext:value-type="float">
            <text:p>973624</text:p>
          </table:table-cell>
          <table:table-cell office:value-type="float" office:value="4" calcext:value-type="float">
            <text:p>4</text:p>
          </table:table-cell>
          <table:table-cell table:formula="of:=IF([.D11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DEC2HEX([.C1125])" office:value-type="string" office:string-value="EDB3C" calcext:value-type="string">
            <text:p>EDB3C</text:p>
          </table:table-cell>
          <table:table-cell office:value-type="float" office:value="973628" calcext:value-type="float">
            <text:p>973628</text:p>
          </table:table-cell>
          <table:table-cell office:value-type="float" office:value="11" calcext:value-type="float">
            <text:p>11</text:p>
          </table:table-cell>
          <table:table-cell table:formula="of:=IF([.D11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DEC2HEX([.C1126])" office:value-type="string" office:string-value="EDB47" calcext:value-type="string">
            <text:p>EDB47</text:p>
          </table:table-cell>
          <table:table-cell office:value-type="float" office:value="973639" calcext:value-type="float">
            <text:p>973639</text:p>
          </table:table-cell>
          <table:table-cell office:value-type="float" office:value="4" calcext:value-type="float">
            <text:p>4</text:p>
          </table:table-cell>
          <table:table-cell table:formula="of:=IF([.D11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DEC2HEX([.C1127])" office:value-type="string" office:string-value="EDB4B" calcext:value-type="string">
            <text:p>EDB4B</text:p>
          </table:table-cell>
          <table:table-cell office:value-type="float" office:value="973643" calcext:value-type="float">
            <text:p>973643</text:p>
          </table:table-cell>
          <table:table-cell office:value-type="float" office:value="4" calcext:value-type="float">
            <text:p>4</text:p>
          </table:table-cell>
          <table:table-cell table:formula="of:=IF([.D11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DEC2HEX([.C1128])" office:value-type="string" office:string-value="EDB4F" calcext:value-type="string">
            <text:p>EDB4F</text:p>
          </table:table-cell>
          <table:table-cell office:value-type="float" office:value="973647" calcext:value-type="float">
            <text:p>973647</text:p>
          </table:table-cell>
          <table:table-cell office:value-type="float" office:value="4" calcext:value-type="float">
            <text:p>4</text:p>
          </table:table-cell>
          <table:table-cell table:formula="of:=IF([.D11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DEC2HEX([.C1129])" office:value-type="string" office:string-value="EDB53" calcext:value-type="string">
            <text:p>EDB53</text:p>
          </table:table-cell>
          <table:table-cell office:value-type="float" office:value="973651" calcext:value-type="float">
            <text:p>973651</text:p>
          </table:table-cell>
          <table:table-cell office:value-type="float" office:value="4" calcext:value-type="float">
            <text:p>4</text:p>
          </table:table-cell>
          <table:table-cell table:formula="of:=IF([.D11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DEC2HEX([.C1130])" office:value-type="string" office:string-value="EDB57" calcext:value-type="string">
            <text:p>EDB57</text:p>
          </table:table-cell>
          <table:table-cell office:value-type="float" office:value="973655" calcext:value-type="float">
            <text:p>973655</text:p>
          </table:table-cell>
          <table:table-cell office:value-type="float" office:value="4" calcext:value-type="float">
            <text:p>4</text:p>
          </table:table-cell>
          <table:table-cell table:formula="of:=IF([.D11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DEC2HEX([.C1131])" office:value-type="string" office:string-value="EDB5B" calcext:value-type="string">
            <text:p>EDB5B</text:p>
          </table:table-cell>
          <table:table-cell office:value-type="float" office:value="973659" calcext:value-type="float">
            <text:p>973659</text:p>
          </table:table-cell>
          <table:table-cell office:value-type="float" office:value="4" calcext:value-type="float">
            <text:p>4</text:p>
          </table:table-cell>
          <table:table-cell table:formula="of:=IF([.D11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DEC2HEX([.C1132])" office:value-type="string" office:string-value="EDB5F" calcext:value-type="string">
            <text:p>EDB5F</text:p>
          </table:table-cell>
          <table:table-cell office:value-type="float" office:value="973663" calcext:value-type="float">
            <text:p>973663</text:p>
          </table:table-cell>
          <table:table-cell office:value-type="float" office:value="4" calcext:value-type="float">
            <text:p>4</text:p>
          </table:table-cell>
          <table:table-cell table:formula="of:=IF([.D11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DEC2HEX([.C1133])" office:value-type="string" office:string-value="EDB63" calcext:value-type="string">
            <text:p>EDB63</text:p>
          </table:table-cell>
          <table:table-cell office:value-type="float" office:value="973667" calcext:value-type="float">
            <text:p>973667</text:p>
          </table:table-cell>
          <table:table-cell office:value-type="float" office:value="1" calcext:value-type="float">
            <text:p>1</text:p>
          </table:table-cell>
          <table:table-cell table:formula="of:=IF([.D11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DEC2HEX([.C1134])" office:value-type="string" office:string-value="EDB64" calcext:value-type="string">
            <text:p>EDB64</text:p>
          </table:table-cell>
          <table:table-cell office:value-type="float" office:value="973668" calcext:value-type="float">
            <text:p>973668</text:p>
          </table:table-cell>
          <table:table-cell office:value-type="float" office:value="4" calcext:value-type="float">
            <text:p>4</text:p>
          </table:table-cell>
          <table:table-cell table:formula="of:=IF([.D11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DEC2HEX([.C1135])" office:value-type="string" office:string-value="EDB68" calcext:value-type="string">
            <text:p>EDB68</text:p>
          </table:table-cell>
          <table:table-cell office:value-type="float" office:value="973672" calcext:value-type="float">
            <text:p>973672</text:p>
          </table:table-cell>
          <table:table-cell office:value-type="float" office:value="4" calcext:value-type="float">
            <text:p>4</text:p>
          </table:table-cell>
          <table:table-cell table:formula="of:=IF([.D11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DEC2HEX([.C1136])" office:value-type="string" office:string-value="EDB6C" calcext:value-type="string">
            <text:p>EDB6C</text:p>
          </table:table-cell>
          <table:table-cell office:value-type="float" office:value="973676" calcext:value-type="float">
            <text:p>973676</text:p>
          </table:table-cell>
          <table:table-cell office:value-type="float" office:value="4" calcext:value-type="float">
            <text:p>4</text:p>
          </table:table-cell>
          <table:table-cell table:formula="of:=IF([.D11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DEC2HEX([.C1137])" office:value-type="string" office:string-value="EDB70" calcext:value-type="string">
            <text:p>EDB70</text:p>
          </table:table-cell>
          <table:table-cell office:value-type="float" office:value="973680" calcext:value-type="float">
            <text:p>973680</text:p>
          </table:table-cell>
          <table:table-cell office:value-type="float" office:value="4" calcext:value-type="float">
            <text:p>4</text:p>
          </table:table-cell>
          <table:table-cell table:formula="of:=IF([.D11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DEC2HEX([.C1138])" office:value-type="string" office:string-value="EDB74" calcext:value-type="string">
            <text:p>EDB74</text:p>
          </table:table-cell>
          <table:table-cell office:value-type="float" office:value="973684" calcext:value-type="float">
            <text:p>973684</text:p>
          </table:table-cell>
          <table:table-cell office:value-type="float" office:value="4" calcext:value-type="float">
            <text:p>4</text:p>
          </table:table-cell>
          <table:table-cell table:formula="of:=IF([.D11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DEC2HEX([.C1139])" office:value-type="string" office:string-value="EDB78" calcext:value-type="string">
            <text:p>EDB78</text:p>
          </table:table-cell>
          <table:table-cell office:value-type="float" office:value="973688" calcext:value-type="float">
            <text:p>973688</text:p>
          </table:table-cell>
          <table:table-cell office:value-type="float" office:value="4" calcext:value-type="float">
            <text:p>4</text:p>
          </table:table-cell>
          <table:table-cell table:formula="of:=IF([.D11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DEC2HEX([.C1140])" office:value-type="string" office:string-value="EDB7C" calcext:value-type="string">
            <text:p>EDB7C</text:p>
          </table:table-cell>
          <table:table-cell office:value-type="float" office:value="973692" calcext:value-type="float">
            <text:p>973692</text:p>
          </table:table-cell>
          <table:table-cell office:value-type="float" office:value="11" calcext:value-type="float">
            <text:p>11</text:p>
          </table:table-cell>
          <table:table-cell table:formula="of:=IF([.D11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DEC2HEX([.C1141])" office:value-type="string" office:string-value="EDB87" calcext:value-type="string">
            <text:p>EDB87</text:p>
          </table:table-cell>
          <table:table-cell office:value-type="float" office:value="973703" calcext:value-type="float">
            <text:p>973703</text:p>
          </table:table-cell>
          <table:table-cell office:value-type="float" office:value="4" calcext:value-type="float">
            <text:p>4</text:p>
          </table:table-cell>
          <table:table-cell table:formula="of:=IF([.D11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DEC2HEX([.C1142])" office:value-type="string" office:string-value="EDB8B" calcext:value-type="string">
            <text:p>EDB8B</text:p>
          </table:table-cell>
          <table:table-cell office:value-type="float" office:value="973707" calcext:value-type="float">
            <text:p>973707</text:p>
          </table:table-cell>
          <table:table-cell office:value-type="float" office:value="4" calcext:value-type="float">
            <text:p>4</text:p>
          </table:table-cell>
          <table:table-cell table:formula="of:=IF([.D11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DEC2HEX([.C1143])" office:value-type="string" office:string-value="EDB8F" calcext:value-type="string">
            <text:p>EDB8F</text:p>
          </table:table-cell>
          <table:table-cell office:value-type="float" office:value="973711" calcext:value-type="float">
            <text:p>973711</text:p>
          </table:table-cell>
          <table:table-cell office:value-type="float" office:value="4" calcext:value-type="float">
            <text:p>4</text:p>
          </table:table-cell>
          <table:table-cell table:formula="of:=IF([.D11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DEC2HEX([.C1144])" office:value-type="string" office:string-value="EDB93" calcext:value-type="string">
            <text:p>EDB93</text:p>
          </table:table-cell>
          <table:table-cell office:value-type="float" office:value="973715" calcext:value-type="float">
            <text:p>973715</text:p>
          </table:table-cell>
          <table:table-cell office:value-type="float" office:value="4" calcext:value-type="float">
            <text:p>4</text:p>
          </table:table-cell>
          <table:table-cell table:formula="of:=IF([.D11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DEC2HEX([.C1145])" office:value-type="string" office:string-value="EDB97" calcext:value-type="string">
            <text:p>EDB97</text:p>
          </table:table-cell>
          <table:table-cell office:value-type="float" office:value="973719" calcext:value-type="float">
            <text:p>973719</text:p>
          </table:table-cell>
          <table:table-cell office:value-type="float" office:value="4" calcext:value-type="float">
            <text:p>4</text:p>
          </table:table-cell>
          <table:table-cell table:formula="of:=IF([.D11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DEC2HEX([.C1146])" office:value-type="string" office:string-value="EDB9B" calcext:value-type="string">
            <text:p>EDB9B</text:p>
          </table:table-cell>
          <table:table-cell office:value-type="float" office:value="973723" calcext:value-type="float">
            <text:p>973723</text:p>
          </table:table-cell>
          <table:table-cell office:value-type="float" office:value="4" calcext:value-type="float">
            <text:p>4</text:p>
          </table:table-cell>
          <table:table-cell table:formula="of:=IF([.D11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DEC2HEX([.C1147])" office:value-type="string" office:string-value="EDB9F" calcext:value-type="string">
            <text:p>EDB9F</text:p>
          </table:table-cell>
          <table:table-cell office:value-type="float" office:value="973727" calcext:value-type="float">
            <text:p>973727</text:p>
          </table:table-cell>
          <table:table-cell office:value-type="float" office:value="4" calcext:value-type="float">
            <text:p>4</text:p>
          </table:table-cell>
          <table:table-cell table:formula="of:=IF([.D11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DEC2HEX([.C1148])" office:value-type="string" office:string-value="EDBA3" calcext:value-type="string">
            <text:p>EDBA3</text:p>
          </table:table-cell>
          <table:table-cell office:value-type="float" office:value="973731" calcext:value-type="float">
            <text:p>973731</text:p>
          </table:table-cell>
          <table:table-cell office:value-type="float" office:value="1" calcext:value-type="float">
            <text:p>1</text:p>
          </table:table-cell>
          <table:table-cell table:formula="of:=IF([.D11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DEC2HEX([.C1149])" office:value-type="string" office:string-value="EDBA4" calcext:value-type="string">
            <text:p>EDBA4</text:p>
          </table:table-cell>
          <table:table-cell office:value-type="float" office:value="973732" calcext:value-type="float">
            <text:p>973732</text:p>
          </table:table-cell>
          <table:table-cell office:value-type="float" office:value="4" calcext:value-type="float">
            <text:p>4</text:p>
          </table:table-cell>
          <table:table-cell table:formula="of:=IF([.D11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DEC2HEX([.C1150])" office:value-type="string" office:string-value="EDBA8" calcext:value-type="string">
            <text:p>EDBA8</text:p>
          </table:table-cell>
          <table:table-cell office:value-type="float" office:value="973736" calcext:value-type="float">
            <text:p>973736</text:p>
          </table:table-cell>
          <table:table-cell office:value-type="float" office:value="4" calcext:value-type="float">
            <text:p>4</text:p>
          </table:table-cell>
          <table:table-cell table:formula="of:=IF([.D11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DEC2HEX([.C1151])" office:value-type="string" office:string-value="EDBAC" calcext:value-type="string">
            <text:p>EDBAC</text:p>
          </table:table-cell>
          <table:table-cell office:value-type="float" office:value="973740" calcext:value-type="float">
            <text:p>973740</text:p>
          </table:table-cell>
          <table:table-cell office:value-type="float" office:value="4" calcext:value-type="float">
            <text:p>4</text:p>
          </table:table-cell>
          <table:table-cell table:formula="of:=IF([.D11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DEC2HEX([.C1152])" office:value-type="string" office:string-value="EDBB0" calcext:value-type="string">
            <text:p>EDBB0</text:p>
          </table:table-cell>
          <table:table-cell office:value-type="float" office:value="973744" calcext:value-type="float">
            <text:p>973744</text:p>
          </table:table-cell>
          <table:table-cell office:value-type="float" office:value="4" calcext:value-type="float">
            <text:p>4</text:p>
          </table:table-cell>
          <table:table-cell table:formula="of:=IF([.D11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DEC2HEX([.C1153])" office:value-type="string" office:string-value="EDBB4" calcext:value-type="string">
            <text:p>EDBB4</text:p>
          </table:table-cell>
          <table:table-cell office:value-type="float" office:value="973748" calcext:value-type="float">
            <text:p>973748</text:p>
          </table:table-cell>
          <table:table-cell office:value-type="float" office:value="4" calcext:value-type="float">
            <text:p>4</text:p>
          </table:table-cell>
          <table:table-cell table:formula="of:=IF([.D11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DEC2HEX([.C1154])" office:value-type="string" office:string-value="EDBB8" calcext:value-type="string">
            <text:p>EDBB8</text:p>
          </table:table-cell>
          <table:table-cell office:value-type="float" office:value="973752" calcext:value-type="float">
            <text:p>973752</text:p>
          </table:table-cell>
          <table:table-cell office:value-type="float" office:value="4" calcext:value-type="float">
            <text:p>4</text:p>
          </table:table-cell>
          <table:table-cell table:formula="of:=IF([.D11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DEC2HEX([.C1155])" office:value-type="string" office:string-value="EDBBC" calcext:value-type="string">
            <text:p>EDBBC</text:p>
          </table:table-cell>
          <table:table-cell office:value-type="float" office:value="973756" calcext:value-type="float">
            <text:p>973756</text:p>
          </table:table-cell>
          <table:table-cell office:value-type="float" office:value="11" calcext:value-type="float">
            <text:p>11</text:p>
          </table:table-cell>
          <table:table-cell table:formula="of:=IF([.D11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DEC2HEX([.C1156])" office:value-type="string" office:string-value="EDBC7" calcext:value-type="string">
            <text:p>EDBC7</text:p>
          </table:table-cell>
          <table:table-cell office:value-type="float" office:value="973767" calcext:value-type="float">
            <text:p>973767</text:p>
          </table:table-cell>
          <table:table-cell office:value-type="float" office:value="4" calcext:value-type="float">
            <text:p>4</text:p>
          </table:table-cell>
          <table:table-cell table:formula="of:=IF([.D11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DEC2HEX([.C1157])" office:value-type="string" office:string-value="EDBCB" calcext:value-type="string">
            <text:p>EDBCB</text:p>
          </table:table-cell>
          <table:table-cell office:value-type="float" office:value="973771" calcext:value-type="float">
            <text:p>973771</text:p>
          </table:table-cell>
          <table:table-cell office:value-type="float" office:value="4" calcext:value-type="float">
            <text:p>4</text:p>
          </table:table-cell>
          <table:table-cell table:formula="of:=IF([.D11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DEC2HEX([.C1158])" office:value-type="string" office:string-value="EDBCF" calcext:value-type="string">
            <text:p>EDBCF</text:p>
          </table:table-cell>
          <table:table-cell office:value-type="float" office:value="973775" calcext:value-type="float">
            <text:p>973775</text:p>
          </table:table-cell>
          <table:table-cell office:value-type="float" office:value="4" calcext:value-type="float">
            <text:p>4</text:p>
          </table:table-cell>
          <table:table-cell table:formula="of:=IF([.D11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DEC2HEX([.C1159])" office:value-type="string" office:string-value="EDBD3" calcext:value-type="string">
            <text:p>EDBD3</text:p>
          </table:table-cell>
          <table:table-cell office:value-type="float" office:value="973779" calcext:value-type="float">
            <text:p>973779</text:p>
          </table:table-cell>
          <table:table-cell office:value-type="float" office:value="4" calcext:value-type="float">
            <text:p>4</text:p>
          </table:table-cell>
          <table:table-cell table:formula="of:=IF([.D11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DEC2HEX([.C1160])" office:value-type="string" office:string-value="EDBD7" calcext:value-type="string">
            <text:p>EDBD7</text:p>
          </table:table-cell>
          <table:table-cell office:value-type="float" office:value="973783" calcext:value-type="float">
            <text:p>973783</text:p>
          </table:table-cell>
          <table:table-cell office:value-type="float" office:value="4" calcext:value-type="float">
            <text:p>4</text:p>
          </table:table-cell>
          <table:table-cell table:formula="of:=IF([.D11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DEC2HEX([.C1161])" office:value-type="string" office:string-value="EDBDB" calcext:value-type="string">
            <text:p>EDBDB</text:p>
          </table:table-cell>
          <table:table-cell office:value-type="float" office:value="973787" calcext:value-type="float">
            <text:p>973787</text:p>
          </table:table-cell>
          <table:table-cell office:value-type="float" office:value="4" calcext:value-type="float">
            <text:p>4</text:p>
          </table:table-cell>
          <table:table-cell table:formula="of:=IF([.D11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DEC2HEX([.C1162])" office:value-type="string" office:string-value="EDBDF" calcext:value-type="string">
            <text:p>EDBDF</text:p>
          </table:table-cell>
          <table:table-cell office:value-type="float" office:value="973791" calcext:value-type="float">
            <text:p>973791</text:p>
          </table:table-cell>
          <table:table-cell office:value-type="float" office:value="4" calcext:value-type="float">
            <text:p>4</text:p>
          </table:table-cell>
          <table:table-cell table:formula="of:=IF([.D11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DEC2HEX([.C1163])" office:value-type="string" office:string-value="EDBE3" calcext:value-type="string">
            <text:p>EDBE3</text:p>
          </table:table-cell>
          <table:table-cell office:value-type="float" office:value="973795" calcext:value-type="float">
            <text:p>973795</text:p>
          </table:table-cell>
          <table:table-cell office:value-type="float" office:value="1" calcext:value-type="float">
            <text:p>1</text:p>
          </table:table-cell>
          <table:table-cell table:formula="of:=IF([.D11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DEC2HEX([.C1164])" office:value-type="string" office:string-value="EDBE4" calcext:value-type="string">
            <text:p>EDBE4</text:p>
          </table:table-cell>
          <table:table-cell office:value-type="float" office:value="973796" calcext:value-type="float">
            <text:p>973796</text:p>
          </table:table-cell>
          <table:table-cell office:value-type="float" office:value="4" calcext:value-type="float">
            <text:p>4</text:p>
          </table:table-cell>
          <table:table-cell table:formula="of:=IF([.D11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DEC2HEX([.C1165])" office:value-type="string" office:string-value="EDBE8" calcext:value-type="string">
            <text:p>EDBE8</text:p>
          </table:table-cell>
          <table:table-cell office:value-type="float" office:value="973800" calcext:value-type="float">
            <text:p>973800</text:p>
          </table:table-cell>
          <table:table-cell office:value-type="float" office:value="4" calcext:value-type="float">
            <text:p>4</text:p>
          </table:table-cell>
          <table:table-cell table:formula="of:=IF([.D11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DEC2HEX([.C1166])" office:value-type="string" office:string-value="EDBEC" calcext:value-type="string">
            <text:p>EDBEC</text:p>
          </table:table-cell>
          <table:table-cell office:value-type="float" office:value="973804" calcext:value-type="float">
            <text:p>973804</text:p>
          </table:table-cell>
          <table:table-cell office:value-type="float" office:value="4" calcext:value-type="float">
            <text:p>4</text:p>
          </table:table-cell>
          <table:table-cell table:formula="of:=IF([.D11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DEC2HEX([.C1167])" office:value-type="string" office:string-value="EDBF0" calcext:value-type="string">
            <text:p>EDBF0</text:p>
          </table:table-cell>
          <table:table-cell office:value-type="float" office:value="973808" calcext:value-type="float">
            <text:p>973808</text:p>
          </table:table-cell>
          <table:table-cell office:value-type="float" office:value="4" calcext:value-type="float">
            <text:p>4</text:p>
          </table:table-cell>
          <table:table-cell table:formula="of:=IF([.D11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DEC2HEX([.C1168])" office:value-type="string" office:string-value="EDBF4" calcext:value-type="string">
            <text:p>EDBF4</text:p>
          </table:table-cell>
          <table:table-cell office:value-type="float" office:value="973812" calcext:value-type="float">
            <text:p>973812</text:p>
          </table:table-cell>
          <table:table-cell office:value-type="float" office:value="4" calcext:value-type="float">
            <text:p>4</text:p>
          </table:table-cell>
          <table:table-cell table:formula="of:=IF([.D11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DEC2HEX([.C1169])" office:value-type="string" office:string-value="EDBF8" calcext:value-type="string">
            <text:p>EDBF8</text:p>
          </table:table-cell>
          <table:table-cell office:value-type="float" office:value="973816" calcext:value-type="float">
            <text:p>973816</text:p>
          </table:table-cell>
          <table:table-cell office:value-type="float" office:value="4" calcext:value-type="float">
            <text:p>4</text:p>
          </table:table-cell>
          <table:table-cell table:formula="of:=IF([.D11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DEC2HEX([.C1170])" office:value-type="string" office:string-value="EDBFC" calcext:value-type="string">
            <text:p>EDBFC</text:p>
          </table:table-cell>
          <table:table-cell office:value-type="float" office:value="973820" calcext:value-type="float">
            <text:p>973820</text:p>
          </table:table-cell>
          <table:table-cell office:value-type="float" office:value="11" calcext:value-type="float">
            <text:p>11</text:p>
          </table:table-cell>
          <table:table-cell table:formula="of:=IF([.D11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DEC2HEX([.C1171])" office:value-type="string" office:string-value="EDC07" calcext:value-type="string">
            <text:p>EDC07</text:p>
          </table:table-cell>
          <table:table-cell office:value-type="float" office:value="973831" calcext:value-type="float">
            <text:p>973831</text:p>
          </table:table-cell>
          <table:table-cell office:value-type="float" office:value="4" calcext:value-type="float">
            <text:p>4</text:p>
          </table:table-cell>
          <table:table-cell table:formula="of:=IF([.D11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DEC2HEX([.C1172])" office:value-type="string" office:string-value="EDC0B" calcext:value-type="string">
            <text:p>EDC0B</text:p>
          </table:table-cell>
          <table:table-cell office:value-type="float" office:value="973835" calcext:value-type="float">
            <text:p>973835</text:p>
          </table:table-cell>
          <table:table-cell office:value-type="float" office:value="4" calcext:value-type="float">
            <text:p>4</text:p>
          </table:table-cell>
          <table:table-cell table:formula="of:=IF([.D11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DEC2HEX([.C1173])" office:value-type="string" office:string-value="EDC0F" calcext:value-type="string">
            <text:p>EDC0F</text:p>
          </table:table-cell>
          <table:table-cell office:value-type="float" office:value="973839" calcext:value-type="float">
            <text:p>973839</text:p>
          </table:table-cell>
          <table:table-cell office:value-type="float" office:value="4" calcext:value-type="float">
            <text:p>4</text:p>
          </table:table-cell>
          <table:table-cell table:formula="of:=IF([.D11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DEC2HEX([.C1174])" office:value-type="string" office:string-value="EDC13" calcext:value-type="string">
            <text:p>EDC13</text:p>
          </table:table-cell>
          <table:table-cell office:value-type="float" office:value="973843" calcext:value-type="float">
            <text:p>973843</text:p>
          </table:table-cell>
          <table:table-cell office:value-type="float" office:value="4" calcext:value-type="float">
            <text:p>4</text:p>
          </table:table-cell>
          <table:table-cell table:formula="of:=IF([.D11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DEC2HEX([.C1175])" office:value-type="string" office:string-value="EDC17" calcext:value-type="string">
            <text:p>EDC17</text:p>
          </table:table-cell>
          <table:table-cell office:value-type="float" office:value="973847" calcext:value-type="float">
            <text:p>973847</text:p>
          </table:table-cell>
          <table:table-cell office:value-type="float" office:value="4" calcext:value-type="float">
            <text:p>4</text:p>
          </table:table-cell>
          <table:table-cell table:formula="of:=IF([.D11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DEC2HEX([.C1176])" office:value-type="string" office:string-value="EDC1B" calcext:value-type="string">
            <text:p>EDC1B</text:p>
          </table:table-cell>
          <table:table-cell office:value-type="float" office:value="973851" calcext:value-type="float">
            <text:p>973851</text:p>
          </table:table-cell>
          <table:table-cell office:value-type="float" office:value="4" calcext:value-type="float">
            <text:p>4</text:p>
          </table:table-cell>
          <table:table-cell table:formula="of:=IF([.D11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DEC2HEX([.C1177])" office:value-type="string" office:string-value="EDC1F" calcext:value-type="string">
            <text:p>EDC1F</text:p>
          </table:table-cell>
          <table:table-cell office:value-type="float" office:value="973855" calcext:value-type="float">
            <text:p>973855</text:p>
          </table:table-cell>
          <table:table-cell office:value-type="float" office:value="4" calcext:value-type="float">
            <text:p>4</text:p>
          </table:table-cell>
          <table:table-cell table:formula="of:=IF([.D11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DEC2HEX([.C1178])" office:value-type="string" office:string-value="EDC23" calcext:value-type="string">
            <text:p>EDC23</text:p>
          </table:table-cell>
          <table:table-cell office:value-type="float" office:value="973859" calcext:value-type="float">
            <text:p>973859</text:p>
          </table:table-cell>
          <table:table-cell office:value-type="float" office:value="1" calcext:value-type="float">
            <text:p>1</text:p>
          </table:table-cell>
          <table:table-cell table:formula="of:=IF([.D11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DEC2HEX([.C1179])" office:value-type="string" office:string-value="EDC24" calcext:value-type="string">
            <text:p>EDC24</text:p>
          </table:table-cell>
          <table:table-cell office:value-type="float" office:value="973860" calcext:value-type="float">
            <text:p>973860</text:p>
          </table:table-cell>
          <table:table-cell office:value-type="float" office:value="4" calcext:value-type="float">
            <text:p>4</text:p>
          </table:table-cell>
          <table:table-cell table:formula="of:=IF([.D11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DEC2HEX([.C1180])" office:value-type="string" office:string-value="EDC28" calcext:value-type="string">
            <text:p>EDC28</text:p>
          </table:table-cell>
          <table:table-cell office:value-type="float" office:value="973864" calcext:value-type="float">
            <text:p>973864</text:p>
          </table:table-cell>
          <table:table-cell office:value-type="float" office:value="4" calcext:value-type="float">
            <text:p>4</text:p>
          </table:table-cell>
          <table:table-cell table:formula="of:=IF([.D11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DEC2HEX([.C1181])" office:value-type="string" office:string-value="EDC2C" calcext:value-type="string">
            <text:p>EDC2C</text:p>
          </table:table-cell>
          <table:table-cell office:value-type="float" office:value="973868" calcext:value-type="float">
            <text:p>973868</text:p>
          </table:table-cell>
          <table:table-cell office:value-type="float" office:value="4" calcext:value-type="float">
            <text:p>4</text:p>
          </table:table-cell>
          <table:table-cell table:formula="of:=IF([.D11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DEC2HEX([.C1182])" office:value-type="string" office:string-value="EDC30" calcext:value-type="string">
            <text:p>EDC30</text:p>
          </table:table-cell>
          <table:table-cell office:value-type="float" office:value="973872" calcext:value-type="float">
            <text:p>973872</text:p>
          </table:table-cell>
          <table:table-cell office:value-type="float" office:value="4" calcext:value-type="float">
            <text:p>4</text:p>
          </table:table-cell>
          <table:table-cell table:formula="of:=IF([.D11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DEC2HEX([.C1183])" office:value-type="string" office:string-value="EDC34" calcext:value-type="string">
            <text:p>EDC34</text:p>
          </table:table-cell>
          <table:table-cell office:value-type="float" office:value="973876" calcext:value-type="float">
            <text:p>973876</text:p>
          </table:table-cell>
          <table:table-cell office:value-type="float" office:value="4" calcext:value-type="float">
            <text:p>4</text:p>
          </table:table-cell>
          <table:table-cell table:formula="of:=IF([.D11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DEC2HEX([.C1184])" office:value-type="string" office:string-value="EDC38" calcext:value-type="string">
            <text:p>EDC38</text:p>
          </table:table-cell>
          <table:table-cell office:value-type="float" office:value="973880" calcext:value-type="float">
            <text:p>973880</text:p>
          </table:table-cell>
          <table:table-cell office:value-type="float" office:value="4" calcext:value-type="float">
            <text:p>4</text:p>
          </table:table-cell>
          <table:table-cell table:formula="of:=IF([.D11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DEC2HEX([.C1185])" office:value-type="string" office:string-value="EDC3C" calcext:value-type="string">
            <text:p>EDC3C</text:p>
          </table:table-cell>
          <table:table-cell office:value-type="float" office:value="973884" calcext:value-type="float">
            <text:p>973884</text:p>
          </table:table-cell>
          <table:table-cell office:value-type="float" office:value="11" calcext:value-type="float">
            <text:p>11</text:p>
          </table:table-cell>
          <table:table-cell table:formula="of:=IF([.D11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DEC2HEX([.C1186])" office:value-type="string" office:string-value="EDC47" calcext:value-type="string">
            <text:p>EDC47</text:p>
          </table:table-cell>
          <table:table-cell office:value-type="float" office:value="973895" calcext:value-type="float">
            <text:p>973895</text:p>
          </table:table-cell>
          <table:table-cell office:value-type="float" office:value="4" calcext:value-type="float">
            <text:p>4</text:p>
          </table:table-cell>
          <table:table-cell table:formula="of:=IF([.D11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DEC2HEX([.C1187])" office:value-type="string" office:string-value="EDC4B" calcext:value-type="string">
            <text:p>EDC4B</text:p>
          </table:table-cell>
          <table:table-cell office:value-type="float" office:value="973899" calcext:value-type="float">
            <text:p>973899</text:p>
          </table:table-cell>
          <table:table-cell office:value-type="float" office:value="4" calcext:value-type="float">
            <text:p>4</text:p>
          </table:table-cell>
          <table:table-cell table:formula="of:=IF([.D11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DEC2HEX([.C1188])" office:value-type="string" office:string-value="EDC4F" calcext:value-type="string">
            <text:p>EDC4F</text:p>
          </table:table-cell>
          <table:table-cell office:value-type="float" office:value="973903" calcext:value-type="float">
            <text:p>973903</text:p>
          </table:table-cell>
          <table:table-cell office:value-type="float" office:value="4" calcext:value-type="float">
            <text:p>4</text:p>
          </table:table-cell>
          <table:table-cell table:formula="of:=IF([.D11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DEC2HEX([.C1189])" office:value-type="string" office:string-value="EDC53" calcext:value-type="string">
            <text:p>EDC53</text:p>
          </table:table-cell>
          <table:table-cell office:value-type="float" office:value="973907" calcext:value-type="float">
            <text:p>973907</text:p>
          </table:table-cell>
          <table:table-cell office:value-type="float" office:value="4" calcext:value-type="float">
            <text:p>4</text:p>
          </table:table-cell>
          <table:table-cell table:formula="of:=IF([.D11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DEC2HEX([.C1190])" office:value-type="string" office:string-value="EDC57" calcext:value-type="string">
            <text:p>EDC57</text:p>
          </table:table-cell>
          <table:table-cell office:value-type="float" office:value="973911" calcext:value-type="float">
            <text:p>973911</text:p>
          </table:table-cell>
          <table:table-cell office:value-type="float" office:value="4" calcext:value-type="float">
            <text:p>4</text:p>
          </table:table-cell>
          <table:table-cell table:formula="of:=IF([.D11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DEC2HEX([.C1191])" office:value-type="string" office:string-value="EDC5B" calcext:value-type="string">
            <text:p>EDC5B</text:p>
          </table:table-cell>
          <table:table-cell office:value-type="float" office:value="973915" calcext:value-type="float">
            <text:p>973915</text:p>
          </table:table-cell>
          <table:table-cell office:value-type="float" office:value="4" calcext:value-type="float">
            <text:p>4</text:p>
          </table:table-cell>
          <table:table-cell table:formula="of:=IF([.D11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DEC2HEX([.C1192])" office:value-type="string" office:string-value="EDC5F" calcext:value-type="string">
            <text:p>EDC5F</text:p>
          </table:table-cell>
          <table:table-cell office:value-type="float" office:value="973919" calcext:value-type="float">
            <text:p>973919</text:p>
          </table:table-cell>
          <table:table-cell office:value-type="float" office:value="4" calcext:value-type="float">
            <text:p>4</text:p>
          </table:table-cell>
          <table:table-cell table:formula="of:=IF([.D11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DEC2HEX([.C1193])" office:value-type="string" office:string-value="EDC63" calcext:value-type="string">
            <text:p>EDC63</text:p>
          </table:table-cell>
          <table:table-cell office:value-type="float" office:value="973923" calcext:value-type="float">
            <text:p>973923</text:p>
          </table:table-cell>
          <table:table-cell office:value-type="float" office:value="1" calcext:value-type="float">
            <text:p>1</text:p>
          </table:table-cell>
          <table:table-cell table:formula="of:=IF([.D11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DEC2HEX([.C1194])" office:value-type="string" office:string-value="EDC64" calcext:value-type="string">
            <text:p>EDC64</text:p>
          </table:table-cell>
          <table:table-cell office:value-type="float" office:value="973924" calcext:value-type="float">
            <text:p>973924</text:p>
          </table:table-cell>
          <table:table-cell office:value-type="float" office:value="4" calcext:value-type="float">
            <text:p>4</text:p>
          </table:table-cell>
          <table:table-cell table:formula="of:=IF([.D11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DEC2HEX([.C1195])" office:value-type="string" office:string-value="EDC68" calcext:value-type="string">
            <text:p>EDC68</text:p>
          </table:table-cell>
          <table:table-cell office:value-type="float" office:value="973928" calcext:value-type="float">
            <text:p>973928</text:p>
          </table:table-cell>
          <table:table-cell office:value-type="float" office:value="4" calcext:value-type="float">
            <text:p>4</text:p>
          </table:table-cell>
          <table:table-cell table:formula="of:=IF([.D11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DEC2HEX([.C1196])" office:value-type="string" office:string-value="EDC6C" calcext:value-type="string">
            <text:p>EDC6C</text:p>
          </table:table-cell>
          <table:table-cell office:value-type="float" office:value="973932" calcext:value-type="float">
            <text:p>973932</text:p>
          </table:table-cell>
          <table:table-cell office:value-type="float" office:value="4" calcext:value-type="float">
            <text:p>4</text:p>
          </table:table-cell>
          <table:table-cell table:formula="of:=IF([.D11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DEC2HEX([.C1197])" office:value-type="string" office:string-value="EDC70" calcext:value-type="string">
            <text:p>EDC70</text:p>
          </table:table-cell>
          <table:table-cell office:value-type="float" office:value="973936" calcext:value-type="float">
            <text:p>973936</text:p>
          </table:table-cell>
          <table:table-cell office:value-type="float" office:value="4" calcext:value-type="float">
            <text:p>4</text:p>
          </table:table-cell>
          <table:table-cell table:formula="of:=IF([.D11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DEC2HEX([.C1198])" office:value-type="string" office:string-value="EDC74" calcext:value-type="string">
            <text:p>EDC74</text:p>
          </table:table-cell>
          <table:table-cell office:value-type="float" office:value="973940" calcext:value-type="float">
            <text:p>973940</text:p>
          </table:table-cell>
          <table:table-cell office:value-type="float" office:value="4" calcext:value-type="float">
            <text:p>4</text:p>
          </table:table-cell>
          <table:table-cell table:formula="of:=IF([.D11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DEC2HEX([.C1199])" office:value-type="string" office:string-value="EDC78" calcext:value-type="string">
            <text:p>EDC78</text:p>
          </table:table-cell>
          <table:table-cell office:value-type="float" office:value="973944" calcext:value-type="float">
            <text:p>973944</text:p>
          </table:table-cell>
          <table:table-cell office:value-type="float" office:value="4" calcext:value-type="float">
            <text:p>4</text:p>
          </table:table-cell>
          <table:table-cell table:formula="of:=IF([.D11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DEC2HEX([.C1200])" office:value-type="string" office:string-value="EDC7C" calcext:value-type="string">
            <text:p>EDC7C</text:p>
          </table:table-cell>
          <table:table-cell office:value-type="float" office:value="973948" calcext:value-type="float">
            <text:p>973948</text:p>
          </table:table-cell>
          <table:table-cell office:value-type="float" office:value="11" calcext:value-type="float">
            <text:p>11</text:p>
          </table:table-cell>
          <table:table-cell table:formula="of:=IF([.D12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DEC2HEX([.C1201])" office:value-type="string" office:string-value="EDC87" calcext:value-type="string">
            <text:p>EDC87</text:p>
          </table:table-cell>
          <table:table-cell office:value-type="float" office:value="973959" calcext:value-type="float">
            <text:p>973959</text:p>
          </table:table-cell>
          <table:table-cell office:value-type="float" office:value="4" calcext:value-type="float">
            <text:p>4</text:p>
          </table:table-cell>
          <table:table-cell table:formula="of:=IF([.D12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DEC2HEX([.C1202])" office:value-type="string" office:string-value="EDC8B" calcext:value-type="string">
            <text:p>EDC8B</text:p>
          </table:table-cell>
          <table:table-cell office:value-type="float" office:value="973963" calcext:value-type="float">
            <text:p>973963</text:p>
          </table:table-cell>
          <table:table-cell office:value-type="float" office:value="4" calcext:value-type="float">
            <text:p>4</text:p>
          </table:table-cell>
          <table:table-cell table:formula="of:=IF([.D12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DEC2HEX([.C1203])" office:value-type="string" office:string-value="EDC8F" calcext:value-type="string">
            <text:p>EDC8F</text:p>
          </table:table-cell>
          <table:table-cell office:value-type="float" office:value="973967" calcext:value-type="float">
            <text:p>973967</text:p>
          </table:table-cell>
          <table:table-cell office:value-type="float" office:value="4" calcext:value-type="float">
            <text:p>4</text:p>
          </table:table-cell>
          <table:table-cell table:formula="of:=IF([.D12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DEC2HEX([.C1204])" office:value-type="string" office:string-value="EDC93" calcext:value-type="string">
            <text:p>EDC93</text:p>
          </table:table-cell>
          <table:table-cell office:value-type="float" office:value="973971" calcext:value-type="float">
            <text:p>973971</text:p>
          </table:table-cell>
          <table:table-cell office:value-type="float" office:value="4" calcext:value-type="float">
            <text:p>4</text:p>
          </table:table-cell>
          <table:table-cell table:formula="of:=IF([.D12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DEC2HEX([.C1205])" office:value-type="string" office:string-value="EDC97" calcext:value-type="string">
            <text:p>EDC97</text:p>
          </table:table-cell>
          <table:table-cell office:value-type="float" office:value="973975" calcext:value-type="float">
            <text:p>973975</text:p>
          </table:table-cell>
          <table:table-cell office:value-type="float" office:value="4" calcext:value-type="float">
            <text:p>4</text:p>
          </table:table-cell>
          <table:table-cell table:formula="of:=IF([.D12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DEC2HEX([.C1206])" office:value-type="string" office:string-value="EDC9B" calcext:value-type="string">
            <text:p>EDC9B</text:p>
          </table:table-cell>
          <table:table-cell office:value-type="float" office:value="973979" calcext:value-type="float">
            <text:p>973979</text:p>
          </table:table-cell>
          <table:table-cell office:value-type="float" office:value="4" calcext:value-type="float">
            <text:p>4</text:p>
          </table:table-cell>
          <table:table-cell table:formula="of:=IF([.D12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DEC2HEX([.C1207])" office:value-type="string" office:string-value="EDC9F" calcext:value-type="string">
            <text:p>EDC9F</text:p>
          </table:table-cell>
          <table:table-cell office:value-type="float" office:value="973983" calcext:value-type="float">
            <text:p>973983</text:p>
          </table:table-cell>
          <table:table-cell office:value-type="float" office:value="4" calcext:value-type="float">
            <text:p>4</text:p>
          </table:table-cell>
          <table:table-cell table:formula="of:=IF([.D12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DEC2HEX([.C1208])" office:value-type="string" office:string-value="EDCA3" calcext:value-type="string">
            <text:p>EDCA3</text:p>
          </table:table-cell>
          <table:table-cell office:value-type="float" office:value="973987" calcext:value-type="float">
            <text:p>973987</text:p>
          </table:table-cell>
          <table:table-cell office:value-type="float" office:value="1" calcext:value-type="float">
            <text:p>1</text:p>
          </table:table-cell>
          <table:table-cell table:formula="of:=IF([.D12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DEC2HEX([.C1209])" office:value-type="string" office:string-value="EDCA4" calcext:value-type="string">
            <text:p>EDCA4</text:p>
          </table:table-cell>
          <table:table-cell office:value-type="float" office:value="973988" calcext:value-type="float">
            <text:p>973988</text:p>
          </table:table-cell>
          <table:table-cell office:value-type="float" office:value="4" calcext:value-type="float">
            <text:p>4</text:p>
          </table:table-cell>
          <table:table-cell table:formula="of:=IF([.D12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DEC2HEX([.C1210])" office:value-type="string" office:string-value="EDCA8" calcext:value-type="string">
            <text:p>EDCA8</text:p>
          </table:table-cell>
          <table:table-cell office:value-type="float" office:value="973992" calcext:value-type="float">
            <text:p>973992</text:p>
          </table:table-cell>
          <table:table-cell office:value-type="float" office:value="4" calcext:value-type="float">
            <text:p>4</text:p>
          </table:table-cell>
          <table:table-cell table:formula="of:=IF([.D12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DEC2HEX([.C1211])" office:value-type="string" office:string-value="EDCAC" calcext:value-type="string">
            <text:p>EDCAC</text:p>
          </table:table-cell>
          <table:table-cell office:value-type="float" office:value="973996" calcext:value-type="float">
            <text:p>973996</text:p>
          </table:table-cell>
          <table:table-cell office:value-type="float" office:value="4" calcext:value-type="float">
            <text:p>4</text:p>
          </table:table-cell>
          <table:table-cell table:formula="of:=IF([.D12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DEC2HEX([.C1212])" office:value-type="string" office:string-value="EDCB0" calcext:value-type="string">
            <text:p>EDCB0</text:p>
          </table:table-cell>
          <table:table-cell office:value-type="float" office:value="974000" calcext:value-type="float">
            <text:p>974000</text:p>
          </table:table-cell>
          <table:table-cell office:value-type="float" office:value="4" calcext:value-type="float">
            <text:p>4</text:p>
          </table:table-cell>
          <table:table-cell table:formula="of:=IF([.D12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DEC2HEX([.C1213])" office:value-type="string" office:string-value="EDCB4" calcext:value-type="string">
            <text:p>EDCB4</text:p>
          </table:table-cell>
          <table:table-cell office:value-type="float" office:value="974004" calcext:value-type="float">
            <text:p>974004</text:p>
          </table:table-cell>
          <table:table-cell office:value-type="float" office:value="4" calcext:value-type="float">
            <text:p>4</text:p>
          </table:table-cell>
          <table:table-cell table:formula="of:=IF([.D12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DEC2HEX([.C1214])" office:value-type="string" office:string-value="EDCB8" calcext:value-type="string">
            <text:p>EDCB8</text:p>
          </table:table-cell>
          <table:table-cell office:value-type="float" office:value="974008" calcext:value-type="float">
            <text:p>974008</text:p>
          </table:table-cell>
          <table:table-cell office:value-type="float" office:value="4" calcext:value-type="float">
            <text:p>4</text:p>
          </table:table-cell>
          <table:table-cell table:formula="of:=IF([.D12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DEC2HEX([.C1215])" office:value-type="string" office:string-value="EDCBC" calcext:value-type="string">
            <text:p>EDCBC</text:p>
          </table:table-cell>
          <table:table-cell office:value-type="float" office:value="974012" calcext:value-type="float">
            <text:p>974012</text:p>
          </table:table-cell>
          <table:table-cell office:value-type="float" office:value="11" calcext:value-type="float">
            <text:p>11</text:p>
          </table:table-cell>
          <table:table-cell table:formula="of:=IF([.D12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DEC2HEX([.C1216])" office:value-type="string" office:string-value="EDCC7" calcext:value-type="string">
            <text:p>EDCC7</text:p>
          </table:table-cell>
          <table:table-cell office:value-type="float" office:value="974023" calcext:value-type="float">
            <text:p>974023</text:p>
          </table:table-cell>
          <table:table-cell office:value-type="float" office:value="4" calcext:value-type="float">
            <text:p>4</text:p>
          </table:table-cell>
          <table:table-cell table:formula="of:=IF([.D12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DEC2HEX([.C1217])" office:value-type="string" office:string-value="EDCCB" calcext:value-type="string">
            <text:p>EDCCB</text:p>
          </table:table-cell>
          <table:table-cell office:value-type="float" office:value="974027" calcext:value-type="float">
            <text:p>974027</text:p>
          </table:table-cell>
          <table:table-cell office:value-type="float" office:value="4" calcext:value-type="float">
            <text:p>4</text:p>
          </table:table-cell>
          <table:table-cell table:formula="of:=IF([.D12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DEC2HEX([.C1218])" office:value-type="string" office:string-value="EDCCF" calcext:value-type="string">
            <text:p>EDCCF</text:p>
          </table:table-cell>
          <table:table-cell office:value-type="float" office:value="974031" calcext:value-type="float">
            <text:p>974031</text:p>
          </table:table-cell>
          <table:table-cell office:value-type="float" office:value="4" calcext:value-type="float">
            <text:p>4</text:p>
          </table:table-cell>
          <table:table-cell table:formula="of:=IF([.D12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DEC2HEX([.C1219])" office:value-type="string" office:string-value="EDCD3" calcext:value-type="string">
            <text:p>EDCD3</text:p>
          </table:table-cell>
          <table:table-cell office:value-type="float" office:value="974035" calcext:value-type="float">
            <text:p>974035</text:p>
          </table:table-cell>
          <table:table-cell office:value-type="float" office:value="4" calcext:value-type="float">
            <text:p>4</text:p>
          </table:table-cell>
          <table:table-cell table:formula="of:=IF([.D12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DEC2HEX([.C1220])" office:value-type="string" office:string-value="EDCD7" calcext:value-type="string">
            <text:p>EDCD7</text:p>
          </table:table-cell>
          <table:table-cell office:value-type="float" office:value="974039" calcext:value-type="float">
            <text:p>974039</text:p>
          </table:table-cell>
          <table:table-cell office:value-type="float" office:value="4" calcext:value-type="float">
            <text:p>4</text:p>
          </table:table-cell>
          <table:table-cell table:formula="of:=IF([.D12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DEC2HEX([.C1221])" office:value-type="string" office:string-value="EDCDB" calcext:value-type="string">
            <text:p>EDCDB</text:p>
          </table:table-cell>
          <table:table-cell office:value-type="float" office:value="974043" calcext:value-type="float">
            <text:p>974043</text:p>
          </table:table-cell>
          <table:table-cell office:value-type="float" office:value="4" calcext:value-type="float">
            <text:p>4</text:p>
          </table:table-cell>
          <table:table-cell table:formula="of:=IF([.D12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DEC2HEX([.C1222])" office:value-type="string" office:string-value="EDCDF" calcext:value-type="string">
            <text:p>EDCDF</text:p>
          </table:table-cell>
          <table:table-cell office:value-type="float" office:value="974047" calcext:value-type="float">
            <text:p>974047</text:p>
          </table:table-cell>
          <table:table-cell office:value-type="float" office:value="4" calcext:value-type="float">
            <text:p>4</text:p>
          </table:table-cell>
          <table:table-cell table:formula="of:=IF([.D12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DEC2HEX([.C1223])" office:value-type="string" office:string-value="EDCE3" calcext:value-type="string">
            <text:p>EDCE3</text:p>
          </table:table-cell>
          <table:table-cell office:value-type="float" office:value="974051" calcext:value-type="float">
            <text:p>974051</text:p>
          </table:table-cell>
          <table:table-cell office:value-type="float" office:value="1" calcext:value-type="float">
            <text:p>1</text:p>
          </table:table-cell>
          <table:table-cell table:formula="of:=IF([.D12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DEC2HEX([.C1224])" office:value-type="string" office:string-value="EDCE4" calcext:value-type="string">
            <text:p>EDCE4</text:p>
          </table:table-cell>
          <table:table-cell office:value-type="float" office:value="974052" calcext:value-type="float">
            <text:p>974052</text:p>
          </table:table-cell>
          <table:table-cell office:value-type="float" office:value="4" calcext:value-type="float">
            <text:p>4</text:p>
          </table:table-cell>
          <table:table-cell table:formula="of:=IF([.D12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DEC2HEX([.C1225])" office:value-type="string" office:string-value="EDCE8" calcext:value-type="string">
            <text:p>EDCE8</text:p>
          </table:table-cell>
          <table:table-cell office:value-type="float" office:value="974056" calcext:value-type="float">
            <text:p>974056</text:p>
          </table:table-cell>
          <table:table-cell office:value-type="float" office:value="4" calcext:value-type="float">
            <text:p>4</text:p>
          </table:table-cell>
          <table:table-cell table:formula="of:=IF([.D12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DEC2HEX([.C1226])" office:value-type="string" office:string-value="EDCEC" calcext:value-type="string">
            <text:p>EDCEC</text:p>
          </table:table-cell>
          <table:table-cell office:value-type="float" office:value="974060" calcext:value-type="float">
            <text:p>974060</text:p>
          </table:table-cell>
          <table:table-cell office:value-type="float" office:value="4" calcext:value-type="float">
            <text:p>4</text:p>
          </table:table-cell>
          <table:table-cell table:formula="of:=IF([.D12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DEC2HEX([.C1227])" office:value-type="string" office:string-value="EDCF0" calcext:value-type="string">
            <text:p>EDCF0</text:p>
          </table:table-cell>
          <table:table-cell office:value-type="float" office:value="974064" calcext:value-type="float">
            <text:p>974064</text:p>
          </table:table-cell>
          <table:table-cell office:value-type="float" office:value="4" calcext:value-type="float">
            <text:p>4</text:p>
          </table:table-cell>
          <table:table-cell table:formula="of:=IF([.D12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DEC2HEX([.C1228])" office:value-type="string" office:string-value="EDCF4" calcext:value-type="string">
            <text:p>EDCF4</text:p>
          </table:table-cell>
          <table:table-cell office:value-type="float" office:value="974068" calcext:value-type="float">
            <text:p>974068</text:p>
          </table:table-cell>
          <table:table-cell office:value-type="float" office:value="4" calcext:value-type="float">
            <text:p>4</text:p>
          </table:table-cell>
          <table:table-cell table:formula="of:=IF([.D12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DEC2HEX([.C1229])" office:value-type="string" office:string-value="EDCF8" calcext:value-type="string">
            <text:p>EDCF8</text:p>
          </table:table-cell>
          <table:table-cell office:value-type="float" office:value="974072" calcext:value-type="float">
            <text:p>974072</text:p>
          </table:table-cell>
          <table:table-cell office:value-type="float" office:value="4" calcext:value-type="float">
            <text:p>4</text:p>
          </table:table-cell>
          <table:table-cell table:formula="of:=IF([.D12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DEC2HEX([.C1230])" office:value-type="string" office:string-value="EDCFC" calcext:value-type="string">
            <text:p>EDCFC</text:p>
          </table:table-cell>
          <table:table-cell office:value-type="float" office:value="974076" calcext:value-type="float">
            <text:p>974076</text:p>
          </table:table-cell>
          <table:table-cell office:value-type="float" office:value="11" calcext:value-type="float">
            <text:p>11</text:p>
          </table:table-cell>
          <table:table-cell table:formula="of:=IF([.D12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DEC2HEX([.C1231])" office:value-type="string" office:string-value="EDD07" calcext:value-type="string">
            <text:p>EDD07</text:p>
          </table:table-cell>
          <table:table-cell office:value-type="float" office:value="974087" calcext:value-type="float">
            <text:p>974087</text:p>
          </table:table-cell>
          <table:table-cell office:value-type="float" office:value="4" calcext:value-type="float">
            <text:p>4</text:p>
          </table:table-cell>
          <table:table-cell table:formula="of:=IF([.D12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DEC2HEX([.C1232])" office:value-type="string" office:string-value="EDD0B" calcext:value-type="string">
            <text:p>EDD0B</text:p>
          </table:table-cell>
          <table:table-cell office:value-type="float" office:value="974091" calcext:value-type="float">
            <text:p>974091</text:p>
          </table:table-cell>
          <table:table-cell office:value-type="float" office:value="4" calcext:value-type="float">
            <text:p>4</text:p>
          </table:table-cell>
          <table:table-cell table:formula="of:=IF([.D12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DEC2HEX([.C1233])" office:value-type="string" office:string-value="EDD0F" calcext:value-type="string">
            <text:p>EDD0F</text:p>
          </table:table-cell>
          <table:table-cell office:value-type="float" office:value="974095" calcext:value-type="float">
            <text:p>974095</text:p>
          </table:table-cell>
          <table:table-cell office:value-type="float" office:value="4" calcext:value-type="float">
            <text:p>4</text:p>
          </table:table-cell>
          <table:table-cell table:formula="of:=IF([.D12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DEC2HEX([.C1234])" office:value-type="string" office:string-value="EDD13" calcext:value-type="string">
            <text:p>EDD13</text:p>
          </table:table-cell>
          <table:table-cell office:value-type="float" office:value="974099" calcext:value-type="float">
            <text:p>974099</text:p>
          </table:table-cell>
          <table:table-cell office:value-type="float" office:value="4" calcext:value-type="float">
            <text:p>4</text:p>
          </table:table-cell>
          <table:table-cell table:formula="of:=IF([.D12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DEC2HEX([.C1235])" office:value-type="string" office:string-value="EDD17" calcext:value-type="string">
            <text:p>EDD17</text:p>
          </table:table-cell>
          <table:table-cell office:value-type="float" office:value="974103" calcext:value-type="float">
            <text:p>974103</text:p>
          </table:table-cell>
          <table:table-cell office:value-type="float" office:value="4" calcext:value-type="float">
            <text:p>4</text:p>
          </table:table-cell>
          <table:table-cell table:formula="of:=IF([.D12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DEC2HEX([.C1236])" office:value-type="string" office:string-value="EDD1B" calcext:value-type="string">
            <text:p>EDD1B</text:p>
          </table:table-cell>
          <table:table-cell office:value-type="float" office:value="974107" calcext:value-type="float">
            <text:p>974107</text:p>
          </table:table-cell>
          <table:table-cell office:value-type="float" office:value="4" calcext:value-type="float">
            <text:p>4</text:p>
          </table:table-cell>
          <table:table-cell table:formula="of:=IF([.D12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DEC2HEX([.C1237])" office:value-type="string" office:string-value="EDD1F" calcext:value-type="string">
            <text:p>EDD1F</text:p>
          </table:table-cell>
          <table:table-cell office:value-type="float" office:value="974111" calcext:value-type="float">
            <text:p>974111</text:p>
          </table:table-cell>
          <table:table-cell office:value-type="float" office:value="4" calcext:value-type="float">
            <text:p>4</text:p>
          </table:table-cell>
          <table:table-cell table:formula="of:=IF([.D12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DEC2HEX([.C1238])" office:value-type="string" office:string-value="EDD23" calcext:value-type="string">
            <text:p>EDD23</text:p>
          </table:table-cell>
          <table:table-cell office:value-type="float" office:value="974115" calcext:value-type="float">
            <text:p>974115</text:p>
          </table:table-cell>
          <table:table-cell office:value-type="float" office:value="1" calcext:value-type="float">
            <text:p>1</text:p>
          </table:table-cell>
          <table:table-cell table:formula="of:=IF([.D12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DEC2HEX([.C1239])" office:value-type="string" office:string-value="EDD24" calcext:value-type="string">
            <text:p>EDD24</text:p>
          </table:table-cell>
          <table:table-cell office:value-type="float" office:value="974116" calcext:value-type="float">
            <text:p>974116</text:p>
          </table:table-cell>
          <table:table-cell office:value-type="float" office:value="4" calcext:value-type="float">
            <text:p>4</text:p>
          </table:table-cell>
          <table:table-cell table:formula="of:=IF([.D12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DEC2HEX([.C1240])" office:value-type="string" office:string-value="EDD28" calcext:value-type="string">
            <text:p>EDD28</text:p>
          </table:table-cell>
          <table:table-cell office:value-type="float" office:value="974120" calcext:value-type="float">
            <text:p>974120</text:p>
          </table:table-cell>
          <table:table-cell office:value-type="float" office:value="4" calcext:value-type="float">
            <text:p>4</text:p>
          </table:table-cell>
          <table:table-cell table:formula="of:=IF([.D12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DEC2HEX([.C1241])" office:value-type="string" office:string-value="EDD2C" calcext:value-type="string">
            <text:p>EDD2C</text:p>
          </table:table-cell>
          <table:table-cell office:value-type="float" office:value="974124" calcext:value-type="float">
            <text:p>974124</text:p>
          </table:table-cell>
          <table:table-cell office:value-type="float" office:value="4" calcext:value-type="float">
            <text:p>4</text:p>
          </table:table-cell>
          <table:table-cell table:formula="of:=IF([.D12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DEC2HEX([.C1242])" office:value-type="string" office:string-value="EDD30" calcext:value-type="string">
            <text:p>EDD30</text:p>
          </table:table-cell>
          <table:table-cell office:value-type="float" office:value="974128" calcext:value-type="float">
            <text:p>974128</text:p>
          </table:table-cell>
          <table:table-cell office:value-type="float" office:value="4" calcext:value-type="float">
            <text:p>4</text:p>
          </table:table-cell>
          <table:table-cell table:formula="of:=IF([.D12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DEC2HEX([.C1243])" office:value-type="string" office:string-value="EDD34" calcext:value-type="string">
            <text:p>EDD34</text:p>
          </table:table-cell>
          <table:table-cell office:value-type="float" office:value="974132" calcext:value-type="float">
            <text:p>974132</text:p>
          </table:table-cell>
          <table:table-cell office:value-type="float" office:value="4" calcext:value-type="float">
            <text:p>4</text:p>
          </table:table-cell>
          <table:table-cell table:formula="of:=IF([.D12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DEC2HEX([.C1244])" office:value-type="string" office:string-value="EDD38" calcext:value-type="string">
            <text:p>EDD38</text:p>
          </table:table-cell>
          <table:table-cell office:value-type="float" office:value="974136" calcext:value-type="float">
            <text:p>974136</text:p>
          </table:table-cell>
          <table:table-cell office:value-type="float" office:value="4" calcext:value-type="float">
            <text:p>4</text:p>
          </table:table-cell>
          <table:table-cell table:formula="of:=IF([.D12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DEC2HEX([.C1245])" office:value-type="string" office:string-value="EDD3C" calcext:value-type="string">
            <text:p>EDD3C</text:p>
          </table:table-cell>
          <table:table-cell office:value-type="float" office:value="974140" calcext:value-type="float">
            <text:p>974140</text:p>
          </table:table-cell>
          <table:table-cell office:value-type="float" office:value="11" calcext:value-type="float">
            <text:p>11</text:p>
          </table:table-cell>
          <table:table-cell table:formula="of:=IF([.D12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DEC2HEX([.C1246])" office:value-type="string" office:string-value="EDD47" calcext:value-type="string">
            <text:p>EDD47</text:p>
          </table:table-cell>
          <table:table-cell office:value-type="float" office:value="974151" calcext:value-type="float">
            <text:p>974151</text:p>
          </table:table-cell>
          <table:table-cell office:value-type="float" office:value="4" calcext:value-type="float">
            <text:p>4</text:p>
          </table:table-cell>
          <table:table-cell table:formula="of:=IF([.D12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DEC2HEX([.C1247])" office:value-type="string" office:string-value="EDD4B" calcext:value-type="string">
            <text:p>EDD4B</text:p>
          </table:table-cell>
          <table:table-cell office:value-type="float" office:value="974155" calcext:value-type="float">
            <text:p>974155</text:p>
          </table:table-cell>
          <table:table-cell office:value-type="float" office:value="4" calcext:value-type="float">
            <text:p>4</text:p>
          </table:table-cell>
          <table:table-cell table:formula="of:=IF([.D12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DEC2HEX([.C1248])" office:value-type="string" office:string-value="EDD4F" calcext:value-type="string">
            <text:p>EDD4F</text:p>
          </table:table-cell>
          <table:table-cell office:value-type="float" office:value="974159" calcext:value-type="float">
            <text:p>974159</text:p>
          </table:table-cell>
          <table:table-cell office:value-type="float" office:value="4" calcext:value-type="float">
            <text:p>4</text:p>
          </table:table-cell>
          <table:table-cell table:formula="of:=IF([.D12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DEC2HEX([.C1249])" office:value-type="string" office:string-value="EDD53" calcext:value-type="string">
            <text:p>EDD53</text:p>
          </table:table-cell>
          <table:table-cell office:value-type="float" office:value="974163" calcext:value-type="float">
            <text:p>974163</text:p>
          </table:table-cell>
          <table:table-cell office:value-type="float" office:value="4" calcext:value-type="float">
            <text:p>4</text:p>
          </table:table-cell>
          <table:table-cell table:formula="of:=IF([.D12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DEC2HEX([.C1250])" office:value-type="string" office:string-value="EDD57" calcext:value-type="string">
            <text:p>EDD57</text:p>
          </table:table-cell>
          <table:table-cell office:value-type="float" office:value="974167" calcext:value-type="float">
            <text:p>974167</text:p>
          </table:table-cell>
          <table:table-cell office:value-type="float" office:value="4" calcext:value-type="float">
            <text:p>4</text:p>
          </table:table-cell>
          <table:table-cell table:formula="of:=IF([.D12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DEC2HEX([.C1251])" office:value-type="string" office:string-value="EDD5B" calcext:value-type="string">
            <text:p>EDD5B</text:p>
          </table:table-cell>
          <table:table-cell office:value-type="float" office:value="974171" calcext:value-type="float">
            <text:p>974171</text:p>
          </table:table-cell>
          <table:table-cell office:value-type="float" office:value="4" calcext:value-type="float">
            <text:p>4</text:p>
          </table:table-cell>
          <table:table-cell table:formula="of:=IF([.D12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DEC2HEX([.C1252])" office:value-type="string" office:string-value="EDD5F" calcext:value-type="string">
            <text:p>EDD5F</text:p>
          </table:table-cell>
          <table:table-cell office:value-type="float" office:value="974175" calcext:value-type="float">
            <text:p>974175</text:p>
          </table:table-cell>
          <table:table-cell office:value-type="float" office:value="4" calcext:value-type="float">
            <text:p>4</text:p>
          </table:table-cell>
          <table:table-cell table:formula="of:=IF([.D12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DEC2HEX([.C1253])" office:value-type="string" office:string-value="EDD63" calcext:value-type="string">
            <text:p>EDD63</text:p>
          </table:table-cell>
          <table:table-cell office:value-type="float" office:value="974179" calcext:value-type="float">
            <text:p>974179</text:p>
          </table:table-cell>
          <table:table-cell office:value-type="float" office:value="1" calcext:value-type="float">
            <text:p>1</text:p>
          </table:table-cell>
          <table:table-cell table:formula="of:=IF([.D12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DEC2HEX([.C1254])" office:value-type="string" office:string-value="EDD64" calcext:value-type="string">
            <text:p>EDD64</text:p>
          </table:table-cell>
          <table:table-cell office:value-type="float" office:value="974180" calcext:value-type="float">
            <text:p>974180</text:p>
          </table:table-cell>
          <table:table-cell office:value-type="float" office:value="4" calcext:value-type="float">
            <text:p>4</text:p>
          </table:table-cell>
          <table:table-cell table:formula="of:=IF([.D12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DEC2HEX([.C1255])" office:value-type="string" office:string-value="EDD68" calcext:value-type="string">
            <text:p>EDD68</text:p>
          </table:table-cell>
          <table:table-cell office:value-type="float" office:value="974184" calcext:value-type="float">
            <text:p>974184</text:p>
          </table:table-cell>
          <table:table-cell office:value-type="float" office:value="4" calcext:value-type="float">
            <text:p>4</text:p>
          </table:table-cell>
          <table:table-cell table:formula="of:=IF([.D12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DEC2HEX([.C1256])" office:value-type="string" office:string-value="EDD6C" calcext:value-type="string">
            <text:p>EDD6C</text:p>
          </table:table-cell>
          <table:table-cell office:value-type="float" office:value="974188" calcext:value-type="float">
            <text:p>974188</text:p>
          </table:table-cell>
          <table:table-cell office:value-type="float" office:value="4" calcext:value-type="float">
            <text:p>4</text:p>
          </table:table-cell>
          <table:table-cell table:formula="of:=IF([.D12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DEC2HEX([.C1257])" office:value-type="string" office:string-value="EDD70" calcext:value-type="string">
            <text:p>EDD70</text:p>
          </table:table-cell>
          <table:table-cell office:value-type="float" office:value="974192" calcext:value-type="float">
            <text:p>974192</text:p>
          </table:table-cell>
          <table:table-cell office:value-type="float" office:value="4" calcext:value-type="float">
            <text:p>4</text:p>
          </table:table-cell>
          <table:table-cell table:formula="of:=IF([.D12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DEC2HEX([.C1258])" office:value-type="string" office:string-value="EDD74" calcext:value-type="string">
            <text:p>EDD74</text:p>
          </table:table-cell>
          <table:table-cell office:value-type="float" office:value="974196" calcext:value-type="float">
            <text:p>974196</text:p>
          </table:table-cell>
          <table:table-cell office:value-type="float" office:value="4" calcext:value-type="float">
            <text:p>4</text:p>
          </table:table-cell>
          <table:table-cell table:formula="of:=IF([.D12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DEC2HEX([.C1259])" office:value-type="string" office:string-value="EDD78" calcext:value-type="string">
            <text:p>EDD78</text:p>
          </table:table-cell>
          <table:table-cell office:value-type="float" office:value="974200" calcext:value-type="float">
            <text:p>974200</text:p>
          </table:table-cell>
          <table:table-cell office:value-type="float" office:value="4" calcext:value-type="float">
            <text:p>4</text:p>
          </table:table-cell>
          <table:table-cell table:formula="of:=IF([.D12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DEC2HEX([.C1260])" office:value-type="string" office:string-value="EDD7C" calcext:value-type="string">
            <text:p>EDD7C</text:p>
          </table:table-cell>
          <table:table-cell office:value-type="float" office:value="974204" calcext:value-type="float">
            <text:p>974204</text:p>
          </table:table-cell>
          <table:table-cell office:value-type="float" office:value="11" calcext:value-type="float">
            <text:p>11</text:p>
          </table:table-cell>
          <table:table-cell table:formula="of:=IF([.D12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DEC2HEX([.C1261])" office:value-type="string" office:string-value="EDD87" calcext:value-type="string">
            <text:p>EDD87</text:p>
          </table:table-cell>
          <table:table-cell office:value-type="float" office:value="974215" calcext:value-type="float">
            <text:p>974215</text:p>
          </table:table-cell>
          <table:table-cell office:value-type="float" office:value="4" calcext:value-type="float">
            <text:p>4</text:p>
          </table:table-cell>
          <table:table-cell table:formula="of:=IF([.D12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DEC2HEX([.C1262])" office:value-type="string" office:string-value="EDD8B" calcext:value-type="string">
            <text:p>EDD8B</text:p>
          </table:table-cell>
          <table:table-cell office:value-type="float" office:value="974219" calcext:value-type="float">
            <text:p>974219</text:p>
          </table:table-cell>
          <table:table-cell office:value-type="float" office:value="4" calcext:value-type="float">
            <text:p>4</text:p>
          </table:table-cell>
          <table:table-cell table:formula="of:=IF([.D12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DEC2HEX([.C1263])" office:value-type="string" office:string-value="EDD8F" calcext:value-type="string">
            <text:p>EDD8F</text:p>
          </table:table-cell>
          <table:table-cell office:value-type="float" office:value="974223" calcext:value-type="float">
            <text:p>974223</text:p>
          </table:table-cell>
          <table:table-cell office:value-type="float" office:value="4" calcext:value-type="float">
            <text:p>4</text:p>
          </table:table-cell>
          <table:table-cell table:formula="of:=IF([.D12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DEC2HEX([.C1264])" office:value-type="string" office:string-value="EDD93" calcext:value-type="string">
            <text:p>EDD93</text:p>
          </table:table-cell>
          <table:table-cell office:value-type="float" office:value="974227" calcext:value-type="float">
            <text:p>974227</text:p>
          </table:table-cell>
          <table:table-cell office:value-type="float" office:value="4" calcext:value-type="float">
            <text:p>4</text:p>
          </table:table-cell>
          <table:table-cell table:formula="of:=IF([.D12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DEC2HEX([.C1265])" office:value-type="string" office:string-value="EDD97" calcext:value-type="string">
            <text:p>EDD97</text:p>
          </table:table-cell>
          <table:table-cell office:value-type="float" office:value="974231" calcext:value-type="float">
            <text:p>974231</text:p>
          </table:table-cell>
          <table:table-cell office:value-type="float" office:value="4" calcext:value-type="float">
            <text:p>4</text:p>
          </table:table-cell>
          <table:table-cell table:formula="of:=IF([.D12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DEC2HEX([.C1266])" office:value-type="string" office:string-value="EDD9B" calcext:value-type="string">
            <text:p>EDD9B</text:p>
          </table:table-cell>
          <table:table-cell office:value-type="float" office:value="974235" calcext:value-type="float">
            <text:p>974235</text:p>
          </table:table-cell>
          <table:table-cell office:value-type="float" office:value="4" calcext:value-type="float">
            <text:p>4</text:p>
          </table:table-cell>
          <table:table-cell table:formula="of:=IF([.D12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DEC2HEX([.C1267])" office:value-type="string" office:string-value="EDD9F" calcext:value-type="string">
            <text:p>EDD9F</text:p>
          </table:table-cell>
          <table:table-cell office:value-type="float" office:value="974239" calcext:value-type="float">
            <text:p>974239</text:p>
          </table:table-cell>
          <table:table-cell office:value-type="float" office:value="4" calcext:value-type="float">
            <text:p>4</text:p>
          </table:table-cell>
          <table:table-cell table:formula="of:=IF([.D12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DEC2HEX([.C1268])" office:value-type="string" office:string-value="EDDA3" calcext:value-type="string">
            <text:p>EDDA3</text:p>
          </table:table-cell>
          <table:table-cell office:value-type="float" office:value="974243" calcext:value-type="float">
            <text:p>974243</text:p>
          </table:table-cell>
          <table:table-cell office:value-type="float" office:value="1" calcext:value-type="float">
            <text:p>1</text:p>
          </table:table-cell>
          <table:table-cell table:formula="of:=IF([.D12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DEC2HEX([.C1269])" office:value-type="string" office:string-value="EDDA4" calcext:value-type="string">
            <text:p>EDDA4</text:p>
          </table:table-cell>
          <table:table-cell office:value-type="float" office:value="974244" calcext:value-type="float">
            <text:p>974244</text:p>
          </table:table-cell>
          <table:table-cell office:value-type="float" office:value="4" calcext:value-type="float">
            <text:p>4</text:p>
          </table:table-cell>
          <table:table-cell table:formula="of:=IF([.D12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DEC2HEX([.C1270])" office:value-type="string" office:string-value="EDDA8" calcext:value-type="string">
            <text:p>EDDA8</text:p>
          </table:table-cell>
          <table:table-cell office:value-type="float" office:value="974248" calcext:value-type="float">
            <text:p>974248</text:p>
          </table:table-cell>
          <table:table-cell office:value-type="float" office:value="4" calcext:value-type="float">
            <text:p>4</text:p>
          </table:table-cell>
          <table:table-cell table:formula="of:=IF([.D12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DEC2HEX([.C1271])" office:value-type="string" office:string-value="EDDAC" calcext:value-type="string">
            <text:p>EDDAC</text:p>
          </table:table-cell>
          <table:table-cell office:value-type="float" office:value="974252" calcext:value-type="float">
            <text:p>974252</text:p>
          </table:table-cell>
          <table:table-cell office:value-type="float" office:value="4" calcext:value-type="float">
            <text:p>4</text:p>
          </table:table-cell>
          <table:table-cell table:formula="of:=IF([.D12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DEC2HEX([.C1272])" office:value-type="string" office:string-value="EDDB0" calcext:value-type="string">
            <text:p>EDDB0</text:p>
          </table:table-cell>
          <table:table-cell office:value-type="float" office:value="974256" calcext:value-type="float">
            <text:p>974256</text:p>
          </table:table-cell>
          <table:table-cell office:value-type="float" office:value="4" calcext:value-type="float">
            <text:p>4</text:p>
          </table:table-cell>
          <table:table-cell table:formula="of:=IF([.D12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DEC2HEX([.C1273])" office:value-type="string" office:string-value="EDDB4" calcext:value-type="string">
            <text:p>EDDB4</text:p>
          </table:table-cell>
          <table:table-cell office:value-type="float" office:value="974260" calcext:value-type="float">
            <text:p>974260</text:p>
          </table:table-cell>
          <table:table-cell office:value-type="float" office:value="4" calcext:value-type="float">
            <text:p>4</text:p>
          </table:table-cell>
          <table:table-cell table:formula="of:=IF([.D12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DEC2HEX([.C1274])" office:value-type="string" office:string-value="EDDB8" calcext:value-type="string">
            <text:p>EDDB8</text:p>
          </table:table-cell>
          <table:table-cell office:value-type="float" office:value="974264" calcext:value-type="float">
            <text:p>974264</text:p>
          </table:table-cell>
          <table:table-cell office:value-type="float" office:value="4" calcext:value-type="float">
            <text:p>4</text:p>
          </table:table-cell>
          <table:table-cell table:formula="of:=IF([.D12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DEC2HEX([.C1275])" office:value-type="string" office:string-value="EDDBC" calcext:value-type="string">
            <text:p>EDDBC</text:p>
          </table:table-cell>
          <table:table-cell office:value-type="float" office:value="974268" calcext:value-type="float">
            <text:p>974268</text:p>
          </table:table-cell>
          <table:table-cell office:value-type="float" office:value="11" calcext:value-type="float">
            <text:p>11</text:p>
          </table:table-cell>
          <table:table-cell table:formula="of:=IF([.D12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DEC2HEX([.C1276])" office:value-type="string" office:string-value="EDDC7" calcext:value-type="string">
            <text:p>EDDC7</text:p>
          </table:table-cell>
          <table:table-cell office:value-type="float" office:value="974279" calcext:value-type="float">
            <text:p>974279</text:p>
          </table:table-cell>
          <table:table-cell office:value-type="float" office:value="4" calcext:value-type="float">
            <text:p>4</text:p>
          </table:table-cell>
          <table:table-cell table:formula="of:=IF([.D12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DEC2HEX([.C1277])" office:value-type="string" office:string-value="EDDCB" calcext:value-type="string">
            <text:p>EDDCB</text:p>
          </table:table-cell>
          <table:table-cell office:value-type="float" office:value="974283" calcext:value-type="float">
            <text:p>974283</text:p>
          </table:table-cell>
          <table:table-cell office:value-type="float" office:value="4" calcext:value-type="float">
            <text:p>4</text:p>
          </table:table-cell>
          <table:table-cell table:formula="of:=IF([.D12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DEC2HEX([.C1278])" office:value-type="string" office:string-value="EDDCF" calcext:value-type="string">
            <text:p>EDDCF</text:p>
          </table:table-cell>
          <table:table-cell office:value-type="float" office:value="974287" calcext:value-type="float">
            <text:p>974287</text:p>
          </table:table-cell>
          <table:table-cell office:value-type="float" office:value="4" calcext:value-type="float">
            <text:p>4</text:p>
          </table:table-cell>
          <table:table-cell table:formula="of:=IF([.D12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DEC2HEX([.C1279])" office:value-type="string" office:string-value="EDDD3" calcext:value-type="string">
            <text:p>EDDD3</text:p>
          </table:table-cell>
          <table:table-cell office:value-type="float" office:value="974291" calcext:value-type="float">
            <text:p>974291</text:p>
          </table:table-cell>
          <table:table-cell office:value-type="float" office:value="4" calcext:value-type="float">
            <text:p>4</text:p>
          </table:table-cell>
          <table:table-cell table:formula="of:=IF([.D12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DEC2HEX([.C1280])" office:value-type="string" office:string-value="EDDD7" calcext:value-type="string">
            <text:p>EDDD7</text:p>
          </table:table-cell>
          <table:table-cell office:value-type="float" office:value="974295" calcext:value-type="float">
            <text:p>974295</text:p>
          </table:table-cell>
          <table:table-cell office:value-type="float" office:value="4" calcext:value-type="float">
            <text:p>4</text:p>
          </table:table-cell>
          <table:table-cell table:formula="of:=IF([.D12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DEC2HEX([.C1281])" office:value-type="string" office:string-value="EDDDB" calcext:value-type="string">
            <text:p>EDDDB</text:p>
          </table:table-cell>
          <table:table-cell office:value-type="float" office:value="974299" calcext:value-type="float">
            <text:p>974299</text:p>
          </table:table-cell>
          <table:table-cell office:value-type="float" office:value="4" calcext:value-type="float">
            <text:p>4</text:p>
          </table:table-cell>
          <table:table-cell table:formula="of:=IF([.D12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DEC2HEX([.C1282])" office:value-type="string" office:string-value="EDDDF" calcext:value-type="string">
            <text:p>EDDDF</text:p>
          </table:table-cell>
          <table:table-cell office:value-type="float" office:value="974303" calcext:value-type="float">
            <text:p>974303</text:p>
          </table:table-cell>
          <table:table-cell office:value-type="float" office:value="4" calcext:value-type="float">
            <text:p>4</text:p>
          </table:table-cell>
          <table:table-cell table:formula="of:=IF([.D12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DEC2HEX([.C1283])" office:value-type="string" office:string-value="EDDE3" calcext:value-type="string">
            <text:p>EDDE3</text:p>
          </table:table-cell>
          <table:table-cell office:value-type="float" office:value="974307" calcext:value-type="float">
            <text:p>974307</text:p>
          </table:table-cell>
          <table:table-cell office:value-type="float" office:value="1" calcext:value-type="float">
            <text:p>1</text:p>
          </table:table-cell>
          <table:table-cell table:formula="of:=IF([.D12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DEC2HEX([.C1284])" office:value-type="string" office:string-value="EDDE4" calcext:value-type="string">
            <text:p>EDDE4</text:p>
          </table:table-cell>
          <table:table-cell office:value-type="float" office:value="974308" calcext:value-type="float">
            <text:p>974308</text:p>
          </table:table-cell>
          <table:table-cell office:value-type="float" office:value="4" calcext:value-type="float">
            <text:p>4</text:p>
          </table:table-cell>
          <table:table-cell table:formula="of:=IF([.D12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DEC2HEX([.C1285])" office:value-type="string" office:string-value="EDDE8" calcext:value-type="string">
            <text:p>EDDE8</text:p>
          </table:table-cell>
          <table:table-cell office:value-type="float" office:value="974312" calcext:value-type="float">
            <text:p>974312</text:p>
          </table:table-cell>
          <table:table-cell office:value-type="float" office:value="4" calcext:value-type="float">
            <text:p>4</text:p>
          </table:table-cell>
          <table:table-cell table:formula="of:=IF([.D12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DEC2HEX([.C1286])" office:value-type="string" office:string-value="EDDEC" calcext:value-type="string">
            <text:p>EDDEC</text:p>
          </table:table-cell>
          <table:table-cell office:value-type="float" office:value="974316" calcext:value-type="float">
            <text:p>974316</text:p>
          </table:table-cell>
          <table:table-cell office:value-type="float" office:value="4" calcext:value-type="float">
            <text:p>4</text:p>
          </table:table-cell>
          <table:table-cell table:formula="of:=IF([.D12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DEC2HEX([.C1287])" office:value-type="string" office:string-value="EDDF0" calcext:value-type="string">
            <text:p>EDDF0</text:p>
          </table:table-cell>
          <table:table-cell office:value-type="float" office:value="974320" calcext:value-type="float">
            <text:p>974320</text:p>
          </table:table-cell>
          <table:table-cell office:value-type="float" office:value="4" calcext:value-type="float">
            <text:p>4</text:p>
          </table:table-cell>
          <table:table-cell table:formula="of:=IF([.D12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DEC2HEX([.C1288])" office:value-type="string" office:string-value="EDDF4" calcext:value-type="string">
            <text:p>EDDF4</text:p>
          </table:table-cell>
          <table:table-cell office:value-type="float" office:value="974324" calcext:value-type="float">
            <text:p>974324</text:p>
          </table:table-cell>
          <table:table-cell office:value-type="float" office:value="4" calcext:value-type="float">
            <text:p>4</text:p>
          </table:table-cell>
          <table:table-cell table:formula="of:=IF([.D12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DEC2HEX([.C1289])" office:value-type="string" office:string-value="EDDF8" calcext:value-type="string">
            <text:p>EDDF8</text:p>
          </table:table-cell>
          <table:table-cell office:value-type="float" office:value="974328" calcext:value-type="float">
            <text:p>974328</text:p>
          </table:table-cell>
          <table:table-cell office:value-type="float" office:value="4" calcext:value-type="float">
            <text:p>4</text:p>
          </table:table-cell>
          <table:table-cell table:formula="of:=IF([.D12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DEC2HEX([.C1290])" office:value-type="string" office:string-value="EDDFC" calcext:value-type="string">
            <text:p>EDDFC</text:p>
          </table:table-cell>
          <table:table-cell office:value-type="float" office:value="974332" calcext:value-type="float">
            <text:p>974332</text:p>
          </table:table-cell>
          <table:table-cell office:value-type="float" office:value="11" calcext:value-type="float">
            <text:p>11</text:p>
          </table:table-cell>
          <table:table-cell table:formula="of:=IF([.D12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DEC2HEX([.C1291])" office:value-type="string" office:string-value="EDE07" calcext:value-type="string">
            <text:p>EDE07</text:p>
          </table:table-cell>
          <table:table-cell office:value-type="float" office:value="974343" calcext:value-type="float">
            <text:p>974343</text:p>
          </table:table-cell>
          <table:table-cell office:value-type="float" office:value="4" calcext:value-type="float">
            <text:p>4</text:p>
          </table:table-cell>
          <table:table-cell table:formula="of:=IF([.D12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DEC2HEX([.C1292])" office:value-type="string" office:string-value="EDE0B" calcext:value-type="string">
            <text:p>EDE0B</text:p>
          </table:table-cell>
          <table:table-cell office:value-type="float" office:value="974347" calcext:value-type="float">
            <text:p>974347</text:p>
          </table:table-cell>
          <table:table-cell office:value-type="float" office:value="4" calcext:value-type="float">
            <text:p>4</text:p>
          </table:table-cell>
          <table:table-cell table:formula="of:=IF([.D12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DEC2HEX([.C1293])" office:value-type="string" office:string-value="EDE0F" calcext:value-type="string">
            <text:p>EDE0F</text:p>
          </table:table-cell>
          <table:table-cell office:value-type="float" office:value="974351" calcext:value-type="float">
            <text:p>974351</text:p>
          </table:table-cell>
          <table:table-cell office:value-type="float" office:value="4" calcext:value-type="float">
            <text:p>4</text:p>
          </table:table-cell>
          <table:table-cell table:formula="of:=IF([.D12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DEC2HEX([.C1294])" office:value-type="string" office:string-value="EDE13" calcext:value-type="string">
            <text:p>EDE13</text:p>
          </table:table-cell>
          <table:table-cell office:value-type="float" office:value="974355" calcext:value-type="float">
            <text:p>974355</text:p>
          </table:table-cell>
          <table:table-cell office:value-type="float" office:value="4" calcext:value-type="float">
            <text:p>4</text:p>
          </table:table-cell>
          <table:table-cell table:formula="of:=IF([.D12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DEC2HEX([.C1295])" office:value-type="string" office:string-value="EDE17" calcext:value-type="string">
            <text:p>EDE17</text:p>
          </table:table-cell>
          <table:table-cell office:value-type="float" office:value="974359" calcext:value-type="float">
            <text:p>974359</text:p>
          </table:table-cell>
          <table:table-cell office:value-type="float" office:value="4" calcext:value-type="float">
            <text:p>4</text:p>
          </table:table-cell>
          <table:table-cell table:formula="of:=IF([.D12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DEC2HEX([.C1296])" office:value-type="string" office:string-value="EDE1B" calcext:value-type="string">
            <text:p>EDE1B</text:p>
          </table:table-cell>
          <table:table-cell office:value-type="float" office:value="974363" calcext:value-type="float">
            <text:p>974363</text:p>
          </table:table-cell>
          <table:table-cell office:value-type="float" office:value="4" calcext:value-type="float">
            <text:p>4</text:p>
          </table:table-cell>
          <table:table-cell table:formula="of:=IF([.D12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DEC2HEX([.C1297])" office:value-type="string" office:string-value="EDE1F" calcext:value-type="string">
            <text:p>EDE1F</text:p>
          </table:table-cell>
          <table:table-cell office:value-type="float" office:value="974367" calcext:value-type="float">
            <text:p>974367</text:p>
          </table:table-cell>
          <table:table-cell office:value-type="float" office:value="4" calcext:value-type="float">
            <text:p>4</text:p>
          </table:table-cell>
          <table:table-cell table:formula="of:=IF([.D12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DEC2HEX([.C1298])" office:value-type="string" office:string-value="EDE23" calcext:value-type="string">
            <text:p>EDE23</text:p>
          </table:table-cell>
          <table:table-cell office:value-type="float" office:value="974371" calcext:value-type="float">
            <text:p>974371</text:p>
          </table:table-cell>
          <table:table-cell office:value-type="float" office:value="1" calcext:value-type="float">
            <text:p>1</text:p>
          </table:table-cell>
          <table:table-cell table:formula="of:=IF([.D12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DEC2HEX([.C1299])" office:value-type="string" office:string-value="EDE24" calcext:value-type="string">
            <text:p>EDE24</text:p>
          </table:table-cell>
          <table:table-cell office:value-type="float" office:value="974372" calcext:value-type="float">
            <text:p>974372</text:p>
          </table:table-cell>
          <table:table-cell office:value-type="float" office:value="4" calcext:value-type="float">
            <text:p>4</text:p>
          </table:table-cell>
          <table:table-cell table:formula="of:=IF([.D12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DEC2HEX([.C1300])" office:value-type="string" office:string-value="EDE28" calcext:value-type="string">
            <text:p>EDE28</text:p>
          </table:table-cell>
          <table:table-cell office:value-type="float" office:value="974376" calcext:value-type="float">
            <text:p>974376</text:p>
          </table:table-cell>
          <table:table-cell office:value-type="float" office:value="4" calcext:value-type="float">
            <text:p>4</text:p>
          </table:table-cell>
          <table:table-cell table:formula="of:=IF([.D13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DEC2HEX([.C1301])" office:value-type="string" office:string-value="EDE2C" calcext:value-type="string">
            <text:p>EDE2C</text:p>
          </table:table-cell>
          <table:table-cell office:value-type="float" office:value="974380" calcext:value-type="float">
            <text:p>974380</text:p>
          </table:table-cell>
          <table:table-cell office:value-type="float" office:value="4" calcext:value-type="float">
            <text:p>4</text:p>
          </table:table-cell>
          <table:table-cell table:formula="of:=IF([.D13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DEC2HEX([.C1302])" office:value-type="string" office:string-value="EDE30" calcext:value-type="string">
            <text:p>EDE30</text:p>
          </table:table-cell>
          <table:table-cell office:value-type="float" office:value="974384" calcext:value-type="float">
            <text:p>974384</text:p>
          </table:table-cell>
          <table:table-cell office:value-type="float" office:value="4" calcext:value-type="float">
            <text:p>4</text:p>
          </table:table-cell>
          <table:table-cell table:formula="of:=IF([.D13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DEC2HEX([.C1303])" office:value-type="string" office:string-value="EDE34" calcext:value-type="string">
            <text:p>EDE34</text:p>
          </table:table-cell>
          <table:table-cell office:value-type="float" office:value="974388" calcext:value-type="float">
            <text:p>974388</text:p>
          </table:table-cell>
          <table:table-cell office:value-type="float" office:value="4" calcext:value-type="float">
            <text:p>4</text:p>
          </table:table-cell>
          <table:table-cell table:formula="of:=IF([.D13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DEC2HEX([.C1304])" office:value-type="string" office:string-value="EDE38" calcext:value-type="string">
            <text:p>EDE38</text:p>
          </table:table-cell>
          <table:table-cell office:value-type="float" office:value="974392" calcext:value-type="float">
            <text:p>974392</text:p>
          </table:table-cell>
          <table:table-cell office:value-type="float" office:value="4" calcext:value-type="float">
            <text:p>4</text:p>
          </table:table-cell>
          <table:table-cell table:formula="of:=IF([.D13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DEC2HEX([.C1305])" office:value-type="string" office:string-value="EDE3C" calcext:value-type="string">
            <text:p>EDE3C</text:p>
          </table:table-cell>
          <table:table-cell office:value-type="float" office:value="974396" calcext:value-type="float">
            <text:p>974396</text:p>
          </table:table-cell>
          <table:table-cell office:value-type="float" office:value="11" calcext:value-type="float">
            <text:p>11</text:p>
          </table:table-cell>
          <table:table-cell table:formula="of:=IF([.D13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DEC2HEX([.C1306])" office:value-type="string" office:string-value="EDE47" calcext:value-type="string">
            <text:p>EDE47</text:p>
          </table:table-cell>
          <table:table-cell office:value-type="float" office:value="974407" calcext:value-type="float">
            <text:p>974407</text:p>
          </table:table-cell>
          <table:table-cell office:value-type="float" office:value="4" calcext:value-type="float">
            <text:p>4</text:p>
          </table:table-cell>
          <table:table-cell table:formula="of:=IF([.D13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DEC2HEX([.C1307])" office:value-type="string" office:string-value="EDE4B" calcext:value-type="string">
            <text:p>EDE4B</text:p>
          </table:table-cell>
          <table:table-cell office:value-type="float" office:value="974411" calcext:value-type="float">
            <text:p>974411</text:p>
          </table:table-cell>
          <table:table-cell office:value-type="float" office:value="4" calcext:value-type="float">
            <text:p>4</text:p>
          </table:table-cell>
          <table:table-cell table:formula="of:=IF([.D13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DEC2HEX([.C1308])" office:value-type="string" office:string-value="EDE4F" calcext:value-type="string">
            <text:p>EDE4F</text:p>
          </table:table-cell>
          <table:table-cell office:value-type="float" office:value="974415" calcext:value-type="float">
            <text:p>974415</text:p>
          </table:table-cell>
          <table:table-cell office:value-type="float" office:value="4" calcext:value-type="float">
            <text:p>4</text:p>
          </table:table-cell>
          <table:table-cell table:formula="of:=IF([.D13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DEC2HEX([.C1309])" office:value-type="string" office:string-value="EDE53" calcext:value-type="string">
            <text:p>EDE53</text:p>
          </table:table-cell>
          <table:table-cell office:value-type="float" office:value="974419" calcext:value-type="float">
            <text:p>974419</text:p>
          </table:table-cell>
          <table:table-cell office:value-type="float" office:value="4" calcext:value-type="float">
            <text:p>4</text:p>
          </table:table-cell>
          <table:table-cell table:formula="of:=IF([.D13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DEC2HEX([.C1310])" office:value-type="string" office:string-value="EDE57" calcext:value-type="string">
            <text:p>EDE57</text:p>
          </table:table-cell>
          <table:table-cell office:value-type="float" office:value="974423" calcext:value-type="float">
            <text:p>974423</text:p>
          </table:table-cell>
          <table:table-cell office:value-type="float" office:value="4" calcext:value-type="float">
            <text:p>4</text:p>
          </table:table-cell>
          <table:table-cell table:formula="of:=IF([.D13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DEC2HEX([.C1311])" office:value-type="string" office:string-value="EDE5B" calcext:value-type="string">
            <text:p>EDE5B</text:p>
          </table:table-cell>
          <table:table-cell office:value-type="float" office:value="974427" calcext:value-type="float">
            <text:p>974427</text:p>
          </table:table-cell>
          <table:table-cell office:value-type="float" office:value="4" calcext:value-type="float">
            <text:p>4</text:p>
          </table:table-cell>
          <table:table-cell table:formula="of:=IF([.D13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DEC2HEX([.C1312])" office:value-type="string" office:string-value="EDE5F" calcext:value-type="string">
            <text:p>EDE5F</text:p>
          </table:table-cell>
          <table:table-cell office:value-type="float" office:value="974431" calcext:value-type="float">
            <text:p>974431</text:p>
          </table:table-cell>
          <table:table-cell office:value-type="float" office:value="4" calcext:value-type="float">
            <text:p>4</text:p>
          </table:table-cell>
          <table:table-cell table:formula="of:=IF([.D13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DEC2HEX([.C1313])" office:value-type="string" office:string-value="EDE63" calcext:value-type="string">
            <text:p>EDE63</text:p>
          </table:table-cell>
          <table:table-cell office:value-type="float" office:value="974435" calcext:value-type="float">
            <text:p>974435</text:p>
          </table:table-cell>
          <table:table-cell office:value-type="float" office:value="1" calcext:value-type="float">
            <text:p>1</text:p>
          </table:table-cell>
          <table:table-cell table:formula="of:=IF([.D13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DEC2HEX([.C1314])" office:value-type="string" office:string-value="EDE64" calcext:value-type="string">
            <text:p>EDE64</text:p>
          </table:table-cell>
          <table:table-cell office:value-type="float" office:value="974436" calcext:value-type="float">
            <text:p>974436</text:p>
          </table:table-cell>
          <table:table-cell office:value-type="float" office:value="4" calcext:value-type="float">
            <text:p>4</text:p>
          </table:table-cell>
          <table:table-cell table:formula="of:=IF([.D13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DEC2HEX([.C1315])" office:value-type="string" office:string-value="EDE68" calcext:value-type="string">
            <text:p>EDE68</text:p>
          </table:table-cell>
          <table:table-cell office:value-type="float" office:value="974440" calcext:value-type="float">
            <text:p>974440</text:p>
          </table:table-cell>
          <table:table-cell office:value-type="float" office:value="4" calcext:value-type="float">
            <text:p>4</text:p>
          </table:table-cell>
          <table:table-cell table:formula="of:=IF([.D13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DEC2HEX([.C1316])" office:value-type="string" office:string-value="EDE6C" calcext:value-type="string">
            <text:p>EDE6C</text:p>
          </table:table-cell>
          <table:table-cell office:value-type="float" office:value="974444" calcext:value-type="float">
            <text:p>974444</text:p>
          </table:table-cell>
          <table:table-cell office:value-type="float" office:value="4" calcext:value-type="float">
            <text:p>4</text:p>
          </table:table-cell>
          <table:table-cell table:formula="of:=IF([.D13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DEC2HEX([.C1317])" office:value-type="string" office:string-value="EDE70" calcext:value-type="string">
            <text:p>EDE70</text:p>
          </table:table-cell>
          <table:table-cell office:value-type="float" office:value="974448" calcext:value-type="float">
            <text:p>974448</text:p>
          </table:table-cell>
          <table:table-cell office:value-type="float" office:value="4" calcext:value-type="float">
            <text:p>4</text:p>
          </table:table-cell>
          <table:table-cell table:formula="of:=IF([.D13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DEC2HEX([.C1318])" office:value-type="string" office:string-value="EDE74" calcext:value-type="string">
            <text:p>EDE74</text:p>
          </table:table-cell>
          <table:table-cell office:value-type="float" office:value="974452" calcext:value-type="float">
            <text:p>974452</text:p>
          </table:table-cell>
          <table:table-cell office:value-type="float" office:value="4" calcext:value-type="float">
            <text:p>4</text:p>
          </table:table-cell>
          <table:table-cell table:formula="of:=IF([.D13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DEC2HEX([.C1319])" office:value-type="string" office:string-value="EDE78" calcext:value-type="string">
            <text:p>EDE78</text:p>
          </table:table-cell>
          <table:table-cell office:value-type="float" office:value="974456" calcext:value-type="float">
            <text:p>974456</text:p>
          </table:table-cell>
          <table:table-cell office:value-type="float" office:value="4" calcext:value-type="float">
            <text:p>4</text:p>
          </table:table-cell>
          <table:table-cell table:formula="of:=IF([.D13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DEC2HEX([.C1320])" office:value-type="string" office:string-value="EDE7C" calcext:value-type="string">
            <text:p>EDE7C</text:p>
          </table:table-cell>
          <table:table-cell office:value-type="float" office:value="974460" calcext:value-type="float">
            <text:p>974460</text:p>
          </table:table-cell>
          <table:table-cell office:value-type="float" office:value="4" calcext:value-type="float">
            <text:p>4</text:p>
          </table:table-cell>
          <table:table-cell table:formula="of:=IF([.D13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DEC2HEX([.C1321])" office:value-type="string" office:string-value="EDE80" calcext:value-type="string">
            <text:p>EDE80</text:p>
          </table:table-cell>
          <table:table-cell office:value-type="float" office:value="974464" calcext:value-type="float">
            <text:p>974464</text:p>
          </table:table-cell>
          <table:table-cell office:value-type="float" office:value="4" calcext:value-type="float">
            <text:p>4</text:p>
          </table:table-cell>
          <table:table-cell table:formula="of:=IF([.D13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DEC2HEX([.C1322])" office:value-type="string" office:string-value="EDE84" calcext:value-type="string">
            <text:p>EDE84</text:p>
          </table:table-cell>
          <table:table-cell office:value-type="float" office:value="974468" calcext:value-type="float">
            <text:p>974468</text:p>
          </table:table-cell>
          <table:table-cell office:value-type="float" office:value="4" calcext:value-type="float">
            <text:p>4</text:p>
          </table:table-cell>
          <table:table-cell table:formula="of:=IF([.D13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DEC2HEX([.C1323])" office:value-type="string" office:string-value="EDE88" calcext:value-type="string">
            <text:p>EDE88</text:p>
          </table:table-cell>
          <table:table-cell office:value-type="float" office:value="974472" calcext:value-type="float">
            <text:p>974472</text:p>
          </table:table-cell>
          <table:table-cell office:value-type="float" office:value="4" calcext:value-type="float">
            <text:p>4</text:p>
          </table:table-cell>
          <table:table-cell table:formula="of:=IF([.D13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DEC2HEX([.C1324])" office:value-type="string" office:string-value="EDE8C" calcext:value-type="string">
            <text:p>EDE8C</text:p>
          </table:table-cell>
          <table:table-cell office:value-type="float" office:value="974476" calcext:value-type="float">
            <text:p>974476</text:p>
          </table:table-cell>
          <table:table-cell office:value-type="float" office:value="4" calcext:value-type="float">
            <text:p>4</text:p>
          </table:table-cell>
          <table:table-cell table:formula="of:=IF([.D13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DEC2HEX([.C1325])" office:value-type="string" office:string-value="EDE90" calcext:value-type="string">
            <text:p>EDE90</text:p>
          </table:table-cell>
          <table:table-cell office:value-type="float" office:value="974480" calcext:value-type="float">
            <text:p>974480</text:p>
          </table:table-cell>
          <table:table-cell office:value-type="float" office:value="4" calcext:value-type="float">
            <text:p>4</text:p>
          </table:table-cell>
          <table:table-cell table:formula="of:=IF([.D13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DEC2HEX([.C1326])" office:value-type="string" office:string-value="EDE94" calcext:value-type="string">
            <text:p>EDE94</text:p>
          </table:table-cell>
          <table:table-cell office:value-type="float" office:value="974484" calcext:value-type="float">
            <text:p>974484</text:p>
          </table:table-cell>
          <table:table-cell office:value-type="float" office:value="4" calcext:value-type="float">
            <text:p>4</text:p>
          </table:table-cell>
          <table:table-cell table:formula="of:=IF([.D13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DEC2HEX([.C1327])" office:value-type="string" office:string-value="EDE98" calcext:value-type="string">
            <text:p>EDE98</text:p>
          </table:table-cell>
          <table:table-cell office:value-type="float" office:value="974488" calcext:value-type="float">
            <text:p>974488</text:p>
          </table:table-cell>
          <table:table-cell office:value-type="float" office:value="4" calcext:value-type="float">
            <text:p>4</text:p>
          </table:table-cell>
          <table:table-cell table:formula="of:=IF([.D13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DEC2HEX([.C1328])" office:value-type="string" office:string-value="EDE9C" calcext:value-type="string">
            <text:p>EDE9C</text:p>
          </table:table-cell>
          <table:table-cell office:value-type="float" office:value="974492" calcext:value-type="float">
            <text:p>974492</text:p>
          </table:table-cell>
          <table:table-cell office:value-type="float" office:value="4" calcext:value-type="float">
            <text:p>4</text:p>
          </table:table-cell>
          <table:table-cell table:formula="of:=IF([.D13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DEC2HEX([.C1329])" office:value-type="string" office:string-value="EDEA0" calcext:value-type="string">
            <text:p>EDEA0</text:p>
          </table:table-cell>
          <table:table-cell office:value-type="float" office:value="974496" calcext:value-type="float">
            <text:p>974496</text:p>
          </table:table-cell>
          <table:table-cell office:value-type="float" office:value="4" calcext:value-type="float">
            <text:p>4</text:p>
          </table:table-cell>
          <table:table-cell table:formula="of:=IF([.D13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DEC2HEX([.C1330])" office:value-type="string" office:string-value="EDEA4" calcext:value-type="string">
            <text:p>EDEA4</text:p>
          </table:table-cell>
          <table:table-cell office:value-type="float" office:value="974500" calcext:value-type="float">
            <text:p>974500</text:p>
          </table:table-cell>
          <table:table-cell office:value-type="float" office:value="4" calcext:value-type="float">
            <text:p>4</text:p>
          </table:table-cell>
          <table:table-cell table:formula="of:=IF([.D13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DEC2HEX([.C1331])" office:value-type="string" office:string-value="EDEA8" calcext:value-type="string">
            <text:p>EDEA8</text:p>
          </table:table-cell>
          <table:table-cell office:value-type="float" office:value="974504" calcext:value-type="float">
            <text:p>974504</text:p>
          </table:table-cell>
          <table:table-cell office:value-type="float" office:value="4" calcext:value-type="float">
            <text:p>4</text:p>
          </table:table-cell>
          <table:table-cell table:formula="of:=IF([.D13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DEC2HEX([.C1332])" office:value-type="string" office:string-value="EDEAC" calcext:value-type="string">
            <text:p>EDEAC</text:p>
          </table:table-cell>
          <table:table-cell office:value-type="float" office:value="974508" calcext:value-type="float">
            <text:p>974508</text:p>
          </table:table-cell>
          <table:table-cell office:value-type="float" office:value="4" calcext:value-type="float">
            <text:p>4</text:p>
          </table:table-cell>
          <table:table-cell table:formula="of:=IF([.D13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DEC2HEX([.C1333])" office:value-type="string" office:string-value="EDEB0" calcext:value-type="string">
            <text:p>EDEB0</text:p>
          </table:table-cell>
          <table:table-cell office:value-type="float" office:value="974512" calcext:value-type="float">
            <text:p>974512</text:p>
          </table:table-cell>
          <table:table-cell office:value-type="float" office:value="4" calcext:value-type="float">
            <text:p>4</text:p>
          </table:table-cell>
          <table:table-cell table:formula="of:=IF([.D13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DEC2HEX([.C1334])" office:value-type="string" office:string-value="EDEB4" calcext:value-type="string">
            <text:p>EDEB4</text:p>
          </table:table-cell>
          <table:table-cell office:value-type="float" office:value="974516" calcext:value-type="float">
            <text:p>974516</text:p>
          </table:table-cell>
          <table:table-cell office:value-type="float" office:value="4" calcext:value-type="float">
            <text:p>4</text:p>
          </table:table-cell>
          <table:table-cell table:formula="of:=IF([.D13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DEC2HEX([.C1335])" office:value-type="string" office:string-value="EDEB8" calcext:value-type="string">
            <text:p>EDEB8</text:p>
          </table:table-cell>
          <table:table-cell office:value-type="float" office:value="974520" calcext:value-type="float">
            <text:p>974520</text:p>
          </table:table-cell>
          <table:table-cell office:value-type="float" office:value="4" calcext:value-type="float">
            <text:p>4</text:p>
          </table:table-cell>
          <table:table-cell table:formula="of:=IF([.D13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DEC2HEX([.C1336])" office:value-type="string" office:string-value="EDEBC" calcext:value-type="string">
            <text:p>EDEBC</text:p>
          </table:table-cell>
          <table:table-cell office:value-type="float" office:value="974524" calcext:value-type="float">
            <text:p>974524</text:p>
          </table:table-cell>
          <table:table-cell office:value-type="float" office:value="4" calcext:value-type="float">
            <text:p>4</text:p>
          </table:table-cell>
          <table:table-cell table:formula="of:=IF([.D13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DEC2HEX([.C1337])" office:value-type="string" office:string-value="EDEC0" calcext:value-type="string">
            <text:p>EDEC0</text:p>
          </table:table-cell>
          <table:table-cell office:value-type="float" office:value="974528" calcext:value-type="float">
            <text:p>974528</text:p>
          </table:table-cell>
          <table:table-cell office:value-type="float" office:value="4" calcext:value-type="float">
            <text:p>4</text:p>
          </table:table-cell>
          <table:table-cell table:formula="of:=IF([.D13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DEC2HEX([.C1338])" office:value-type="string" office:string-value="EDEC4" calcext:value-type="string">
            <text:p>EDEC4</text:p>
          </table:table-cell>
          <table:table-cell office:value-type="float" office:value="974532" calcext:value-type="float">
            <text:p>974532</text:p>
          </table:table-cell>
          <table:table-cell office:value-type="float" office:value="4" calcext:value-type="float">
            <text:p>4</text:p>
          </table:table-cell>
          <table:table-cell table:formula="of:=IF([.D13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DEC2HEX([.C1339])" office:value-type="string" office:string-value="EDEC8" calcext:value-type="string">
            <text:p>EDEC8</text:p>
          </table:table-cell>
          <table:table-cell office:value-type="float" office:value="974536" calcext:value-type="float">
            <text:p>974536</text:p>
          </table:table-cell>
          <table:table-cell office:value-type="float" office:value="4" calcext:value-type="float">
            <text:p>4</text:p>
          </table:table-cell>
          <table:table-cell table:formula="of:=IF([.D13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DEC2HEX([.C1340])" office:value-type="string" office:string-value="EDECC" calcext:value-type="string">
            <text:p>EDECC</text:p>
          </table:table-cell>
          <table:table-cell office:value-type="float" office:value="974540" calcext:value-type="float">
            <text:p>974540</text:p>
          </table:table-cell>
          <table:table-cell office:value-type="float" office:value="4" calcext:value-type="float">
            <text:p>4</text:p>
          </table:table-cell>
          <table:table-cell table:formula="of:=IF([.D13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DEC2HEX([.C1341])" office:value-type="string" office:string-value="EDED0" calcext:value-type="string">
            <text:p>EDED0</text:p>
          </table:table-cell>
          <table:table-cell office:value-type="float" office:value="974544" calcext:value-type="float">
            <text:p>974544</text:p>
          </table:table-cell>
          <table:table-cell office:value-type="float" office:value="4" calcext:value-type="float">
            <text:p>4</text:p>
          </table:table-cell>
          <table:table-cell table:formula="of:=IF([.D13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DEC2HEX([.C1342])" office:value-type="string" office:string-value="EDED4" calcext:value-type="string">
            <text:p>EDED4</text:p>
          </table:table-cell>
          <table:table-cell office:value-type="float" office:value="974548" calcext:value-type="float">
            <text:p>974548</text:p>
          </table:table-cell>
          <table:table-cell office:value-type="float" office:value="4" calcext:value-type="float">
            <text:p>4</text:p>
          </table:table-cell>
          <table:table-cell table:formula="of:=IF([.D13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DEC2HEX([.C1343])" office:value-type="string" office:string-value="EDED8" calcext:value-type="string">
            <text:p>EDED8</text:p>
          </table:table-cell>
          <table:table-cell office:value-type="float" office:value="974552" calcext:value-type="float">
            <text:p>974552</text:p>
          </table:table-cell>
          <table:table-cell office:value-type="float" office:value="4" calcext:value-type="float">
            <text:p>4</text:p>
          </table:table-cell>
          <table:table-cell table:formula="of:=IF([.D13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DEC2HEX([.C1344])" office:value-type="string" office:string-value="EDEDC" calcext:value-type="string">
            <text:p>EDEDC</text:p>
          </table:table-cell>
          <table:table-cell office:value-type="float" office:value="974556" calcext:value-type="float">
            <text:p>974556</text:p>
          </table:table-cell>
          <table:table-cell office:value-type="float" office:value="4" calcext:value-type="float">
            <text:p>4</text:p>
          </table:table-cell>
          <table:table-cell table:formula="of:=IF([.D13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DEC2HEX([.C1345])" office:value-type="string" office:string-value="EDEE0" calcext:value-type="string">
            <text:p>EDEE0</text:p>
          </table:table-cell>
          <table:table-cell office:value-type="float" office:value="974560" calcext:value-type="float">
            <text:p>974560</text:p>
          </table:table-cell>
          <table:table-cell office:value-type="float" office:value="4" calcext:value-type="float">
            <text:p>4</text:p>
          </table:table-cell>
          <table:table-cell table:formula="of:=IF([.D13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DEC2HEX([.C1346])" office:value-type="string" office:string-value="EDEE4" calcext:value-type="string">
            <text:p>EDEE4</text:p>
          </table:table-cell>
          <table:table-cell office:value-type="float" office:value="974564" calcext:value-type="float">
            <text:p>974564</text:p>
          </table:table-cell>
          <table:table-cell office:value-type="float" office:value="4" calcext:value-type="float">
            <text:p>4</text:p>
          </table:table-cell>
          <table:table-cell table:formula="of:=IF([.D13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DEC2HEX([.C1347])" office:value-type="string" office:string-value="EDEE8" calcext:value-type="string">
            <text:p>EDEE8</text:p>
          </table:table-cell>
          <table:table-cell office:value-type="float" office:value="974568" calcext:value-type="float">
            <text:p>974568</text:p>
          </table:table-cell>
          <table:table-cell office:value-type="float" office:value="4" calcext:value-type="float">
            <text:p>4</text:p>
          </table:table-cell>
          <table:table-cell table:formula="of:=IF([.D13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DEC2HEX([.C1348])" office:value-type="string" office:string-value="EDEEC" calcext:value-type="string">
            <text:p>EDEEC</text:p>
          </table:table-cell>
          <table:table-cell office:value-type="float" office:value="974572" calcext:value-type="float">
            <text:p>974572</text:p>
          </table:table-cell>
          <table:table-cell office:value-type="float" office:value="4" calcext:value-type="float">
            <text:p>4</text:p>
          </table:table-cell>
          <table:table-cell table:formula="of:=IF([.D13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DEC2HEX([.C1349])" office:value-type="string" office:string-value="EDEF0" calcext:value-type="string">
            <text:p>EDEF0</text:p>
          </table:table-cell>
          <table:table-cell office:value-type="float" office:value="974576" calcext:value-type="float">
            <text:p>974576</text:p>
          </table:table-cell>
          <table:table-cell office:value-type="float" office:value="4" calcext:value-type="float">
            <text:p>4</text:p>
          </table:table-cell>
          <table:table-cell table:formula="of:=IF([.D13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DEC2HEX([.C1350])" office:value-type="string" office:string-value="EDEF4" calcext:value-type="string">
            <text:p>EDEF4</text:p>
          </table:table-cell>
          <table:table-cell office:value-type="float" office:value="974580" calcext:value-type="float">
            <text:p>974580</text:p>
          </table:table-cell>
          <table:table-cell office:value-type="float" office:value="4" calcext:value-type="float">
            <text:p>4</text:p>
          </table:table-cell>
          <table:table-cell table:formula="of:=IF([.D13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DEC2HEX([.C1351])" office:value-type="string" office:string-value="EDEF8" calcext:value-type="string">
            <text:p>EDEF8</text:p>
          </table:table-cell>
          <table:table-cell office:value-type="float" office:value="974584" calcext:value-type="float">
            <text:p>974584</text:p>
          </table:table-cell>
          <table:table-cell office:value-type="float" office:value="4" calcext:value-type="float">
            <text:p>4</text:p>
          </table:table-cell>
          <table:table-cell table:formula="of:=IF([.D13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DEC2HEX([.C1352])" office:value-type="string" office:string-value="EDEFC" calcext:value-type="string">
            <text:p>EDEFC</text:p>
          </table:table-cell>
          <table:table-cell office:value-type="float" office:value="974588" calcext:value-type="float">
            <text:p>974588</text:p>
          </table:table-cell>
          <table:table-cell office:value-type="float" office:value="4" calcext:value-type="float">
            <text:p>4</text:p>
          </table:table-cell>
          <table:table-cell table:formula="of:=IF([.D13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DEC2HEX([.C1353])" office:value-type="string" office:string-value="EDF00" calcext:value-type="string">
            <text:p>EDF00</text:p>
          </table:table-cell>
          <table:table-cell office:value-type="float" office:value="974592" calcext:value-type="float">
            <text:p>974592</text:p>
          </table:table-cell>
          <table:table-cell office:value-type="float" office:value="4" calcext:value-type="float">
            <text:p>4</text:p>
          </table:table-cell>
          <table:table-cell table:formula="of:=IF([.D13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DEC2HEX([.C1354])" office:value-type="string" office:string-value="EDF04" calcext:value-type="string">
            <text:p>EDF04</text:p>
          </table:table-cell>
          <table:table-cell office:value-type="float" office:value="974596" calcext:value-type="float">
            <text:p>974596</text:p>
          </table:table-cell>
          <table:table-cell office:value-type="float" office:value="4" calcext:value-type="float">
            <text:p>4</text:p>
          </table:table-cell>
          <table:table-cell table:formula="of:=IF([.D13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DEC2HEX([.C1355])" office:value-type="string" office:string-value="EDF08" calcext:value-type="string">
            <text:p>EDF08</text:p>
          </table:table-cell>
          <table:table-cell office:value-type="float" office:value="974600" calcext:value-type="float">
            <text:p>974600</text:p>
          </table:table-cell>
          <table:table-cell office:value-type="float" office:value="4" calcext:value-type="float">
            <text:p>4</text:p>
          </table:table-cell>
          <table:table-cell table:formula="of:=IF([.D13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DEC2HEX([.C1356])" office:value-type="string" office:string-value="EDF0C" calcext:value-type="string">
            <text:p>EDF0C</text:p>
          </table:table-cell>
          <table:table-cell office:value-type="float" office:value="974604" calcext:value-type="float">
            <text:p>974604</text:p>
          </table:table-cell>
          <table:table-cell office:value-type="float" office:value="4" calcext:value-type="float">
            <text:p>4</text:p>
          </table:table-cell>
          <table:table-cell table:formula="of:=IF([.D13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DEC2HEX([.C1357])" office:value-type="string" office:string-value="EDF10" calcext:value-type="string">
            <text:p>EDF10</text:p>
          </table:table-cell>
          <table:table-cell office:value-type="float" office:value="974608" calcext:value-type="float">
            <text:p>974608</text:p>
          </table:table-cell>
          <table:table-cell office:value-type="float" office:value="4" calcext:value-type="float">
            <text:p>4</text:p>
          </table:table-cell>
          <table:table-cell table:formula="of:=IF([.D13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DEC2HEX([.C1358])" office:value-type="string" office:string-value="EDF14" calcext:value-type="string">
            <text:p>EDF14</text:p>
          </table:table-cell>
          <table:table-cell office:value-type="float" office:value="974612" calcext:value-type="float">
            <text:p>974612</text:p>
          </table:table-cell>
          <table:table-cell office:value-type="float" office:value="4" calcext:value-type="float">
            <text:p>4</text:p>
          </table:table-cell>
          <table:table-cell table:formula="of:=IF([.D13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DEC2HEX([.C1359])" office:value-type="string" office:string-value="EDF18" calcext:value-type="string">
            <text:p>EDF18</text:p>
          </table:table-cell>
          <table:table-cell office:value-type="float" office:value="974616" calcext:value-type="float">
            <text:p>974616</text:p>
          </table:table-cell>
          <table:table-cell office:value-type="float" office:value="4" calcext:value-type="float">
            <text:p>4</text:p>
          </table:table-cell>
          <table:table-cell table:formula="of:=IF([.D13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DEC2HEX([.C1360])" office:value-type="string" office:string-value="EDF1C" calcext:value-type="string">
            <text:p>EDF1C</text:p>
          </table:table-cell>
          <table:table-cell office:value-type="float" office:value="974620" calcext:value-type="float">
            <text:p>974620</text:p>
          </table:table-cell>
          <table:table-cell office:value-type="float" office:value="4" calcext:value-type="float">
            <text:p>4</text:p>
          </table:table-cell>
          <table:table-cell table:formula="of:=IF([.D13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DEC2HEX([.C1361])" office:value-type="string" office:string-value="EDF20" calcext:value-type="string">
            <text:p>EDF20</text:p>
          </table:table-cell>
          <table:table-cell office:value-type="float" office:value="974624" calcext:value-type="float">
            <text:p>974624</text:p>
          </table:table-cell>
          <table:table-cell office:value-type="float" office:value="4" calcext:value-type="float">
            <text:p>4</text:p>
          </table:table-cell>
          <table:table-cell table:formula="of:=IF([.D13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DEC2HEX([.C1362])" office:value-type="string" office:string-value="EDF24" calcext:value-type="string">
            <text:p>EDF24</text:p>
          </table:table-cell>
          <table:table-cell office:value-type="float" office:value="974628" calcext:value-type="float">
            <text:p>974628</text:p>
          </table:table-cell>
          <table:table-cell office:value-type="float" office:value="4" calcext:value-type="float">
            <text:p>4</text:p>
          </table:table-cell>
          <table:table-cell table:formula="of:=IF([.D13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DEC2HEX([.C1363])" office:value-type="string" office:string-value="EDF28" calcext:value-type="string">
            <text:p>EDF28</text:p>
          </table:table-cell>
          <table:table-cell office:value-type="float" office:value="974632" calcext:value-type="float">
            <text:p>974632</text:p>
          </table:table-cell>
          <table:table-cell office:value-type="float" office:value="4" calcext:value-type="float">
            <text:p>4</text:p>
          </table:table-cell>
          <table:table-cell table:formula="of:=IF([.D13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DEC2HEX([.C1364])" office:value-type="string" office:string-value="EDF2C" calcext:value-type="string">
            <text:p>EDF2C</text:p>
          </table:table-cell>
          <table:table-cell office:value-type="float" office:value="974636" calcext:value-type="float">
            <text:p>974636</text:p>
          </table:table-cell>
          <table:table-cell office:value-type="float" office:value="4" calcext:value-type="float">
            <text:p>4</text:p>
          </table:table-cell>
          <table:table-cell table:formula="of:=IF([.D13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DEC2HEX([.C1365])" office:value-type="string" office:string-value="EDF30" calcext:value-type="string">
            <text:p>EDF30</text:p>
          </table:table-cell>
          <table:table-cell office:value-type="float" office:value="974640" calcext:value-type="float">
            <text:p>974640</text:p>
          </table:table-cell>
          <table:table-cell office:value-type="float" office:value="4" calcext:value-type="float">
            <text:p>4</text:p>
          </table:table-cell>
          <table:table-cell table:formula="of:=IF([.D13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DEC2HEX([.C1366])" office:value-type="string" office:string-value="EDF34" calcext:value-type="string">
            <text:p>EDF34</text:p>
          </table:table-cell>
          <table:table-cell office:value-type="float" office:value="974644" calcext:value-type="float">
            <text:p>974644</text:p>
          </table:table-cell>
          <table:table-cell office:value-type="float" office:value="4" calcext:value-type="float">
            <text:p>4</text:p>
          </table:table-cell>
          <table:table-cell table:formula="of:=IF([.D13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DEC2HEX([.C1367])" office:value-type="string" office:string-value="EDF38" calcext:value-type="string">
            <text:p>EDF38</text:p>
          </table:table-cell>
          <table:table-cell office:value-type="float" office:value="974648" calcext:value-type="float">
            <text:p>974648</text:p>
          </table:table-cell>
          <table:table-cell office:value-type="float" office:value="4" calcext:value-type="float">
            <text:p>4</text:p>
          </table:table-cell>
          <table:table-cell table:formula="of:=IF([.D13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DEC2HEX([.C1368])" office:value-type="string" office:string-value="EDF3C" calcext:value-type="string">
            <text:p>EDF3C</text:p>
          </table:table-cell>
          <table:table-cell office:value-type="float" office:value="974652" calcext:value-type="float">
            <text:p>974652</text:p>
          </table:table-cell>
          <table:table-cell office:value-type="float" office:value="4" calcext:value-type="float">
            <text:p>4</text:p>
          </table:table-cell>
          <table:table-cell table:formula="of:=IF([.D13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DEC2HEX([.C1369])" office:value-type="string" office:string-value="EDF40" calcext:value-type="string">
            <text:p>EDF40</text:p>
          </table:table-cell>
          <table:table-cell office:value-type="float" office:value="974656" calcext:value-type="float">
            <text:p>974656</text:p>
          </table:table-cell>
          <table:table-cell office:value-type="float" office:value="4" calcext:value-type="float">
            <text:p>4</text:p>
          </table:table-cell>
          <table:table-cell table:formula="of:=IF([.D13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DEC2HEX([.C1370])" office:value-type="string" office:string-value="EDF44" calcext:value-type="string">
            <text:p>EDF44</text:p>
          </table:table-cell>
          <table:table-cell office:value-type="float" office:value="974660" calcext:value-type="float">
            <text:p>974660</text:p>
          </table:table-cell>
          <table:table-cell office:value-type="float" office:value="4" calcext:value-type="float">
            <text:p>4</text:p>
          </table:table-cell>
          <table:table-cell table:formula="of:=IF([.D13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DEC2HEX([.C1371])" office:value-type="string" office:string-value="EDF48" calcext:value-type="string">
            <text:p>EDF48</text:p>
          </table:table-cell>
          <table:table-cell office:value-type="float" office:value="974664" calcext:value-type="float">
            <text:p>974664</text:p>
          </table:table-cell>
          <table:table-cell office:value-type="float" office:value="4" calcext:value-type="float">
            <text:p>4</text:p>
          </table:table-cell>
          <table:table-cell table:formula="of:=IF([.D13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DEC2HEX([.C1372])" office:value-type="string" office:string-value="EDF4C" calcext:value-type="string">
            <text:p>EDF4C</text:p>
          </table:table-cell>
          <table:table-cell office:value-type="float" office:value="974668" calcext:value-type="float">
            <text:p>974668</text:p>
          </table:table-cell>
          <table:table-cell office:value-type="float" office:value="4" calcext:value-type="float">
            <text:p>4</text:p>
          </table:table-cell>
          <table:table-cell table:formula="of:=IF([.D13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DEC2HEX([.C1373])" office:value-type="string" office:string-value="EDF50" calcext:value-type="string">
            <text:p>EDF50</text:p>
          </table:table-cell>
          <table:table-cell office:value-type="float" office:value="974672" calcext:value-type="float">
            <text:p>974672</text:p>
          </table:table-cell>
          <table:table-cell office:value-type="float" office:value="4" calcext:value-type="float">
            <text:p>4</text:p>
          </table:table-cell>
          <table:table-cell table:formula="of:=IF([.D13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DEC2HEX([.C1374])" office:value-type="string" office:string-value="EDF54" calcext:value-type="string">
            <text:p>EDF54</text:p>
          </table:table-cell>
          <table:table-cell office:value-type="float" office:value="974676" calcext:value-type="float">
            <text:p>974676</text:p>
          </table:table-cell>
          <table:table-cell office:value-type="float" office:value="4" calcext:value-type="float">
            <text:p>4</text:p>
          </table:table-cell>
          <table:table-cell table:formula="of:=IF([.D13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DEC2HEX([.C1375])" office:value-type="string" office:string-value="EDF58" calcext:value-type="string">
            <text:p>EDF58</text:p>
          </table:table-cell>
          <table:table-cell office:value-type="float" office:value="974680" calcext:value-type="float">
            <text:p>974680</text:p>
          </table:table-cell>
          <table:table-cell office:value-type="float" office:value="4" calcext:value-type="float">
            <text:p>4</text:p>
          </table:table-cell>
          <table:table-cell table:formula="of:=IF([.D13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DEC2HEX([.C1376])" office:value-type="string" office:string-value="EDF5C" calcext:value-type="string">
            <text:p>EDF5C</text:p>
          </table:table-cell>
          <table:table-cell office:value-type="float" office:value="974684" calcext:value-type="float">
            <text:p>974684</text:p>
          </table:table-cell>
          <table:table-cell office:value-type="float" office:value="4" calcext:value-type="float">
            <text:p>4</text:p>
          </table:table-cell>
          <table:table-cell table:formula="of:=IF([.D13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DEC2HEX([.C1377])" office:value-type="string" office:string-value="EDF60" calcext:value-type="string">
            <text:p>EDF60</text:p>
          </table:table-cell>
          <table:table-cell office:value-type="float" office:value="974688" calcext:value-type="float">
            <text:p>974688</text:p>
          </table:table-cell>
          <table:table-cell office:value-type="float" office:value="4" calcext:value-type="float">
            <text:p>4</text:p>
          </table:table-cell>
          <table:table-cell table:formula="of:=IF([.D13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DEC2HEX([.C1378])" office:value-type="string" office:string-value="EDF64" calcext:value-type="string">
            <text:p>EDF64</text:p>
          </table:table-cell>
          <table:table-cell office:value-type="float" office:value="974692" calcext:value-type="float">
            <text:p>974692</text:p>
          </table:table-cell>
          <table:table-cell office:value-type="float" office:value="4" calcext:value-type="float">
            <text:p>4</text:p>
          </table:table-cell>
          <table:table-cell table:formula="of:=IF([.D13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DEC2HEX([.C1379])" office:value-type="string" office:string-value="EDF68" calcext:value-type="string">
            <text:p>EDF68</text:p>
          </table:table-cell>
          <table:table-cell office:value-type="float" office:value="974696" calcext:value-type="float">
            <text:p>974696</text:p>
          </table:table-cell>
          <table:table-cell office:value-type="float" office:value="4" calcext:value-type="float">
            <text:p>4</text:p>
          </table:table-cell>
          <table:table-cell table:formula="of:=IF([.D13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DEC2HEX([.C1380])" office:value-type="string" office:string-value="EDF6C" calcext:value-type="string">
            <text:p>EDF6C</text:p>
          </table:table-cell>
          <table:table-cell office:value-type="float" office:value="974700" calcext:value-type="float">
            <text:p>974700</text:p>
          </table:table-cell>
          <table:table-cell office:value-type="float" office:value="4" calcext:value-type="float">
            <text:p>4</text:p>
          </table:table-cell>
          <table:table-cell table:formula="of:=IF([.D13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DEC2HEX([.C1381])" office:value-type="string" office:string-value="EDF70" calcext:value-type="string">
            <text:p>EDF70</text:p>
          </table:table-cell>
          <table:table-cell office:value-type="float" office:value="974704" calcext:value-type="float">
            <text:p>974704</text:p>
          </table:table-cell>
          <table:table-cell office:value-type="float" office:value="4" calcext:value-type="float">
            <text:p>4</text:p>
          </table:table-cell>
          <table:table-cell table:formula="of:=IF([.D13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DEC2HEX([.C1382])" office:value-type="string" office:string-value="EDF74" calcext:value-type="string">
            <text:p>EDF74</text:p>
          </table:table-cell>
          <table:table-cell office:value-type="float" office:value="974708" calcext:value-type="float">
            <text:p>974708</text:p>
          </table:table-cell>
          <table:table-cell office:value-type="float" office:value="4" calcext:value-type="float">
            <text:p>4</text:p>
          </table:table-cell>
          <table:table-cell table:formula="of:=IF([.D13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DEC2HEX([.C1383])" office:value-type="string" office:string-value="EDF78" calcext:value-type="string">
            <text:p>EDF78</text:p>
          </table:table-cell>
          <table:table-cell office:value-type="float" office:value="974712" calcext:value-type="float">
            <text:p>974712</text:p>
          </table:table-cell>
          <table:table-cell office:value-type="float" office:value="4" calcext:value-type="float">
            <text:p>4</text:p>
          </table:table-cell>
          <table:table-cell table:formula="of:=IF([.D13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DEC2HEX([.C1384])" office:value-type="string" office:string-value="EDF7C" calcext:value-type="string">
            <text:p>EDF7C</text:p>
          </table:table-cell>
          <table:table-cell office:value-type="float" office:value="974716" calcext:value-type="float">
            <text:p>974716</text:p>
          </table:table-cell>
          <table:table-cell office:value-type="float" office:value="4" calcext:value-type="float">
            <text:p>4</text:p>
          </table:table-cell>
          <table:table-cell table:formula="of:=IF([.D13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DEC2HEX([.C1385])" office:value-type="string" office:string-value="EDF80" calcext:value-type="string">
            <text:p>EDF80</text:p>
          </table:table-cell>
          <table:table-cell office:value-type="float" office:value="974720" calcext:value-type="float">
            <text:p>974720</text:p>
          </table:table-cell>
          <table:table-cell office:value-type="float" office:value="4" calcext:value-type="float">
            <text:p>4</text:p>
          </table:table-cell>
          <table:table-cell table:formula="of:=IF([.D13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DEC2HEX([.C1386])" office:value-type="string" office:string-value="EDF84" calcext:value-type="string">
            <text:p>EDF84</text:p>
          </table:table-cell>
          <table:table-cell office:value-type="float" office:value="974724" calcext:value-type="float">
            <text:p>974724</text:p>
          </table:table-cell>
          <table:table-cell office:value-type="float" office:value="4" calcext:value-type="float">
            <text:p>4</text:p>
          </table:table-cell>
          <table:table-cell table:formula="of:=IF([.D13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DEC2HEX([.C1387])" office:value-type="string" office:string-value="EDF88" calcext:value-type="string">
            <text:p>EDF88</text:p>
          </table:table-cell>
          <table:table-cell office:value-type="float" office:value="974728" calcext:value-type="float">
            <text:p>974728</text:p>
          </table:table-cell>
          <table:table-cell office:value-type="float" office:value="4" calcext:value-type="float">
            <text:p>4</text:p>
          </table:table-cell>
          <table:table-cell table:formula="of:=IF([.D13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DEC2HEX([.C1388])" office:value-type="string" office:string-value="EDF8C" calcext:value-type="string">
            <text:p>EDF8C</text:p>
          </table:table-cell>
          <table:table-cell office:value-type="float" office:value="974732" calcext:value-type="float">
            <text:p>974732</text:p>
          </table:table-cell>
          <table:table-cell office:value-type="float" office:value="4" calcext:value-type="float">
            <text:p>4</text:p>
          </table:table-cell>
          <table:table-cell table:formula="of:=IF([.D13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DEC2HEX([.C1389])" office:value-type="string" office:string-value="EDF90" calcext:value-type="string">
            <text:p>EDF90</text:p>
          </table:table-cell>
          <table:table-cell office:value-type="float" office:value="974736" calcext:value-type="float">
            <text:p>974736</text:p>
          </table:table-cell>
          <table:table-cell office:value-type="float" office:value="4" calcext:value-type="float">
            <text:p>4</text:p>
          </table:table-cell>
          <table:table-cell table:formula="of:=IF([.D13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DEC2HEX([.C1390])" office:value-type="string" office:string-value="EDF94" calcext:value-type="string">
            <text:p>EDF94</text:p>
          </table:table-cell>
          <table:table-cell office:value-type="float" office:value="974740" calcext:value-type="float">
            <text:p>974740</text:p>
          </table:table-cell>
          <table:table-cell office:value-type="float" office:value="4" calcext:value-type="float">
            <text:p>4</text:p>
          </table:table-cell>
          <table:table-cell table:formula="of:=IF([.D13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DEC2HEX([.C1391])" office:value-type="string" office:string-value="EDF98" calcext:value-type="string">
            <text:p>EDF98</text:p>
          </table:table-cell>
          <table:table-cell office:value-type="float" office:value="974744" calcext:value-type="float">
            <text:p>974744</text:p>
          </table:table-cell>
          <table:table-cell office:value-type="float" office:value="4" calcext:value-type="float">
            <text:p>4</text:p>
          </table:table-cell>
          <table:table-cell table:formula="of:=IF([.D13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DEC2HEX([.C1392])" office:value-type="string" office:string-value="EDF9C" calcext:value-type="string">
            <text:p>EDF9C</text:p>
          </table:table-cell>
          <table:table-cell office:value-type="float" office:value="974748" calcext:value-type="float">
            <text:p>974748</text:p>
          </table:table-cell>
          <table:table-cell office:value-type="float" office:value="4" calcext:value-type="float">
            <text:p>4</text:p>
          </table:table-cell>
          <table:table-cell table:formula="of:=IF([.D13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DEC2HEX([.C1393])" office:value-type="string" office:string-value="EDFA0" calcext:value-type="string">
            <text:p>EDFA0</text:p>
          </table:table-cell>
          <table:table-cell office:value-type="float" office:value="974752" calcext:value-type="float">
            <text:p>974752</text:p>
          </table:table-cell>
          <table:table-cell office:value-type="float" office:value="4" calcext:value-type="float">
            <text:p>4</text:p>
          </table:table-cell>
          <table:table-cell table:formula="of:=IF([.D13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DEC2HEX([.C1394])" office:value-type="string" office:string-value="EDFA4" calcext:value-type="string">
            <text:p>EDFA4</text:p>
          </table:table-cell>
          <table:table-cell office:value-type="float" office:value="974756" calcext:value-type="float">
            <text:p>974756</text:p>
          </table:table-cell>
          <table:table-cell office:value-type="float" office:value="4" calcext:value-type="float">
            <text:p>4</text:p>
          </table:table-cell>
          <table:table-cell table:formula="of:=IF([.D13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DEC2HEX([.C1395])" office:value-type="string" office:string-value="EDFA8" calcext:value-type="string">
            <text:p>EDFA8</text:p>
          </table:table-cell>
          <table:table-cell office:value-type="float" office:value="974760" calcext:value-type="float">
            <text:p>974760</text:p>
          </table:table-cell>
          <table:table-cell office:value-type="float" office:value="4" calcext:value-type="float">
            <text:p>4</text:p>
          </table:table-cell>
          <table:table-cell table:formula="of:=IF([.D13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DEC2HEX([.C1396])" office:value-type="string" office:string-value="EDFAC" calcext:value-type="string">
            <text:p>EDFAC</text:p>
          </table:table-cell>
          <table:table-cell office:value-type="float" office:value="974764" calcext:value-type="float">
            <text:p>974764</text:p>
          </table:table-cell>
          <table:table-cell office:value-type="float" office:value="4" calcext:value-type="float">
            <text:p>4</text:p>
          </table:table-cell>
          <table:table-cell table:formula="of:=IF([.D13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DEC2HEX([.C1397])" office:value-type="string" office:string-value="EDFB0" calcext:value-type="string">
            <text:p>EDFB0</text:p>
          </table:table-cell>
          <table:table-cell office:value-type="float" office:value="974768" calcext:value-type="float">
            <text:p>974768</text:p>
          </table:table-cell>
          <table:table-cell office:value-type="float" office:value="4" calcext:value-type="float">
            <text:p>4</text:p>
          </table:table-cell>
          <table:table-cell table:formula="of:=IF([.D13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DEC2HEX([.C1398])" office:value-type="string" office:string-value="EDFB4" calcext:value-type="string">
            <text:p>EDFB4</text:p>
          </table:table-cell>
          <table:table-cell office:value-type="float" office:value="974772" calcext:value-type="float">
            <text:p>974772</text:p>
          </table:table-cell>
          <table:table-cell office:value-type="float" office:value="4" calcext:value-type="float">
            <text:p>4</text:p>
          </table:table-cell>
          <table:table-cell table:formula="of:=IF([.D13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DEC2HEX([.C1399])" office:value-type="string" office:string-value="EDFB8" calcext:value-type="string">
            <text:p>EDFB8</text:p>
          </table:table-cell>
          <table:table-cell office:value-type="float" office:value="974776" calcext:value-type="float">
            <text:p>974776</text:p>
          </table:table-cell>
          <table:table-cell office:value-type="float" office:value="4" calcext:value-type="float">
            <text:p>4</text:p>
          </table:table-cell>
          <table:table-cell table:formula="of:=IF([.D13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DEC2HEX([.C1400])" office:value-type="string" office:string-value="EDFBC" calcext:value-type="string">
            <text:p>EDFBC</text:p>
          </table:table-cell>
          <table:table-cell office:value-type="float" office:value="974780" calcext:value-type="float">
            <text:p>974780</text:p>
          </table:table-cell>
          <table:table-cell office:value-type="float" office:value="4" calcext:value-type="float">
            <text:p>4</text:p>
          </table:table-cell>
          <table:table-cell table:formula="of:=IF([.D14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DEC2HEX([.C1401])" office:value-type="string" office:string-value="EDFC0" calcext:value-type="string">
            <text:p>EDFC0</text:p>
          </table:table-cell>
          <table:table-cell office:value-type="float" office:value="974784" calcext:value-type="float">
            <text:p>974784</text:p>
          </table:table-cell>
          <table:table-cell office:value-type="float" office:value="4" calcext:value-type="float">
            <text:p>4</text:p>
          </table:table-cell>
          <table:table-cell table:formula="of:=IF([.D14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DEC2HEX([.C1402])" office:value-type="string" office:string-value="EDFC4" calcext:value-type="string">
            <text:p>EDFC4</text:p>
          </table:table-cell>
          <table:table-cell office:value-type="float" office:value="974788" calcext:value-type="float">
            <text:p>974788</text:p>
          </table:table-cell>
          <table:table-cell office:value-type="float" office:value="4" calcext:value-type="float">
            <text:p>4</text:p>
          </table:table-cell>
          <table:table-cell table:formula="of:=IF([.D14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DEC2HEX([.C1403])" office:value-type="string" office:string-value="EDFC8" calcext:value-type="string">
            <text:p>EDFC8</text:p>
          </table:table-cell>
          <table:table-cell office:value-type="float" office:value="974792" calcext:value-type="float">
            <text:p>974792</text:p>
          </table:table-cell>
          <table:table-cell office:value-type="float" office:value="4" calcext:value-type="float">
            <text:p>4</text:p>
          </table:table-cell>
          <table:table-cell table:formula="of:=IF([.D14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DEC2HEX([.C1404])" office:value-type="string" office:string-value="EDFCC" calcext:value-type="string">
            <text:p>EDFCC</text:p>
          </table:table-cell>
          <table:table-cell office:value-type="float" office:value="974796" calcext:value-type="float">
            <text:p>974796</text:p>
          </table:table-cell>
          <table:table-cell office:value-type="float" office:value="4" calcext:value-type="float">
            <text:p>4</text:p>
          </table:table-cell>
          <table:table-cell table:formula="of:=IF([.D14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DEC2HEX([.C1405])" office:value-type="string" office:string-value="EDFD0" calcext:value-type="string">
            <text:p>EDFD0</text:p>
          </table:table-cell>
          <table:table-cell office:value-type="float" office:value="974800" calcext:value-type="float">
            <text:p>974800</text:p>
          </table:table-cell>
          <table:table-cell office:value-type="float" office:value="4" calcext:value-type="float">
            <text:p>4</text:p>
          </table:table-cell>
          <table:table-cell table:formula="of:=IF([.D14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DEC2HEX([.C1406])" office:value-type="string" office:string-value="EDFD4" calcext:value-type="string">
            <text:p>EDFD4</text:p>
          </table:table-cell>
          <table:table-cell office:value-type="float" office:value="974804" calcext:value-type="float">
            <text:p>974804</text:p>
          </table:table-cell>
          <table:table-cell office:value-type="float" office:value="4" calcext:value-type="float">
            <text:p>4</text:p>
          </table:table-cell>
          <table:table-cell table:formula="of:=IF([.D14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DEC2HEX([.C1407])" office:value-type="string" office:string-value="EDFD8" calcext:value-type="string">
            <text:p>EDFD8</text:p>
          </table:table-cell>
          <table:table-cell office:value-type="float" office:value="974808" calcext:value-type="float">
            <text:p>974808</text:p>
          </table:table-cell>
          <table:table-cell office:value-type="float" office:value="4" calcext:value-type="float">
            <text:p>4</text:p>
          </table:table-cell>
          <table:table-cell table:formula="of:=IF([.D14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DEC2HEX([.C1408])" office:value-type="string" office:string-value="EDFDC" calcext:value-type="string">
            <text:p>EDFDC</text:p>
          </table:table-cell>
          <table:table-cell office:value-type="float" office:value="974812" calcext:value-type="float">
            <text:p>974812</text:p>
          </table:table-cell>
          <table:table-cell office:value-type="float" office:value="4" calcext:value-type="float">
            <text:p>4</text:p>
          </table:table-cell>
          <table:table-cell table:formula="of:=IF([.D14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DEC2HEX([.C1409])" office:value-type="string" office:string-value="EDFE0" calcext:value-type="string">
            <text:p>EDFE0</text:p>
          </table:table-cell>
          <table:table-cell office:value-type="float" office:value="974816" calcext:value-type="float">
            <text:p>974816</text:p>
          </table:table-cell>
          <table:table-cell office:value-type="float" office:value="4" calcext:value-type="float">
            <text:p>4</text:p>
          </table:table-cell>
          <table:table-cell table:formula="of:=IF([.D14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DEC2HEX([.C1410])" office:value-type="string" office:string-value="EDFE4" calcext:value-type="string">
            <text:p>EDFE4</text:p>
          </table:table-cell>
          <table:table-cell office:value-type="float" office:value="974820" calcext:value-type="float">
            <text:p>974820</text:p>
          </table:table-cell>
          <table:table-cell office:value-type="float" office:value="4" calcext:value-type="float">
            <text:p>4</text:p>
          </table:table-cell>
          <table:table-cell table:formula="of:=IF([.D14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DEC2HEX([.C1411])" office:value-type="string" office:string-value="EDFE8" calcext:value-type="string">
            <text:p>EDFE8</text:p>
          </table:table-cell>
          <table:table-cell office:value-type="float" office:value="974824" calcext:value-type="float">
            <text:p>974824</text:p>
          </table:table-cell>
          <table:table-cell office:value-type="float" office:value="4" calcext:value-type="float">
            <text:p>4</text:p>
          </table:table-cell>
          <table:table-cell table:formula="of:=IF([.D14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DEC2HEX([.C1412])" office:value-type="string" office:string-value="EDFEC" calcext:value-type="string">
            <text:p>EDFEC</text:p>
          </table:table-cell>
          <table:table-cell office:value-type="float" office:value="974828" calcext:value-type="float">
            <text:p>974828</text:p>
          </table:table-cell>
          <table:table-cell office:value-type="float" office:value="4" calcext:value-type="float">
            <text:p>4</text:p>
          </table:table-cell>
          <table:table-cell table:formula="of:=IF([.D14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DEC2HEX([.C1413])" office:value-type="string" office:string-value="EDFF0" calcext:value-type="string">
            <text:p>EDFF0</text:p>
          </table:table-cell>
          <table:table-cell office:value-type="float" office:value="974832" calcext:value-type="float">
            <text:p>974832</text:p>
          </table:table-cell>
          <table:table-cell office:value-type="float" office:value="4" calcext:value-type="float">
            <text:p>4</text:p>
          </table:table-cell>
          <table:table-cell table:formula="of:=IF([.D14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DEC2HEX([.C1414])" office:value-type="string" office:string-value="EDFF4" calcext:value-type="string">
            <text:p>EDFF4</text:p>
          </table:table-cell>
          <table:table-cell office:value-type="float" office:value="974836" calcext:value-type="float">
            <text:p>974836</text:p>
          </table:table-cell>
          <table:table-cell office:value-type="float" office:value="4" calcext:value-type="float">
            <text:p>4</text:p>
          </table:table-cell>
          <table:table-cell table:formula="of:=IF([.D14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DEC2HEX([.C1415])" office:value-type="string" office:string-value="EDFF8" calcext:value-type="string">
            <text:p>EDFF8</text:p>
          </table:table-cell>
          <table:table-cell office:value-type="float" office:value="974840" calcext:value-type="float">
            <text:p>974840</text:p>
          </table:table-cell>
          <table:table-cell office:value-type="float" office:value="4" calcext:value-type="float">
            <text:p>4</text:p>
          </table:table-cell>
          <table:table-cell table:formula="of:=IF([.D14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DEC2HEX([.C1416])" office:value-type="string" office:string-value="EDFFC" calcext:value-type="string">
            <text:p>EDFFC</text:p>
          </table:table-cell>
          <table:table-cell office:value-type="float" office:value="974844" calcext:value-type="float">
            <text:p>974844</text:p>
          </table:table-cell>
          <table:table-cell office:value-type="float" office:value="4" calcext:value-type="float">
            <text:p>4</text:p>
          </table:table-cell>
          <table:table-cell table:formula="of:=IF([.D14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DEC2HEX([.C1417])" office:value-type="string" office:string-value="EE000" calcext:value-type="string">
            <text:p>EE000</text:p>
          </table:table-cell>
          <table:table-cell office:value-type="float" office:value="974848" calcext:value-type="float">
            <text:p>974848</text:p>
          </table:table-cell>
          <table:table-cell office:value-type="float" office:value="4" calcext:value-type="float">
            <text:p>4</text:p>
          </table:table-cell>
          <table:table-cell table:formula="of:=IF([.D14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DEC2HEX([.C1418])" office:value-type="string" office:string-value="EE004" calcext:value-type="string">
            <text:p>EE004</text:p>
          </table:table-cell>
          <table:table-cell office:value-type="float" office:value="974852" calcext:value-type="float">
            <text:p>974852</text:p>
          </table:table-cell>
          <table:table-cell office:value-type="float" office:value="4" calcext:value-type="float">
            <text:p>4</text:p>
          </table:table-cell>
          <table:table-cell table:formula="of:=IF([.D14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DEC2HEX([.C1419])" office:value-type="string" office:string-value="EE008" calcext:value-type="string">
            <text:p>EE008</text:p>
          </table:table-cell>
          <table:table-cell office:value-type="float" office:value="974856" calcext:value-type="float">
            <text:p>974856</text:p>
          </table:table-cell>
          <table:table-cell office:value-type="float" office:value="4" calcext:value-type="float">
            <text:p>4</text:p>
          </table:table-cell>
          <table:table-cell table:formula="of:=IF([.D14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DEC2HEX([.C1420])" office:value-type="string" office:string-value="EE00C" calcext:value-type="string">
            <text:p>EE00C</text:p>
          </table:table-cell>
          <table:table-cell office:value-type="float" office:value="974860" calcext:value-type="float">
            <text:p>974860</text:p>
          </table:table-cell>
          <table:table-cell office:value-type="float" office:value="4" calcext:value-type="float">
            <text:p>4</text:p>
          </table:table-cell>
          <table:table-cell table:formula="of:=IF([.D14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DEC2HEX([.C1421])" office:value-type="string" office:string-value="EE010" calcext:value-type="string">
            <text:p>EE010</text:p>
          </table:table-cell>
          <table:table-cell office:value-type="float" office:value="974864" calcext:value-type="float">
            <text:p>974864</text:p>
          </table:table-cell>
          <table:table-cell office:value-type="float" office:value="4" calcext:value-type="float">
            <text:p>4</text:p>
          </table:table-cell>
          <table:table-cell table:formula="of:=IF([.D14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DEC2HEX([.C1422])" office:value-type="string" office:string-value="EE014" calcext:value-type="string">
            <text:p>EE014</text:p>
          </table:table-cell>
          <table:table-cell office:value-type="float" office:value="974868" calcext:value-type="float">
            <text:p>974868</text:p>
          </table:table-cell>
          <table:table-cell office:value-type="float" office:value="4" calcext:value-type="float">
            <text:p>4</text:p>
          </table:table-cell>
          <table:table-cell table:formula="of:=IF([.D14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DEC2HEX([.C1423])" office:value-type="string" office:string-value="EE018" calcext:value-type="string">
            <text:p>EE018</text:p>
          </table:table-cell>
          <table:table-cell office:value-type="float" office:value="974872" calcext:value-type="float">
            <text:p>974872</text:p>
          </table:table-cell>
          <table:table-cell office:value-type="float" office:value="4" calcext:value-type="float">
            <text:p>4</text:p>
          </table:table-cell>
          <table:table-cell table:formula="of:=IF([.D14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DEC2HEX([.C1424])" office:value-type="string" office:string-value="EE01C" calcext:value-type="string">
            <text:p>EE01C</text:p>
          </table:table-cell>
          <table:table-cell office:value-type="float" office:value="974876" calcext:value-type="float">
            <text:p>974876</text:p>
          </table:table-cell>
          <table:table-cell office:value-type="float" office:value="4" calcext:value-type="float">
            <text:p>4</text:p>
          </table:table-cell>
          <table:table-cell table:formula="of:=IF([.D14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DEC2HEX([.C1425])" office:value-type="string" office:string-value="EE020" calcext:value-type="string">
            <text:p>EE020</text:p>
          </table:table-cell>
          <table:table-cell office:value-type="float" office:value="974880" calcext:value-type="float">
            <text:p>974880</text:p>
          </table:table-cell>
          <table:table-cell office:value-type="float" office:value="32" calcext:value-type="float">
            <text:p>32</text:p>
          </table:table-cell>
          <table:table-cell table:formula="of:=IF([.D14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DEC2HEX([.C1426])" office:value-type="string" office:string-value="EE040" calcext:value-type="string">
            <text:p>EE040</text:p>
          </table:table-cell>
          <table:table-cell office:value-type="float" office:value="974912" calcext:value-type="float">
            <text:p>974912</text:p>
          </table:table-cell>
          <table:table-cell office:value-type="float" office:value="32" calcext:value-type="float">
            <text:p>32</text:p>
          </table:table-cell>
          <table:table-cell table:formula="of:=IF([.D14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DEC2HEX([.C1427])" office:value-type="string" office:string-value="EE060" calcext:value-type="string">
            <text:p>EE060</text:p>
          </table:table-cell>
          <table:table-cell office:value-type="float" office:value="974944" calcext:value-type="float">
            <text:p>974944</text:p>
          </table:table-cell>
          <table:table-cell office:value-type="float" office:value="32" calcext:value-type="float">
            <text:p>32</text:p>
          </table:table-cell>
          <table:table-cell table:formula="of:=IF([.D14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DEC2HEX([.C1428])" office:value-type="string" office:string-value="EE080" calcext:value-type="string">
            <text:p>EE080</text:p>
          </table:table-cell>
          <table:table-cell office:value-type="float" office:value="974976" calcext:value-type="float">
            <text:p>974976</text:p>
          </table:table-cell>
          <table:table-cell office:value-type="float" office:value="32" calcext:value-type="float">
            <text:p>32</text:p>
          </table:table-cell>
          <table:table-cell table:formula="of:=IF([.D14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DEC2HEX([.C1429])" office:value-type="string" office:string-value="EE0A0" calcext:value-type="string">
            <text:p>EE0A0</text:p>
          </table:table-cell>
          <table:table-cell office:value-type="float" office:value="975008" calcext:value-type="float">
            <text:p>975008</text:p>
          </table:table-cell>
          <table:table-cell office:value-type="float" office:value="32" calcext:value-type="float">
            <text:p>32</text:p>
          </table:table-cell>
          <table:table-cell table:formula="of:=IF([.D14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DEC2HEX([.C1430])" office:value-type="string" office:string-value="EE0C0" calcext:value-type="string">
            <text:p>EE0C0</text:p>
          </table:table-cell>
          <table:table-cell office:value-type="float" office:value="975040" calcext:value-type="float">
            <text:p>975040</text:p>
          </table:table-cell>
          <table:table-cell office:value-type="float" office:value="32" calcext:value-type="float">
            <text:p>32</text:p>
          </table:table-cell>
          <table:table-cell table:formula="of:=IF([.D14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DEC2HEX([.C1431])" office:value-type="string" office:string-value="EE0E0" calcext:value-type="string">
            <text:p>EE0E0</text:p>
          </table:table-cell>
          <table:table-cell office:value-type="float" office:value="975072" calcext:value-type="float">
            <text:p>975072</text:p>
          </table:table-cell>
          <table:table-cell office:value-type="float" office:value="32" calcext:value-type="float">
            <text:p>32</text:p>
          </table:table-cell>
          <table:table-cell table:formula="of:=IF([.D14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DEC2HEX([.C1432])" office:value-type="string" office:string-value="EE100" calcext:value-type="string">
            <text:p>EE100</text:p>
          </table:table-cell>
          <table:table-cell office:value-type="float" office:value="975104" calcext:value-type="float">
            <text:p>975104</text:p>
          </table:table-cell>
          <table:table-cell office:value-type="float" office:value="32" calcext:value-type="float">
            <text:p>32</text:p>
          </table:table-cell>
          <table:table-cell table:formula="of:=IF([.D14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DEC2HEX([.C1433])" office:value-type="string" office:string-value="EE120" calcext:value-type="string">
            <text:p>EE120</text:p>
          </table:table-cell>
          <table:table-cell office:value-type="float" office:value="975136" calcext:value-type="float">
            <text:p>975136</text:p>
          </table:table-cell>
          <table:table-cell office:value-type="float" office:value="32" calcext:value-type="float">
            <text:p>32</text:p>
          </table:table-cell>
          <table:table-cell table:formula="of:=IF([.D14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DEC2HEX([.C1434])" office:value-type="string" office:string-value="EE140" calcext:value-type="string">
            <text:p>EE140</text:p>
          </table:table-cell>
          <table:table-cell office:value-type="float" office:value="975168" calcext:value-type="float">
            <text:p>975168</text:p>
          </table:table-cell>
          <table:table-cell office:value-type="float" office:value="32" calcext:value-type="float">
            <text:p>32</text:p>
          </table:table-cell>
          <table:table-cell table:formula="of:=IF([.D14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DEC2HEX([.C1435])" office:value-type="string" office:string-value="EE160" calcext:value-type="string">
            <text:p>EE160</text:p>
          </table:table-cell>
          <table:table-cell office:value-type="float" office:value="975200" calcext:value-type="float">
            <text:p>975200</text:p>
          </table:table-cell>
          <table:table-cell office:value-type="float" office:value="32" calcext:value-type="float">
            <text:p>32</text:p>
          </table:table-cell>
          <table:table-cell table:formula="of:=IF([.D14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DEC2HEX([.C1436])" office:value-type="string" office:string-value="EE180" calcext:value-type="string">
            <text:p>EE180</text:p>
          </table:table-cell>
          <table:table-cell office:value-type="float" office:value="975232" calcext:value-type="float">
            <text:p>975232</text:p>
          </table:table-cell>
          <table:table-cell office:value-type="float" office:value="32" calcext:value-type="float">
            <text:p>32</text:p>
          </table:table-cell>
          <table:table-cell table:formula="of:=IF([.D14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DEC2HEX([.C1437])" office:value-type="string" office:string-value="EE1A0" calcext:value-type="string">
            <text:p>EE1A0</text:p>
          </table:table-cell>
          <table:table-cell office:value-type="float" office:value="975264" calcext:value-type="float">
            <text:p>975264</text:p>
          </table:table-cell>
          <table:table-cell office:value-type="float" office:value="32" calcext:value-type="float">
            <text:p>32</text:p>
          </table:table-cell>
          <table:table-cell table:formula="of:=IF([.D14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DEC2HEX([.C1438])" office:value-type="string" office:string-value="EE1C0" calcext:value-type="string">
            <text:p>EE1C0</text:p>
          </table:table-cell>
          <table:table-cell office:value-type="float" office:value="975296" calcext:value-type="float">
            <text:p>975296</text:p>
          </table:table-cell>
          <table:table-cell office:value-type="float" office:value="32" calcext:value-type="float">
            <text:p>32</text:p>
          </table:table-cell>
          <table:table-cell table:formula="of:=IF([.D14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DEC2HEX([.C1439])" office:value-type="string" office:string-value="EE1E0" calcext:value-type="string">
            <text:p>EE1E0</text:p>
          </table:table-cell>
          <table:table-cell office:value-type="float" office:value="975328" calcext:value-type="float">
            <text:p>975328</text:p>
          </table:table-cell>
          <table:table-cell office:value-type="float" office:value="32" calcext:value-type="float">
            <text:p>32</text:p>
          </table:table-cell>
          <table:table-cell table:formula="of:=IF([.D14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DEC2HEX([.C1440])" office:value-type="string" office:string-value="EE200" calcext:value-type="string">
            <text:p>EE200</text:p>
          </table:table-cell>
          <table:table-cell office:value-type="float" office:value="975360" calcext:value-type="float">
            <text:p>975360</text:p>
          </table:table-cell>
          <table:table-cell office:value-type="float" office:value="32" calcext:value-type="float">
            <text:p>32</text:p>
          </table:table-cell>
          <table:table-cell table:formula="of:=IF([.D14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DEC2HEX([.C1441])" office:value-type="string" office:string-value="EE220" calcext:value-type="string">
            <text:p>EE220</text:p>
          </table:table-cell>
          <table:table-cell office:value-type="float" office:value="975392" calcext:value-type="float">
            <text:p>975392</text:p>
          </table:table-cell>
          <table:table-cell office:value-type="float" office:value="32" calcext:value-type="float">
            <text:p>32</text:p>
          </table:table-cell>
          <table:table-cell table:formula="of:=IF([.D14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DEC2HEX([.C1442])" office:value-type="string" office:string-value="EE240" calcext:value-type="string">
            <text:p>EE240</text:p>
          </table:table-cell>
          <table:table-cell office:value-type="float" office:value="975424" calcext:value-type="float">
            <text:p>975424</text:p>
          </table:table-cell>
          <table:table-cell office:value-type="float" office:value="32" calcext:value-type="float">
            <text:p>32</text:p>
          </table:table-cell>
          <table:table-cell table:formula="of:=IF([.D144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DEC2HEX([.C1443])" office:value-type="string" office:string-value="EE260" calcext:value-type="string">
            <text:p>EE260</text:p>
          </table:table-cell>
          <table:table-cell office:value-type="float" office:value="975456" calcext:value-type="float">
            <text:p>975456</text:p>
          </table:table-cell>
          <table:table-cell office:value-type="float" office:value="32" calcext:value-type="float">
            <text:p>32</text:p>
          </table:table-cell>
          <table:table-cell table:formula="of:=IF([.D144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DEC2HEX([.C1444])" office:value-type="string" office:string-value="EE280" calcext:value-type="string">
            <text:p>EE280</text:p>
          </table:table-cell>
          <table:table-cell office:value-type="float" office:value="975488" calcext:value-type="float">
            <text:p>975488</text:p>
          </table:table-cell>
          <table:table-cell office:value-type="float" office:value="32" calcext:value-type="float">
            <text:p>32</text:p>
          </table:table-cell>
          <table:table-cell table:formula="of:=IF([.D144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DEC2HEX([.C1445])" office:value-type="string" office:string-value="EE2A0" calcext:value-type="string">
            <text:p>EE2A0</text:p>
          </table:table-cell>
          <table:table-cell office:value-type="float" office:value="975520" calcext:value-type="float">
            <text:p>975520</text:p>
          </table:table-cell>
          <table:table-cell office:value-type="float" office:value="32" calcext:value-type="float">
            <text:p>32</text:p>
          </table:table-cell>
          <table:table-cell table:formula="of:=IF([.D144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DEC2HEX([.C1446])" office:value-type="string" office:string-value="EE2C0" calcext:value-type="string">
            <text:p>EE2C0</text:p>
          </table:table-cell>
          <table:table-cell office:value-type="float" office:value="975552" calcext:value-type="float">
            <text:p>975552</text:p>
          </table:table-cell>
          <table:table-cell office:value-type="float" office:value="32" calcext:value-type="float">
            <text:p>32</text:p>
          </table:table-cell>
          <table:table-cell table:formula="of:=IF([.D144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DEC2HEX([.C1447])" office:value-type="string" office:string-value="EE2E0" calcext:value-type="string">
            <text:p>EE2E0</text:p>
          </table:table-cell>
          <table:table-cell office:value-type="float" office:value="975584" calcext:value-type="float">
            <text:p>975584</text:p>
          </table:table-cell>
          <table:table-cell office:value-type="float" office:value="32" calcext:value-type="float">
            <text:p>32</text:p>
          </table:table-cell>
          <table:table-cell table:formula="of:=IF([.D144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DEC2HEX([.C1448])" office:value-type="string" office:string-value="EE300" calcext:value-type="string">
            <text:p>EE300</text:p>
          </table:table-cell>
          <table:table-cell office:value-type="float" office:value="975616" calcext:value-type="float">
            <text:p>975616</text:p>
          </table:table-cell>
          <table:table-cell office:value-type="float" office:value="32" calcext:value-type="float">
            <text:p>32</text:p>
          </table:table-cell>
          <table:table-cell table:formula="of:=IF([.D144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DEC2HEX([.C1449])" office:value-type="string" office:string-value="EE320" calcext:value-type="string">
            <text:p>EE320</text:p>
          </table:table-cell>
          <table:table-cell office:value-type="float" office:value="975648" calcext:value-type="float">
            <text:p>975648</text:p>
          </table:table-cell>
          <table:table-cell office:value-type="float" office:value="32" calcext:value-type="float">
            <text:p>32</text:p>
          </table:table-cell>
          <table:table-cell table:formula="of:=IF([.D144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DEC2HEX([.C1450])" office:value-type="string" office:string-value="EE340" calcext:value-type="string">
            <text:p>EE340</text:p>
          </table:table-cell>
          <table:table-cell office:value-type="float" office:value="975680" calcext:value-type="float">
            <text:p>975680</text:p>
          </table:table-cell>
          <table:table-cell office:value-type="float" office:value="32" calcext:value-type="float">
            <text:p>32</text:p>
          </table:table-cell>
          <table:table-cell table:formula="of:=IF([.D145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DEC2HEX([.C1451])" office:value-type="string" office:string-value="EE360" calcext:value-type="string">
            <text:p>EE360</text:p>
          </table:table-cell>
          <table:table-cell office:value-type="float" office:value="975712" calcext:value-type="float">
            <text:p>975712</text:p>
          </table:table-cell>
          <table:table-cell office:value-type="float" office:value="32" calcext:value-type="float">
            <text:p>32</text:p>
          </table:table-cell>
          <table:table-cell table:formula="of:=IF([.D145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DEC2HEX([.C1452])" office:value-type="string" office:string-value="EE380" calcext:value-type="string">
            <text:p>EE380</text:p>
          </table:table-cell>
          <table:table-cell office:value-type="float" office:value="975744" calcext:value-type="float">
            <text:p>975744</text:p>
          </table:table-cell>
          <table:table-cell office:value-type="float" office:value="32" calcext:value-type="float">
            <text:p>32</text:p>
          </table:table-cell>
          <table:table-cell table:formula="of:=IF([.D145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DEC2HEX([.C1453])" office:value-type="string" office:string-value="EE3A0" calcext:value-type="string">
            <text:p>EE3A0</text:p>
          </table:table-cell>
          <table:table-cell office:value-type="float" office:value="975776" calcext:value-type="float">
            <text:p>975776</text:p>
          </table:table-cell>
          <table:table-cell office:value-type="float" office:value="32" calcext:value-type="float">
            <text:p>32</text:p>
          </table:table-cell>
          <table:table-cell table:formula="of:=IF([.D145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DEC2HEX([.C1454])" office:value-type="string" office:string-value="EE3C0" calcext:value-type="string">
            <text:p>EE3C0</text:p>
          </table:table-cell>
          <table:table-cell office:value-type="float" office:value="975808" calcext:value-type="float">
            <text:p>975808</text:p>
          </table:table-cell>
          <table:table-cell office:value-type="float" office:value="32" calcext:value-type="float">
            <text:p>32</text:p>
          </table:table-cell>
          <table:table-cell table:formula="of:=IF([.D145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DEC2HEX([.C1455])" office:value-type="string" office:string-value="EE3E0" calcext:value-type="string">
            <text:p>EE3E0</text:p>
          </table:table-cell>
          <table:table-cell office:value-type="float" office:value="975840" calcext:value-type="float">
            <text:p>975840</text:p>
          </table:table-cell>
          <table:table-cell office:value-type="float" office:value="32" calcext:value-type="float">
            <text:p>32</text:p>
          </table:table-cell>
          <table:table-cell table:formula="of:=IF([.D145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DEC2HEX([.C1456])" office:value-type="string" office:string-value="EE400" calcext:value-type="string">
            <text:p>EE400</text:p>
          </table:table-cell>
          <table:table-cell office:value-type="float" office:value="975872" calcext:value-type="float">
            <text:p>975872</text:p>
          </table:table-cell>
          <table:table-cell office:value-type="float" office:value="32" calcext:value-type="float">
            <text:p>32</text:p>
          </table:table-cell>
          <table:table-cell table:formula="of:=IF([.D145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DEC2HEX([.C1457])" office:value-type="string" office:string-value="EE420" calcext:value-type="string">
            <text:p>EE420</text:p>
          </table:table-cell>
          <table:table-cell office:value-type="float" office:value="975904" calcext:value-type="float">
            <text:p>975904</text:p>
          </table:table-cell>
          <table:table-cell office:value-type="float" office:value="32" calcext:value-type="float">
            <text:p>32</text:p>
          </table:table-cell>
          <table:table-cell table:formula="of:=IF([.D145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DEC2HEX([.C1458])" office:value-type="string" office:string-value="EE440" calcext:value-type="string">
            <text:p>EE440</text:p>
          </table:table-cell>
          <table:table-cell office:value-type="float" office:value="975936" calcext:value-type="float">
            <text:p>975936</text:p>
          </table:table-cell>
          <table:table-cell office:value-type="float" office:value="32" calcext:value-type="float">
            <text:p>32</text:p>
          </table:table-cell>
          <table:table-cell table:formula="of:=IF([.D145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DEC2HEX([.C1459])" office:value-type="string" office:string-value="EE460" calcext:value-type="string">
            <text:p>EE460</text:p>
          </table:table-cell>
          <table:table-cell office:value-type="float" office:value="975968" calcext:value-type="float">
            <text:p>975968</text:p>
          </table:table-cell>
          <table:table-cell office:value-type="float" office:value="32" calcext:value-type="float">
            <text:p>32</text:p>
          </table:table-cell>
          <table:table-cell table:formula="of:=IF([.D145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DEC2HEX([.C1460])" office:value-type="string" office:string-value="EE480" calcext:value-type="string">
            <text:p>EE480</text:p>
          </table:table-cell>
          <table:table-cell office:value-type="float" office:value="976000" calcext:value-type="float">
            <text:p>976000</text:p>
          </table:table-cell>
          <table:table-cell office:value-type="float" office:value="32" calcext:value-type="float">
            <text:p>32</text:p>
          </table:table-cell>
          <table:table-cell table:formula="of:=IF([.D146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DEC2HEX([.C1461])" office:value-type="string" office:string-value="EE4A0" calcext:value-type="string">
            <text:p>EE4A0</text:p>
          </table:table-cell>
          <table:table-cell office:value-type="float" office:value="976032" calcext:value-type="float">
            <text:p>976032</text:p>
          </table:table-cell>
          <table:table-cell office:value-type="float" office:value="32" calcext:value-type="float">
            <text:p>32</text:p>
          </table:table-cell>
          <table:table-cell table:formula="of:=IF([.D146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DEC2HEX([.C1462])" office:value-type="string" office:string-value="EE4C0" calcext:value-type="string">
            <text:p>EE4C0</text:p>
          </table:table-cell>
          <table:table-cell office:value-type="float" office:value="976064" calcext:value-type="float">
            <text:p>976064</text:p>
          </table:table-cell>
          <table:table-cell office:value-type="float" office:value="32" calcext:value-type="float">
            <text:p>32</text:p>
          </table:table-cell>
          <table:table-cell table:formula="of:=IF([.D146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DEC2HEX([.C1463])" office:value-type="string" office:string-value="EE4E0" calcext:value-type="string">
            <text:p>EE4E0</text:p>
          </table:table-cell>
          <table:table-cell office:value-type="float" office:value="976096" calcext:value-type="float">
            <text:p>976096</text:p>
          </table:table-cell>
          <table:table-cell office:value-type="float" office:value="32" calcext:value-type="float">
            <text:p>32</text:p>
          </table:table-cell>
          <table:table-cell table:formula="of:=IF([.D146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DEC2HEX([.C1464])" office:value-type="string" office:string-value="EE500" calcext:value-type="string">
            <text:p>EE500</text:p>
          </table:table-cell>
          <table:table-cell office:value-type="float" office:value="976128" calcext:value-type="float">
            <text:p>976128</text:p>
          </table:table-cell>
          <table:table-cell office:value-type="float" office:value="32" calcext:value-type="float">
            <text:p>32</text:p>
          </table:table-cell>
          <table:table-cell table:formula="of:=IF([.D146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DEC2HEX([.C1465])" office:value-type="string" office:string-value="EE520" calcext:value-type="string">
            <text:p>EE520</text:p>
          </table:table-cell>
          <table:table-cell office:value-type="float" office:value="976160" calcext:value-type="float">
            <text:p>976160</text:p>
          </table:table-cell>
          <table:table-cell office:value-type="float" office:value="32" calcext:value-type="float">
            <text:p>32</text:p>
          </table:table-cell>
          <table:table-cell table:formula="of:=IF([.D146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DEC2HEX([.C1466])" office:value-type="string" office:string-value="EE540" calcext:value-type="string">
            <text:p>EE540</text:p>
          </table:table-cell>
          <table:table-cell office:value-type="float" office:value="976192" calcext:value-type="float">
            <text:p>976192</text:p>
          </table:table-cell>
          <table:table-cell office:value-type="float" office:value="32" calcext:value-type="float">
            <text:p>32</text:p>
          </table:table-cell>
          <table:table-cell table:formula="of:=IF([.D146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DEC2HEX([.C1467])" office:value-type="string" office:string-value="EE560" calcext:value-type="string">
            <text:p>EE560</text:p>
          </table:table-cell>
          <table:table-cell office:value-type="float" office:value="976224" calcext:value-type="float">
            <text:p>976224</text:p>
          </table:table-cell>
          <table:table-cell office:value-type="float" office:value="32" calcext:value-type="float">
            <text:p>32</text:p>
          </table:table-cell>
          <table:table-cell table:formula="of:=IF([.D146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DEC2HEX([.C1468])" office:value-type="string" office:string-value="EE580" calcext:value-type="string">
            <text:p>EE580</text:p>
          </table:table-cell>
          <table:table-cell office:value-type="float" office:value="976256" calcext:value-type="float">
            <text:p>976256</text:p>
          </table:table-cell>
          <table:table-cell office:value-type="float" office:value="32" calcext:value-type="float">
            <text:p>32</text:p>
          </table:table-cell>
          <table:table-cell table:formula="of:=IF([.D146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DEC2HEX([.C1469])" office:value-type="string" office:string-value="EE5A0" calcext:value-type="string">
            <text:p>EE5A0</text:p>
          </table:table-cell>
          <table:table-cell office:value-type="float" office:value="976288" calcext:value-type="float">
            <text:p>976288</text:p>
          </table:table-cell>
          <table:table-cell office:value-type="float" office:value="32" calcext:value-type="float">
            <text:p>32</text:p>
          </table:table-cell>
          <table:table-cell table:formula="of:=IF([.D146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DEC2HEX([.C1470])" office:value-type="string" office:string-value="EE5C0" calcext:value-type="string">
            <text:p>EE5C0</text:p>
          </table:table-cell>
          <table:table-cell office:value-type="float" office:value="976320" calcext:value-type="float">
            <text:p>976320</text:p>
          </table:table-cell>
          <table:table-cell office:value-type="float" office:value="32" calcext:value-type="float">
            <text:p>32</text:p>
          </table:table-cell>
          <table:table-cell table:formula="of:=IF([.D147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DEC2HEX([.C1471])" office:value-type="string" office:string-value="EE5E0" calcext:value-type="string">
            <text:p>EE5E0</text:p>
          </table:table-cell>
          <table:table-cell office:value-type="float" office:value="976352" calcext:value-type="float">
            <text:p>976352</text:p>
          </table:table-cell>
          <table:table-cell office:value-type="float" office:value="32" calcext:value-type="float">
            <text:p>32</text:p>
          </table:table-cell>
          <table:table-cell table:formula="of:=IF([.D147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DEC2HEX([.C1472])" office:value-type="string" office:string-value="EE600" calcext:value-type="string">
            <text:p>EE600</text:p>
          </table:table-cell>
          <table:table-cell office:value-type="float" office:value="976384" calcext:value-type="float">
            <text:p>976384</text:p>
          </table:table-cell>
          <table:table-cell office:value-type="float" office:value="32" calcext:value-type="float">
            <text:p>32</text:p>
          </table:table-cell>
          <table:table-cell table:formula="of:=IF([.D147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DEC2HEX([.C1473])" office:value-type="string" office:string-value="EE620" calcext:value-type="string">
            <text:p>EE620</text:p>
          </table:table-cell>
          <table:table-cell office:value-type="float" office:value="976416" calcext:value-type="float">
            <text:p>976416</text:p>
          </table:table-cell>
          <table:table-cell office:value-type="float" office:value="32" calcext:value-type="float">
            <text:p>32</text:p>
          </table:table-cell>
          <table:table-cell table:formula="of:=IF([.D147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DEC2HEX([.C1474])" office:value-type="string" office:string-value="EE640" calcext:value-type="string">
            <text:p>EE640</text:p>
          </table:table-cell>
          <table:table-cell office:value-type="float" office:value="976448" calcext:value-type="float">
            <text:p>976448</text:p>
          </table:table-cell>
          <table:table-cell office:value-type="float" office:value="32" calcext:value-type="float">
            <text:p>32</text:p>
          </table:table-cell>
          <table:table-cell table:formula="of:=IF([.D147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DEC2HEX([.C1475])" office:value-type="string" office:string-value="EE660" calcext:value-type="string">
            <text:p>EE660</text:p>
          </table:table-cell>
          <table:table-cell office:value-type="float" office:value="976480" calcext:value-type="float">
            <text:p>976480</text:p>
          </table:table-cell>
          <table:table-cell office:value-type="float" office:value="32" calcext:value-type="float">
            <text:p>32</text:p>
          </table:table-cell>
          <table:table-cell table:formula="of:=IF([.D147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DEC2HEX([.C1476])" office:value-type="string" office:string-value="EE680" calcext:value-type="string">
            <text:p>EE680</text:p>
          </table:table-cell>
          <table:table-cell office:value-type="float" office:value="976512" calcext:value-type="float">
            <text:p>976512</text:p>
          </table:table-cell>
          <table:table-cell office:value-type="float" office:value="32" calcext:value-type="float">
            <text:p>32</text:p>
          </table:table-cell>
          <table:table-cell table:formula="of:=IF([.D147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DEC2HEX([.C1477])" office:value-type="string" office:string-value="EE6A0" calcext:value-type="string">
            <text:p>EE6A0</text:p>
          </table:table-cell>
          <table:table-cell office:value-type="float" office:value="976544" calcext:value-type="float">
            <text:p>976544</text:p>
          </table:table-cell>
          <table:table-cell office:value-type="float" office:value="32" calcext:value-type="float">
            <text:p>32</text:p>
          </table:table-cell>
          <table:table-cell table:formula="of:=IF([.D147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DEC2HEX([.C1478])" office:value-type="string" office:string-value="EE6C0" calcext:value-type="string">
            <text:p>EE6C0</text:p>
          </table:table-cell>
          <table:table-cell office:value-type="float" office:value="976576" calcext:value-type="float">
            <text:p>976576</text:p>
          </table:table-cell>
          <table:table-cell office:value-type="float" office:value="2" calcext:value-type="float">
            <text:p>2</text:p>
          </table:table-cell>
          <table:table-cell table:formula="of:=IF([.D147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DEC2HEX([.C1479])" office:value-type="string" office:string-value="EE6C2" calcext:value-type="string">
            <text:p>EE6C2</text:p>
          </table:table-cell>
          <table:table-cell office:value-type="float" office:value="976578" calcext:value-type="float">
            <text:p>976578</text:p>
          </table:table-cell>
          <table:table-cell office:value-type="float" office:value="2" calcext:value-type="float">
            <text:p>2</text:p>
          </table:table-cell>
          <table:table-cell table:formula="of:=IF([.D147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DEC2HEX([.C1480])" office:value-type="string" office:string-value="EE6C4" calcext:value-type="string">
            <text:p>EE6C4</text:p>
          </table:table-cell>
          <table:table-cell office:value-type="float" office:value="976580" calcext:value-type="float">
            <text:p>976580</text:p>
          </table:table-cell>
          <table:table-cell office:value-type="float" office:value="4" calcext:value-type="float">
            <text:p>4</text:p>
          </table:table-cell>
          <table:table-cell table:formula="of:=IF([.D148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DEC2HEX([.C1481])" office:value-type="string" office:string-value="EE6C8" calcext:value-type="string">
            <text:p>EE6C8</text:p>
          </table:table-cell>
          <table:table-cell office:value-type="float" office:value="976584" calcext:value-type="float">
            <text:p>976584</text:p>
          </table:table-cell>
          <table:table-cell office:value-type="float" office:value="2" calcext:value-type="float">
            <text:p>2</text:p>
          </table:table-cell>
          <table:table-cell table:formula="of:=IF([.D148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DEC2HEX([.C1482])" office:value-type="string" office:string-value="EE6CA" calcext:value-type="string">
            <text:p>EE6CA</text:p>
          </table:table-cell>
          <table:table-cell office:value-type="float" office:value="976586" calcext:value-type="float">
            <text:p>976586</text:p>
          </table:table-cell>
          <table:table-cell office:value-type="float" office:value="2" calcext:value-type="float">
            <text:p>2</text:p>
          </table:table-cell>
          <table:table-cell table:formula="of:=IF([.D148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DEC2HEX([.C1483])" office:value-type="string" office:string-value="EE6CC" calcext:value-type="string">
            <text:p>EE6CC</text:p>
          </table:table-cell>
          <table:table-cell office:value-type="float" office:value="976588" calcext:value-type="float">
            <text:p>976588</text:p>
          </table:table-cell>
          <table:table-cell office:value-type="float" office:value="2" calcext:value-type="float">
            <text:p>2</text:p>
          </table:table-cell>
          <table:table-cell table:formula="of:=IF([.D148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DEC2HEX([.C1484])" office:value-type="string" office:string-value="EE6CE" calcext:value-type="string">
            <text:p>EE6CE</text:p>
          </table:table-cell>
          <table:table-cell office:value-type="float" office:value="976590" calcext:value-type="float">
            <text:p>976590</text:p>
          </table:table-cell>
          <table:table-cell office:value-type="float" office:value="4" calcext:value-type="float">
            <text:p>4</text:p>
          </table:table-cell>
          <table:table-cell table:formula="of:=IF([.D148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DEC2HEX([.C1485])" office:value-type="string" office:string-value="EE6D2" calcext:value-type="string">
            <text:p>EE6D2</text:p>
          </table:table-cell>
          <table:table-cell office:value-type="float" office:value="976594" calcext:value-type="float">
            <text:p>976594</text:p>
          </table:table-cell>
          <table:table-cell office:value-type="float" office:value="2" calcext:value-type="float">
            <text:p>2</text:p>
          </table:table-cell>
          <table:table-cell table:formula="of:=IF([.D148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DEC2HEX([.C1486])" office:value-type="string" office:string-value="EE6D4" calcext:value-type="string">
            <text:p>EE6D4</text:p>
          </table:table-cell>
          <table:table-cell office:value-type="float" office:value="976596" calcext:value-type="float">
            <text:p>976596</text:p>
          </table:table-cell>
          <table:table-cell office:value-type="float" office:value="4" calcext:value-type="float">
            <text:p>4</text:p>
          </table:table-cell>
          <table:table-cell table:formula="of:=IF([.D148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DEC2HEX([.C1487])" office:value-type="string" office:string-value="EE6D8" calcext:value-type="string">
            <text:p>EE6D8</text:p>
          </table:table-cell>
          <table:table-cell office:value-type="float" office:value="976600" calcext:value-type="float">
            <text:p>976600</text:p>
          </table:table-cell>
          <table:table-cell office:value-type="float" office:value="4" calcext:value-type="float">
            <text:p>4</text:p>
          </table:table-cell>
          <table:table-cell table:formula="of:=IF([.D148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DEC2HEX([.C1488])" office:value-type="string" office:string-value="EE6DC" calcext:value-type="string">
            <text:p>EE6DC</text:p>
          </table:table-cell>
          <table:table-cell office:value-type="float" office:value="976604" calcext:value-type="float">
            <text:p>976604</text:p>
          </table:table-cell>
          <table:table-cell office:value-type="float" office:value="4" calcext:value-type="float">
            <text:p>4</text:p>
          </table:table-cell>
          <table:table-cell table:formula="of:=IF([.D148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DEC2HEX([.C1489])" office:value-type="string" office:string-value="EE6E0" calcext:value-type="string">
            <text:p>EE6E0</text:p>
          </table:table-cell>
          <table:table-cell office:value-type="float" office:value="976608" calcext:value-type="float">
            <text:p>976608</text:p>
          </table:table-cell>
          <table:table-cell office:value-type="float" office:value="4" calcext:value-type="float">
            <text:p>4</text:p>
          </table:table-cell>
          <table:table-cell table:formula="of:=IF([.D148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DEC2HEX([.C1490])" office:value-type="string" office:string-value="EE6E4" calcext:value-type="string">
            <text:p>EE6E4</text:p>
          </table:table-cell>
          <table:table-cell office:value-type="float" office:value="976612" calcext:value-type="float">
            <text:p>976612</text:p>
          </table:table-cell>
          <table:table-cell office:value-type="float" office:value="4" calcext:value-type="float">
            <text:p>4</text:p>
          </table:table-cell>
          <table:table-cell table:formula="of:=IF([.D149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DEC2HEX([.C1491])" office:value-type="string" office:string-value="EE6E8" calcext:value-type="string">
            <text:p>EE6E8</text:p>
          </table:table-cell>
          <table:table-cell office:value-type="float" office:value="976616" calcext:value-type="float">
            <text:p>976616</text:p>
          </table:table-cell>
          <table:table-cell office:value-type="float" office:value="4" calcext:value-type="float">
            <text:p>4</text:p>
          </table:table-cell>
          <table:table-cell table:formula="of:=IF([.D149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DEC2HEX([.C1492])" office:value-type="string" office:string-value="EE6EC" calcext:value-type="string">
            <text:p>EE6EC</text:p>
          </table:table-cell>
          <table:table-cell office:value-type="float" office:value="976620" calcext:value-type="float">
            <text:p>976620</text:p>
          </table:table-cell>
          <table:table-cell office:value-type="float" office:value="2" calcext:value-type="float">
            <text:p>2</text:p>
          </table:table-cell>
          <table:table-cell table:formula="of:=IF([.D149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DEC2HEX([.C1493])" office:value-type="string" office:string-value="EE6EE" calcext:value-type="string">
            <text:p>EE6EE</text:p>
          </table:table-cell>
          <table:table-cell office:value-type="float" office:value="976622" calcext:value-type="float">
            <text:p>976622</text:p>
          </table:table-cell>
          <table:table-cell office:value-type="float" office:value="4" calcext:value-type="float">
            <text:p>4</text:p>
          </table:table-cell>
          <table:table-cell table:formula="of:=IF([.D149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DEC2HEX([.C1494])" office:value-type="string" office:string-value="EE6F2" calcext:value-type="string">
            <text:p>EE6F2</text:p>
          </table:table-cell>
          <table:table-cell office:value-type="float" office:value="976626" calcext:value-type="float">
            <text:p>976626</text:p>
          </table:table-cell>
          <table:table-cell office:value-type="float" office:value="4" calcext:value-type="float">
            <text:p>4</text:p>
          </table:table-cell>
          <table:table-cell table:formula="of:=IF([.D149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DEC2HEX([.C1495])" office:value-type="string" office:string-value="EE6F6" calcext:value-type="string">
            <text:p>EE6F6</text:p>
          </table:table-cell>
          <table:table-cell office:value-type="float" office:value="976630" calcext:value-type="float">
            <text:p>976630</text:p>
          </table:table-cell>
          <table:table-cell office:value-type="float" office:value="4" calcext:value-type="float">
            <text:p>4</text:p>
          </table:table-cell>
          <table:table-cell table:formula="of:=IF([.D149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DEC2HEX([.C1496])" office:value-type="string" office:string-value="EE6FA" calcext:value-type="string">
            <text:p>EE6FA</text:p>
          </table:table-cell>
          <table:table-cell office:value-type="float" office:value="976634" calcext:value-type="float">
            <text:p>976634</text:p>
          </table:table-cell>
          <table:table-cell office:value-type="float" office:value="4" calcext:value-type="float">
            <text:p>4</text:p>
          </table:table-cell>
          <table:table-cell table:formula="of:=IF([.D149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DEC2HEX([.C1497])" office:value-type="string" office:string-value="EE6FE" calcext:value-type="string">
            <text:p>EE6FE</text:p>
          </table:table-cell>
          <table:table-cell office:value-type="float" office:value="976638" calcext:value-type="float">
            <text:p>976638</text:p>
          </table:table-cell>
          <table:table-cell office:value-type="float" office:value="4" calcext:value-type="float">
            <text:p>4</text:p>
          </table:table-cell>
          <table:table-cell table:formula="of:=IF([.D149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DEC2HEX([.C1498])" office:value-type="string" office:string-value="EE702" calcext:value-type="string">
            <text:p>EE702</text:p>
          </table:table-cell>
          <table:table-cell office:value-type="float" office:value="976642" calcext:value-type="float">
            <text:p>976642</text:p>
          </table:table-cell>
          <table:table-cell office:value-type="float" office:value="4" calcext:value-type="float">
            <text:p>4</text:p>
          </table:table-cell>
          <table:table-cell table:formula="of:=IF([.D149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DEC2HEX([.C1499])" office:value-type="string" office:string-value="EE706" calcext:value-type="string">
            <text:p>EE706</text:p>
          </table:table-cell>
          <table:table-cell office:value-type="float" office:value="976646" calcext:value-type="float">
            <text:p>976646</text:p>
          </table:table-cell>
          <table:table-cell office:value-type="float" office:value="2" calcext:value-type="float">
            <text:p>2</text:p>
          </table:table-cell>
          <table:table-cell table:formula="of:=IF([.D149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DEC2HEX([.C1500])" office:value-type="string" office:string-value="EE708" calcext:value-type="string">
            <text:p>EE708</text:p>
          </table:table-cell>
          <table:table-cell office:value-type="float" office:value="976648" calcext:value-type="float">
            <text:p>976648</text:p>
          </table:table-cell>
          <table:table-cell office:value-type="float" office:value="2" calcext:value-type="float">
            <text:p>2</text:p>
          </table:table-cell>
          <table:table-cell table:formula="of:=IF([.D150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DEC2HEX([.C1501])" office:value-type="string" office:string-value="EE70A" calcext:value-type="string">
            <text:p>EE70A</text:p>
          </table:table-cell>
          <table:table-cell office:value-type="float" office:value="976650" calcext:value-type="float">
            <text:p>976650</text:p>
          </table:table-cell>
          <table:table-cell office:value-type="float" office:value="4" calcext:value-type="float">
            <text:p>4</text:p>
          </table:table-cell>
          <table:table-cell table:formula="of:=IF([.D150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DEC2HEX([.C1502])" office:value-type="string" office:string-value="EE70E" calcext:value-type="string">
            <text:p>EE70E</text:p>
          </table:table-cell>
          <table:table-cell office:value-type="float" office:value="976654" calcext:value-type="float">
            <text:p>976654</text:p>
          </table:table-cell>
          <table:table-cell office:value-type="float" office:value="4" calcext:value-type="float">
            <text:p>4</text:p>
          </table:table-cell>
          <table:table-cell table:formula="of:=IF([.D150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DEC2HEX([.C1503])" office:value-type="string" office:string-value="EE712" calcext:value-type="string">
            <text:p>EE712</text:p>
          </table:table-cell>
          <table:table-cell office:value-type="float" office:value="976658" calcext:value-type="float">
            <text:p>976658</text:p>
          </table:table-cell>
          <table:table-cell office:value-type="float" office:value="4" calcext:value-type="float">
            <text:p>4</text:p>
          </table:table-cell>
          <table:table-cell table:formula="of:=IF([.D150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DEC2HEX([.C1504])" office:value-type="string" office:string-value="EE716" calcext:value-type="string">
            <text:p>EE716</text:p>
          </table:table-cell>
          <table:table-cell office:value-type="float" office:value="976662" calcext:value-type="float">
            <text:p>976662</text:p>
          </table:table-cell>
          <table:table-cell office:value-type="float" office:value="4" calcext:value-type="float">
            <text:p>4</text:p>
          </table:table-cell>
          <table:table-cell table:formula="of:=IF([.D150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DEC2HEX([.C1505])" office:value-type="string" office:string-value="EE71A" calcext:value-type="string">
            <text:p>EE71A</text:p>
          </table:table-cell>
          <table:table-cell office:value-type="float" office:value="976666" calcext:value-type="float">
            <text:p>976666</text:p>
          </table:table-cell>
          <table:table-cell office:value-type="float" office:value="1" calcext:value-type="float">
            <text:p>1</text:p>
          </table:table-cell>
          <table:table-cell table:formula="of:=IF([.D150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DEC2HEX([.C1506])" office:value-type="string" office:string-value="EE71B" calcext:value-type="string">
            <text:p>EE71B</text:p>
          </table:table-cell>
          <table:table-cell office:value-type="float" office:value="976667" calcext:value-type="float">
            <text:p>976667</text:p>
          </table:table-cell>
          <table:table-cell office:value-type="float" office:value="4" calcext:value-type="float">
            <text:p>4</text:p>
          </table:table-cell>
          <table:table-cell table:formula="of:=IF([.D150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DEC2HEX([.C1507])" office:value-type="string" office:string-value="EE71F" calcext:value-type="string">
            <text:p>EE71F</text:p>
          </table:table-cell>
          <table:table-cell office:value-type="float" office:value="976671" calcext:value-type="float">
            <text:p>976671</text:p>
          </table:table-cell>
          <table:table-cell office:value-type="float" office:value="16" calcext:value-type="float">
            <text:p>16</text:p>
          </table:table-cell>
          <table:table-cell table:formula="of:=IF([.D150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DEC2HEX([.C1508])" office:value-type="string" office:string-value="EE72F" calcext:value-type="string">
            <text:p>EE72F</text:p>
          </table:table-cell>
          <table:table-cell office:value-type="float" office:value="976687" calcext:value-type="float">
            <text:p>976687</text:p>
          </table:table-cell>
          <table:table-cell office:value-type="float" office:value="1" calcext:value-type="float">
            <text:p>1</text:p>
          </table:table-cell>
          <table:table-cell table:formula="of:=IF([.D150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DEC2HEX([.C1509])" office:value-type="string" office:string-value="EE730" calcext:value-type="string">
            <text:p>EE730</text:p>
          </table:table-cell>
          <table:table-cell office:value-type="float" office:value="976688" calcext:value-type="float">
            <text:p>976688</text:p>
          </table:table-cell>
          <table:table-cell office:value-type="float" office:value="4" calcext:value-type="float">
            <text:p>4</text:p>
          </table:table-cell>
          <table:table-cell table:formula="of:=IF([.D150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DEC2HEX([.C1510])" office:value-type="string" office:string-value="EE734" calcext:value-type="string">
            <text:p>EE734</text:p>
          </table:table-cell>
          <table:table-cell office:value-type="float" office:value="976692" calcext:value-type="float">
            <text:p>976692</text:p>
          </table:table-cell>
          <table:table-cell office:value-type="float" office:value="4" calcext:value-type="float">
            <text:p>4</text:p>
          </table:table-cell>
          <table:table-cell table:formula="of:=IF([.D151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DEC2HEX([.C1511])" office:value-type="string" office:string-value="EE738" calcext:value-type="string">
            <text:p>EE738</text:p>
          </table:table-cell>
          <table:table-cell office:value-type="float" office:value="976696" calcext:value-type="float">
            <text:p>976696</text:p>
          </table:table-cell>
          <table:table-cell office:value-type="float" office:value="1" calcext:value-type="float">
            <text:p>1</text:p>
          </table:table-cell>
          <table:table-cell table:formula="of:=IF([.D151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DEC2HEX([.C1512])" office:value-type="string" office:string-value="EE739" calcext:value-type="string">
            <text:p>EE739</text:p>
          </table:table-cell>
          <table:table-cell office:value-type="float" office:value="976697" calcext:value-type="float">
            <text:p>976697</text:p>
          </table:table-cell>
          <table:table-cell office:value-type="float" office:value="4" calcext:value-type="float">
            <text:p>4</text:p>
          </table:table-cell>
          <table:table-cell table:formula="of:=IF([.D151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DEC2HEX([.C1513])" office:value-type="string" office:string-value="EE73D" calcext:value-type="string">
            <text:p>EE73D</text:p>
          </table:table-cell>
          <table:table-cell office:value-type="float" office:value="976701" calcext:value-type="float">
            <text:p>976701</text:p>
          </table:table-cell>
          <table:table-cell office:value-type="float" office:value="4" calcext:value-type="float">
            <text:p>4</text:p>
          </table:table-cell>
          <table:table-cell table:formula="of:=IF([.D151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DEC2HEX([.C1514])" office:value-type="string" office:string-value="EE741" calcext:value-type="string">
            <text:p>EE741</text:p>
          </table:table-cell>
          <table:table-cell office:value-type="float" office:value="976705" calcext:value-type="float">
            <text:p>976705</text:p>
          </table:table-cell>
          <table:table-cell office:value-type="float" office:value="4" calcext:value-type="float">
            <text:p>4</text:p>
          </table:table-cell>
          <table:table-cell table:formula="of:=IF([.D151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DEC2HEX([.C1515])" office:value-type="string" office:string-value="EE745" calcext:value-type="string">
            <text:p>EE745</text:p>
          </table:table-cell>
          <table:table-cell office:value-type="float" office:value="976709" calcext:value-type="float">
            <text:p>976709</text:p>
          </table:table-cell>
          <table:table-cell office:value-type="float" office:value="1" calcext:value-type="float">
            <text:p>1</text:p>
          </table:table-cell>
          <table:table-cell table:formula="of:=IF([.D151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DEC2HEX([.C1516])" office:value-type="string" office:string-value="EE746" calcext:value-type="string">
            <text:p>EE746</text:p>
          </table:table-cell>
          <table:table-cell office:value-type="float" office:value="976710" calcext:value-type="float">
            <text:p>976710</text:p>
          </table:table-cell>
          <table:table-cell office:value-type="float" office:value="4" calcext:value-type="float">
            <text:p>4</text:p>
          </table:table-cell>
          <table:table-cell table:formula="of:=IF([.D151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DEC2HEX([.C1517])" office:value-type="string" office:string-value="EE74A" calcext:value-type="string">
            <text:p>EE74A</text:p>
          </table:table-cell>
          <table:table-cell office:value-type="float" office:value="976714" calcext:value-type="float">
            <text:p>976714</text:p>
          </table:table-cell>
          <table:table-cell office:value-type="float" office:value="4" calcext:value-type="float">
            <text:p>4</text:p>
          </table:table-cell>
          <table:table-cell table:formula="of:=IF([.D151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DEC2HEX([.C1518])" office:value-type="string" office:string-value="EE74E" calcext:value-type="string">
            <text:p>EE74E</text:p>
          </table:table-cell>
          <table:table-cell office:value-type="float" office:value="976718" calcext:value-type="float">
            <text:p>976718</text:p>
          </table:table-cell>
          <table:table-cell office:value-type="float" office:value="1" calcext:value-type="float">
            <text:p>1</text:p>
          </table:table-cell>
          <table:table-cell table:formula="of:=IF([.D151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DEC2HEX([.C1519])" office:value-type="string" office:string-value="EE74F" calcext:value-type="string">
            <text:p>EE74F</text:p>
          </table:table-cell>
          <table:table-cell office:value-type="float" office:value="976719" calcext:value-type="float">
            <text:p>976719</text:p>
          </table:table-cell>
          <table:table-cell office:value-type="float" office:value="1" calcext:value-type="float">
            <text:p>1</text:p>
          </table:table-cell>
          <table:table-cell table:formula="of:=IF([.D151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DEC2HEX([.C1520])" office:value-type="string" office:string-value="EE750" calcext:value-type="string">
            <text:p>EE750</text:p>
          </table:table-cell>
          <table:table-cell office:value-type="float" office:value="976720" calcext:value-type="float">
            <text:p>976720</text:p>
          </table:table-cell>
          <table:table-cell office:value-type="float" office:value="4" calcext:value-type="float">
            <text:p>4</text:p>
          </table:table-cell>
          <table:table-cell table:formula="of:=IF([.D152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DEC2HEX([.C1521])" office:value-type="string" office:string-value="EE754" calcext:value-type="string">
            <text:p>EE754</text:p>
          </table:table-cell>
          <table:table-cell office:value-type="float" office:value="976724" calcext:value-type="float">
            <text:p>976724</text:p>
          </table:table-cell>
          <table:table-cell office:value-type="float" office:value="4" calcext:value-type="float">
            <text:p>4</text:p>
          </table:table-cell>
          <table:table-cell table:formula="of:=IF([.D152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DEC2HEX([.C1522])" office:value-type="string" office:string-value="EE758" calcext:value-type="string">
            <text:p>EE758</text:p>
          </table:table-cell>
          <table:table-cell office:value-type="float" office:value="976728" calcext:value-type="float">
            <text:p>976728</text:p>
          </table:table-cell>
          <table:table-cell office:value-type="float" office:value="1" calcext:value-type="float">
            <text:p>1</text:p>
          </table:table-cell>
          <table:table-cell table:formula="of:=IF([.D152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DEC2HEX([.C1523])" office:value-type="string" office:string-value="EE759" calcext:value-type="string">
            <text:p>EE759</text:p>
          </table:table-cell>
          <table:table-cell office:value-type="float" office:value="976729" calcext:value-type="float">
            <text:p>976729</text:p>
          </table:table-cell>
          <table:table-cell office:value-type="float" office:value="4" calcext:value-type="float">
            <text:p>4</text:p>
          </table:table-cell>
          <table:table-cell table:formula="of:=IF([.D152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DEC2HEX([.C1524])" office:value-type="string" office:string-value="EE769" calcext:value-type="string">
            <text:p>EE769</text:p>
          </table:table-cell>
          <table:table-cell office:value-type="float" office:value="976745" calcext:value-type="float">
            <text:p>976745</text:p>
          </table:table-cell>
          <table:table-cell office:value-type="float" office:value="1" calcext:value-type="float">
            <text:p>1</text:p>
          </table:table-cell>
          <table:table-cell table:formula="of:=IF([.D152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DEC2HEX([.C1525])" office:value-type="string" office:string-value="EE76A" calcext:value-type="string">
            <text:p>EE76A</text:p>
          </table:table-cell>
          <table:table-cell office:value-type="float" office:value="976746" calcext:value-type="float">
            <text:p>976746</text:p>
          </table:table-cell>
          <table:table-cell office:value-type="float" office:value="4" calcext:value-type="float">
            <text:p>4</text:p>
          </table:table-cell>
          <table:table-cell table:formula="of:=IF([.D152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DEC2HEX([.C1526])" office:value-type="string" office:string-value="EE76E" calcext:value-type="string">
            <text:p>EE76E</text:p>
          </table:table-cell>
          <table:table-cell office:value-type="float" office:value="976750" calcext:value-type="float">
            <text:p>976750</text:p>
          </table:table-cell>
          <table:table-cell office:value-type="float" office:value="4" calcext:value-type="float">
            <text:p>4</text:p>
          </table:table-cell>
          <table:table-cell table:formula="of:=IF([.D152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DEC2HEX([.C1527])" office:value-type="string" office:string-value="EE772" calcext:value-type="string">
            <text:p>EE772</text:p>
          </table:table-cell>
          <table:table-cell office:value-type="float" office:value="976754" calcext:value-type="float">
            <text:p>976754</text:p>
          </table:table-cell>
          <table:table-cell office:value-type="float" office:value="4" calcext:value-type="float">
            <text:p>4</text:p>
          </table:table-cell>
          <table:table-cell table:formula="of:=IF([.D152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DEC2HEX([.C1528])" office:value-type="string" office:string-value="EE776" calcext:value-type="string">
            <text:p>EE776</text:p>
          </table:table-cell>
          <table:table-cell office:value-type="float" office:value="976758" calcext:value-type="float">
            <text:p>976758</text:p>
          </table:table-cell>
          <table:table-cell office:value-type="float" office:value="1" calcext:value-type="float">
            <text:p>1</text:p>
          </table:table-cell>
          <table:table-cell table:formula="of:=IF([.D152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DEC2HEX([.C1529])" office:value-type="string" office:string-value="EE777" calcext:value-type="string">
            <text:p>EE777</text:p>
          </table:table-cell>
          <table:table-cell office:value-type="float" office:value="976759" calcext:value-type="float">
            <text:p>976759</text:p>
          </table:table-cell>
          <table:table-cell office:value-type="float" office:value="4" calcext:value-type="float">
            <text:p>4</text:p>
          </table:table-cell>
          <table:table-cell table:formula="of:=IF([.D152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DEC2HEX([.C1530])" office:value-type="string" office:string-value="EE77B" calcext:value-type="string">
            <text:p>EE77B</text:p>
          </table:table-cell>
          <table:table-cell office:value-type="float" office:value="976763" calcext:value-type="float">
            <text:p>976763</text:p>
          </table:table-cell>
          <table:table-cell office:value-type="float" office:value="4" calcext:value-type="float">
            <text:p>4</text:p>
          </table:table-cell>
          <table:table-cell table:formula="of:=IF([.D153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DEC2HEX([.C1531])" office:value-type="string" office:string-value="EE77F" calcext:value-type="string">
            <text:p>EE77F</text:p>
          </table:table-cell>
          <table:table-cell office:value-type="float" office:value="976767" calcext:value-type="float">
            <text:p>976767</text:p>
          </table:table-cell>
          <table:table-cell office:value-type="float" office:value="1" calcext:value-type="float">
            <text:p>1</text:p>
          </table:table-cell>
          <table:table-cell table:formula="of:=IF([.D153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DEC2HEX([.C1532])" office:value-type="string" office:string-value="EE780" calcext:value-type="string">
            <text:p>EE780</text:p>
          </table:table-cell>
          <table:table-cell office:value-type="float" office:value="976768" calcext:value-type="float">
            <text:p>976768</text:p>
          </table:table-cell>
          <table:table-cell office:value-type="float" office:value="4" calcext:value-type="float">
            <text:p>4</text:p>
          </table:table-cell>
          <table:table-cell table:formula="of:=IF([.D1532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DEC2HEX([.C1533])" office:value-type="string" office:string-value="EE784" calcext:value-type="string">
            <text:p>EE784</text:p>
          </table:table-cell>
          <table:table-cell office:value-type="float" office:value="976772" calcext:value-type="float">
            <text:p>976772</text:p>
          </table:table-cell>
          <table:table-cell office:value-type="float" office:value="4" calcext:value-type="float">
            <text:p>4</text:p>
          </table:table-cell>
          <table:table-cell table:formula="of:=IF([.D1533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DEC2HEX([.C1534])" office:value-type="string" office:string-value="EE788" calcext:value-type="string">
            <text:p>EE788</text:p>
          </table:table-cell>
          <table:table-cell office:value-type="float" office:value="976776" calcext:value-type="float">
            <text:p>976776</text:p>
          </table:table-cell>
          <table:table-cell office:value-type="float" office:value="1" calcext:value-type="float">
            <text:p>1</text:p>
          </table:table-cell>
          <table:table-cell table:formula="of:=IF([.D1534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DEC2HEX([.C1535])" office:value-type="string" office:string-value="EE789" calcext:value-type="string">
            <text:p>EE789</text:p>
          </table:table-cell>
          <table:table-cell office:value-type="float" office:value="976777" calcext:value-type="float">
            <text:p>976777</text:p>
          </table:table-cell>
          <table:table-cell office:value-type="float" office:value="4" calcext:value-type="float">
            <text:p>4</text:p>
          </table:table-cell>
          <table:table-cell table:formula="of:=IF([.D1535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DEC2HEX([.C1536])" office:value-type="string" office:string-value="EE78D" calcext:value-type="string">
            <text:p>EE78D</text:p>
          </table:table-cell>
          <table:table-cell office:value-type="float" office:value="976781" calcext:value-type="float">
            <text:p>976781</text:p>
          </table:table-cell>
          <table:table-cell office:value-type="float" office:value="4" calcext:value-type="float">
            <text:p>4</text:p>
          </table:table-cell>
          <table:table-cell table:formula="of:=IF([.D1536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DEC2HEX([.C1537])" office:value-type="string" office:string-value="EE791" calcext:value-type="string">
            <text:p>EE791</text:p>
          </table:table-cell>
          <table:table-cell office:value-type="float" office:value="976785" calcext:value-type="float">
            <text:p>976785</text:p>
          </table:table-cell>
          <table:table-cell office:value-type="float" office:value="1" calcext:value-type="float">
            <text:p>1</text:p>
          </table:table-cell>
          <table:table-cell table:formula="of:=IF([.D1537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DEC2HEX([.C1538])" office:value-type="string" office:string-value="EE792" calcext:value-type="string">
            <text:p>EE792</text:p>
          </table:table-cell>
          <table:table-cell office:value-type="float" office:value="976786" calcext:value-type="float">
            <text:p>976786</text:p>
          </table:table-cell>
          <table:table-cell office:value-type="float" office:value="4" calcext:value-type="float">
            <text:p>4</text:p>
          </table:table-cell>
          <table:table-cell table:formula="of:=IF([.D1538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DEC2HEX([.C1539])" office:value-type="string" office:string-value="EE796" calcext:value-type="string">
            <text:p>EE796</text:p>
          </table:table-cell>
          <table:table-cell office:value-type="float" office:value="976790" calcext:value-type="float">
            <text:p>976790</text:p>
          </table:table-cell>
          <table:table-cell office:value-type="float" office:value="4" calcext:value-type="float">
            <text:p>4</text:p>
          </table:table-cell>
          <table:table-cell table:formula="of:=IF([.D1539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DEC2HEX([.C1540])" office:value-type="string" office:string-value="EE79A" calcext:value-type="string">
            <text:p>EE79A</text:p>
          </table:table-cell>
          <table:table-cell office:value-type="float" office:value="976794" calcext:value-type="float">
            <text:p>976794</text:p>
          </table:table-cell>
          <table:table-cell office:value-type="float" office:value="4" calcext:value-type="float">
            <text:p>4</text:p>
          </table:table-cell>
          <table:table-cell table:formula="of:=IF([.D1540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DEC2HEX([.C1541])" office:value-type="string" office:string-value="EE79E" calcext:value-type="string">
            <text:p>EE79E</text:p>
          </table:table-cell>
          <table:table-cell office:value-type="float" office:value="976798" calcext:value-type="float">
            <text:p>976798</text:p>
          </table:table-cell>
          <table:table-cell office:value-type="float" office:value="1" calcext:value-type="float">
            <text:p>1</text:p>
          </table:table-cell>
          <table:table-cell table:formula="of:=IF([.D1541]&gt;100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70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abelle1.A1:Tabelle1.G154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/>
    <style:font-face style:name="Aptos Narrow" svg:font-family="'Aptos Narro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0__25__20_-_20_Akzent1" style:display-name="20 % - Akzent1" style:family="table-cell" style:parent-style-name="Default" style:data-style-name="N0">
      <style:table-cell-properties fo:background-color="#c0e6f5"/>
    </style:style>
    <style:style style:name="_32_0_20__25__20_-_20_Akzent2" style:display-name="20 % - Akzent2" style:family="table-cell" style:parent-style-name="Default" style:data-style-name="N0">
      <style:table-cell-properties fo:background-color="#fbe2d5"/>
    </style:style>
    <style:style style:name="_32_0_20__25__20_-_20_Akzent3" style:display-name="20 % - Akzent3" style:family="table-cell" style:parent-style-name="Default" style:data-style-name="N0">
      <style:table-cell-properties fo:background-color="#c1f0c8"/>
    </style:style>
    <style:style style:name="_32_0_20__25__20_-_20_Akzent4" style:display-name="20 % - Akzent4" style:family="table-cell" style:parent-style-name="Default" style:data-style-name="N0">
      <style:table-cell-properties fo:background-color="#caedfb"/>
    </style:style>
    <style:style style:name="_32_0_20__25__20_-_20_Akzent5" style:display-name="20 % - Akzent5" style:family="table-cell" style:parent-style-name="Default" style:data-style-name="N0">
      <style:table-cell-properties fo:background-color="#f2ceef"/>
    </style:style>
    <style:style style:name="_32_0_20__25__20_-_20_Akzent6" style:display-name="20 % - Akzent6" style:family="table-cell" style:parent-style-name="Default" style:data-style-name="N0">
      <style:table-cell-properties fo:background-color="#daf2d0"/>
    </style:style>
    <style:style style:name="_34_0_20__25__20_-_20_Akzent1" style:display-name="40 % - Akzent1" style:family="table-cell" style:parent-style-name="Default" style:data-style-name="N0">
      <style:table-cell-properties fo:background-color="#83cceb"/>
    </style:style>
    <style:style style:name="_34_0_20__25__20_-_20_Akzent2" style:display-name="40 % - Akzent2" style:family="table-cell" style:parent-style-name="Default" style:data-style-name="N0">
      <style:table-cell-properties fo:background-color="#f7c7ac"/>
    </style:style>
    <style:style style:name="_34_0_20__25__20_-_20_Akzent3" style:display-name="40 % - Akzent3" style:family="table-cell" style:parent-style-name="Default" style:data-style-name="N0">
      <style:table-cell-properties fo:background-color="#83e28e"/>
    </style:style>
    <style:style style:name="_34_0_20__25__20_-_20_Akzent4" style:display-name="40 % - Akzent4" style:family="table-cell" style:parent-style-name="Default" style:data-style-name="N0">
      <style:table-cell-properties fo:background-color="#94dcf8"/>
    </style:style>
    <style:style style:name="_34_0_20__25__20_-_20_Akzent5" style:display-name="40 % - Akzent5" style:family="table-cell" style:parent-style-name="Default" style:data-style-name="N0">
      <style:table-cell-properties fo:background-color="#e49edd"/>
    </style:style>
    <style:style style:name="_34_0_20__25__20_-_20_Akzent6" style:display-name="40 % - Akzent6" style:family="table-cell" style:parent-style-name="Default" style:data-style-name="N0">
      <style:table-cell-properties fo:background-color="#b5e6a2"/>
    </style:style>
    <style:style style:name="_36_0_20__25__20_-_20_Akzent1" style:display-name="60 % - Akzent1" style:family="table-cell" style:parent-style-name="Default" style:data-style-name="N0">
      <style:table-cell-properties fo:background-color="#44b3e1"/>
    </style:style>
    <style:style style:name="_36_0_20__25__20_-_20_Akzent2" style:display-name="60 % - Akzent2" style:family="table-cell" style:parent-style-name="Default" style:data-style-name="N0">
      <style:table-cell-properties fo:background-color="#f1a983"/>
    </style:style>
    <style:style style:name="_36_0_20__25__20_-_20_Akzent3" style:display-name="60 % - Akzent3" style:family="table-cell" style:parent-style-name="Default" style:data-style-name="N0">
      <style:table-cell-properties fo:background-color="#47d359"/>
    </style:style>
    <style:style style:name="_36_0_20__25__20_-_20_Akzent4" style:display-name="60 % - Akzent4" style:family="table-cell" style:parent-style-name="Default" style:data-style-name="N0">
      <style:table-cell-properties fo:background-color="#61cbf3"/>
    </style:style>
    <style:style style:name="_36_0_20__25__20_-_20_Akzent5" style:display-name="60 % - Akzent5" style:family="table-cell" style:parent-style-name="Default" style:data-style-name="N0">
      <style:table-cell-properties fo:background-color="#d86dcd"/>
    </style:style>
    <style:style style:name="_36_0_20__25__20_-_20_Akzent6" style:display-name="60 % - Akzent6" style:family="table-cell" style:parent-style-name="Default" style:data-style-name="N0">
      <style:table-cell-properties fo:background-color="#8ed973"/>
    </style:style>
    <style:style style:name="Akzent1" style:family="table-cell" style:parent-style-name="Default" style:data-style-name="N0">
      <style:table-cell-properties fo:background-color="#156082"/>
      <style:text-properties fo:color="#ffffff"/>
    </style:style>
    <style:style style:name="Akzent2" style:family="table-cell" style:parent-style-name="Default" style:data-style-name="N0">
      <style:table-cell-properties fo:background-color="#e97132"/>
      <style:text-properties fo:color="#ffffff"/>
    </style:style>
    <style:style style:name="Akzent3" style:family="table-cell" style:parent-style-name="Default" style:data-style-name="N0">
      <style:table-cell-properties fo:background-color="#196b24"/>
      <style:text-properties fo:color="#ffffff"/>
    </style:style>
    <style:style style:name="Akzent4" style:family="table-cell" style:parent-style-name="Default" style:data-style-name="N0">
      <style:table-cell-properties fo:background-color="#0f9ed5"/>
      <style:text-properties fo:color="#ffffff"/>
    </style:style>
    <style:style style:name="Akzent5" style:family="table-cell" style:parent-style-name="Default" style:data-style-name="N0">
      <style:table-cell-properties fo:background-color="#a02b93"/>
      <style:text-properties fo:color="#ffffff"/>
    </style:style>
    <style:style style:name="Akzent6" style:family="table-cell" style:parent-style-name="Default" style:data-style-name="N0">
      <style:table-cell-properties fo:background-color="#4ea72e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gebnis" style:family="table-cell" style:parent-style-name="Default" style:data-style-name="N0">
      <style:table-cell-properties fo:border-bottom="0.06pt solid #156082" fo:border-left="none" fo:border-right="none" fo:border-top="0.06pt solid #156082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" style:family="table-cell" style:parent-style-name="Default" style:data-style-name="N0">
      <style:text-properties fo:color="#0e2841" style:font-name="Aptos Display" fo:font-family="'Aptos Display'" fo:font-size="18pt" style:font-name-asian="Aptos Display" style:font-family-asian="'Aptos Display'" style:font-size-asian="18pt" style:font-name-complex="Aptos Display" style:font-family-complex="'Aptos Display'" style:font-size-complex="18pt"/>
    </style:style>
    <style:style style:name="Überschrift_20_1" style:display-name="Überschrift 1" style:family="table-cell" style:parent-style-name="Default" style:data-style-name="N0">
      <style:table-cell-properties fo:border-bottom="2.49pt solid #156082" fo:border-left="none" fo:border-right="none" fo:border-top="none"/>
      <style:text-properties fo:color="#0e2841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64bee6" fo:border-left="none" fo:border-right="none" fo:border-top="none"/>
      <style:text-properties fo:color="#0e2841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44b3e1" fo:border-left="none" fo:border-right="none" fo:border-top="none"/>
      <style:text-properties fo:color="#0e2841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0e2841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Crazy Cat</meta:initial-creator>
    <meta:creation-date>2026-06-06T11:57:19Z</meta:creation-date>
    <dc:date>2026-06-06T18:03:01.542331122</dc:date>
    <meta:editing-duration>PT2H32S</meta:editing-duration>
    <meta:editing-cycles>2</meta:editing-cycles>
    <meta:document-statistic meta:table-count="2" meta:cell-count="20051" meta:object-count="0"/>
  </office:meta>
</office:document-meta>
</file>