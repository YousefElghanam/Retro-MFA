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81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hite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me of Day</text:p>
          </table:table-cell>
          <table:table-cell office:value-type="string" table:style-name="ce1">
            <text:p>Process Name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Operation</text:p>
          </table:table-cell>
          <table:table-cell office:value-type="string" table:style-name="ce1">
            <text:p>Path</text:p>
          </table:table-cell>
          <table:table-cell office:value-type="string" table:style-name="ce1">
            <text:p>Result</text:p>
          </table:table-cell>
          <table:table-cell office:value-type="string" table:style-name="ce1">
            <text:p>Detail</text:p>
          </table:table-cell>
          <table:table-cell table:number-columns-repeated="16377" table:style-name="ce1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915129" table:style-name="ce1">
            <text:p>9151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QueryDirectory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FileInformationClass: FileIdBothDirectoryInformation, Filter: white2.mfa, 2: white2.mfa</text:p>
          </table:table-cell>
          <table:table-cell table:number-columns-repeated="16376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922127" table:style-name="ce1">
            <text:p>92212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Create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Desired Access: Read Attributes, Disposition: Open, Options: Open Reparse Point, Attributes: n/a, ShareMode: Read, Write, Delete, AllocationSize: n/a, OpenResult: Opened</text:p>
          </table:table-cell>
          <table:table-cell table:number-columns-repeated="16376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924000" table:style-name="ce1">
            <text:p>92400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QueryBasicInformation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CreationTime: 06.06.2026 13:21:48, LastAccessTime: 06.06.2026 12:48:03, LastWriteTime: 05.07.2022 12:36:38, ChangeTime: 06.06.2026 13:30:04, FileAttributes: A</text:p>
          </table:table-cell>
          <table:table-cell table:number-columns-repeated="16376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924337" table:style-name="ce1">
            <text:p>9243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Close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table:number-columns-repeated="16377" table:style-name="ce1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1108188" table:style-name="ce1">
            <text:p>11081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Create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Desired Access: Generic Read, Disposition: Open, Options: Synchronous IO Non-Alert, Non-Directory File, Attributes: N, ShareMode: Read, AllocationSize: n/a, OpenResult: Opened</text:p>
          </table:table-cell>
          <table:table-cell table:number-columns-repeated="16376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1110787" table:style-name="ce1">
            <text:p>111078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QueryBasicInformation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CreationTime: 06.06.2026 13:21:48, LastAccessTime: 06.06.2026 12:48:03, LastWriteTime: 05.07.2022 12:36:38, ChangeTime: 06.06.2026 13:30:04, FileAttributes: A</text:p>
          </table:table-cell>
          <table:table-cell table:number-columns-repeated="16376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1111280" table:style-name="ce1">
            <text:p>111128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QueryStandardInformation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AllocationSize: 978 944, EndOfFile: 976 799, NumberOfLinks: 1, DeletePending: False, Directory: False</text:p>
          </table:table-cell>
          <table:table-cell table:number-columns-repeated="16376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1115127" table:style-name="ce1">
            <text:p>111512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Create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Desired Access: Read Attributes, Disposition: Open, Options: Open Reparse Point, Attributes: n/a, ShareMode: Read, Write, Delete, AllocationSize: n/a, OpenResult: Opened</text:p>
          </table:table-cell>
          <table:table-cell table:number-columns-repeated="16376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1116655" table:style-name="ce1">
            <text:p>111665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QueryBasicInformation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CreationTime: 06.06.2026 13:21:48, LastAccessTime: 06.06.2026 12:48:03, LastWriteTime: 05.07.2022 12:36:38, ChangeTime: 06.06.2026 13:30:04, FileAttributes: A</text:p>
          </table:table-cell>
          <table:table-cell table:number-columns-repeated="16376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1117028" table:style-name="ce1">
            <text:p>11170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Close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table:number-columns-repeated="16377" table:style-name="ce1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1122851" table:style-name="ce1">
            <text:p>112285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QueryStandardInformation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AllocationSize: 978 944, EndOfFile: 976 799, NumberOfLinks: 1, DeletePending: False, Directory: False</text:p>
          </table:table-cell>
          <table:table-cell table:number-columns-repeated="16376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1196596" table:style-name="ce1">
            <text:p>119659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0, Length: 4 096, Priority: Normal</text:p>
          </table:table-cell>
          <table:table-cell table:number-columns-repeated="16376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1225502" table:style-name="ce1">
            <text:p>12255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QueryBasicInformation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CreationTime: 06.06.2026 13:21:48, LastAccessTime: 06.06.2026 13:34:36, LastWriteTime: 05.07.2022 12:36:38, ChangeTime: 06.06.2026 13:30:04, FileAttributes: A</text:p>
          </table:table-cell>
          <table:table-cell table:number-columns-repeated="16376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1225934" table:style-name="ce1">
            <text:p>122593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QueryStandardInformation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AllocationSize: 978 944, EndOfFile: 976 799, NumberOfLinks: 1, DeletePending: False, Directory: False</text:p>
          </table:table-cell>
          <table:table-cell table:number-columns-repeated="16376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1231312" table:style-name="ce1">
            <text:p>123131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Create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Desired Access: Read Attributes, Disposition: Open, Options: Open Reparse Point, Attributes: n/a, ShareMode: Read, Write, Delete, AllocationSize: n/a, OpenResult: Opened</text:p>
          </table:table-cell>
          <table:table-cell table:number-columns-repeated="16376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1233362" table:style-name="ce1">
            <text:p>12333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QueryBasicInformation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CreationTime: 06.06.2026 13:21:48, LastAccessTime: 06.06.2026 13:34:36, LastWriteTime: 05.07.2022 12:36:38, ChangeTime: 06.06.2026 13:30:04, FileAttributes: A</text:p>
          </table:table-cell>
          <table:table-cell table:number-columns-repeated="16376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1233700" table:style-name="ce1">
            <text:p>123370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Close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table:number-columns-repeated="16377" table:style-name="ce1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1242341" table:style-name="ce1">
            <text:p>124234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CreateFile</text:p>
          </table:table-cell>
          <table:table-cell office:value-type="string" table:style-name="ce1">
            <text:p>C:\Users\mw\Downloads\MFA\white2.mfacfg</text:p>
          </table:table-cell>
          <table:table-cell office:value-type="string" table:style-name="ce1">
            <text:p>NAME NOT FOUND</text:p>
          </table:table-cell>
          <table:table-cell office:value-type="string" table:style-name="ce1">
            <text:p>Desired Access: Read Attributes, Disposition: Open, Options: Open Reparse Point, Attributes: n/a, ShareMode: Read, Write, Delete, AllocationSize: n/a</text:p>
          </table:table-cell>
          <table:table-cell table:number-columns-repeated="16376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1249737" table:style-name="ce1">
            <text:p>12497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, Length: 4</text:p>
          </table:table-cell>
          <table:table-cell table:number-columns-repeated="16376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1250405" table:style-name="ce1">
            <text:p>125040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8, Length: 4</text:p>
          </table:table-cell>
          <table:table-cell table:number-columns-repeated="16376"/>
        </table:table-row>
        <table:table-row table:style-name="ro1">
          <table:table-cell office:value-type="time" office:time-value="PT13H34M36S" table:style-name="ce2">
            <text:p>13:34:36</text:p>
          </table:table-cell>
          <table:table-cell office:value-type="float" office:value="1250733" table:style-name="ce1">
            <text:p>125073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4819827" table:style-name="ce1">
            <text:p>481982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4821984" table:style-name="ce1">
            <text:p>482198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0, Length: 2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4822915" table:style-name="ce1">
            <text:p>48229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4823429" table:style-name="ce1">
            <text:p>48234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2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4823882" table:style-name="ce1">
            <text:p>482388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4824210" table:style-name="ce1">
            <text:p>482421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88, Length: 89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4824557" table:style-name="ce1">
            <text:p>48245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7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4885459" table:style-name="ce1">
            <text:p>488545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 37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4886123" table:style-name="ce1">
            <text:p>488612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 38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4941859" table:style-name="ce1">
            <text:p>494185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 38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4942435" table:style-name="ce1">
            <text:p>494243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 38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004318" table:style-name="ce1">
            <text:p>500431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 39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004887" table:style-name="ce1">
            <text:p>500488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 39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056827" table:style-name="ce1">
            <text:p>505682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 40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057427" table:style-name="ce1">
            <text:p>505742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 40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057731" table:style-name="ce1">
            <text:p>505773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 409, Length: 1 02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058671" table:style-name="ce1">
            <text:p>505867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 43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39620" table:style-name="ce1">
            <text:p>513962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 44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40726" table:style-name="ce1">
            <text:p>51407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 44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41548" table:style-name="ce1">
            <text:p>514154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 477, Length: 6 91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43856" table:style-name="ce1">
            <text:p>514385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4 38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44713" table:style-name="ce1">
            <text:p>514471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4 393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45437" table:style-name="ce1">
            <text:p>51454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4 425, Length: 3 07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47275" table:style-name="ce1">
            <text:p>51472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7 49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48125" table:style-name="ce1">
            <text:p>514812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7 50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48848" table:style-name="ce1">
            <text:p>514884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7 533, Length: 76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49565" table:style-name="ce1">
            <text:p>51495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8 30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50296" table:style-name="ce1">
            <text:p>515029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8 30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51001" table:style-name="ce1">
            <text:p>515100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8 337, Length: 1 56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51763" table:style-name="ce1">
            <text:p>515176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9 89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52575" table:style-name="ce1">
            <text:p>51525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9 90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53285" table:style-name="ce1">
            <text:p>515328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9 933, Length: 89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56462" table:style-name="ce1">
            <text:p>51564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0 8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57266" table:style-name="ce1">
            <text:p>515726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0 83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58203" table:style-name="ce1">
            <text:p>515820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0 863, Length: 31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59339" table:style-name="ce1">
            <text:p>515933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1 17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60120" table:style-name="ce1">
            <text:p>516012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1 177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60848" table:style-name="ce1">
            <text:p>516084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1 209, Length: 886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61556" table:style-name="ce1">
            <text:p>516155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2 09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62286" table:style-name="ce1">
            <text:p>516228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2 099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62995" table:style-name="ce1">
            <text:p>516299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2 131, Length: 55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63702" table:style-name="ce1">
            <text:p>51637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2 68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64463" table:style-name="ce1">
            <text:p>516446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2 68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65166" table:style-name="ce1">
            <text:p>516516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2 717, Length: 26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69521" table:style-name="ce1">
            <text:p>516952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2 97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71165" table:style-name="ce1">
            <text:p>51711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2 98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72198" table:style-name="ce1">
            <text:p>517219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3 013, Length: 13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76775" table:style-name="ce1">
            <text:p>51767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3 1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77602" table:style-name="ce1">
            <text:p>51776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3 147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78335" table:style-name="ce1">
            <text:p>517833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3 179, Length: 86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79052" table:style-name="ce1">
            <text:p>517905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4 04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79788" table:style-name="ce1">
            <text:p>51797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4 04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80496" table:style-name="ce1">
            <text:p>518049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4 076, Length: 597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81301" table:style-name="ce1">
            <text:p>518130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4 67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82057" table:style-name="ce1">
            <text:p>51820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4 677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82775" table:style-name="ce1">
            <text:p>51827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4 709, Length: 523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83482" table:style-name="ce1">
            <text:p>518348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5 23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84203" table:style-name="ce1">
            <text:p>518420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5 236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84906" table:style-name="ce1">
            <text:p>51849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5 268, Length: 597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85605" table:style-name="ce1">
            <text:p>518560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5 86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86331" table:style-name="ce1">
            <text:p>518633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5 869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87033" table:style-name="ce1">
            <text:p>518703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5 901, Length: 56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87738" table:style-name="ce1">
            <text:p>518773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6 46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88457" table:style-name="ce1">
            <text:p>51884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6 46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89157" table:style-name="ce1">
            <text:p>51891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6 497, Length: 49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90009" table:style-name="ce1">
            <text:p>519000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6 9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90793" table:style-name="ce1">
            <text:p>51907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6 99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91512" table:style-name="ce1">
            <text:p>519151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7 027, Length: 583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92215" table:style-name="ce1">
            <text:p>51922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7 61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92938" table:style-name="ce1">
            <text:p>519293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7 61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93648" table:style-name="ce1">
            <text:p>519364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7 646, Length: 585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94350" table:style-name="ce1">
            <text:p>519435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8 2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95075" table:style-name="ce1">
            <text:p>51950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8 23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96005" table:style-name="ce1">
            <text:p>519600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8 267, Length: 597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96769" table:style-name="ce1">
            <text:p>519676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8 8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97502" table:style-name="ce1">
            <text:p>51975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8 868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98201" table:style-name="ce1">
            <text:p>519820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8 900, Length: 38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98899" table:style-name="ce1">
            <text:p>51988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9 2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199637" table:style-name="ce1">
            <text:p>51996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9 288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00335" table:style-name="ce1">
            <text:p>520033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9 320, Length: 1 24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01041" table:style-name="ce1">
            <text:p>520104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0 56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01764" table:style-name="ce1">
            <text:p>520176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0 566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02471" table:style-name="ce1">
            <text:p>520247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0 598, Length: 425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03245" table:style-name="ce1">
            <text:p>520324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1 0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03998" table:style-name="ce1">
            <text:p>520399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1 027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04888" table:style-name="ce1">
            <text:p>52048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1 059, Length: 47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05601" table:style-name="ce1">
            <text:p>520560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1 53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06320" table:style-name="ce1">
            <text:p>520632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1 53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07025" table:style-name="ce1">
            <text:p>520702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1 566, Length: 1 25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07773" table:style-name="ce1">
            <text:p>52077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2 8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08518" table:style-name="ce1">
            <text:p>520851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2 820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09310" table:style-name="ce1">
            <text:p>520931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2 852, Length: 34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10019" table:style-name="ce1">
            <text:p>521001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3 19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10741" table:style-name="ce1">
            <text:p>521074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3 198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11440" table:style-name="ce1">
            <text:p>521144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3 230, Length: 599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12151" table:style-name="ce1">
            <text:p>521215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3 82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12872" table:style-name="ce1">
            <text:p>521287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3 833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13572" table:style-name="ce1">
            <text:p>521357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3 865, Length: 58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14274" table:style-name="ce1">
            <text:p>521427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4 4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15009" table:style-name="ce1">
            <text:p>521500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4 45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15913" table:style-name="ce1">
            <text:p>521591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4 483, Length: 599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16703" table:style-name="ce1">
            <text:p>521670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5 08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17490" table:style-name="ce1">
            <text:p>521749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5 086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18212" table:style-name="ce1">
            <text:p>521821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5 118, Length: 50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18917" table:style-name="ce1">
            <text:p>52189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5 62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19642" table:style-name="ce1">
            <text:p>521964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5 62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20342" table:style-name="ce1">
            <text:p>522034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5 656, Length: 599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21041" table:style-name="ce1">
            <text:p>522104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6 2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21775" table:style-name="ce1">
            <text:p>52217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6 259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22477" table:style-name="ce1">
            <text:p>522247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6 291, Length: 599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23222" table:style-name="ce1">
            <text:p>522322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6 89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23947" table:style-name="ce1">
            <text:p>522394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6 89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24653" table:style-name="ce1">
            <text:p>522465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6 926, Length: 56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25354" table:style-name="ce1">
            <text:p>52253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7 4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26099" table:style-name="ce1">
            <text:p>52260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7 492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26799" table:style-name="ce1">
            <text:p>52267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7 524, Length: 52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27501" table:style-name="ce1">
            <text:p>522750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8 04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28229" table:style-name="ce1">
            <text:p>52282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8 050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28931" table:style-name="ce1">
            <text:p>522893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8 082, Length: 876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29636" table:style-name="ce1">
            <text:p>522963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8 95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31445" table:style-name="ce1">
            <text:p>523144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8 962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32315" table:style-name="ce1">
            <text:p>52323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8 994, Length: 837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35593" table:style-name="ce1">
            <text:p>52355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9 8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36595" table:style-name="ce1">
            <text:p>523659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9 83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37383" table:style-name="ce1">
            <text:p>523738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9 867, Length: 48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38277" table:style-name="ce1">
            <text:p>523827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0 3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39065" table:style-name="ce1">
            <text:p>52390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0 35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39787" table:style-name="ce1">
            <text:p>523978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0 383, Length: 1 0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40601" table:style-name="ce1">
            <text:p>524060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1 4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41337" table:style-name="ce1">
            <text:p>52413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1 419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42052" table:style-name="ce1">
            <text:p>524205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1 451, Length: 1 037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42782" table:style-name="ce1">
            <text:p>524278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2 4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43508" table:style-name="ce1">
            <text:p>524350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2 492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44214" table:style-name="ce1">
            <text:p>52442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2 524, Length: 1 166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44992" table:style-name="ce1">
            <text:p>524499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3 69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45758" table:style-name="ce1">
            <text:p>524575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3 69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46467" table:style-name="ce1">
            <text:p>524646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3 726, Length: 1 18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47179" table:style-name="ce1">
            <text:p>524717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4 91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47937" table:style-name="ce1">
            <text:p>52479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4 91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48646" table:style-name="ce1">
            <text:p>524864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4 946, Length: 1 136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49402" table:style-name="ce1">
            <text:p>52494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6 08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50133" table:style-name="ce1">
            <text:p>525013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6 086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51098" table:style-name="ce1">
            <text:p>525109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6 118, Length: 1 146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51828" table:style-name="ce1">
            <text:p>52518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7 2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52563" table:style-name="ce1">
            <text:p>525256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7 268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53273" table:style-name="ce1">
            <text:p>52532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7 300, Length: 7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54039" table:style-name="ce1">
            <text:p>525403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8 02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54801" table:style-name="ce1">
            <text:p>525480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8 02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55514" table:style-name="ce1">
            <text:p>52555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8 056, Length: 1 01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56216" table:style-name="ce1">
            <text:p>525621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9 07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56967" table:style-name="ce1">
            <text:p>525696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9 078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57674" table:style-name="ce1">
            <text:p>525767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9 110, Length: 68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58423" table:style-name="ce1">
            <text:p>525842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9 79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59156" table:style-name="ce1">
            <text:p>525915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9 79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59860" table:style-name="ce1">
            <text:p>525986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9 826, Length: 657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60563" table:style-name="ce1">
            <text:p>526056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0 48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61292" table:style-name="ce1">
            <text:p>526129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0 487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61996" table:style-name="ce1">
            <text:p>526199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0 519, Length: 67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62707" table:style-name="ce1">
            <text:p>526270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1 19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63436" table:style-name="ce1">
            <text:p>526343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1 19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64141" table:style-name="ce1">
            <text:p>526414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1 226, Length: 929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64900" table:style-name="ce1">
            <text:p>526490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2 1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65687" table:style-name="ce1">
            <text:p>526568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2 159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66402" table:style-name="ce1">
            <text:p>52664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2 191, Length: 1 066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67141" table:style-name="ce1">
            <text:p>526714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3 25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67861" table:style-name="ce1">
            <text:p>526786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3 26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68710" table:style-name="ce1">
            <text:p>526871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3 293, Length: 1 12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69424" table:style-name="ce1">
            <text:p>526942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4 42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70184" table:style-name="ce1">
            <text:p>527018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4 42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71075" table:style-name="ce1">
            <text:p>52710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4 457, Length: 53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71810" table:style-name="ce1">
            <text:p>527181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4 98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72591" table:style-name="ce1">
            <text:p>52725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4 99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73514" table:style-name="ce1">
            <text:p>52735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5 023, Length: 556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74293" table:style-name="ce1">
            <text:p>52742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5 5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75073" table:style-name="ce1">
            <text:p>52750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5 583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75781" table:style-name="ce1">
            <text:p>527578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5 615, Length: 55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76481" table:style-name="ce1">
            <text:p>527648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6 17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77199" table:style-name="ce1">
            <text:p>52771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6 177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77899" table:style-name="ce1">
            <text:p>52778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6 209, Length: 57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78597" table:style-name="ce1">
            <text:p>527859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6 78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79317" table:style-name="ce1">
            <text:p>52793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6 787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80012" table:style-name="ce1">
            <text:p>528001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6 819, Length: 62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80760" table:style-name="ce1">
            <text:p>528076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7 4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81488" table:style-name="ce1">
            <text:p>52814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7 45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82187" table:style-name="ce1">
            <text:p>528218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7 483, Length: 64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82886" table:style-name="ce1">
            <text:p>528288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8 1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83641" table:style-name="ce1">
            <text:p>528364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8 13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84344" table:style-name="ce1">
            <text:p>528434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8 163, Length: 833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85044" table:style-name="ce1">
            <text:p>528504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8 9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85767" table:style-name="ce1">
            <text:p>528576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9 000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86469" table:style-name="ce1">
            <text:p>528646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9 032, Length: 1 317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87229" table:style-name="ce1">
            <text:p>52872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0 34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87999" table:style-name="ce1">
            <text:p>52879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0 353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88706" table:style-name="ce1">
            <text:p>52887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0 385, Length: 1 116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89448" table:style-name="ce1">
            <text:p>528944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1 50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90182" table:style-name="ce1">
            <text:p>529018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1 50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91062" table:style-name="ce1">
            <text:p>52910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1 537, Length: 1 329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91808" table:style-name="ce1">
            <text:p>529180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2 86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92577" table:style-name="ce1">
            <text:p>529257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2 870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93291" table:style-name="ce1">
            <text:p>52932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2 902, Length: 78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93993" table:style-name="ce1">
            <text:p>52939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3 69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94742" table:style-name="ce1">
            <text:p>529474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3 69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95451" table:style-name="ce1">
            <text:p>529545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3 726, Length: 1 08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96224" table:style-name="ce1">
            <text:p>529622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4 8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96987" table:style-name="ce1">
            <text:p>529698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4 81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297695" table:style-name="ce1">
            <text:p>529769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4 843, Length: 4 10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383045" table:style-name="ce1">
            <text:p>538304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8 94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383889" table:style-name="ce1">
            <text:p>538388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8 94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384675" table:style-name="ce1">
            <text:p>53846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8 953, Length: 1 02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385972" table:style-name="ce1">
            <text:p>538597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9 98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399601" table:style-name="ce1">
            <text:p>539960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9 98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00724" table:style-name="ce1">
            <text:p>540072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9 989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01552" table:style-name="ce1">
            <text:p>540155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0 021, Length: 26 30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04131" table:style-name="ce1">
            <text:p>540413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 32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05034" table:style-name="ce1">
            <text:p>540503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 329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05766" table:style-name="ce1">
            <text:p>540576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 361, Length: 5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06532" table:style-name="ce1">
            <text:p>54065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 4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07262" table:style-name="ce1">
            <text:p>54072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 423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07973" table:style-name="ce1">
            <text:p>54079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 455, Length: 31 18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10153" table:style-name="ce1">
            <text:p>541015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27 6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10986" table:style-name="ce1">
            <text:p>541098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27 647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11711" table:style-name="ce1">
            <text:p>541171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27 679, Length: 13 9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12619" table:style-name="ce1">
            <text:p>541261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41 5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13417" table:style-name="ce1">
            <text:p>54134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41 603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14127" table:style-name="ce1">
            <text:p>541412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41 635, Length: 13 9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15417" table:style-name="ce1">
            <text:p>54154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55 5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16195" table:style-name="ce1">
            <text:p>541619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55 559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16918" table:style-name="ce1">
            <text:p>541691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55 591, Length: 13 9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18736" table:style-name="ce1">
            <text:p>541873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69 5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19564" table:style-name="ce1">
            <text:p>541956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69 51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20288" table:style-name="ce1">
            <text:p>54202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69 547, Length: 13 9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21190" table:style-name="ce1">
            <text:p>542119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83 4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21957" table:style-name="ce1">
            <text:p>54219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83 47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22664" table:style-name="ce1">
            <text:p>542266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83 503, Length: 13 9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24700" table:style-name="ce1">
            <text:p>542470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97 4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25559" table:style-name="ce1">
            <text:p>542555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97 427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26301" table:style-name="ce1">
            <text:p>542630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197 459, Length: 13 9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28106" table:style-name="ce1">
            <text:p>54281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11 3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29013" table:style-name="ce1">
            <text:p>542901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11 383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29741" table:style-name="ce1">
            <text:p>542974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11 415, Length: 13 9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31556" table:style-name="ce1">
            <text:p>543155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25 3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32383" table:style-name="ce1">
            <text:p>543238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25 339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33102" table:style-name="ce1">
            <text:p>54331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25 371, Length: 13 9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35077" table:style-name="ce1">
            <text:p>543507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39 2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35923" table:style-name="ce1">
            <text:p>543592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39 29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36655" table:style-name="ce1">
            <text:p>543665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39 327, Length: 13 9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38615" table:style-name="ce1">
            <text:p>54386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53 2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39465" table:style-name="ce1">
            <text:p>54394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53 25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40237" table:style-name="ce1">
            <text:p>54402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53 283, Length: 4 40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41050" table:style-name="ce1">
            <text:p>544105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57 6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41818" table:style-name="ce1">
            <text:p>544181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57 69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42526" table:style-name="ce1">
            <text:p>54425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57 727, Length: 12 296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43514" table:style-name="ce1">
            <text:p>54435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70 0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44276" table:style-name="ce1">
            <text:p>544427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70 027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44991" table:style-name="ce1">
            <text:p>54449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70 059, Length: 12 296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45875" table:style-name="ce1">
            <text:p>54458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82 3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46632" table:style-name="ce1">
            <text:p>54466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82 359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47343" table:style-name="ce1">
            <text:p>544734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82 391, Length: 4 40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48147" table:style-name="ce1">
            <text:p>544814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86 7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48942" table:style-name="ce1">
            <text:p>544894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86 803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49658" table:style-name="ce1">
            <text:p>544965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286 835, Length: 13 9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50557" table:style-name="ce1">
            <text:p>54505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00 7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51314" table:style-name="ce1">
            <text:p>54513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00 759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52025" table:style-name="ce1">
            <text:p>545202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00 791, Length: 13 9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52951" table:style-name="ce1">
            <text:p>545295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14 7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53714" table:style-name="ce1">
            <text:p>54537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14 71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54426" table:style-name="ce1">
            <text:p>54544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14 747, Length: 13 9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55575" table:style-name="ce1">
            <text:p>54555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28 6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56352" table:style-name="ce1">
            <text:p>545635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28 67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57073" table:style-name="ce1">
            <text:p>54570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28 703, Length: 13 9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58336" table:style-name="ce1">
            <text:p>545833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42 6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59135" table:style-name="ce1">
            <text:p>545913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42 627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59859" table:style-name="ce1">
            <text:p>545985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42 659, Length: 13 9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60974" table:style-name="ce1">
            <text:p>546097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56 5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61754" table:style-name="ce1">
            <text:p>54617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56 583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62468" table:style-name="ce1">
            <text:p>546246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56 615, Length: 13 9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63368" table:style-name="ce1">
            <text:p>546336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70 5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64128" table:style-name="ce1">
            <text:p>54641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70 539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64886" table:style-name="ce1">
            <text:p>546488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70 571, Length: 13 9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65832" table:style-name="ce1">
            <text:p>54658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84 4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66603" table:style-name="ce1">
            <text:p>546660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84 49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67312" table:style-name="ce1">
            <text:p>546731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84 527, Length: 13 9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68227" table:style-name="ce1">
            <text:p>546822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98 4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69002" table:style-name="ce1">
            <text:p>54690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98 45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69723" table:style-name="ce1">
            <text:p>546972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398 483, Length: 13 9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70622" table:style-name="ce1">
            <text:p>547062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12 4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71376" table:style-name="ce1">
            <text:p>547137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12 407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72086" table:style-name="ce1">
            <text:p>547208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12 439, Length: 4 77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72906" table:style-name="ce1">
            <text:p>54729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17 20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73656" table:style-name="ce1">
            <text:p>547365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17 213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74366" table:style-name="ce1">
            <text:p>547436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17 245, Length: 5 20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75375" table:style-name="ce1">
            <text:p>54753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22 4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76146" table:style-name="ce1">
            <text:p>547614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22 45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76864" table:style-name="ce1">
            <text:p>547686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22 483, Length: 6 23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77660" table:style-name="ce1">
            <text:p>547766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28 71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78442" table:style-name="ce1">
            <text:p>547844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28 717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79157" table:style-name="ce1">
            <text:p>54791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28 749, Length: 24 7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80190" table:style-name="ce1">
            <text:p>548019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53 46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80947" table:style-name="ce1">
            <text:p>548094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53 473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81660" table:style-name="ce1">
            <text:p>548166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53 505, Length: 24 72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83935" table:style-name="ce1">
            <text:p>548393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78 22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84772" table:style-name="ce1">
            <text:p>548477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78 229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85491" table:style-name="ce1">
            <text:p>54854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78 261, Length: 11 34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86386" table:style-name="ce1">
            <text:p>548638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89 60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87143" table:style-name="ce1">
            <text:p>548714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89 60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87860" table:style-name="ce1">
            <text:p>548786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489 637, Length: 11 34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88742" table:style-name="ce1">
            <text:p>548874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00 97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89521" table:style-name="ce1">
            <text:p>548952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00 98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90238" table:style-name="ce1">
            <text:p>549023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01 013, Length: 21 06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91226" table:style-name="ce1">
            <text:p>54912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22 07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91989" table:style-name="ce1">
            <text:p>549198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22 077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92702" table:style-name="ce1">
            <text:p>54927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22 109, Length: 21 06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93763" table:style-name="ce1">
            <text:p>549376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43 16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94680" table:style-name="ce1">
            <text:p>549468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43 173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95608" table:style-name="ce1">
            <text:p>549560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43 205, Length: 32 76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96770" table:style-name="ce1">
            <text:p>549677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575 973, Length: 27 37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97969" table:style-name="ce1">
            <text:p>549796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03 3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98791" table:style-name="ce1">
            <text:p>54987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03 347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499503" table:style-name="ce1">
            <text:p>549950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03 379, Length: 32 76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00608" table:style-name="ce1">
            <text:p>550060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36 147, Length: 26 12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01661" table:style-name="ce1">
            <text:p>550166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62 26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02462" table:style-name="ce1">
            <text:p>55024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62 273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03179" table:style-name="ce1">
            <text:p>550317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62 305, Length: 13 53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04110" table:style-name="ce1">
            <text:p>550411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75 8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04873" table:style-name="ce1">
            <text:p>55048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75 839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05613" table:style-name="ce1">
            <text:p>550561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75 871, Length: 16 20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06535" table:style-name="ce1">
            <text:p>550653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92 0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07294" table:style-name="ce1">
            <text:p>550729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92 07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08009" table:style-name="ce1">
            <text:p>550800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692 107, Length: 16 20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08952" table:style-name="ce1">
            <text:p>550895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08 3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09718" table:style-name="ce1">
            <text:p>550971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08 31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10432" table:style-name="ce1">
            <text:p>55104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08 343, Length: 21 996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12594" table:style-name="ce1">
            <text:p>551259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30 33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13469" table:style-name="ce1">
            <text:p>551346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30 343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14201" table:style-name="ce1">
            <text:p>551420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30 375, Length: 11 28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15376" table:style-name="ce1">
            <text:p>551537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41 6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16278" table:style-name="ce1">
            <text:p>551627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41 667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16998" table:style-name="ce1">
            <text:p>551699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41 699, Length: 14 59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17894" table:style-name="ce1">
            <text:p>551789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56 2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18649" table:style-name="ce1">
            <text:p>551864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56 29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19353" table:style-name="ce1">
            <text:p>551935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56 327, Length: 6 14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20186" table:style-name="ce1">
            <text:p>552018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62 4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20940" table:style-name="ce1">
            <text:p>552094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62 47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21643" table:style-name="ce1">
            <text:p>552164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62 507, Length: 6 14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22439" table:style-name="ce1">
            <text:p>552243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68 65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23213" table:style-name="ce1">
            <text:p>552321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68 65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23925" table:style-name="ce1">
            <text:p>552392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68 687, Length: 6 14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24755" table:style-name="ce1">
            <text:p>552475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74 8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25520" table:style-name="ce1">
            <text:p>552552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74 83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26226" table:style-name="ce1">
            <text:p>55262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74 867, Length: 6 14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27013" table:style-name="ce1">
            <text:p>552701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81 0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27770" table:style-name="ce1">
            <text:p>552777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81 015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28478" table:style-name="ce1">
            <text:p>552847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81 047, Length: 8 466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29512" table:style-name="ce1">
            <text:p>552951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89 51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30293" table:style-name="ce1">
            <text:p>55302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89 517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31007" table:style-name="ce1">
            <text:p>553100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89 549, Length: 6 80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31844" table:style-name="ce1">
            <text:p>553184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96 35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32671" table:style-name="ce1">
            <text:p>553267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96 36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33430" table:style-name="ce1">
            <text:p>553343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796 393, Length: 9 75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34270" table:style-name="ce1">
            <text:p>553427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806 1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35025" table:style-name="ce1">
            <text:p>553502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806 147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37033" table:style-name="ce1">
            <text:p>553703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806 179, Length: 26 12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38155" table:style-name="ce1">
            <text:p>553815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832 3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38920" table:style-name="ce1">
            <text:p>553892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832 31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39630" table:style-name="ce1">
            <text:p>553963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832 343, Length: 32 76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42004" table:style-name="ce1">
            <text:p>554200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865 111, Length: 12 716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42999" table:style-name="ce1">
            <text:p>55429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877 8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43770" table:style-name="ce1">
            <text:p>554377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877 83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44489" table:style-name="ce1">
            <text:p>554448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877 863, Length: 32 76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46161" table:style-name="ce1">
            <text:p>554616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10 631, Length: 10 31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47103" table:style-name="ce1">
            <text:p>554710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20 94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47978" table:style-name="ce1">
            <text:p>554797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20 953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48735" table:style-name="ce1">
            <text:p>554873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20 985, Length: 16 36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49680" table:style-name="ce1">
            <text:p>554968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37 3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50463" table:style-name="ce1">
            <text:p>555046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37 35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551176" table:style-name="ce1">
            <text:p>555117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37 383, Length: 31 46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16882" table:style-name="ce1">
            <text:p>561688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8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17599" table:style-name="ce1">
            <text:p>56175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851, Length: 2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17999" table:style-name="ce1">
            <text:p>56179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8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18290" table:style-name="ce1">
            <text:p>561829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883, Length: 1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18587" table:style-name="ce1">
            <text:p>561858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89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18879" table:style-name="ce1">
            <text:p>561887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901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19190" table:style-name="ce1">
            <text:p>561919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93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19476" table:style-name="ce1">
            <text:p>561947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93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19760" table:style-name="ce1">
            <text:p>561976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94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0036" table:style-name="ce1">
            <text:p>562003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945, Length: 1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0322" table:style-name="ce1">
            <text:p>562032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9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0600" table:style-name="ce1">
            <text:p>562060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9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0875" table:style-name="ce1">
            <text:p>56208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9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1148" table:style-name="ce1">
            <text:p>562114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9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1426" table:style-name="ce1">
            <text:p>56214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9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1698" table:style-name="ce1">
            <text:p>562169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97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1972" table:style-name="ce1">
            <text:p>562197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9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2244" table:style-name="ce1">
            <text:p>562224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98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2516" table:style-name="ce1">
            <text:p>562251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98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2791" table:style-name="ce1">
            <text:p>56227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9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3061" table:style-name="ce1">
            <text:p>562306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99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3332" table:style-name="ce1">
            <text:p>56233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8 9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3602" table:style-name="ce1">
            <text:p>56236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4034" table:style-name="ce1">
            <text:p>562403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4657" table:style-name="ce1">
            <text:p>56246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4967" table:style-name="ce1">
            <text:p>562496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5248" table:style-name="ce1">
            <text:p>562524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5527" table:style-name="ce1">
            <text:p>562552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5804" table:style-name="ce1">
            <text:p>562580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6088" table:style-name="ce1">
            <text:p>56260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6360" table:style-name="ce1">
            <text:p>562636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6634" table:style-name="ce1">
            <text:p>562663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3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6906" table:style-name="ce1">
            <text:p>56269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7178" table:style-name="ce1">
            <text:p>562717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7451" table:style-name="ce1">
            <text:p>562745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5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7721" table:style-name="ce1">
            <text:p>562772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8206" table:style-name="ce1">
            <text:p>56282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8494" table:style-name="ce1">
            <text:p>562849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8771" table:style-name="ce1">
            <text:p>562877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9053" table:style-name="ce1">
            <text:p>562905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9327" table:style-name="ce1">
            <text:p>562932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7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9598" table:style-name="ce1">
            <text:p>562959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29869" table:style-name="ce1">
            <text:p>562986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8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0139" table:style-name="ce1">
            <text:p>563013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8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0412" table:style-name="ce1">
            <text:p>563041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0685" table:style-name="ce1">
            <text:p>563068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9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0957" table:style-name="ce1">
            <text:p>56309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0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1246" table:style-name="ce1">
            <text:p>563124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1839" table:style-name="ce1">
            <text:p>563183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2117" table:style-name="ce1">
            <text:p>56321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2390" table:style-name="ce1">
            <text:p>563239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2663" table:style-name="ce1">
            <text:p>563266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2936" table:style-name="ce1">
            <text:p>563293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3211" table:style-name="ce1">
            <text:p>563321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3487" table:style-name="ce1">
            <text:p>563348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3759" table:style-name="ce1">
            <text:p>563375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4037" table:style-name="ce1">
            <text:p>56340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3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4308" table:style-name="ce1">
            <text:p>563430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4581" table:style-name="ce1">
            <text:p>563458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4858" table:style-name="ce1">
            <text:p>563485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5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5132" table:style-name="ce1">
            <text:p>56351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5407" table:style-name="ce1">
            <text:p>563540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5680" table:style-name="ce1">
            <text:p>563568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5954" table:style-name="ce1">
            <text:p>56359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6224" table:style-name="ce1">
            <text:p>563622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6534" table:style-name="ce1">
            <text:p>563653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7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6807" table:style-name="ce1">
            <text:p>563680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7082" table:style-name="ce1">
            <text:p>563708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8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7352" table:style-name="ce1">
            <text:p>563735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8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7628" table:style-name="ce1">
            <text:p>56376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7900" table:style-name="ce1">
            <text:p>563790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9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8173" table:style-name="ce1">
            <text:p>56381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1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8443" table:style-name="ce1">
            <text:p>563844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8713" table:style-name="ce1">
            <text:p>563871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8988" table:style-name="ce1">
            <text:p>56389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9257" table:style-name="ce1">
            <text:p>56392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39528" table:style-name="ce1">
            <text:p>56395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0144" table:style-name="ce1">
            <text:p>564014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0422" table:style-name="ce1">
            <text:p>564042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0694" table:style-name="ce1">
            <text:p>564069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0966" table:style-name="ce1">
            <text:p>564096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1237" table:style-name="ce1">
            <text:p>56412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3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1508" table:style-name="ce1">
            <text:p>564150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1785" table:style-name="ce1">
            <text:p>564178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2058" table:style-name="ce1">
            <text:p>564205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5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2329" table:style-name="ce1">
            <text:p>56423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2600" table:style-name="ce1">
            <text:p>564260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2872" table:style-name="ce1">
            <text:p>564287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3143" table:style-name="ce1">
            <text:p>564314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3413" table:style-name="ce1">
            <text:p>564341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3682" table:style-name="ce1">
            <text:p>564368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7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3955" table:style-name="ce1">
            <text:p>564395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4229" table:style-name="ce1">
            <text:p>56442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8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4500" table:style-name="ce1">
            <text:p>564450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8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4770" table:style-name="ce1">
            <text:p>564477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5041" table:style-name="ce1">
            <text:p>564504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9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5310" table:style-name="ce1">
            <text:p>564531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2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5580" table:style-name="ce1">
            <text:p>564558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3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5852" table:style-name="ce1">
            <text:p>564585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3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6123" table:style-name="ce1">
            <text:p>564612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3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6396" table:style-name="ce1">
            <text:p>564639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3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6670" table:style-name="ce1">
            <text:p>564667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3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6995" table:style-name="ce1">
            <text:p>564699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323, Length: 55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7277" table:style-name="ce1">
            <text:p>564727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87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7712" table:style-name="ce1">
            <text:p>564771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87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8136" table:style-name="ce1">
            <text:p>564813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88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8428" table:style-name="ce1">
            <text:p>56484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88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8811" table:style-name="ce1">
            <text:p>564881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88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9181" table:style-name="ce1">
            <text:p>564918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89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9462" table:style-name="ce1">
            <text:p>56494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89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49743" table:style-name="ce1">
            <text:p>564974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90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50031" table:style-name="ce1">
            <text:p>565003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90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650310" table:style-name="ce1">
            <text:p>565031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909, Length: 36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41318" table:style-name="ce1">
            <text:p>574131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94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41939" table:style-name="ce1">
            <text:p>574193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94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42557" table:style-name="ce1">
            <text:p>57425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95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42855" table:style-name="ce1">
            <text:p>574285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957, Length: 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64792" table:style-name="ce1">
            <text:p>576479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96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65243" table:style-name="ce1">
            <text:p>576524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96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65537" table:style-name="ce1">
            <text:p>57655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973, Length: 3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65876" table:style-name="ce1">
            <text:p>576587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97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66151" table:style-name="ce1">
            <text:p>576615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98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66428" table:style-name="ce1">
            <text:p>57664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9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66699" table:style-name="ce1">
            <text:p>57666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9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66970" table:style-name="ce1">
            <text:p>576697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9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67243" table:style-name="ce1">
            <text:p>576724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69 9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67527" table:style-name="ce1">
            <text:p>576752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0 00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67803" table:style-name="ce1">
            <text:p>576780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0 00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68073" table:style-name="ce1">
            <text:p>57680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0 00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68345" table:style-name="ce1">
            <text:p>576834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0 01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68857" table:style-name="ce1">
            <text:p>57688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0 016, Length: 1 02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1334" table:style-name="ce1">
            <text:p>577133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04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1728" table:style-name="ce1">
            <text:p>57717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04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2154" table:style-name="ce1">
            <text:p>57721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0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2444" table:style-name="ce1">
            <text:p>577244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0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2720" table:style-name="ce1">
            <text:p>577272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05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2997" table:style-name="ce1">
            <text:p>577299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06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3271" table:style-name="ce1">
            <text:p>577327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0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3564" table:style-name="ce1">
            <text:p>577356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068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3840" table:style-name="ce1">
            <text:p>577384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069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4193" table:style-name="ce1">
            <text:p>57741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07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4491" table:style-name="ce1">
            <text:p>57744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07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4800" table:style-name="ce1">
            <text:p>577480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07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5074" table:style-name="ce1">
            <text:p>577507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08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5351" table:style-name="ce1">
            <text:p>577535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08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5660" table:style-name="ce1">
            <text:p>577566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09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5946" table:style-name="ce1">
            <text:p>577594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09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6219" table:style-name="ce1">
            <text:p>577621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09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6490" table:style-name="ce1">
            <text:p>577649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0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6771" table:style-name="ce1">
            <text:p>577677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0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7053" table:style-name="ce1">
            <text:p>577705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1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7349" table:style-name="ce1">
            <text:p>577734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1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7629" table:style-name="ce1">
            <text:p>57776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18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77902" table:style-name="ce1">
            <text:p>57779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0287" table:style-name="ce1">
            <text:p>578028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0693" table:style-name="ce1">
            <text:p>57806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1081" table:style-name="ce1">
            <text:p>578108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1373" table:style-name="ce1">
            <text:p>57813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1645" table:style-name="ce1">
            <text:p>578164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3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1923" table:style-name="ce1">
            <text:p>578192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43, Length: 8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2222" table:style-name="ce1">
            <text:p>578222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5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2498" table:style-name="ce1">
            <text:p>578249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2772" table:style-name="ce1">
            <text:p>578277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3043" table:style-name="ce1">
            <text:p>578304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3313" table:style-name="ce1">
            <text:p>578331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3588" table:style-name="ce1">
            <text:p>57835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3870" table:style-name="ce1">
            <text:p>578387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7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4205" table:style-name="ce1">
            <text:p>578420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79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4484" table:style-name="ce1">
            <text:p>578448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8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4761" table:style-name="ce1">
            <text:p>578476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5054" table:style-name="ce1">
            <text:p>57850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5367" table:style-name="ce1">
            <text:p>578536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5652" table:style-name="ce1">
            <text:p>578565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1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5932" table:style-name="ce1">
            <text:p>57859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0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6210" table:style-name="ce1">
            <text:p>578621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04, Length: 1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6500" table:style-name="ce1">
            <text:p>578650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1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6774" table:style-name="ce1">
            <text:p>578677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1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7045" table:style-name="ce1">
            <text:p>578704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2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7319" table:style-name="ce1">
            <text:p>578731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2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7593" table:style-name="ce1">
            <text:p>57875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3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7871" table:style-name="ce1">
            <text:p>578787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3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8150" table:style-name="ce1">
            <text:p>578815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3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8426" table:style-name="ce1">
            <text:p>57884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42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8869" table:style-name="ce1">
            <text:p>578886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9161" table:style-name="ce1">
            <text:p>578916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89452" table:style-name="ce1">
            <text:p>578945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5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96884" table:style-name="ce1">
            <text:p>579688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97523" table:style-name="ce1">
            <text:p>579752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97814" table:style-name="ce1">
            <text:p>57978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98099" table:style-name="ce1">
            <text:p>57980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67, Length: 1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98429" table:style-name="ce1">
            <text:p>57984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7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98706" table:style-name="ce1">
            <text:p>57987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8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98999" table:style-name="ce1">
            <text:p>57989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8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99274" table:style-name="ce1">
            <text:p>579927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8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99550" table:style-name="ce1">
            <text:p>579955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9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799839" table:style-name="ce1">
            <text:p>579983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29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0139" table:style-name="ce1">
            <text:p>580013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0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0432" table:style-name="ce1">
            <text:p>58004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05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0706" table:style-name="ce1">
            <text:p>58007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0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0979" table:style-name="ce1">
            <text:p>580097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1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1260" table:style-name="ce1">
            <text:p>580126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1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1577" table:style-name="ce1">
            <text:p>580157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1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1864" table:style-name="ce1">
            <text:p>580186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2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2140" table:style-name="ce1">
            <text:p>580214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2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2420" table:style-name="ce1">
            <text:p>580242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30, Length: 1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2739" table:style-name="ce1">
            <text:p>580273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4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3015" table:style-name="ce1">
            <text:p>58030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4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3288" table:style-name="ce1">
            <text:p>58032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3561" table:style-name="ce1">
            <text:p>580356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3836" table:style-name="ce1">
            <text:p>580383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5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4115" table:style-name="ce1">
            <text:p>58041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6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4396" table:style-name="ce1">
            <text:p>580439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4675" table:style-name="ce1">
            <text:p>58046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68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4949" table:style-name="ce1">
            <text:p>580494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6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5226" table:style-name="ce1">
            <text:p>58052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7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05501" table:style-name="ce1">
            <text:p>580550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7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15444" table:style-name="ce1">
            <text:p>581544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8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16175" table:style-name="ce1">
            <text:p>58161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8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16472" table:style-name="ce1">
            <text:p>581647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8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16757" table:style-name="ce1">
            <text:p>58167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393, Length: 1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17105" table:style-name="ce1">
            <text:p>581710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17385" table:style-name="ce1">
            <text:p>581738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17662" table:style-name="ce1">
            <text:p>58176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17936" table:style-name="ce1">
            <text:p>581793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18210" table:style-name="ce1">
            <text:p>581821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18502" table:style-name="ce1">
            <text:p>58185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18792" table:style-name="ce1">
            <text:p>581879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19083" table:style-name="ce1">
            <text:p>581908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31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19357" table:style-name="ce1">
            <text:p>58193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3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19632" table:style-name="ce1">
            <text:p>58196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3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19914" table:style-name="ce1">
            <text:p>58199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4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0228" table:style-name="ce1">
            <text:p>58202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4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0512" table:style-name="ce1">
            <text:p>582051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0792" table:style-name="ce1">
            <text:p>582079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1071" table:style-name="ce1">
            <text:p>582107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56, Length: 1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1364" table:style-name="ce1">
            <text:p>582136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6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1640" table:style-name="ce1">
            <text:p>582164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7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1916" table:style-name="ce1">
            <text:p>582191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7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2193" table:style-name="ce1">
            <text:p>58221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7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2465" table:style-name="ce1">
            <text:p>58224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8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2741" table:style-name="ce1">
            <text:p>582274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8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3021" table:style-name="ce1">
            <text:p>582302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9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3318" table:style-name="ce1">
            <text:p>582331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94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3591" table:style-name="ce1">
            <text:p>58235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9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3862" table:style-name="ce1">
            <text:p>58238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4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4136" table:style-name="ce1">
            <text:p>582413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8075" table:style-name="ce1">
            <text:p>58280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8589" table:style-name="ce1">
            <text:p>582858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8880" table:style-name="ce1">
            <text:p>582888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9396" table:style-name="ce1">
            <text:p>582939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19, Length: 1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29724" table:style-name="ce1">
            <text:p>582972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2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0162" table:style-name="ce1">
            <text:p>58301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3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0437" table:style-name="ce1">
            <text:p>58304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3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0726" table:style-name="ce1">
            <text:p>58307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4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1000" table:style-name="ce1">
            <text:p>583100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4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1285" table:style-name="ce1">
            <text:p>583128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4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1569" table:style-name="ce1">
            <text:p>583156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5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1847" table:style-name="ce1">
            <text:p>583184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57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2122" table:style-name="ce1">
            <text:p>583212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5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2394" table:style-name="ce1">
            <text:p>583239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6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2669" table:style-name="ce1">
            <text:p>583266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6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2971" table:style-name="ce1">
            <text:p>583297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7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3252" table:style-name="ce1">
            <text:p>583325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7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3529" table:style-name="ce1">
            <text:p>58335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7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3805" table:style-name="ce1">
            <text:p>583380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82, Length: 1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4094" table:style-name="ce1">
            <text:p>583409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4369" table:style-name="ce1">
            <text:p>583436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5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4641" table:style-name="ce1">
            <text:p>583464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0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4913" table:style-name="ce1">
            <text:p>583491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0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5185" table:style-name="ce1">
            <text:p>583518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0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5463" table:style-name="ce1">
            <text:p>583546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1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5753" table:style-name="ce1">
            <text:p>583575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6029" table:style-name="ce1">
            <text:p>58360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20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6304" table:style-name="ce1">
            <text:p>583630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2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6583" table:style-name="ce1">
            <text:p>583658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2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36863" table:style-name="ce1">
            <text:p>583686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2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0838" table:style-name="ce1">
            <text:p>584083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3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1348" table:style-name="ce1">
            <text:p>584134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3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1635" table:style-name="ce1">
            <text:p>584163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4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1918" table:style-name="ce1">
            <text:p>584191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45, Length: 10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2228" table:style-name="ce1">
            <text:p>58422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2503" table:style-name="ce1">
            <text:p>584250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2775" table:style-name="ce1">
            <text:p>58427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3049" table:style-name="ce1">
            <text:p>584304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3322" table:style-name="ce1">
            <text:p>584332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3604" table:style-name="ce1">
            <text:p>584360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7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3888" table:style-name="ce1">
            <text:p>58438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4169" table:style-name="ce1">
            <text:p>584416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83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4442" table:style-name="ce1">
            <text:p>584444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4713" table:style-name="ce1">
            <text:p>584471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4988" table:style-name="ce1">
            <text:p>58449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5285" table:style-name="ce1">
            <text:p>584528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6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5577" table:style-name="ce1">
            <text:p>584557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0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5857" table:style-name="ce1">
            <text:p>58458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0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6136" table:style-name="ce1">
            <text:p>584613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08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6453" table:style-name="ce1">
            <text:p>584645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6730" table:style-name="ce1">
            <text:p>584673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7006" table:style-name="ce1">
            <text:p>58470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7278" table:style-name="ce1">
            <text:p>584727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7549" table:style-name="ce1">
            <text:p>584754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7828" table:style-name="ce1">
            <text:p>58478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3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8117" table:style-name="ce1">
            <text:p>58481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8393" table:style-name="ce1">
            <text:p>58483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47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8665" table:style-name="ce1">
            <text:p>58486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8940" table:style-name="ce1">
            <text:p>584894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49403" table:style-name="ce1">
            <text:p>584940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5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3161" table:style-name="ce1">
            <text:p>585316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6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3665" table:style-name="ce1">
            <text:p>58536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3950" table:style-name="ce1">
            <text:p>585395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6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4228" table:style-name="ce1">
            <text:p>58542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72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4535" table:style-name="ce1">
            <text:p>585453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8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4813" table:style-name="ce1">
            <text:p>585481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8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5088" table:style-name="ce1">
            <text:p>58550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5362" table:style-name="ce1">
            <text:p>58553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9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5634" table:style-name="ce1">
            <text:p>585563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7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5917" table:style-name="ce1">
            <text:p>58559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6199" table:style-name="ce1">
            <text:p>58561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6481" table:style-name="ce1">
            <text:p>585648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11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6754" table:style-name="ce1">
            <text:p>58567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1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7031" table:style-name="ce1">
            <text:p>585703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7306" table:style-name="ce1">
            <text:p>58573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2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7603" table:style-name="ce1">
            <text:p>585760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2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7885" table:style-name="ce1">
            <text:p>585788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2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8160" table:style-name="ce1">
            <text:p>585816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3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8437" table:style-name="ce1">
            <text:p>58584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36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8723" table:style-name="ce1">
            <text:p>585872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8994" table:style-name="ce1">
            <text:p>585899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5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9269" table:style-name="ce1">
            <text:p>585926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9542" table:style-name="ce1">
            <text:p>585954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59815" table:style-name="ce1">
            <text:p>58598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60090" table:style-name="ce1">
            <text:p>586009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60370" table:style-name="ce1">
            <text:p>586037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60647" table:style-name="ce1">
            <text:p>586064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75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60920" table:style-name="ce1">
            <text:p>586092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7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61198" table:style-name="ce1">
            <text:p>586119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8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61609" table:style-name="ce1">
            <text:p>586160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66983" table:style-name="ce1">
            <text:p>586698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67888" table:style-name="ce1">
            <text:p>58678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68212" table:style-name="ce1">
            <text:p>586821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8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68502" table:style-name="ce1">
            <text:p>58685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00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68836" table:style-name="ce1">
            <text:p>586883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69116" table:style-name="ce1">
            <text:p>586911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69617" table:style-name="ce1">
            <text:p>58696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69909" table:style-name="ce1">
            <text:p>586990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0183" table:style-name="ce1">
            <text:p>587018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0480" table:style-name="ce1">
            <text:p>587048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0772" table:style-name="ce1">
            <text:p>587077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1070" table:style-name="ce1">
            <text:p>587107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39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1353" table:style-name="ce1">
            <text:p>587135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4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1627" table:style-name="ce1">
            <text:p>587162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4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2295" table:style-name="ce1">
            <text:p>587229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2624" table:style-name="ce1">
            <text:p>587262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2908" table:style-name="ce1">
            <text:p>587290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5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3181" table:style-name="ce1">
            <text:p>587318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6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3459" table:style-name="ce1">
            <text:p>587345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64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3747" table:style-name="ce1">
            <text:p>587374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7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4023" table:style-name="ce1">
            <text:p>587402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4295" table:style-name="ce1">
            <text:p>587429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8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4565" table:style-name="ce1">
            <text:p>58745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8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4837" table:style-name="ce1">
            <text:p>58748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5113" table:style-name="ce1">
            <text:p>587511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9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5393" table:style-name="ce1">
            <text:p>58753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1 9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5673" table:style-name="ce1">
            <text:p>58756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03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5945" table:style-name="ce1">
            <text:p>587594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0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6220" table:style-name="ce1">
            <text:p>587622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0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76494" table:style-name="ce1">
            <text:p>587649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1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0766" table:style-name="ce1">
            <text:p>588076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1274" table:style-name="ce1">
            <text:p>588127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2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1562" table:style-name="ce1">
            <text:p>58815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2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1845" table:style-name="ce1">
            <text:p>588184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28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2176" table:style-name="ce1">
            <text:p>588217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3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2454" table:style-name="ce1">
            <text:p>58824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2728" table:style-name="ce1">
            <text:p>58827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3002" table:style-name="ce1">
            <text:p>58830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5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3275" table:style-name="ce1">
            <text:p>58832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3560" table:style-name="ce1">
            <text:p>588356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3848" table:style-name="ce1">
            <text:p>588384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4133" table:style-name="ce1">
            <text:p>588413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67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4406" table:style-name="ce1">
            <text:p>58844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6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4678" table:style-name="ce1">
            <text:p>588467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7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4951" table:style-name="ce1">
            <text:p>588495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7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5254" table:style-name="ce1">
            <text:p>58852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8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5538" table:style-name="ce1">
            <text:p>588553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5815" table:style-name="ce1">
            <text:p>58858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6091" table:style-name="ce1">
            <text:p>58860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092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6379" table:style-name="ce1">
            <text:p>588637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6651" table:style-name="ce1">
            <text:p>588665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6925" table:style-name="ce1">
            <text:p>588692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7197" table:style-name="ce1">
            <text:p>588719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7469" table:style-name="ce1">
            <text:p>588746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7744" table:style-name="ce1">
            <text:p>588774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8022" table:style-name="ce1">
            <text:p>588802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8300" table:style-name="ce1">
            <text:p>588830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31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8574" table:style-name="ce1">
            <text:p>588857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3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8856" table:style-name="ce1">
            <text:p>588885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3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89130" table:style-name="ce1">
            <text:p>588913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4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3232" table:style-name="ce1">
            <text:p>58932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4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3751" table:style-name="ce1">
            <text:p>589375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4045" table:style-name="ce1">
            <text:p>589404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4328" table:style-name="ce1">
            <text:p>58943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56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4639" table:style-name="ce1">
            <text:p>589463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4915" table:style-name="ce1">
            <text:p>58949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5196" table:style-name="ce1">
            <text:p>589519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7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5471" table:style-name="ce1">
            <text:p>589547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5743" table:style-name="ce1">
            <text:p>589574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8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6028" table:style-name="ce1">
            <text:p>58960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8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6314" table:style-name="ce1">
            <text:p>58963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6604" table:style-name="ce1">
            <text:p>589660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95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6876" table:style-name="ce1">
            <text:p>589687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1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7152" table:style-name="ce1">
            <text:p>589715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0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7429" table:style-name="ce1">
            <text:p>58974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0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7734" table:style-name="ce1">
            <text:p>589773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0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8020" table:style-name="ce1">
            <text:p>589802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1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8294" table:style-name="ce1">
            <text:p>589829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8572" table:style-name="ce1">
            <text:p>589857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20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8861" table:style-name="ce1">
            <text:p>589886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9135" table:style-name="ce1">
            <text:p>589913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9407" table:style-name="ce1">
            <text:p>589940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3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899866" table:style-name="ce1">
            <text:p>589986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0146" table:style-name="ce1">
            <text:p>590014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0437" table:style-name="ce1">
            <text:p>59004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5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0719" table:style-name="ce1">
            <text:p>590071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1000" table:style-name="ce1">
            <text:p>590100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59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1272" table:style-name="ce1">
            <text:p>590127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6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1543" table:style-name="ce1">
            <text:p>590154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1819" table:style-name="ce1">
            <text:p>590181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6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2115" table:style-name="ce1">
            <text:p>59021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7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2397" table:style-name="ce1">
            <text:p>590239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7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2671" table:style-name="ce1">
            <text:p>590267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8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2948" table:style-name="ce1">
            <text:p>590294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84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3254" table:style-name="ce1">
            <text:p>59032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9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3530" table:style-name="ce1">
            <text:p>590353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2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3806" table:style-name="ce1">
            <text:p>59038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4089" table:style-name="ce1">
            <text:p>590408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4360" table:style-name="ce1">
            <text:p>590436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4656" table:style-name="ce1">
            <text:p>590465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4937" table:style-name="ce1">
            <text:p>59049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5214" table:style-name="ce1">
            <text:p>59052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23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5487" table:style-name="ce1">
            <text:p>590548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2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5762" table:style-name="ce1">
            <text:p>59057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2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06036" table:style-name="ce1">
            <text:p>590603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3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0128" table:style-name="ce1">
            <text:p>59101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3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0642" table:style-name="ce1">
            <text:p>591064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4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0929" table:style-name="ce1">
            <text:p>59109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4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1214" table:style-name="ce1">
            <text:p>59112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48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1524" table:style-name="ce1">
            <text:p>591152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1801" table:style-name="ce1">
            <text:p>591180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2076" table:style-name="ce1">
            <text:p>591207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2350" table:style-name="ce1">
            <text:p>591235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2633" table:style-name="ce1">
            <text:p>591263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7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2917" table:style-name="ce1">
            <text:p>59129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3205" table:style-name="ce1">
            <text:p>591320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8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3491" table:style-name="ce1">
            <text:p>59134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87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3766" table:style-name="ce1">
            <text:p>591376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4040" table:style-name="ce1">
            <text:p>591404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4313" table:style-name="ce1">
            <text:p>591431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3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4655" table:style-name="ce1">
            <text:p>591465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0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4940" table:style-name="ce1">
            <text:p>591494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0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5216" table:style-name="ce1">
            <text:p>591521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0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5491" table:style-name="ce1">
            <text:p>59154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12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5778" table:style-name="ce1">
            <text:p>591577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6051" table:style-name="ce1">
            <text:p>591605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6326" table:style-name="ce1">
            <text:p>59163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6598" table:style-name="ce1">
            <text:p>591659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6875" table:style-name="ce1">
            <text:p>59168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3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7150" table:style-name="ce1">
            <text:p>591715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7429" table:style-name="ce1">
            <text:p>59174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7705" table:style-name="ce1">
            <text:p>591770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51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7978" table:style-name="ce1">
            <text:p>591797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8250" table:style-name="ce1">
            <text:p>591825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5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18526" table:style-name="ce1">
            <text:p>59185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6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2256" table:style-name="ce1">
            <text:p>592225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2758" table:style-name="ce1">
            <text:p>592275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6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3045" table:style-name="ce1">
            <text:p>592304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7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3328" table:style-name="ce1">
            <text:p>59233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76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3637" table:style-name="ce1">
            <text:p>59236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8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3913" table:style-name="ce1">
            <text:p>592391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4184" table:style-name="ce1">
            <text:p>592418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9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4458" table:style-name="ce1">
            <text:p>592445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4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4731" table:style-name="ce1">
            <text:p>592473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5015" table:style-name="ce1">
            <text:p>59250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5299" table:style-name="ce1">
            <text:p>59252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5582" table:style-name="ce1">
            <text:p>592558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15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5853" table:style-name="ce1">
            <text:p>592585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6126" table:style-name="ce1">
            <text:p>59261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2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6402" table:style-name="ce1">
            <text:p>59264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2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6700" table:style-name="ce1">
            <text:p>592670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2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6984" table:style-name="ce1">
            <text:p>592698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3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7261" table:style-name="ce1">
            <text:p>592726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3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7541" table:style-name="ce1">
            <text:p>592754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40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7846" table:style-name="ce1">
            <text:p>592784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5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8120" table:style-name="ce1">
            <text:p>592812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8391" table:style-name="ce1">
            <text:p>59283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8665" table:style-name="ce1">
            <text:p>59286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8938" table:style-name="ce1">
            <text:p>592893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9220" table:style-name="ce1">
            <text:p>592922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9501" table:style-name="ce1">
            <text:p>592950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7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29963" table:style-name="ce1">
            <text:p>592996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79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0254" table:style-name="ce1">
            <text:p>59302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8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0533" table:style-name="ce1">
            <text:p>593053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0810" table:style-name="ce1">
            <text:p>593081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4709" table:style-name="ce1">
            <text:p>593470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5231" table:style-name="ce1">
            <text:p>593523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5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5528" table:style-name="ce1">
            <text:p>59355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0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5814" table:style-name="ce1">
            <text:p>59358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04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6171" table:style-name="ce1">
            <text:p>593617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6450" table:style-name="ce1">
            <text:p>593645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6726" table:style-name="ce1">
            <text:p>59367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7002" table:style-name="ce1">
            <text:p>59370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7276" table:style-name="ce1">
            <text:p>593727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7558" table:style-name="ce1">
            <text:p>593755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7846" table:style-name="ce1">
            <text:p>593784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3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8125" table:style-name="ce1">
            <text:p>593812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43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8400" table:style-name="ce1">
            <text:p>593840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4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8675" table:style-name="ce1">
            <text:p>59386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8951" table:style-name="ce1">
            <text:p>593895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9300" table:style-name="ce1">
            <text:p>593930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5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9582" table:style-name="ce1">
            <text:p>593958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6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39856" table:style-name="ce1">
            <text:p>593985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0134" table:style-name="ce1">
            <text:p>594013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68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0427" table:style-name="ce1">
            <text:p>594042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0701" table:style-name="ce1">
            <text:p>594070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8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0973" table:style-name="ce1">
            <text:p>59409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8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1245" table:style-name="ce1">
            <text:p>594124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1517" table:style-name="ce1">
            <text:p>59415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9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1793" table:style-name="ce1">
            <text:p>59417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6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2073" table:style-name="ce1">
            <text:p>59420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2347" table:style-name="ce1">
            <text:p>594234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07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2618" table:style-name="ce1">
            <text:p>594261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0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2891" table:style-name="ce1">
            <text:p>59428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1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3166" table:style-name="ce1">
            <text:p>594316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6928" table:style-name="ce1">
            <text:p>59469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2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7426" table:style-name="ce1">
            <text:p>59474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2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7714" table:style-name="ce1">
            <text:p>59477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2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7994" table:style-name="ce1">
            <text:p>594799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32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8317" table:style-name="ce1">
            <text:p>59483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8593" table:style-name="ce1">
            <text:p>59485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8864" table:style-name="ce1">
            <text:p>594886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5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9136" table:style-name="ce1">
            <text:p>594913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9407" table:style-name="ce1">
            <text:p>594940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49688" table:style-name="ce1">
            <text:p>59496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0178" table:style-name="ce1">
            <text:p>595017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0465" table:style-name="ce1">
            <text:p>59504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71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0739" table:style-name="ce1">
            <text:p>595073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7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1011" table:style-name="ce1">
            <text:p>595101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7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1287" table:style-name="ce1">
            <text:p>595128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8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1587" table:style-name="ce1">
            <text:p>595158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1871" table:style-name="ce1">
            <text:p>595187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2145" table:style-name="ce1">
            <text:p>595214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2427" table:style-name="ce1">
            <text:p>595242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796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2723" table:style-name="ce1">
            <text:p>595272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2996" table:style-name="ce1">
            <text:p>595299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3268" table:style-name="ce1">
            <text:p>595326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3544" table:style-name="ce1">
            <text:p>595354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3814" table:style-name="ce1">
            <text:p>59538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4092" table:style-name="ce1">
            <text:p>595409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4374" table:style-name="ce1">
            <text:p>595437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4654" table:style-name="ce1">
            <text:p>59546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35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4927" table:style-name="ce1">
            <text:p>595492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3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5198" table:style-name="ce1">
            <text:p>595519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4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5473" table:style-name="ce1">
            <text:p>59554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4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9223" table:style-name="ce1">
            <text:p>595922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59726" table:style-name="ce1">
            <text:p>59597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0011" table:style-name="ce1">
            <text:p>596001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5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0296" table:style-name="ce1">
            <text:p>596029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60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0604" table:style-name="ce1">
            <text:p>596060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0878" table:style-name="ce1">
            <text:p>596087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7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1150" table:style-name="ce1">
            <text:p>596115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1421" table:style-name="ce1">
            <text:p>596142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8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1691" table:style-name="ce1">
            <text:p>59616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8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1973" table:style-name="ce1">
            <text:p>59619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2255" table:style-name="ce1">
            <text:p>596225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9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2538" table:style-name="ce1">
            <text:p>596253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899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2811" table:style-name="ce1">
            <text:p>596281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0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3084" table:style-name="ce1">
            <text:p>596308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0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3358" table:style-name="ce1">
            <text:p>596335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0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3699" table:style-name="ce1">
            <text:p>59636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1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3979" table:style-name="ce1">
            <text:p>596397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4251" table:style-name="ce1">
            <text:p>596425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2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4528" table:style-name="ce1">
            <text:p>59645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24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4837" table:style-name="ce1">
            <text:p>59648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5111" table:style-name="ce1">
            <text:p>596511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3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5383" table:style-name="ce1">
            <text:p>596538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5808" table:style-name="ce1">
            <text:p>596580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6086" table:style-name="ce1">
            <text:p>596608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5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6373" table:style-name="ce1">
            <text:p>59663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6654" table:style-name="ce1">
            <text:p>59666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6931" table:style-name="ce1">
            <text:p>596693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63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7205" table:style-name="ce1">
            <text:p>596720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7480" table:style-name="ce1">
            <text:p>596748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6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67755" table:style-name="ce1">
            <text:p>596775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7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1907" table:style-name="ce1">
            <text:p>597190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7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2422" table:style-name="ce1">
            <text:p>597242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8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2712" table:style-name="ce1">
            <text:p>597271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2989" table:style-name="ce1">
            <text:p>597298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88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3297" table:style-name="ce1">
            <text:p>597329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2 9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3584" table:style-name="ce1">
            <text:p>597358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3858" table:style-name="ce1">
            <text:p>597385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4129" table:style-name="ce1">
            <text:p>59741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4399" table:style-name="ce1">
            <text:p>59743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4686" table:style-name="ce1">
            <text:p>597468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4969" table:style-name="ce1">
            <text:p>597496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5253" table:style-name="ce1">
            <text:p>597525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27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5526" table:style-name="ce1">
            <text:p>59755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2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5805" table:style-name="ce1">
            <text:p>597580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3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6083" table:style-name="ce1">
            <text:p>597608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3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6383" table:style-name="ce1">
            <text:p>597638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4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6665" table:style-name="ce1">
            <text:p>59766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4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6940" table:style-name="ce1">
            <text:p>597694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7217" table:style-name="ce1">
            <text:p>59772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52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7518" table:style-name="ce1">
            <text:p>597751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7793" table:style-name="ce1">
            <text:p>59777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8068" table:style-name="ce1">
            <text:p>597806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8340" table:style-name="ce1">
            <text:p>597834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7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8612" table:style-name="ce1">
            <text:p>597861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8889" table:style-name="ce1">
            <text:p>597888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8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9169" table:style-name="ce1">
            <text:p>597916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8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9450" table:style-name="ce1">
            <text:p>597945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91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9725" table:style-name="ce1">
            <text:p>597972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79997" table:style-name="ce1">
            <text:p>597999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0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80276" table:style-name="ce1">
            <text:p>598027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0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84040" table:style-name="ce1">
            <text:p>598404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0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84544" table:style-name="ce1">
            <text:p>598454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0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84830" table:style-name="ce1">
            <text:p>598483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1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85110" table:style-name="ce1">
            <text:p>598511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16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85417" table:style-name="ce1">
            <text:p>59854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85915" table:style-name="ce1">
            <text:p>59859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86191" table:style-name="ce1">
            <text:p>59861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88530" table:style-name="ce1">
            <text:p>598853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3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88876" table:style-name="ce1">
            <text:p>598887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89168" table:style-name="ce1">
            <text:p>598916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89461" table:style-name="ce1">
            <text:p>598946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5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89743" table:style-name="ce1">
            <text:p>598974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55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0017" table:style-name="ce1">
            <text:p>59900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5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0451" table:style-name="ce1">
            <text:p>599045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6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0734" table:style-name="ce1">
            <text:p>599073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1102" table:style-name="ce1">
            <text:p>59911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6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1393" table:style-name="ce1">
            <text:p>59913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7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1667" table:style-name="ce1">
            <text:p>599166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7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1944" table:style-name="ce1">
            <text:p>599194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80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2290" table:style-name="ce1">
            <text:p>599229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2564" table:style-name="ce1">
            <text:p>599256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9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2839" table:style-name="ce1">
            <text:p>599283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1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3111" table:style-name="ce1">
            <text:p>599311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3383" table:style-name="ce1">
            <text:p>599338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3660" table:style-name="ce1">
            <text:p>599366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3961" table:style-name="ce1">
            <text:p>599396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4261" table:style-name="ce1">
            <text:p>599426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19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4536" table:style-name="ce1">
            <text:p>599453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2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4810" table:style-name="ce1">
            <text:p>599481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2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5088" table:style-name="ce1">
            <text:p>59950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2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5999844" table:style-name="ce1">
            <text:p>599984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3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0373" table:style-name="ce1">
            <text:p>60003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3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0663" table:style-name="ce1">
            <text:p>600066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4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0958" table:style-name="ce1">
            <text:p>600095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44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1268" table:style-name="ce1">
            <text:p>600126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1544" table:style-name="ce1">
            <text:p>600154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1816" table:style-name="ce1">
            <text:p>600181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2088" table:style-name="ce1">
            <text:p>60020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2358" table:style-name="ce1">
            <text:p>600235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2640" table:style-name="ce1">
            <text:p>600264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7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2925" table:style-name="ce1">
            <text:p>600292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3204" table:style-name="ce1">
            <text:p>600320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83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3477" table:style-name="ce1">
            <text:p>600347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3749" table:style-name="ce1">
            <text:p>600374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4025" table:style-name="ce1">
            <text:p>600402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4480" table:style-name="ce1">
            <text:p>600448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2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4790" table:style-name="ce1">
            <text:p>600479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0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5070" table:style-name="ce1">
            <text:p>600507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0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5346" table:style-name="ce1">
            <text:p>600534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08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5640" table:style-name="ce1">
            <text:p>600564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5914" table:style-name="ce1">
            <text:p>60059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6208" table:style-name="ce1">
            <text:p>600620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6481" table:style-name="ce1">
            <text:p>600648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6756" table:style-name="ce1">
            <text:p>600675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8140" table:style-name="ce1">
            <text:p>600814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3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8462" table:style-name="ce1">
            <text:p>60084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8853" table:style-name="ce1">
            <text:p>600885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47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9285" table:style-name="ce1">
            <text:p>600928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9565" table:style-name="ce1">
            <text:p>60095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09844" table:style-name="ce1">
            <text:p>600984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5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10354" table:style-name="ce1">
            <text:p>60103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6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10671" table:style-name="ce1">
            <text:p>601067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10948" table:style-name="ce1">
            <text:p>601094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6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11227" table:style-name="ce1">
            <text:p>601122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72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11525" table:style-name="ce1">
            <text:p>601152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8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11802" table:style-name="ce1">
            <text:p>60118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8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12075" table:style-name="ce1">
            <text:p>60120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12346" table:style-name="ce1">
            <text:p>601234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9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12616" table:style-name="ce1">
            <text:p>601261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3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12891" table:style-name="ce1">
            <text:p>60128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13171" table:style-name="ce1">
            <text:p>601317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13451" table:style-name="ce1">
            <text:p>601345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11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13725" table:style-name="ce1">
            <text:p>601372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1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13998" table:style-name="ce1">
            <text:p>601399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14272" table:style-name="ce1">
            <text:p>601427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2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19738" table:style-name="ce1">
            <text:p>601973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2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20415" table:style-name="ce1">
            <text:p>60204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2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20706" table:style-name="ce1">
            <text:p>60207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3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20989" table:style-name="ce1">
            <text:p>602098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36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21319" table:style-name="ce1">
            <text:p>602131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21603" table:style-name="ce1">
            <text:p>602160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5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21910" table:style-name="ce1">
            <text:p>602191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22204" table:style-name="ce1">
            <text:p>602220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22474" table:style-name="ce1">
            <text:p>602247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27371" table:style-name="ce1">
            <text:p>602737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27857" table:style-name="ce1">
            <text:p>60278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28317" table:style-name="ce1">
            <text:p>60283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75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28694" table:style-name="ce1">
            <text:p>602869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7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29082" table:style-name="ce1">
            <text:p>602908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8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29383" table:style-name="ce1">
            <text:p>602938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29750" table:style-name="ce1">
            <text:p>602975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30059" table:style-name="ce1">
            <text:p>603005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30623" table:style-name="ce1">
            <text:p>603062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4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30928" table:style-name="ce1">
            <text:p>60309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00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31280" table:style-name="ce1">
            <text:p>603128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31559" table:style-name="ce1">
            <text:p>603155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31843" table:style-name="ce1">
            <text:p>603184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32113" table:style-name="ce1">
            <text:p>603211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32393" table:style-name="ce1">
            <text:p>60323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32799" table:style-name="ce1">
            <text:p>60327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33146" table:style-name="ce1">
            <text:p>603314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33433" table:style-name="ce1">
            <text:p>603343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39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33709" table:style-name="ce1">
            <text:p>603370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4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33985" table:style-name="ce1">
            <text:p>603398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4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34260" table:style-name="ce1">
            <text:p>603426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0866" table:style-name="ce1">
            <text:p>604086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1606" table:style-name="ce1">
            <text:p>60416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5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1894" table:style-name="ce1">
            <text:p>604189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6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2282" table:style-name="ce1">
            <text:p>604228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64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2797" table:style-name="ce1">
            <text:p>604279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7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3178" table:style-name="ce1">
            <text:p>604317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3454" table:style-name="ce1">
            <text:p>60434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8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3729" table:style-name="ce1">
            <text:p>60437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8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4002" table:style-name="ce1">
            <text:p>60440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4301" table:style-name="ce1">
            <text:p>604430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9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5134" table:style-name="ce1">
            <text:p>604513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5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5453" table:style-name="ce1">
            <text:p>604545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03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5732" table:style-name="ce1">
            <text:p>60457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0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6004" table:style-name="ce1">
            <text:p>604600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0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6283" table:style-name="ce1">
            <text:p>604628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1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6691" table:style-name="ce1">
            <text:p>60466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6984" table:style-name="ce1">
            <text:p>604698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2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7258" table:style-name="ce1">
            <text:p>604725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2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7537" table:style-name="ce1">
            <text:p>60475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28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8158" table:style-name="ce1">
            <text:p>604815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3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8437" table:style-name="ce1">
            <text:p>60484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8718" table:style-name="ce1">
            <text:p>604871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8991" table:style-name="ce1">
            <text:p>60489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5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9375" table:style-name="ce1">
            <text:p>60493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9662" table:style-name="ce1">
            <text:p>60496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49966" table:style-name="ce1">
            <text:p>604996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50258" table:style-name="ce1">
            <text:p>605025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67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50532" table:style-name="ce1">
            <text:p>60505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6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51029" table:style-name="ce1">
            <text:p>60510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7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51311" table:style-name="ce1">
            <text:p>605131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7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56665" table:style-name="ce1">
            <text:p>60566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8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57227" table:style-name="ce1">
            <text:p>605722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57512" table:style-name="ce1">
            <text:p>605751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57793" table:style-name="ce1">
            <text:p>60577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692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58121" table:style-name="ce1">
            <text:p>605812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58399" table:style-name="ce1">
            <text:p>60583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58673" table:style-name="ce1">
            <text:p>60586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58943" table:style-name="ce1">
            <text:p>605894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59214" table:style-name="ce1">
            <text:p>60592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59498" table:style-name="ce1">
            <text:p>605949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59782" table:style-name="ce1">
            <text:p>605978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0065" table:style-name="ce1">
            <text:p>60600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31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0338" table:style-name="ce1">
            <text:p>606033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3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0614" table:style-name="ce1">
            <text:p>60606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3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0888" table:style-name="ce1">
            <text:p>60608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4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1201" table:style-name="ce1">
            <text:p>606120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4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1581" table:style-name="ce1">
            <text:p>606158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1857" table:style-name="ce1">
            <text:p>60618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2137" table:style-name="ce1">
            <text:p>60621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56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2430" table:style-name="ce1">
            <text:p>606243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2705" table:style-name="ce1">
            <text:p>606270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2977" table:style-name="ce1">
            <text:p>606297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7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3249" table:style-name="ce1">
            <text:p>606324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3522" table:style-name="ce1">
            <text:p>606352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8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3797" table:style-name="ce1">
            <text:p>606379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8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4080" table:style-name="ce1">
            <text:p>606408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4358" table:style-name="ce1">
            <text:p>606435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95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4632" table:style-name="ce1">
            <text:p>60646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7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4905" table:style-name="ce1">
            <text:p>606490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0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5178" table:style-name="ce1">
            <text:p>606517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0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9018" table:style-name="ce1">
            <text:p>606901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0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9521" table:style-name="ce1">
            <text:p>606952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1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69807" table:style-name="ce1">
            <text:p>606980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0088" table:style-name="ce1">
            <text:p>60700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20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0395" table:style-name="ce1">
            <text:p>607039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0891" table:style-name="ce1">
            <text:p>60708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1189" table:style-name="ce1">
            <text:p>607118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3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1464" table:style-name="ce1">
            <text:p>607146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1736" table:style-name="ce1">
            <text:p>607173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2021" table:style-name="ce1">
            <text:p>607202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5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2306" table:style-name="ce1">
            <text:p>60723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2588" table:style-name="ce1">
            <text:p>60725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59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2870" table:style-name="ce1">
            <text:p>607287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6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3145" table:style-name="ce1">
            <text:p>607314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3422" table:style-name="ce1">
            <text:p>607342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6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3777" table:style-name="ce1">
            <text:p>607377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7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4071" table:style-name="ce1">
            <text:p>607407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7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4348" table:style-name="ce1">
            <text:p>607434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8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4624" table:style-name="ce1">
            <text:p>607462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84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4914" table:style-name="ce1">
            <text:p>60749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9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5196" table:style-name="ce1">
            <text:p>607519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8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5469" table:style-name="ce1">
            <text:p>607546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5742" table:style-name="ce1">
            <text:p>607574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6017" table:style-name="ce1">
            <text:p>60760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6296" table:style-name="ce1">
            <text:p>607629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6580" table:style-name="ce1">
            <text:p>607658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6865" table:style-name="ce1">
            <text:p>60768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23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7140" table:style-name="ce1">
            <text:p>607714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2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7414" table:style-name="ce1">
            <text:p>60774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2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77689" table:style-name="ce1">
            <text:p>607768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3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1549" table:style-name="ce1">
            <text:p>608154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3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2056" table:style-name="ce1">
            <text:p>608205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4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2347" table:style-name="ce1">
            <text:p>608234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4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2628" table:style-name="ce1">
            <text:p>60826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48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2937" table:style-name="ce1">
            <text:p>60829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3216" table:style-name="ce1">
            <text:p>608321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3489" table:style-name="ce1">
            <text:p>608348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3763" table:style-name="ce1">
            <text:p>608376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4036" table:style-name="ce1">
            <text:p>608403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7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4321" table:style-name="ce1">
            <text:p>608432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4609" table:style-name="ce1">
            <text:p>608460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8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4893" table:style-name="ce1">
            <text:p>60848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87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5166" table:style-name="ce1">
            <text:p>608516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5439" table:style-name="ce1">
            <text:p>608543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5716" table:style-name="ce1">
            <text:p>608571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3 9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6018" table:style-name="ce1">
            <text:p>608601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0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6464" table:style-name="ce1">
            <text:p>608646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0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6742" table:style-name="ce1">
            <text:p>608674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0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7033" table:style-name="ce1">
            <text:p>608703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12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7323" table:style-name="ce1">
            <text:p>608732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7598" table:style-name="ce1">
            <text:p>608759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7869" table:style-name="ce1">
            <text:p>608786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8142" table:style-name="ce1">
            <text:p>608814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8416" table:style-name="ce1">
            <text:p>608841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3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8697" table:style-name="ce1">
            <text:p>608869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8978" table:style-name="ce1">
            <text:p>608897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9256" table:style-name="ce1">
            <text:p>608925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51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9529" table:style-name="ce1">
            <text:p>60895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89802" table:style-name="ce1">
            <text:p>60898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5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0077" table:style-name="ce1">
            <text:p>609007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6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4315" table:style-name="ce1">
            <text:p>60943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4828" table:style-name="ce1">
            <text:p>60948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6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5124" table:style-name="ce1">
            <text:p>609512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7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5403" table:style-name="ce1">
            <text:p>609540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76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5709" table:style-name="ce1">
            <text:p>609570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8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5984" table:style-name="ce1">
            <text:p>609598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6256" table:style-name="ce1">
            <text:p>609625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9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6534" table:style-name="ce1">
            <text:p>609653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0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6806" table:style-name="ce1">
            <text:p>60968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7087" table:style-name="ce1">
            <text:p>609708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7372" table:style-name="ce1">
            <text:p>609737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7654" table:style-name="ce1">
            <text:p>60976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15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7926" table:style-name="ce1">
            <text:p>60979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8199" table:style-name="ce1">
            <text:p>60981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2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8473" table:style-name="ce1">
            <text:p>60984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2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8811" table:style-name="ce1">
            <text:p>609881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2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9095" table:style-name="ce1">
            <text:p>609909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3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9366" table:style-name="ce1">
            <text:p>609936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3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9642" table:style-name="ce1">
            <text:p>609964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40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099929" table:style-name="ce1">
            <text:p>60999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5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0207" table:style-name="ce1">
            <text:p>610020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0485" table:style-name="ce1">
            <text:p>610048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0755" table:style-name="ce1">
            <text:p>610075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1032" table:style-name="ce1">
            <text:p>61010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1309" table:style-name="ce1">
            <text:p>610130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7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1592" table:style-name="ce1">
            <text:p>610159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7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1872" table:style-name="ce1">
            <text:p>610187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79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2149" table:style-name="ce1">
            <text:p>610214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8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2422" table:style-name="ce1">
            <text:p>610242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2699" table:style-name="ce1">
            <text:p>61026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6493" table:style-name="ce1">
            <text:p>61064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6999" table:style-name="ce1">
            <text:p>61069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1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7286" table:style-name="ce1">
            <text:p>610728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0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7565" table:style-name="ce1">
            <text:p>61075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04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7875" table:style-name="ce1">
            <text:p>61078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8152" table:style-name="ce1">
            <text:p>610815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8426" table:style-name="ce1">
            <text:p>61084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8699" table:style-name="ce1">
            <text:p>61086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8967" table:style-name="ce1">
            <text:p>610896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9249" table:style-name="ce1">
            <text:p>610924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3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9530" table:style-name="ce1">
            <text:p>610953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3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09811" table:style-name="ce1">
            <text:p>610981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43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0084" table:style-name="ce1">
            <text:p>611008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4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0360" table:style-name="ce1">
            <text:p>611036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0635" table:style-name="ce1">
            <text:p>611063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0929" table:style-name="ce1">
            <text:p>61109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5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1412" table:style-name="ce1">
            <text:p>611141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6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1690" table:style-name="ce1">
            <text:p>611169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1966" table:style-name="ce1">
            <text:p>611196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68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2257" table:style-name="ce1">
            <text:p>61122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7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2535" table:style-name="ce1">
            <text:p>611253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8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2815" table:style-name="ce1">
            <text:p>61128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8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3085" table:style-name="ce1">
            <text:p>611308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9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3363" table:style-name="ce1">
            <text:p>611336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9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3638" table:style-name="ce1">
            <text:p>611363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29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3920" table:style-name="ce1">
            <text:p>611392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0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4482" table:style-name="ce1">
            <text:p>611448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07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4762" table:style-name="ce1">
            <text:p>61147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0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5038" table:style-name="ce1">
            <text:p>611503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1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5335" table:style-name="ce1">
            <text:p>611533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9229" table:style-name="ce1">
            <text:p>61192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2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19743" table:style-name="ce1">
            <text:p>611974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2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0031" table:style-name="ce1">
            <text:p>612003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2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0310" table:style-name="ce1">
            <text:p>612031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32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0619" table:style-name="ce1">
            <text:p>612061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4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0895" table:style-name="ce1">
            <text:p>612089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4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1170" table:style-name="ce1">
            <text:p>612117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5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1458" table:style-name="ce1">
            <text:p>612145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5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1728" table:style-name="ce1">
            <text:p>61217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2152" table:style-name="ce1">
            <text:p>612215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2444" table:style-name="ce1">
            <text:p>612244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2737" table:style-name="ce1">
            <text:p>61227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71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3013" table:style-name="ce1">
            <text:p>612301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7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3287" table:style-name="ce1">
            <text:p>612328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7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3561" table:style-name="ce1">
            <text:p>612356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8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3865" table:style-name="ce1">
            <text:p>61238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4165" table:style-name="ce1">
            <text:p>61241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4439" table:style-name="ce1">
            <text:p>612443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4716" table:style-name="ce1">
            <text:p>612471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396, Length: 1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5005" table:style-name="ce1">
            <text:p>612500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0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5279" table:style-name="ce1">
            <text:p>612527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1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5552" table:style-name="ce1">
            <text:p>612555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1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5823" table:style-name="ce1">
            <text:p>612582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1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6094" table:style-name="ce1">
            <text:p>612609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2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6383" table:style-name="ce1">
            <text:p>612638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2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6663" table:style-name="ce1">
            <text:p>612666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3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6941" table:style-name="ce1">
            <text:p>612694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35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7217" table:style-name="ce1">
            <text:p>61272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3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7489" table:style-name="ce1">
            <text:p>612748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4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27762" table:style-name="ce1">
            <text:p>61277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4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1947" table:style-name="ce1">
            <text:p>613194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2438" table:style-name="ce1">
            <text:p>613243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2724" table:style-name="ce1">
            <text:p>613272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5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3171" table:style-name="ce1">
            <text:p>613317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6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3460" table:style-name="ce1">
            <text:p>613346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3739" table:style-name="ce1">
            <text:p>613373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6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4014" table:style-name="ce1">
            <text:p>61340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7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4289" table:style-name="ce1">
            <text:p>613428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7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4563" table:style-name="ce1">
            <text:p>613456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8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4838" table:style-name="ce1">
            <text:p>613483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5109" table:style-name="ce1">
            <text:p>613510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5384" table:style-name="ce1">
            <text:p>613538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5657" table:style-name="ce1">
            <text:p>613565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4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5940" table:style-name="ce1">
            <text:p>613594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0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6215" table:style-name="ce1">
            <text:p>61362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0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6488" table:style-name="ce1">
            <text:p>61364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0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6762" table:style-name="ce1">
            <text:p>61367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1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7039" table:style-name="ce1">
            <text:p>613703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7316" table:style-name="ce1">
            <text:p>613731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2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7588" table:style-name="ce1">
            <text:p>61375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2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7862" table:style-name="ce1">
            <text:p>61378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2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8140" table:style-name="ce1">
            <text:p>613814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3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8415" table:style-name="ce1">
            <text:p>61384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3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8696" table:style-name="ce1">
            <text:p>613869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4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8968" table:style-name="ce1">
            <text:p>613896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4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9242" table:style-name="ce1">
            <text:p>613924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9514" table:style-name="ce1">
            <text:p>61395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39789" table:style-name="ce1">
            <text:p>613978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5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0062" table:style-name="ce1">
            <text:p>61400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6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0337" table:style-name="ce1">
            <text:p>61403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0610" table:style-name="ce1">
            <text:p>614061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6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0885" table:style-name="ce1">
            <text:p>614088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7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1162" table:style-name="ce1">
            <text:p>61411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7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1434" table:style-name="ce1">
            <text:p>614143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8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1709" table:style-name="ce1">
            <text:p>614170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1981" table:style-name="ce1">
            <text:p>614198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2254" table:style-name="ce1">
            <text:p>61422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2529" table:style-name="ce1">
            <text:p>614252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5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2802" table:style-name="ce1">
            <text:p>61428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0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3075" table:style-name="ce1">
            <text:p>61430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0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3348" table:style-name="ce1">
            <text:p>614334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0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3622" table:style-name="ce1">
            <text:p>614362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1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3897" table:style-name="ce1">
            <text:p>614389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4177" table:style-name="ce1">
            <text:p>614417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2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4451" table:style-name="ce1">
            <text:p>614445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2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4724" table:style-name="ce1">
            <text:p>614472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2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4997" table:style-name="ce1">
            <text:p>614499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3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5270" table:style-name="ce1">
            <text:p>614527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3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5542" table:style-name="ce1">
            <text:p>614554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4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5814" table:style-name="ce1">
            <text:p>614581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4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6088" table:style-name="ce1">
            <text:p>61460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6364" table:style-name="ce1">
            <text:p>614636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6636" table:style-name="ce1">
            <text:p>614663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5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6917" table:style-name="ce1">
            <text:p>61469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6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7189" table:style-name="ce1">
            <text:p>614718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7463" table:style-name="ce1">
            <text:p>614746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6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7735" table:style-name="ce1">
            <text:p>614773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7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8009" table:style-name="ce1">
            <text:p>614800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7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8284" table:style-name="ce1">
            <text:p>614828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8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8559" table:style-name="ce1">
            <text:p>614855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8832" table:style-name="ce1">
            <text:p>61488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9108" table:style-name="ce1">
            <text:p>614910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9382" table:style-name="ce1">
            <text:p>614938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6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49782" table:style-name="ce1">
            <text:p>614978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0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0073" table:style-name="ce1">
            <text:p>61500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0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0356" table:style-name="ce1">
            <text:p>615035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0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0630" table:style-name="ce1">
            <text:p>615063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1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0904" table:style-name="ce1">
            <text:p>615090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1178" table:style-name="ce1">
            <text:p>615117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2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1611" table:style-name="ce1">
            <text:p>615161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2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1904" table:style-name="ce1">
            <text:p>615190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2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2176" table:style-name="ce1">
            <text:p>615217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3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2455" table:style-name="ce1">
            <text:p>615245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3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2727" table:style-name="ce1">
            <text:p>615272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4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2998" table:style-name="ce1">
            <text:p>615299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4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3270" table:style-name="ce1">
            <text:p>615327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3542" table:style-name="ce1">
            <text:p>615354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3823" table:style-name="ce1">
            <text:p>615382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5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4099" table:style-name="ce1">
            <text:p>615409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6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4372" table:style-name="ce1">
            <text:p>615437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4645" table:style-name="ce1">
            <text:p>615464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6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4919" table:style-name="ce1">
            <text:p>615491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7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5190" table:style-name="ce1">
            <text:p>615519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7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5470" table:style-name="ce1">
            <text:p>615547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8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5744" table:style-name="ce1">
            <text:p>615574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8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6017" table:style-name="ce1">
            <text:p>615601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6287" table:style-name="ce1">
            <text:p>615628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6559" table:style-name="ce1">
            <text:p>615655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7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6832" table:style-name="ce1">
            <text:p>61568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0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7105" table:style-name="ce1">
            <text:p>615710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0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7375" table:style-name="ce1">
            <text:p>61573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0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7647" table:style-name="ce1">
            <text:p>615764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1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7918" table:style-name="ce1">
            <text:p>615791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8188" table:style-name="ce1">
            <text:p>61581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2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8460" table:style-name="ce1">
            <text:p>615846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2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8732" table:style-name="ce1">
            <text:p>61587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2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9004" table:style-name="ce1">
            <text:p>615900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3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9277" table:style-name="ce1">
            <text:p>615927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3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9549" table:style-name="ce1">
            <text:p>615954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4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59820" table:style-name="ce1">
            <text:p>615982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4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0091" table:style-name="ce1">
            <text:p>616009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4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0432" table:style-name="ce1">
            <text:p>61604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5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0703" table:style-name="ce1">
            <text:p>616070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5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0981" table:style-name="ce1">
            <text:p>616098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6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1253" table:style-name="ce1">
            <text:p>616125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6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1526" table:style-name="ce1">
            <text:p>61615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6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1798" table:style-name="ce1">
            <text:p>616179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7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2080" table:style-name="ce1">
            <text:p>616208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7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2364" table:style-name="ce1">
            <text:p>616236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880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2704" table:style-name="ce1">
            <text:p>616270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912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2990" table:style-name="ce1">
            <text:p>616299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94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3276" table:style-name="ce1">
            <text:p>616327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4 976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3561" table:style-name="ce1">
            <text:p>616356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008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3859" table:style-name="ce1">
            <text:p>616385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040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4146" table:style-name="ce1">
            <text:p>616414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072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4428" table:style-name="ce1">
            <text:p>61644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10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4712" table:style-name="ce1">
            <text:p>616471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136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5004" table:style-name="ce1">
            <text:p>616500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168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5292" table:style-name="ce1">
            <text:p>616529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200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5579" table:style-name="ce1">
            <text:p>616557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232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5862" table:style-name="ce1">
            <text:p>61658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26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6162" table:style-name="ce1">
            <text:p>61661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296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6454" table:style-name="ce1">
            <text:p>61664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328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6745" table:style-name="ce1">
            <text:p>616674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360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7027" table:style-name="ce1">
            <text:p>616702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392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7337" table:style-name="ce1">
            <text:p>616733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42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7621" table:style-name="ce1">
            <text:p>616762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456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7904" table:style-name="ce1">
            <text:p>616790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488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8188" table:style-name="ce1">
            <text:p>616818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520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8482" table:style-name="ce1">
            <text:p>616848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552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8768" table:style-name="ce1">
            <text:p>616876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58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9056" table:style-name="ce1">
            <text:p>616905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616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9340" table:style-name="ce1">
            <text:p>616934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648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9638" table:style-name="ce1">
            <text:p>616963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680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69921" table:style-name="ce1">
            <text:p>616992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712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0206" table:style-name="ce1">
            <text:p>61702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74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0487" table:style-name="ce1">
            <text:p>617048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776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0776" table:style-name="ce1">
            <text:p>617077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808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1058" table:style-name="ce1">
            <text:p>617105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840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1467" table:style-name="ce1">
            <text:p>617146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872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1773" table:style-name="ce1">
            <text:p>617177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90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2074" table:style-name="ce1">
            <text:p>617207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936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2360" table:style-name="ce1">
            <text:p>617236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5 968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2642" table:style-name="ce1">
            <text:p>617264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000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2923" table:style-name="ce1">
            <text:p>617292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032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3219" table:style-name="ce1">
            <text:p>617321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06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3502" table:style-name="ce1">
            <text:p>61735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096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3783" table:style-name="ce1">
            <text:p>617378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128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4151" table:style-name="ce1">
            <text:p>617415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160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4454" table:style-name="ce1">
            <text:p>61744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192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4743" table:style-name="ce1">
            <text:p>617474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22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5024" table:style-name="ce1">
            <text:p>617502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256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5306" table:style-name="ce1">
            <text:p>61753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288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5602" table:style-name="ce1">
            <text:p>61756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320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5890" table:style-name="ce1">
            <text:p>617589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352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6176" table:style-name="ce1">
            <text:p>617617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38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6458" table:style-name="ce1">
            <text:p>617645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416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6750" table:style-name="ce1">
            <text:p>617675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448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7034" table:style-name="ce1">
            <text:p>617703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480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7320" table:style-name="ce1">
            <text:p>617732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512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77606" table:style-name="ce1">
            <text:p>61776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544, Length: 3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88403" table:style-name="ce1">
            <text:p>618840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576, Length: 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89298" table:style-name="ce1">
            <text:p>618929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578, Length: 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89686" table:style-name="ce1">
            <text:p>618968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58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0145" table:style-name="ce1">
            <text:p>619014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584, Length: 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0522" table:style-name="ce1">
            <text:p>619052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586, Length: 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0912" table:style-name="ce1">
            <text:p>619091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588, Length: 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1259" table:style-name="ce1">
            <text:p>619125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59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1681" table:style-name="ce1">
            <text:p>619168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594, Length: 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2105" table:style-name="ce1">
            <text:p>619210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59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2493" table:style-name="ce1">
            <text:p>619249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0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2885" table:style-name="ce1">
            <text:p>619288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0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3269" table:style-name="ce1">
            <text:p>619326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0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3665" table:style-name="ce1">
            <text:p>61936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1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4053" table:style-name="ce1">
            <text:p>619405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1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4447" table:style-name="ce1">
            <text:p>619444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20, Length: 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4815" table:style-name="ce1">
            <text:p>61948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2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5165" table:style-name="ce1">
            <text:p>61951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2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5530" table:style-name="ce1">
            <text:p>619553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3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5890" table:style-name="ce1">
            <text:p>619589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3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6265" table:style-name="ce1">
            <text:p>61962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3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6667" table:style-name="ce1">
            <text:p>619666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4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7084" table:style-name="ce1">
            <text:p>619708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46, Length: 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7478" table:style-name="ce1">
            <text:p>619747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48, Length: 2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7866" table:style-name="ce1">
            <text:p>619786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5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8249" table:style-name="ce1">
            <text:p>619824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5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8634" table:style-name="ce1">
            <text:p>619863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5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199020" table:style-name="ce1">
            <text:p>619902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6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01447" table:style-name="ce1">
            <text:p>620144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66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02205" table:style-name="ce1">
            <text:p>620220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6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02563" table:style-name="ce1">
            <text:p>620256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71, Length: 16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02844" table:style-name="ce1">
            <text:p>620284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87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03121" table:style-name="ce1">
            <text:p>620312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8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03403" table:style-name="ce1">
            <text:p>620340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9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03678" table:style-name="ce1">
            <text:p>620367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96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03954" table:style-name="ce1">
            <text:p>620395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69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04228" table:style-name="ce1">
            <text:p>620422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0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04502" table:style-name="ce1">
            <text:p>620450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05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04775" table:style-name="ce1">
            <text:p>620477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09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05049" table:style-name="ce1">
            <text:p>620504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1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05324" table:style-name="ce1">
            <text:p>620532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1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05600" table:style-name="ce1">
            <text:p>620560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18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14803" table:style-name="ce1">
            <text:p>6214803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19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15415" table:style-name="ce1">
            <text:p>621541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2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15751" table:style-name="ce1">
            <text:p>621575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2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16070" table:style-name="ce1">
            <text:p>621607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28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16347" table:style-name="ce1">
            <text:p>621634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2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16679" table:style-name="ce1">
            <text:p>621667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45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16952" table:style-name="ce1">
            <text:p>621695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4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17224" table:style-name="ce1">
            <text:p>621722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5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17498" table:style-name="ce1">
            <text:p>621749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5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17776" table:style-name="ce1">
            <text:p>621777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58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18426" table:style-name="ce1">
            <text:p>62184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59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18708" table:style-name="ce1">
            <text:p>621870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63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18982" table:style-name="ce1">
            <text:p>621898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67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19265" table:style-name="ce1">
            <text:p>62192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68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19826" table:style-name="ce1">
            <text:p>621982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72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20238" table:style-name="ce1">
            <text:p>622023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76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21170" table:style-name="ce1">
            <text:p>6221170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77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21759" table:style-name="ce1">
            <text:p>6221759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81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22197" table:style-name="ce1">
            <text:p>6222197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85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22606" table:style-name="ce1">
            <text:p>6222606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86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23021" table:style-name="ce1">
            <text:p>6223021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90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23448" table:style-name="ce1">
            <text:p>622344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94, Length: 4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23862" table:style-name="ce1">
            <text:p>622386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Read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Offset: 976 798, Length: 1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25078" table:style-name="ce1">
            <text:p>622507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QueryBasicInformation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CreationTime: 06.06.2026 13:21:48, LastAccessTime: 06.06.2026 13:34:46, LastWriteTime: 05.07.2022 12:36:38, ChangeTime: 06.06.2026 13:30:04, FileAttributes: A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26442" table:style-name="ce1">
            <text:p>622644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QueryStandardInformation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AllocationSize: 978 944, EndOfFile: 976 799, NumberOfLinks: 1, DeletePending: False, Directory: False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34164" table:style-name="ce1">
            <text:p>6234164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Create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Desired Access: Read Attributes, Disposition: Open, Options: Open Reparse Point, Attributes: n/a, ShareMode: Read, Write, Delete, AllocationSize: n/a, OpenResult: Opened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37438" table:style-name="ce1">
            <text:p>6237438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QueryBasicInformation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CreationTime: 06.06.2026 13:21:48, LastAccessTime: 06.06.2026 13:34:46, LastWriteTime: 05.07.2022 12:36:38, ChangeTime: 06.06.2026 13:30:04, FileAttributes: A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6237932" table:style-name="ce1">
            <text:p>6237932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Close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table:number-columns-repeated="16377" table:style-name="ce1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7384985" table:style-name="ce1">
            <text:p>738498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QueryStandardInformation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AllocationSize: 978 944, EndOfFile: 976 799, NumberOfLinks: 1, DeletePending: False, Directory: False</text:p>
          </table:table-cell>
          <table:table-cell table:number-columns-repeated="16376"/>
        </table:table-row>
        <table:table-row table:style-name="ro1">
          <table:table-cell office:value-type="time" office:time-value="PT13H34M46S" table:style-name="ce2">
            <text:p>13:34:46</text:p>
          </table:table-cell>
          <table:table-cell office:value-type="float" office:value="7385685" table:style-name="ce1">
            <text:p>738568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CloseFile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table:number-columns-repeated="16377" table:style-name="ce1"/>
        </table:table-row>
        <table:table-row table:style-name="ro1">
          <table:table-cell office:value-type="time" office:time-value="PT13H34M47S" table:style-name="ce2">
            <text:p>13:34:47</text:p>
          </table:table-cell>
          <table:table-cell office:value-type="float" office:value="2130965" table:style-name="ce1">
            <text:p>2130965</text:p>
          </table:table-cell>
          <table:table-cell office:value-type="string" table:style-name="ce1">
            <text:p>mmf2u.exe</text:p>
          </table:table-cell>
          <table:table-cell office:value-type="float" office:value="23408" table:style-name="ce1">
            <text:p>23408</text:p>
          </table:table-cell>
          <table:table-cell office:value-type="string" table:style-name="ce1">
            <text:p>QueryDirectory</text:p>
          </table:table-cell>
          <table:table-cell office:value-type="string" table:style-name="ce1">
            <text:p>C:\Users\mw\Downloads\MFA\white2.mfa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FileInformationClass: FileIdBothDirectoryInformation, Filter: white2.mfa, 2: white2.mfa</text:p>
          </table:table-cell>
          <table:table-cell table:number-columns-repeated="16376"/>
        </table:table-row>
        <table:table-row table:number-rows-repeated="1047009" table:style-name="ro2">
          <table:table-cell table:number-columns-repeated="16384"/>
        </table:table-row>
      </table:table>
      <table:table table:name="Tabelle1" table:style-name="ta1"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Offset HEX</text:p>
          </table:table-cell>
          <table:table-cell office:value-type="string" table:style-name="ce1">
            <text:p>Offset</text:p>
          </table:table-cell>
          <table:table-cell office:value-type="string" table:style-name="ce1">
            <text:p>Length</text:p>
          </table:table-cell>
          <table:table-cell office:value-type="string" table:style-name="ce1">
            <text:p>value at Offset (length)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ext offset</text:p>
          </table:table-cell>
          <table:table-cell office:value-type="string" table:style-name="ce1">
            <text:p>Spalte1</text:p>
          </table:table-cell>
          <table:table-cell office:value-type="string" table:style-name="ce1">
            <text:p>Spalte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office:string-value="4" table:formula="of:=DEC2HEX([.C2])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office:string-value="8" table:formula="of:=DEC2HEX([.C3])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office:string-value="C" table:formula="of:=DEC2HEX([.C4])" table:style-name="ce1">
            <text:p>C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office:string-value="10" table:formula="of:=DEC2HEX([.C5])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office:string-value="14" table:formula="of:=DEC2HEX([.C6])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office:string-value="30" table:formula="of:=DEC2HEX([.C7])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office:string-value="34" table:formula="of:=DEC2HEX([.C8])" table:style-name="ce1">
            <text:p>34</text:p>
          </table:table-cell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office:string-value="54" table:formula="of:=DEC2HEX([.C9])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office:string-value="58" table:formula="of:=DEC2HEX([.C10])" table:style-name="ce1">
            <text:p>58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office:string-value="B1" table:formula="of:=DEC2HEX([.C11])" table:style-name="ce1">
            <text:p>B1</text:p>
          </table:table-cell>
          <table:table-cell office:value-type="float" office:value="177" table:style-name="ce1">
            <text:p>177</text:p>
          </table:table-cell>
          <table:table-cell office:value-type="float" office:value="4" table:style-name="ce1">
            <text:p>4</text:p>
          </table:table-cell>
          <table:table-cell office:value-type="float" office:value="1834" table:style-name="ce1">
            <text:p>1834</text:p>
          </table:table-cell>
          <table:table-cell office:value-type="float" office:value="6196" table:formula="of:=HEX2DEC([.E11])" table:style-name="ce1">
            <text:p>6196</text:p>
          </table:table-cell>
          <table:table-cell office:value-type="float" office:value="6377" table:formula="of:=[.F11]+[.C11]+[.D11]" table:style-name="ce1">
            <text:p>6377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office:string-value="18E9" table:formula="of:=DEC2HEX([.C12])" table:style-name="ce1">
            <text:p>18E9</text:p>
          </table:table-cell>
          <table:table-cell office:value-type="float" office:value="6377" table:style-name="ce1">
            <text:p>637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TFN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office:string-value="18ED" table:formula="of:=DEC2HEX([.C13])" table:style-name="ce1">
            <text:p>18ED</text:p>
          </table:table-cell>
          <table:table-cell office:value-type="float" office:value="6381" table:style-name="ce1">
            <text:p>638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office:string-value="18F1" table:formula="of:=DEC2HEX([.C14])" table:style-name="ce1">
            <text:p>18F1</text:p>
          </table:table-cell>
          <table:table-cell office:value-type="float" office:value="6385" table:style-name="ce1">
            <text:p>638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PMS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office:string-value="18F5" table:formula="of:=DEC2HEX([.C15])" table:style-name="ce1">
            <text:p>18F5</text:p>
          </table:table-cell>
          <table:table-cell office:value-type="float" office:value="6389" table:style-name="ce1">
            <text:p>638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office:string-value="18F9" table:formula="of:=DEC2HEX([.C16])" table:style-name="ce1">
            <text:p>18F9</text:p>
          </table:table-cell>
          <table:table-cell office:value-type="float" office:value="6393" table:style-name="ce1">
            <text:p>639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SUM</text:p>
          </table:table-cell>
          <table:table-cell table:number-columns-repeated="16379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office:string-value="18FD" table:formula="of:=DEC2HEX([.C17])" table:style-name="ce1">
            <text:p>18FD</text:p>
          </table:table-cell>
          <table:table-cell office:value-type="float" office:value="6397" table:style-name="ce1">
            <text:p>639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office:string-value="1901" table:formula="of:=DEC2HEX([.C18])" table:style-name="ce1">
            <text:p>1901</text:p>
          </table:table-cell>
          <table:table-cell office:value-type="float" office:value="6401" table:style-name="ce1">
            <text:p>640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GMI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office:string-value="1905" table:formula="of:=DEC2HEX([.C19])" table:style-name="ce1">
            <text:p>1905</text:p>
          </table:table-cell>
          <table:table-cell office:value-type="float" office:value="6405" table:style-name="ce1">
            <text:p>640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office:string-value="1909" table:formula="of:=DEC2HEX([.C20])" table:style-name="ce1">
            <text:p>1909</text:p>
          </table:table-cell>
          <table:table-cell office:value-type="float" office:value="6409" table:style-name="ce1">
            <text:p>6409</text:p>
          </table:table-cell>
          <table:table-cell office:value-type="float" office:value="1028" table:style-name="ce1">
            <text:p>1028</text:p>
          </table:table-cell>
          <table:table-cell office:value-type="string" table:style-name="ce1">
            <text:p>????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office:string-value="1D0D" table:formula="of:=DEC2HEX([.C21])" table:style-name="ce1">
            <text:p>1D0D</text:p>
          </table:table-cell>
          <table:table-cell office:value-type="float" office:value="7437" table:style-name="ce1">
            <text:p>7437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office:string-value="1D11" table:formula="of:=DEC2HEX([.C22])" table:style-name="ce1">
            <text:p>1D11</text:p>
          </table:table-cell>
          <table:table-cell office:value-type="float" office:value="7441" table:style-name="ce1">
            <text:p>7441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office:string-value="1D15" table:formula="of:=DEC2HEX([.C23])" table:style-name="ce1">
            <text:p>1D15</text:p>
          </table:table-cell>
          <table:table-cell office:value-type="float" office:value="7445" table:style-name="ce1">
            <text:p>7445</text:p>
          </table:table-cell>
          <table:table-cell office:value-type="float" office:value="32" table:style-name="ce1">
            <text:p>32</text:p>
          </table:table-cell>
          <table:table-cell table:number-columns-repeated="16380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office:string-value="1D35" table:formula="of:=DEC2HEX([.C24])" table:style-name="ce1">
            <text:p>1D35</text:p>
          </table:table-cell>
          <table:table-cell office:value-type="float" office:value="7477" table:style-name="ce1">
            <text:p>7477</text:p>
          </table:table-cell>
          <table:table-cell office:value-type="float" office:value="6912" table:style-name="ce1">
            <text:p>6912</text:p>
          </table:table-cell>
          <table:table-cell table:number-columns-repeated="16380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office:string-value="3835" table:formula="of:=DEC2HEX([.C25])" table:style-name="ce1">
            <text:p>3835</text:p>
          </table:table-cell>
          <table:table-cell office:value-type="float" office:value="14389" table:style-name="ce1">
            <text:p>14389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office:string-value="3839" table:formula="of:=DEC2HEX([.C26])" table:style-name="ce1">
            <text:p>3839</text:p>
          </table:table-cell>
          <table:table-cell office:value-type="float" office:value="14393" table:style-name="ce1">
            <text:p>14393</text:p>
          </table:table-cell>
          <table:table-cell office:value-type="float" office:value="32" table:style-name="ce1">
            <text:p>32</text:p>
          </table:table-cell>
          <table:table-cell table:number-columns-repeated="16380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office:string-value="3859" table:formula="of:=DEC2HEX([.C27])" table:style-name="ce1">
            <text:p>3859</text:p>
          </table:table-cell>
          <table:table-cell office:value-type="float" office:value="14425" table:style-name="ce1">
            <text:p>14425</text:p>
          </table:table-cell>
          <table:table-cell office:value-type="float" office:value="3072" table:style-name="ce1">
            <text:p>3072</text:p>
          </table:table-cell>
          <table:table-cell table:number-columns-repeated="16380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office:string-value="4459" table:formula="of:=DEC2HEX([.C28])" table:style-name="ce1">
            <text:p>4459</text:p>
          </table:table-cell>
          <table:table-cell office:value-type="float" office:value="17497" table:style-name="ce1">
            <text:p>17497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office:string-value="445D" table:formula="of:=DEC2HEX([.C29])" table:style-name="ce1">
            <text:p>445D</text:p>
          </table:table-cell>
          <table:table-cell office:value-type="float" office:value="17501" table:style-name="ce1">
            <text:p>17501</text:p>
          </table:table-cell>
          <table:table-cell office:value-type="float" office:value="32" table:style-name="ce1">
            <text:p>32</text:p>
          </table:table-cell>
          <table:table-cell table:number-columns-repeated="16380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office:string-value="447D" table:formula="of:=DEC2HEX([.C30])" table:style-name="ce1">
            <text:p>447D</text:p>
          </table:table-cell>
          <table:table-cell office:value-type="float" office:value="17533" table:style-name="ce1">
            <text:p>17533</text:p>
          </table:table-cell>
          <table:table-cell office:value-type="float" office:value="768" table:style-name="ce1">
            <text:p>768</text:p>
          </table:table-cell>
          <table:table-cell table:number-columns-repeated="16380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office:string-value="477D" table:formula="of:=DEC2HEX([.C31])" table:style-name="ce1">
            <text:p>477D</text:p>
          </table:table-cell>
          <table:table-cell office:value-type="float" office:value="18301" table:style-name="ce1">
            <text:p>18301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office:string-value="4781" table:formula="of:=DEC2HEX([.C32])" table:style-name="ce1">
            <text:p>4781</text:p>
          </table:table-cell>
          <table:table-cell office:value-type="float" office:value="18305" table:style-name="ce1">
            <text:p>18305</text:p>
          </table:table-cell>
          <table:table-cell office:value-type="float" office:value="32" table:style-name="ce1">
            <text:p>32</text:p>
          </table:table-cell>
          <table:table-cell table:number-columns-repeated="16380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office:string-value="47A1" table:formula="of:=DEC2HEX([.C33])" table:style-name="ce1">
            <text:p>47A1</text:p>
          </table:table-cell>
          <table:table-cell office:value-type="float" office:value="18337" table:style-name="ce1">
            <text:p>18337</text:p>
          </table:table-cell>
          <table:table-cell office:value-type="float" office:value="1560" table:style-name="ce1">
            <text:p>1560</text:p>
          </table:table-cell>
          <table:table-cell table:number-columns-repeated="16380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office:string-value="4DB9" table:formula="of:=DEC2HEX([.C34])" table:style-name="ce1">
            <text:p>4DB9</text:p>
          </table:table-cell>
          <table:table-cell office:value-type="float" office:value="19897" table:style-name="ce1">
            <text:p>19897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office:string-value="4DBD" table:formula="of:=DEC2HEX([.C35])" table:style-name="ce1">
            <text:p>4DBD</text:p>
          </table:table-cell>
          <table:table-cell office:value-type="float" office:value="19901" table:style-name="ce1">
            <text:p>19901</text:p>
          </table:table-cell>
          <table:table-cell office:value-type="float" office:value="32" table:style-name="ce1">
            <text:p>32</text:p>
          </table:table-cell>
          <table:table-cell table:number-columns-repeated="16380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office:string-value="4DDD" table:formula="of:=DEC2HEX([.C36])" table:style-name="ce1">
            <text:p>4DDD</text:p>
          </table:table-cell>
          <table:table-cell office:value-type="float" office:value="19933" table:style-name="ce1">
            <text:p>19933</text:p>
          </table:table-cell>
          <table:table-cell office:value-type="float" office:value="894" table:style-name="ce1">
            <text:p>894</text:p>
          </table:table-cell>
          <table:table-cell table:number-columns-repeated="16380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office:string-value="515B" table:formula="of:=DEC2HEX([.C37])" table:style-name="ce1">
            <text:p>515B</text:p>
          </table:table-cell>
          <table:table-cell office:value-type="float" office:value="20827" table:style-name="ce1">
            <text:p>20827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office:string-value="515F" table:formula="of:=DEC2HEX([.C38])" table:style-name="ce1">
            <text:p>515F</text:p>
          </table:table-cell>
          <table:table-cell office:value-type="float" office:value="20831" table:style-name="ce1">
            <text:p>20831</text:p>
          </table:table-cell>
          <table:table-cell office:value-type="float" office:value="32" table:style-name="ce1">
            <text:p>32</text:p>
          </table:table-cell>
          <table:table-cell table:number-columns-repeated="16380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office:string-value="517F" table:formula="of:=DEC2HEX([.C39])" table:style-name="ce1">
            <text:p>517F</text:p>
          </table:table-cell>
          <table:table-cell office:value-type="float" office:value="20863" table:style-name="ce1">
            <text:p>20863</text:p>
          </table:table-cell>
          <table:table-cell office:value-type="float" office:value="310" table:style-name="ce1">
            <text:p>310</text:p>
          </table:table-cell>
          <table:table-cell table:number-columns-repeated="16380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office:string-value="52B5" table:formula="of:=DEC2HEX([.C40])" table:style-name="ce1">
            <text:p>52B5</text:p>
          </table:table-cell>
          <table:table-cell office:value-type="float" office:value="21173" table:style-name="ce1">
            <text:p>21173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office:string-value="52B9" table:formula="of:=DEC2HEX([.C41])" table:style-name="ce1">
            <text:p>52B9</text:p>
          </table:table-cell>
          <table:table-cell office:value-type="float" office:value="21177" table:style-name="ce1">
            <text:p>21177</text:p>
          </table:table-cell>
          <table:table-cell office:value-type="float" office:value="32" table:style-name="ce1">
            <text:p>32</text:p>
          </table:table-cell>
          <table:table-cell table:number-columns-repeated="16380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office:string-value="52D9" table:formula="of:=DEC2HEX([.C42])" table:style-name="ce1">
            <text:p>52D9</text:p>
          </table:table-cell>
          <table:table-cell office:value-type="float" office:value="21209" table:style-name="ce1">
            <text:p>21209</text:p>
          </table:table-cell>
          <table:table-cell office:value-type="float" office:value="886" table:style-name="ce1">
            <text:p>886</text:p>
          </table:table-cell>
          <table:table-cell table:number-columns-repeated="16380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office:string-value="564F" table:formula="of:=DEC2HEX([.C43])" table:style-name="ce1">
            <text:p>564F</text:p>
          </table:table-cell>
          <table:table-cell office:value-type="float" office:value="22095" table:style-name="ce1">
            <text:p>22095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office:string-value="5653" table:formula="of:=DEC2HEX([.C44])" table:style-name="ce1">
            <text:p>5653</text:p>
          </table:table-cell>
          <table:table-cell office:value-type="float" office:value="22099" table:style-name="ce1">
            <text:p>22099</text:p>
          </table:table-cell>
          <table:table-cell office:value-type="float" office:value="32" table:style-name="ce1">
            <text:p>32</text:p>
          </table:table-cell>
          <table:table-cell table:number-columns-repeated="16380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office:string-value="5673" table:formula="of:=DEC2HEX([.C45])" table:style-name="ce1">
            <text:p>5673</text:p>
          </table:table-cell>
          <table:table-cell office:value-type="float" office:value="22131" table:style-name="ce1">
            <text:p>22131</text:p>
          </table:table-cell>
          <table:table-cell office:value-type="float" office:value="550" table:style-name="ce1">
            <text:p>550</text:p>
          </table:table-cell>
          <table:table-cell table:number-columns-repeated="1638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office:string-value="5899" table:formula="of:=DEC2HEX([.C46])" table:style-name="ce1">
            <text:p>5899</text:p>
          </table:table-cell>
          <table:table-cell office:value-type="float" office:value="22681" table:style-name="ce1">
            <text:p>22681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office:string-value="589D" table:formula="of:=DEC2HEX([.C47])" table:style-name="ce1">
            <text:p>589D</text:p>
          </table:table-cell>
          <table:table-cell office:value-type="float" office:value="22685" table:style-name="ce1">
            <text:p>22685</text:p>
          </table:table-cell>
          <table:table-cell office:value-type="float" office:value="32" table:style-name="ce1">
            <text:p>32</text:p>
          </table:table-cell>
          <table:table-cell table:number-columns-repeated="16380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office:string-value="58BD" table:formula="of:=DEC2HEX([.C48])" table:style-name="ce1">
            <text:p>58BD</text:p>
          </table:table-cell>
          <table:table-cell office:value-type="float" office:value="22717" table:style-name="ce1">
            <text:p>22717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kipped until here (15440)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office:string-value="59C1" table:formula="of:=DEC2HEX([.C49])" table:style-name="ce1">
            <text:p>59C1</text:p>
          </table:table-cell>
          <table:table-cell office:value-type="float" office:value="22977" table:style-name="ce1">
            <text:p>2297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office:string-value="59C5" table:formula="of:=DEC2HEX([.C50])" table:style-name="ce1">
            <text:p>59C5</text:p>
          </table:table-cell>
          <table:table-cell office:value-type="float" office:value="22981" table:style-name="ce1">
            <text:p>2298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office:string-value="59E5" table:formula="of:=DEC2HEX([.C51])" table:style-name="ce1">
            <text:p>59E5</text:p>
          </table:table-cell>
          <table:table-cell office:value-type="float" office:value="23013" table:style-name="ce1">
            <text:p>23013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office:string-value="5A67" table:formula="of:=DEC2HEX([.C52])" table:style-name="ce1">
            <text:p>5A67</text:p>
          </table:table-cell>
          <table:table-cell office:value-type="float" office:value="23143" table:style-name="ce1">
            <text:p>2314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office:string-value="5A6B" table:formula="of:=DEC2HEX([.C53])" table:style-name="ce1">
            <text:p>5A6B</text:p>
          </table:table-cell>
          <table:table-cell office:value-type="float" office:value="23147" table:style-name="ce1">
            <text:p>2314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office:string-value="5A8B" table:formula="of:=DEC2HEX([.C54])" table:style-name="ce1">
            <text:p>5A8B</text:p>
          </table:table-cell>
          <table:table-cell office:value-type="float" office:value="23179" table:style-name="ce1">
            <text:p>23179</text:p>
          </table:table-cell>
          <table:table-cell office:value-type="float" office:value="861" table:style-name="ce1">
            <text:p>86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office:string-value="5DE8" table:formula="of:=DEC2HEX([.C55])" table:style-name="ce1">
            <text:p>5DE8</text:p>
          </table:table-cell>
          <table:table-cell office:value-type="float" office:value="24040" table:style-name="ce1">
            <text:p>2404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office:string-value="5DEC" table:formula="of:=DEC2HEX([.C56])" table:style-name="ce1">
            <text:p>5DEC</text:p>
          </table:table-cell>
          <table:table-cell office:value-type="float" office:value="24044" table:style-name="ce1">
            <text:p>2404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office:string-value="5E0C" table:formula="of:=DEC2HEX([.C57])" table:style-name="ce1">
            <text:p>5E0C</text:p>
          </table:table-cell>
          <table:table-cell office:value-type="float" office:value="24076" table:style-name="ce1">
            <text:p>24076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office:string-value="6061" table:formula="of:=DEC2HEX([.C58])" table:style-name="ce1">
            <text:p>6061</text:p>
          </table:table-cell>
          <table:table-cell office:value-type="float" office:value="24673" table:style-name="ce1">
            <text:p>2467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office:string-value="6065" table:formula="of:=DEC2HEX([.C59])" table:style-name="ce1">
            <text:p>6065</text:p>
          </table:table-cell>
          <table:table-cell office:value-type="float" office:value="24677" table:style-name="ce1">
            <text:p>2467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office:string-value="6085" table:formula="of:=DEC2HEX([.C60])" table:style-name="ce1">
            <text:p>6085</text:p>
          </table:table-cell>
          <table:table-cell office:value-type="float" office:value="24709" table:style-name="ce1">
            <text:p>24709</text:p>
          </table:table-cell>
          <table:table-cell office:value-type="float" office:value="523" table:style-name="ce1">
            <text:p>52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office:string-value="6290" table:formula="of:=DEC2HEX([.C61])" table:style-name="ce1">
            <text:p>6290</text:p>
          </table:table-cell>
          <table:table-cell office:value-type="float" office:value="25232" table:style-name="ce1">
            <text:p>252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office:string-value="6294" table:formula="of:=DEC2HEX([.C62])" table:style-name="ce1">
            <text:p>6294</text:p>
          </table:table-cell>
          <table:table-cell office:value-type="float" office:value="25236" table:style-name="ce1">
            <text:p>2523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office:string-value="62B4" table:formula="of:=DEC2HEX([.C63])" table:style-name="ce1">
            <text:p>62B4</text:p>
          </table:table-cell>
          <table:table-cell office:value-type="float" office:value="25268" table:style-name="ce1">
            <text:p>25268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office:string-value="6509" table:formula="of:=DEC2HEX([.C64])" table:style-name="ce1">
            <text:p>6509</text:p>
          </table:table-cell>
          <table:table-cell office:value-type="float" office:value="25865" table:style-name="ce1">
            <text:p>2586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office:string-value="650D" table:formula="of:=DEC2HEX([.C65])" table:style-name="ce1">
            <text:p>650D</text:p>
          </table:table-cell>
          <table:table-cell office:value-type="float" office:value="25869" table:style-name="ce1">
            <text:p>2586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office:string-value="652D" table:formula="of:=DEC2HEX([.C66])" table:style-name="ce1">
            <text:p>652D</text:p>
          </table:table-cell>
          <table:table-cell office:value-type="float" office:value="25901" table:style-name="ce1">
            <text:p>25901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office:string-value="675D" table:formula="of:=DEC2HEX([.C67])" table:style-name="ce1">
            <text:p>675D</text:p>
          </table:table-cell>
          <table:table-cell office:value-type="float" office:value="26461" table:style-name="ce1">
            <text:p>2646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office:string-value="6761" table:formula="of:=DEC2HEX([.C68])" table:style-name="ce1">
            <text:p>6761</text:p>
          </table:table-cell>
          <table:table-cell office:value-type="float" office:value="26465" table:style-name="ce1">
            <text:p>2646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office:string-value="6781" table:formula="of:=DEC2HEX([.C69])" table:style-name="ce1">
            <text:p>6781</text:p>
          </table:table-cell>
          <table:table-cell office:value-type="float" office:value="26497" table:style-name="ce1">
            <text:p>26497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office:string-value="696F" table:formula="of:=DEC2HEX([.C70])" table:style-name="ce1">
            <text:p>696F</text:p>
          </table:table-cell>
          <table:table-cell office:value-type="float" office:value="26991" table:style-name="ce1">
            <text:p>2699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office:string-value="6973" table:formula="of:=DEC2HEX([.C71])" table:style-name="ce1">
            <text:p>6973</text:p>
          </table:table-cell>
          <table:table-cell office:value-type="float" office:value="26995" table:style-name="ce1">
            <text:p>2699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office:string-value="6993" table:formula="of:=DEC2HEX([.C72])" table:style-name="ce1">
            <text:p>6993</text:p>
          </table:table-cell>
          <table:table-cell office:value-type="float" office:value="27027" table:style-name="ce1">
            <text:p>27027</text:p>
          </table:table-cell>
          <table:table-cell office:value-type="float" office:value="583" table:style-name="ce1">
            <text:p>58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office:string-value="6BDA" table:formula="of:=DEC2HEX([.C73])" table:style-name="ce1">
            <text:p>6BDA</text:p>
          </table:table-cell>
          <table:table-cell office:value-type="float" office:value="27610" table:style-name="ce1">
            <text:p>276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office:string-value="6BDE" table:formula="of:=DEC2HEX([.C74])" table:style-name="ce1">
            <text:p>6BDE</text:p>
          </table:table-cell>
          <table:table-cell office:value-type="float" office:value="27614" table:style-name="ce1">
            <text:p>2761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office:string-value="6BFE" table:formula="of:=DEC2HEX([.C75])" table:style-name="ce1">
            <text:p>6BFE</text:p>
          </table:table-cell>
          <table:table-cell office:value-type="float" office:value="27646" table:style-name="ce1">
            <text:p>27646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office:string-value="6E47" table:formula="of:=DEC2HEX([.C76])" table:style-name="ce1">
            <text:p>6E47</text:p>
          </table:table-cell>
          <table:table-cell office:value-type="float" office:value="28231" table:style-name="ce1">
            <text:p>2823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office:string-value="6E4B" table:formula="of:=DEC2HEX([.C77])" table:style-name="ce1">
            <text:p>6E4B</text:p>
          </table:table-cell>
          <table:table-cell office:value-type="float" office:value="28235" table:style-name="ce1">
            <text:p>2823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office:string-value="6E6B" table:formula="of:=DEC2HEX([.C78])" table:style-name="ce1">
            <text:p>6E6B</text:p>
          </table:table-cell>
          <table:table-cell office:value-type="float" office:value="28267" table:style-name="ce1">
            <text:p>28267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office:string-value="70C0" table:formula="of:=DEC2HEX([.C79])" table:style-name="ce1">
            <text:p>70C0</text:p>
          </table:table-cell>
          <table:table-cell office:value-type="float" office:value="28864" table:style-name="ce1">
            <text:p>2886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office:string-value="70C4" table:formula="of:=DEC2HEX([.C80])" table:style-name="ce1">
            <text:p>70C4</text:p>
          </table:table-cell>
          <table:table-cell office:value-type="float" office:value="28868" table:style-name="ce1">
            <text:p>2886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office:string-value="70E4" table:formula="of:=DEC2HEX([.C81])" table:style-name="ce1">
            <text:p>70E4</text:p>
          </table:table-cell>
          <table:table-cell office:value-type="float" office:value="28900" table:style-name="ce1">
            <text:p>28900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office:string-value="7264" table:formula="of:=DEC2HEX([.C82])" table:style-name="ce1">
            <text:p>7264</text:p>
          </table:table-cell>
          <table:table-cell office:value-type="float" office:value="29284" table:style-name="ce1">
            <text:p>2928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office:string-value="7268" table:formula="of:=DEC2HEX([.C83])" table:style-name="ce1">
            <text:p>7268</text:p>
          </table:table-cell>
          <table:table-cell office:value-type="float" office:value="29288" table:style-name="ce1">
            <text:p>2928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office:string-value="7288" table:formula="of:=DEC2HEX([.C84])" table:style-name="ce1">
            <text:p>7288</text:p>
          </table:table-cell>
          <table:table-cell office:value-type="float" office:value="29320" table:style-name="ce1">
            <text:p>29320</text:p>
          </table:table-cell>
          <table:table-cell office:value-type="float" office:value="1242" table:style-name="ce1">
            <text:p>124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office:string-value="7762" table:formula="of:=DEC2HEX([.C85])" table:style-name="ce1">
            <text:p>7762</text:p>
          </table:table-cell>
          <table:table-cell office:value-type="float" office:value="30562" table:style-name="ce1">
            <text:p>3056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office:string-value="7766" table:formula="of:=DEC2HEX([.C86])" table:style-name="ce1">
            <text:p>7766</text:p>
          </table:table-cell>
          <table:table-cell office:value-type="float" office:value="30566" table:style-name="ce1">
            <text:p>3056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office:string-value="7786" table:formula="of:=DEC2HEX([.C87])" table:style-name="ce1">
            <text:p>7786</text:p>
          </table:table-cell>
          <table:table-cell office:value-type="float" office:value="30598" table:style-name="ce1">
            <text:p>30598</text:p>
          </table:table-cell>
          <table:table-cell office:value-type="float" office:value="425" table:style-name="ce1">
            <text:p>42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office:string-value="792F" table:formula="of:=DEC2HEX([.C88])" table:style-name="ce1">
            <text:p>792F</text:p>
          </table:table-cell>
          <table:table-cell office:value-type="float" office:value="31023" table:style-name="ce1">
            <text:p>3102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office:string-value="7933" table:formula="of:=DEC2HEX([.C89])" table:style-name="ce1">
            <text:p>7933</text:p>
          </table:table-cell>
          <table:table-cell office:value-type="float" office:value="31027" table:style-name="ce1">
            <text:p>3102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office:string-value="7953" table:formula="of:=DEC2HEX([.C90])" table:style-name="ce1">
            <text:p>7953</text:p>
          </table:table-cell>
          <table:table-cell office:value-type="float" office:value="31059" table:style-name="ce1">
            <text:p>31059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office:string-value="7B2A" table:formula="of:=DEC2HEX([.C91])" table:style-name="ce1">
            <text:p>7B2A</text:p>
          </table:table-cell>
          <table:table-cell office:value-type="float" office:value="31530" table:style-name="ce1">
            <text:p>3153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office:string-value="7B2E" table:formula="of:=DEC2HEX([.C92])" table:style-name="ce1">
            <text:p>7B2E</text:p>
          </table:table-cell>
          <table:table-cell office:value-type="float" office:value="31534" table:style-name="ce1">
            <text:p>3153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office:string-value="7B4E" table:formula="of:=DEC2HEX([.C93])" table:style-name="ce1">
            <text:p>7B4E</text:p>
          </table:table-cell>
          <table:table-cell office:value-type="float" office:value="31566" table:style-name="ce1">
            <text:p>31566</text:p>
          </table:table-cell>
          <table:table-cell office:value-type="float" office:value="1250" table:style-name="ce1">
            <text:p>125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office:string-value="8030" table:formula="of:=DEC2HEX([.C94])" table:style-name="ce1">
            <text:p>8030</text:p>
          </table:table-cell>
          <table:table-cell office:value-type="float" office:value="32816" table:style-name="ce1">
            <text:p>328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office:string-value="8034" table:formula="of:=DEC2HEX([.C95])" table:style-name="ce1">
            <text:p>8034</text:p>
          </table:table-cell>
          <table:table-cell office:value-type="float" office:value="32820" table:style-name="ce1">
            <text:p>3282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office:string-value="8054" table:formula="of:=DEC2HEX([.C96])" table:style-name="ce1">
            <text:p>8054</text:p>
          </table:table-cell>
          <table:table-cell office:value-type="float" office:value="32852" table:style-name="ce1">
            <text:p>32852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office:string-value="81AA" table:formula="of:=DEC2HEX([.C97])" table:style-name="ce1">
            <text:p>81AA</text:p>
          </table:table-cell>
          <table:table-cell office:value-type="float" office:value="33194" table:style-name="ce1">
            <text:p>3319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office:string-value="81AE" table:formula="of:=DEC2HEX([.C98])" table:style-name="ce1">
            <text:p>81AE</text:p>
          </table:table-cell>
          <table:table-cell office:value-type="float" office:value="33198" table:style-name="ce1">
            <text:p>3319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office:string-value="81CE" table:formula="of:=DEC2HEX([.C99])" table:style-name="ce1">
            <text:p>81CE</text:p>
          </table:table-cell>
          <table:table-cell office:value-type="float" office:value="33230" table:style-name="ce1">
            <text:p>33230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office:string-value="8425" table:formula="of:=DEC2HEX([.C100])" table:style-name="ce1">
            <text:p>8425</text:p>
          </table:table-cell>
          <table:table-cell office:value-type="float" office:value="33829" table:style-name="ce1">
            <text:p>3382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office:string-value="8429" table:formula="of:=DEC2HEX([.C101])" table:style-name="ce1">
            <text:p>8429</text:p>
          </table:table-cell>
          <table:table-cell office:value-type="float" office:value="33833" table:style-name="ce1">
            <text:p>3383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office:string-value="8449" table:formula="of:=DEC2HEX([.C102])" table:style-name="ce1">
            <text:p>8449</text:p>
          </table:table-cell>
          <table:table-cell office:value-type="float" office:value="33865" table:style-name="ce1">
            <text:p>33865</text:p>
          </table:table-cell>
          <table:table-cell office:value-type="float" office:value="582" table:style-name="ce1">
            <text:p>58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office:string-value="868F" table:formula="of:=DEC2HEX([.C103])" table:style-name="ce1">
            <text:p>868F</text:p>
          </table:table-cell>
          <table:table-cell office:value-type="float" office:value="34447" table:style-name="ce1">
            <text:p>3444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office:string-value="8693" table:formula="of:=DEC2HEX([.C104])" table:style-name="ce1">
            <text:p>8693</text:p>
          </table:table-cell>
          <table:table-cell office:value-type="float" office:value="34451" table:style-name="ce1">
            <text:p>3445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office:string-value="86B3" table:formula="of:=DEC2HEX([.C105])" table:style-name="ce1">
            <text:p>86B3</text:p>
          </table:table-cell>
          <table:table-cell office:value-type="float" office:value="34483" table:style-name="ce1">
            <text:p>34483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office:string-value="890A" table:formula="of:=DEC2HEX([.C106])" table:style-name="ce1">
            <text:p>890A</text:p>
          </table:table-cell>
          <table:table-cell office:value-type="float" office:value="35082" table:style-name="ce1">
            <text:p>3508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office:string-value="890E" table:formula="of:=DEC2HEX([.C107])" table:style-name="ce1">
            <text:p>890E</text:p>
          </table:table-cell>
          <table:table-cell office:value-type="float" office:value="35086" table:style-name="ce1">
            <text:p>3508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office:string-value="892E" table:formula="of:=DEC2HEX([.C108])" table:style-name="ce1">
            <text:p>892E</text:p>
          </table:table-cell>
          <table:table-cell office:value-type="float" office:value="35118" table:style-name="ce1">
            <text:p>35118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office:string-value="8B24" table:formula="of:=DEC2HEX([.C109])" table:style-name="ce1">
            <text:p>8B24</text:p>
          </table:table-cell>
          <table:table-cell office:value-type="float" office:value="35620" table:style-name="ce1">
            <text:p>3562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office:string-value="8B28" table:formula="of:=DEC2HEX([.C110])" table:style-name="ce1">
            <text:p>8B28</text:p>
          </table:table-cell>
          <table:table-cell office:value-type="float" office:value="35624" table:style-name="ce1">
            <text:p>3562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office:string-value="8B48" table:formula="of:=DEC2HEX([.C111])" table:style-name="ce1">
            <text:p>8B48</text:p>
          </table:table-cell>
          <table:table-cell office:value-type="float" office:value="35656" table:style-name="ce1">
            <text:p>35656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office:string-value="8D9F" table:formula="of:=DEC2HEX([.C112])" table:style-name="ce1">
            <text:p>8D9F</text:p>
          </table:table-cell>
          <table:table-cell office:value-type="float" office:value="36255" table:style-name="ce1">
            <text:p>3625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office:string-value="8DA3" table:formula="of:=DEC2HEX([.C113])" table:style-name="ce1">
            <text:p>8DA3</text:p>
          </table:table-cell>
          <table:table-cell office:value-type="float" office:value="36259" table:style-name="ce1">
            <text:p>3625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office:string-value="8DC3" table:formula="of:=DEC2HEX([.C114])" table:style-name="ce1">
            <text:p>8DC3</text:p>
          </table:table-cell>
          <table:table-cell office:value-type="float" office:value="36291" table:style-name="ce1">
            <text:p>36291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office:string-value="901A" table:formula="of:=DEC2HEX([.C115])" table:style-name="ce1">
            <text:p>901A</text:p>
          </table:table-cell>
          <table:table-cell office:value-type="float" office:value="36890" table:style-name="ce1">
            <text:p>3689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office:string-value="901E" table:formula="of:=DEC2HEX([.C116])" table:style-name="ce1">
            <text:p>901E</text:p>
          </table:table-cell>
          <table:table-cell office:value-type="float" office:value="36894" table:style-name="ce1">
            <text:p>3689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office:string-value="903E" table:formula="of:=DEC2HEX([.C117])" table:style-name="ce1">
            <text:p>903E</text:p>
          </table:table-cell>
          <table:table-cell office:value-type="float" office:value="36926" table:style-name="ce1">
            <text:p>36926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office:string-value="9270" table:formula="of:=DEC2HEX([.C118])" table:style-name="ce1">
            <text:p>9270</text:p>
          </table:table-cell>
          <table:table-cell office:value-type="float" office:value="37488" table:style-name="ce1">
            <text:p>3748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office:string-value="9274" table:formula="of:=DEC2HEX([.C119])" table:style-name="ce1">
            <text:p>9274</text:p>
          </table:table-cell>
          <table:table-cell office:value-type="float" office:value="37492" table:style-name="ce1">
            <text:p>3749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office:string-value="9294" table:formula="of:=DEC2HEX([.C120])" table:style-name="ce1">
            <text:p>9294</text:p>
          </table:table-cell>
          <table:table-cell office:value-type="float" office:value="37524" table:style-name="ce1">
            <text:p>37524</text:p>
          </table:table-cell>
          <table:table-cell office:value-type="float" office:value="522" table:style-name="ce1">
            <text:p>52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office:string-value="949E" table:formula="of:=DEC2HEX([.C121])" table:style-name="ce1">
            <text:p>949E</text:p>
          </table:table-cell>
          <table:table-cell office:value-type="float" office:value="38046" table:style-name="ce1">
            <text:p>3804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office:string-value="94A2" table:formula="of:=DEC2HEX([.C122])" table:style-name="ce1">
            <text:p>94A2</text:p>
          </table:table-cell>
          <table:table-cell office:value-type="float" office:value="38050" table:style-name="ce1">
            <text:p>3805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office:string-value="94C2" table:formula="of:=DEC2HEX([.C123])" table:style-name="ce1">
            <text:p>94C2</text:p>
          </table:table-cell>
          <table:table-cell office:value-type="float" office:value="38082" table:style-name="ce1">
            <text:p>38082</text:p>
          </table:table-cell>
          <table:table-cell office:value-type="float" office:value="876" table:style-name="ce1">
            <text:p>876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office:string-value="982E" table:formula="of:=DEC2HEX([.C124])" table:style-name="ce1">
            <text:p>982E</text:p>
          </table:table-cell>
          <table:table-cell office:value-type="float" office:value="38958" table:style-name="ce1">
            <text:p>3895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office:string-value="9832" table:formula="of:=DEC2HEX([.C125])" table:style-name="ce1">
            <text:p>9832</text:p>
          </table:table-cell>
          <table:table-cell office:value-type="float" office:value="38962" table:style-name="ce1">
            <text:p>3896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office:string-value="9852" table:formula="of:=DEC2HEX([.C126])" table:style-name="ce1">
            <text:p>9852</text:p>
          </table:table-cell>
          <table:table-cell office:value-type="float" office:value="38994" table:style-name="ce1">
            <text:p>38994</text:p>
          </table:table-cell>
          <table:table-cell office:value-type="float" office:value="837" table:style-name="ce1">
            <text:p>83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office:string-value="9B97" table:formula="of:=DEC2HEX([.C127])" table:style-name="ce1">
            <text:p>9B97</text:p>
          </table:table-cell>
          <table:table-cell office:value-type="float" office:value="39831" table:style-name="ce1">
            <text:p>3983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office:string-value="9B9B" table:formula="of:=DEC2HEX([.C128])" table:style-name="ce1">
            <text:p>9B9B</text:p>
          </table:table-cell>
          <table:table-cell office:value-type="float" office:value="39835" table:style-name="ce1">
            <text:p>3983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office:string-value="9BBB" table:formula="of:=DEC2HEX([.C129])" table:style-name="ce1">
            <text:p>9BBB</text:p>
          </table:table-cell>
          <table:table-cell office:value-type="float" office:value="39867" table:style-name="ce1">
            <text:p>39867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office:string-value="9D9B" table:formula="of:=DEC2HEX([.C130])" table:style-name="ce1">
            <text:p>9D9B</text:p>
          </table:table-cell>
          <table:table-cell office:value-type="float" office:value="40347" table:style-name="ce1">
            <text:p>4034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office:string-value="9D9F" table:formula="of:=DEC2HEX([.C131])" table:style-name="ce1">
            <text:p>9D9F</text:p>
          </table:table-cell>
          <table:table-cell office:value-type="float" office:value="40351" table:style-name="ce1">
            <text:p>4035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office:string-value="9DBF" table:formula="of:=DEC2HEX([.C132])" table:style-name="ce1">
            <text:p>9DBF</text:p>
          </table:table-cell>
          <table:table-cell office:value-type="float" office:value="40383" table:style-name="ce1">
            <text:p>40383</text:p>
          </table:table-cell>
          <table:table-cell office:value-type="float" office:value="1032" table:style-name="ce1">
            <text:p>103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office:string-value="A1C7" table:formula="of:=DEC2HEX([.C133])" table:style-name="ce1">
            <text:p>A1C7</text:p>
          </table:table-cell>
          <table:table-cell office:value-type="float" office:value="41415" table:style-name="ce1">
            <text:p>4141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office:string-value="A1CB" table:formula="of:=DEC2HEX([.C134])" table:style-name="ce1">
            <text:p>A1CB</text:p>
          </table:table-cell>
          <table:table-cell office:value-type="float" office:value="41419" table:style-name="ce1">
            <text:p>4141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office:string-value="A1EB" table:formula="of:=DEC2HEX([.C135])" table:style-name="ce1">
            <text:p>A1EB</text:p>
          </table:table-cell>
          <table:table-cell office:value-type="float" office:value="41451" table:style-name="ce1">
            <text:p>41451</text:p>
          </table:table-cell>
          <table:table-cell office:value-type="float" office:value="1037" table:style-name="ce1">
            <text:p>103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office:string-value="A5F8" table:formula="of:=DEC2HEX([.C136])" table:style-name="ce1">
            <text:p>A5F8</text:p>
          </table:table-cell>
          <table:table-cell office:value-type="float" office:value="42488" table:style-name="ce1">
            <text:p>4248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office:string-value="A5FC" table:formula="of:=DEC2HEX([.C137])" table:style-name="ce1">
            <text:p>A5FC</text:p>
          </table:table-cell>
          <table:table-cell office:value-type="float" office:value="42492" table:style-name="ce1">
            <text:p>4249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office:string-value="A61C" table:formula="of:=DEC2HEX([.C138])" table:style-name="ce1">
            <text:p>A61C</text:p>
          </table:table-cell>
          <table:table-cell office:value-type="float" office:value="42524" table:style-name="ce1">
            <text:p>42524</text:p>
          </table:table-cell>
          <table:table-cell office:value-type="float" office:value="1166" table:style-name="ce1">
            <text:p>116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office:string-value="AAAA" table:formula="of:=DEC2HEX([.C139])" table:style-name="ce1">
            <text:p>AAAA</text:p>
          </table:table-cell>
          <table:table-cell office:value-type="float" office:value="43690" table:style-name="ce1">
            <text:p>4369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office:string-value="AAAE" table:formula="of:=DEC2HEX([.C140])" table:style-name="ce1">
            <text:p>AAAE</text:p>
          </table:table-cell>
          <table:table-cell office:value-type="float" office:value="43694" table:style-name="ce1">
            <text:p>4369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office:string-value="AACE" table:formula="of:=DEC2HEX([.C141])" table:style-name="ce1">
            <text:p>AACE</text:p>
          </table:table-cell>
          <table:table-cell office:value-type="float" office:value="43726" table:style-name="ce1">
            <text:p>43726</text:p>
          </table:table-cell>
          <table:table-cell office:value-type="float" office:value="1184" table:style-name="ce1">
            <text:p>118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office:string-value="AF6E" table:formula="of:=DEC2HEX([.C142])" table:style-name="ce1">
            <text:p>AF6E</text:p>
          </table:table-cell>
          <table:table-cell office:value-type="float" office:value="44910" table:style-name="ce1">
            <text:p>449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office:string-value="AF72" table:formula="of:=DEC2HEX([.C143])" table:style-name="ce1">
            <text:p>AF72</text:p>
          </table:table-cell>
          <table:table-cell office:value-type="float" office:value="44914" table:style-name="ce1">
            <text:p>4491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office:string-value="AF92" table:formula="of:=DEC2HEX([.C144])" table:style-name="ce1">
            <text:p>AF92</text:p>
          </table:table-cell>
          <table:table-cell office:value-type="float" office:value="44946" table:style-name="ce1">
            <text:p>44946</text:p>
          </table:table-cell>
          <table:table-cell office:value-type="float" office:value="1136" table:style-name="ce1">
            <text:p>1136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office:string-value="B402" table:formula="of:=DEC2HEX([.C145])" table:style-name="ce1">
            <text:p>B402</text:p>
          </table:table-cell>
          <table:table-cell office:value-type="float" office:value="46082" table:style-name="ce1">
            <text:p>4608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office:string-value="B406" table:formula="of:=DEC2HEX([.C146])" table:style-name="ce1">
            <text:p>B406</text:p>
          </table:table-cell>
          <table:table-cell office:value-type="float" office:value="46086" table:style-name="ce1">
            <text:p>4608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office:string-value="B426" table:formula="of:=DEC2HEX([.C147])" table:style-name="ce1">
            <text:p>B426</text:p>
          </table:table-cell>
          <table:table-cell office:value-type="float" office:value="46118" table:style-name="ce1">
            <text:p>46118</text:p>
          </table:table-cell>
          <table:table-cell office:value-type="float" office:value="1146" table:style-name="ce1">
            <text:p>114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office:string-value="B8A0" table:formula="of:=DEC2HEX([.C148])" table:style-name="ce1">
            <text:p>B8A0</text:p>
          </table:table-cell>
          <table:table-cell office:value-type="float" office:value="47264" table:style-name="ce1">
            <text:p>4726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office:string-value="B8A4" table:formula="of:=DEC2HEX([.C149])" table:style-name="ce1">
            <text:p>B8A4</text:p>
          </table:table-cell>
          <table:table-cell office:value-type="float" office:value="47268" table:style-name="ce1">
            <text:p>4726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office:string-value="B8C4" table:formula="of:=DEC2HEX([.C150])" table:style-name="ce1">
            <text:p>B8C4</text:p>
          </table:table-cell>
          <table:table-cell office:value-type="float" office:value="47300" table:style-name="ce1">
            <text:p>47300</text:p>
          </table:table-cell>
          <table:table-cell office:value-type="float" office:value="720" table:style-name="ce1">
            <text:p>72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office:string-value="BB94" table:formula="of:=DEC2HEX([.C151])" table:style-name="ce1">
            <text:p>BB94</text:p>
          </table:table-cell>
          <table:table-cell office:value-type="float" office:value="48020" table:style-name="ce1">
            <text:p>4802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office:string-value="BB98" table:formula="of:=DEC2HEX([.C152])" table:style-name="ce1">
            <text:p>BB98</text:p>
          </table:table-cell>
          <table:table-cell office:value-type="float" office:value="48024" table:style-name="ce1">
            <text:p>4802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office:string-value="BBB8" table:formula="of:=DEC2HEX([.C153])" table:style-name="ce1">
            <text:p>BBB8</text:p>
          </table:table-cell>
          <table:table-cell office:value-type="float" office:value="48056" table:style-name="ce1">
            <text:p>48056</text:p>
          </table:table-cell>
          <table:table-cell office:value-type="float" office:value="1018" table:style-name="ce1">
            <text:p>101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office:string-value="BFB2" table:formula="of:=DEC2HEX([.C154])" table:style-name="ce1">
            <text:p>BFB2</text:p>
          </table:table-cell>
          <table:table-cell office:value-type="float" office:value="49074" table:style-name="ce1">
            <text:p>4907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office:string-value="BFB6" table:formula="of:=DEC2HEX([.C155])" table:style-name="ce1">
            <text:p>BFB6</text:p>
          </table:table-cell>
          <table:table-cell office:value-type="float" office:value="49078" table:style-name="ce1">
            <text:p>4907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office:string-value="BFD6" table:formula="of:=DEC2HEX([.C156])" table:style-name="ce1">
            <text:p>BFD6</text:p>
          </table:table-cell>
          <table:table-cell office:value-type="float" office:value="49110" table:style-name="ce1">
            <text:p>49110</text:p>
          </table:table-cell>
          <table:table-cell office:value-type="float" office:value="680" table:style-name="ce1">
            <text:p>68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office:string-value="C27E" table:formula="of:=DEC2HEX([.C157])" table:style-name="ce1">
            <text:p>C27E</text:p>
          </table:table-cell>
          <table:table-cell office:value-type="float" office:value="49790" table:style-name="ce1">
            <text:p>4979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office:string-value="C282" table:formula="of:=DEC2HEX([.C158])" table:style-name="ce1">
            <text:p>C282</text:p>
          </table:table-cell>
          <table:table-cell office:value-type="float" office:value="49794" table:style-name="ce1">
            <text:p>4979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office:string-value="C2A2" table:formula="of:=DEC2HEX([.C159])" table:style-name="ce1">
            <text:p>C2A2</text:p>
          </table:table-cell>
          <table:table-cell office:value-type="float" office:value="49826" table:style-name="ce1">
            <text:p>49826</text:p>
          </table:table-cell>
          <table:table-cell office:value-type="float" office:value="657" table:style-name="ce1">
            <text:p>65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office:string-value="C533" table:formula="of:=DEC2HEX([.C160])" table:style-name="ce1">
            <text:p>C533</text:p>
          </table:table-cell>
          <table:table-cell office:value-type="float" office:value="50483" table:style-name="ce1">
            <text:p>5048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office:string-value="C537" table:formula="of:=DEC2HEX([.C161])" table:style-name="ce1">
            <text:p>C537</text:p>
          </table:table-cell>
          <table:table-cell office:value-type="float" office:value="50487" table:style-name="ce1">
            <text:p>5048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office:string-value="C557" table:formula="of:=DEC2HEX([.C162])" table:style-name="ce1">
            <text:p>C557</text:p>
          </table:table-cell>
          <table:table-cell office:value-type="float" office:value="50519" table:style-name="ce1">
            <text:p>50519</text:p>
          </table:table-cell>
          <table:table-cell office:value-type="float" office:value="671" table:style-name="ce1">
            <text:p>671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office:string-value="C7F6" table:formula="of:=DEC2HEX([.C163])" table:style-name="ce1">
            <text:p>C7F6</text:p>
          </table:table-cell>
          <table:table-cell office:value-type="float" office:value="51190" table:style-name="ce1">
            <text:p>5119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office:string-value="C7FA" table:formula="of:=DEC2HEX([.C164])" table:style-name="ce1">
            <text:p>C7FA</text:p>
          </table:table-cell>
          <table:table-cell office:value-type="float" office:value="51194" table:style-name="ce1">
            <text:p>5119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office:string-value="C81A" table:formula="of:=DEC2HEX([.C165])" table:style-name="ce1">
            <text:p>C81A</text:p>
          </table:table-cell>
          <table:table-cell office:value-type="float" office:value="51226" table:style-name="ce1">
            <text:p>51226</text:p>
          </table:table-cell>
          <table:table-cell office:value-type="float" office:value="929" table:style-name="ce1">
            <text:p>92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office:string-value="CBBB" table:formula="of:=DEC2HEX([.C166])" table:style-name="ce1">
            <text:p>CBBB</text:p>
          </table:table-cell>
          <table:table-cell office:value-type="float" office:value="52155" table:style-name="ce1">
            <text:p>5215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office:string-value="CBBF" table:formula="of:=DEC2HEX([.C167])" table:style-name="ce1">
            <text:p>CBBF</text:p>
          </table:table-cell>
          <table:table-cell office:value-type="float" office:value="52159" table:style-name="ce1">
            <text:p>5215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office:string-value="CBDF" table:formula="of:=DEC2HEX([.C168])" table:style-name="ce1">
            <text:p>CBDF</text:p>
          </table:table-cell>
          <table:table-cell office:value-type="float" office:value="52191" table:style-name="ce1">
            <text:p>52191</text:p>
          </table:table-cell>
          <table:table-cell office:value-type="float" office:value="1066" table:style-name="ce1">
            <text:p>106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office:string-value="D009" table:formula="of:=DEC2HEX([.C169])" table:style-name="ce1">
            <text:p>D009</text:p>
          </table:table-cell>
          <table:table-cell office:value-type="float" office:value="53257" table:style-name="ce1">
            <text:p>5325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office:string-value="D00D" table:formula="of:=DEC2HEX([.C170])" table:style-name="ce1">
            <text:p>D00D</text:p>
          </table:table-cell>
          <table:table-cell office:value-type="float" office:value="53261" table:style-name="ce1">
            <text:p>5326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office:string-value="D02D" table:formula="of:=DEC2HEX([.C171])" table:style-name="ce1">
            <text:p>D02D</text:p>
          </table:table-cell>
          <table:table-cell office:value-type="float" office:value="53293" table:style-name="ce1">
            <text:p>53293</text:p>
          </table:table-cell>
          <table:table-cell office:value-type="float" office:value="1128" table:style-name="ce1">
            <text:p>112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office:string-value="D495" table:formula="of:=DEC2HEX([.C172])" table:style-name="ce1">
            <text:p>D495</text:p>
          </table:table-cell>
          <table:table-cell office:value-type="float" office:value="54421" table:style-name="ce1">
            <text:p>5442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office:string-value="D499" table:formula="of:=DEC2HEX([.C173])" table:style-name="ce1">
            <text:p>D499</text:p>
          </table:table-cell>
          <table:table-cell office:value-type="float" office:value="54425" table:style-name="ce1">
            <text:p>5442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office:string-value="D4B9" table:formula="of:=DEC2HEX([.C174])" table:style-name="ce1">
            <text:p>D4B9</text:p>
          </table:table-cell>
          <table:table-cell office:value-type="float" office:value="54457" table:style-name="ce1">
            <text:p>54457</text:p>
          </table:table-cell>
          <table:table-cell office:value-type="float" office:value="530" table:style-name="ce1">
            <text:p>53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office:string-value="D6CB" table:formula="of:=DEC2HEX([.C175])" table:style-name="ce1">
            <text:p>D6CB</text:p>
          </table:table-cell>
          <table:table-cell office:value-type="float" office:value="54987" table:style-name="ce1">
            <text:p>5498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office:string-value="D6CF" table:formula="of:=DEC2HEX([.C176])" table:style-name="ce1">
            <text:p>D6CF</text:p>
          </table:table-cell>
          <table:table-cell office:value-type="float" office:value="54991" table:style-name="ce1">
            <text:p>5499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office:string-value="D6EF" table:formula="of:=DEC2HEX([.C177])" table:style-name="ce1">
            <text:p>D6EF</text:p>
          </table:table-cell>
          <table:table-cell office:value-type="float" office:value="55023" table:style-name="ce1">
            <text:p>55023</text:p>
          </table:table-cell>
          <table:table-cell office:value-type="float" office:value="556" table:style-name="ce1">
            <text:p>55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office:string-value="D91B" table:formula="of:=DEC2HEX([.C178])" table:style-name="ce1">
            <text:p>D91B</text:p>
          </table:table-cell>
          <table:table-cell office:value-type="float" office:value="55579" table:style-name="ce1">
            <text:p>5557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office:string-value="D91F" table:formula="of:=DEC2HEX([.C179])" table:style-name="ce1">
            <text:p>D91F</text:p>
          </table:table-cell>
          <table:table-cell office:value-type="float" office:value="55583" table:style-name="ce1">
            <text:p>5558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office:string-value="D93F" table:formula="of:=DEC2HEX([.C180])" table:style-name="ce1">
            <text:p>D93F</text:p>
          </table:table-cell>
          <table:table-cell office:value-type="float" office:value="55615" table:style-name="ce1">
            <text:p>55615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office:string-value="DB6D" table:formula="of:=DEC2HEX([.C181])" table:style-name="ce1">
            <text:p>DB6D</text:p>
          </table:table-cell>
          <table:table-cell office:value-type="float" office:value="56173" table:style-name="ce1">
            <text:p>5617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office:string-value="DB71" table:formula="of:=DEC2HEX([.C182])" table:style-name="ce1">
            <text:p>DB71</text:p>
          </table:table-cell>
          <table:table-cell office:value-type="float" office:value="56177" table:style-name="ce1">
            <text:p>5617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office:string-value="DB91" table:formula="of:=DEC2HEX([.C183])" table:style-name="ce1">
            <text:p>DB91</text:p>
          </table:table-cell>
          <table:table-cell office:value-type="float" office:value="56209" table:style-name="ce1">
            <text:p>56209</text:p>
          </table:table-cell>
          <table:table-cell office:value-type="float" office:value="574" table:style-name="ce1">
            <text:p>57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office:string-value="DDCF" table:formula="of:=DEC2HEX([.C184])" table:style-name="ce1">
            <text:p>DDCF</text:p>
          </table:table-cell>
          <table:table-cell office:value-type="float" office:value="56783" table:style-name="ce1">
            <text:p>5678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office:string-value="DDD3" table:formula="of:=DEC2HEX([.C185])" table:style-name="ce1">
            <text:p>DDD3</text:p>
          </table:table-cell>
          <table:table-cell office:value-type="float" office:value="56787" table:style-name="ce1">
            <text:p>5678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office:string-value="DDF3" table:formula="of:=DEC2HEX([.C186])" table:style-name="ce1">
            <text:p>DDF3</text:p>
          </table:table-cell>
          <table:table-cell office:value-type="float" office:value="56819" table:style-name="ce1">
            <text:p>56819</text:p>
          </table:table-cell>
          <table:table-cell office:value-type="float" office:value="628" table:style-name="ce1">
            <text:p>62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office:string-value="E067" table:formula="of:=DEC2HEX([.C187])" table:style-name="ce1">
            <text:p>E067</text:p>
          </table:table-cell>
          <table:table-cell office:value-type="float" office:value="57447" table:style-name="ce1">
            <text:p>5744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office:string-value="E06B" table:formula="of:=DEC2HEX([.C188])" table:style-name="ce1">
            <text:p>E06B</text:p>
          </table:table-cell>
          <table:table-cell office:value-type="float" office:value="57451" table:style-name="ce1">
            <text:p>5745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office:string-value="E08B" table:formula="of:=DEC2HEX([.C189])" table:style-name="ce1">
            <text:p>E08B</text:p>
          </table:table-cell>
          <table:table-cell office:value-type="float" office:value="57483" table:style-name="ce1">
            <text:p>57483</text:p>
          </table:table-cell>
          <table:table-cell office:value-type="float" office:value="644" table:style-name="ce1">
            <text:p>64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office:string-value="E30F" table:formula="of:=DEC2HEX([.C190])" table:style-name="ce1">
            <text:p>E30F</text:p>
          </table:table-cell>
          <table:table-cell office:value-type="float" office:value="58127" table:style-name="ce1">
            <text:p>5812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office:string-value="E313" table:formula="of:=DEC2HEX([.C191])" table:style-name="ce1">
            <text:p>E313</text:p>
          </table:table-cell>
          <table:table-cell office:value-type="float" office:value="58131" table:style-name="ce1">
            <text:p>5813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office:string-value="E333" table:formula="of:=DEC2HEX([.C192])" table:style-name="ce1">
            <text:p>E333</text:p>
          </table:table-cell>
          <table:table-cell office:value-type="float" office:value="58163" table:style-name="ce1">
            <text:p>58163</text:p>
          </table:table-cell>
          <table:table-cell office:value-type="float" office:value="833" table:style-name="ce1">
            <text:p>83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office:string-value="E674" table:formula="of:=DEC2HEX([.C193])" table:style-name="ce1">
            <text:p>E674</text:p>
          </table:table-cell>
          <table:table-cell office:value-type="float" office:value="58996" table:style-name="ce1">
            <text:p>5899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office:string-value="E678" table:formula="of:=DEC2HEX([.C194])" table:style-name="ce1">
            <text:p>E678</text:p>
          </table:table-cell>
          <table:table-cell office:value-type="float" office:value="59000" table:style-name="ce1">
            <text:p>5900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office:string-value="E698" table:formula="of:=DEC2HEX([.C195])" table:style-name="ce1">
            <text:p>E698</text:p>
          </table:table-cell>
          <table:table-cell office:value-type="float" office:value="59032" table:style-name="ce1">
            <text:p>59032</text:p>
          </table:table-cell>
          <table:table-cell office:value-type="float" office:value="1317" table:style-name="ce1">
            <text:p>1317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office:string-value="EBBD" table:formula="of:=DEC2HEX([.C196])" table:style-name="ce1">
            <text:p>EBBD</text:p>
          </table:table-cell>
          <table:table-cell office:value-type="float" office:value="60349" table:style-name="ce1">
            <text:p>6034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office:string-value="EBC1" table:formula="of:=DEC2HEX([.C197])" table:style-name="ce1">
            <text:p>EBC1</text:p>
          </table:table-cell>
          <table:table-cell office:value-type="float" office:value="60353" table:style-name="ce1">
            <text:p>6035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office:string-value="EBE1" table:formula="of:=DEC2HEX([.C198])" table:style-name="ce1">
            <text:p>EBE1</text:p>
          </table:table-cell>
          <table:table-cell office:value-type="float" office:value="60385" table:style-name="ce1">
            <text:p>60385</text:p>
          </table:table-cell>
          <table:table-cell office:value-type="float" office:value="1116" table:style-name="ce1">
            <text:p>111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office:string-value="F03D" table:formula="of:=DEC2HEX([.C199])" table:style-name="ce1">
            <text:p>F03D</text:p>
          </table:table-cell>
          <table:table-cell office:value-type="float" office:value="61501" table:style-name="ce1">
            <text:p>6150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office:string-value="F041" table:formula="of:=DEC2HEX([.C200])" table:style-name="ce1">
            <text:p>F041</text:p>
          </table:table-cell>
          <table:table-cell office:value-type="float" office:value="61505" table:style-name="ce1">
            <text:p>6150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office:string-value="F061" table:formula="of:=DEC2HEX([.C201])" table:style-name="ce1">
            <text:p>F061</text:p>
          </table:table-cell>
          <table:table-cell office:value-type="float" office:value="61537" table:style-name="ce1">
            <text:p>61537</text:p>
          </table:table-cell>
          <table:table-cell office:value-type="float" office:value="1329" table:style-name="ce1">
            <text:p>132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office:string-value="F592" table:formula="of:=DEC2HEX([.C202])" table:style-name="ce1">
            <text:p>F592</text:p>
          </table:table-cell>
          <table:table-cell office:value-type="float" office:value="62866" table:style-name="ce1">
            <text:p>6286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office:string-value="F596" table:formula="of:=DEC2HEX([.C203])" table:style-name="ce1">
            <text:p>F596</text:p>
          </table:table-cell>
          <table:table-cell office:value-type="float" office:value="62870" table:style-name="ce1">
            <text:p>6287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office:string-value="F5B6" table:formula="of:=DEC2HEX([.C204])" table:style-name="ce1">
            <text:p>F5B6</text:p>
          </table:table-cell>
          <table:table-cell office:value-type="float" office:value="62902" table:style-name="ce1">
            <text:p>62902</text:p>
          </table:table-cell>
          <table:table-cell office:value-type="float" office:value="788" table:style-name="ce1">
            <text:p>788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office:string-value="F8CA" table:formula="of:=DEC2HEX([.C205])" table:style-name="ce1">
            <text:p>F8CA</text:p>
          </table:table-cell>
          <table:table-cell office:value-type="float" office:value="63690" table:style-name="ce1">
            <text:p>6369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office:string-value="F8CE" table:formula="of:=DEC2HEX([.C206])" table:style-name="ce1">
            <text:p>F8CE</text:p>
          </table:table-cell>
          <table:table-cell office:value-type="float" office:value="63694" table:style-name="ce1">
            <text:p>6369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office:string-value="F8EE" table:formula="of:=DEC2HEX([.C207])" table:style-name="ce1">
            <text:p>F8EE</text:p>
          </table:table-cell>
          <table:table-cell office:value-type="float" office:value="63726" table:style-name="ce1">
            <text:p>63726</text:p>
          </table:table-cell>
          <table:table-cell office:value-type="float" office:value="1081" table:style-name="ce1">
            <text:p>1081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office:string-value="FD27" table:formula="of:=DEC2HEX([.C208])" table:style-name="ce1">
            <text:p>FD27</text:p>
          </table:table-cell>
          <table:table-cell office:value-type="float" office:value="64807" table:style-name="ce1">
            <text:p>6480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office:string-value="FD2B" table:formula="of:=DEC2HEX([.C209])" table:style-name="ce1">
            <text:p>FD2B</text:p>
          </table:table-cell>
          <table:table-cell office:value-type="float" office:value="64811" table:style-name="ce1">
            <text:p>64811</text:p>
          </table:table-cell>
          <table:table-cell office:value-type="float" office:value="32" table:style-name="ce1">
            <text:p>32</text:p>
          </table:table-cell>
          <table:table-cell table:number-columns-repeated="16380" table:style-name="ce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office:string-value="FD4B" table:formula="of:=DEC2HEX([.C210])" table:style-name="ce1">
            <text:p>FD4B</text:p>
          </table:table-cell>
          <table:table-cell office:value-type="float" office:value="64843" table:style-name="ce1">
            <text:p>64843</text:p>
          </table:table-cell>
          <table:table-cell office:value-type="float" office:value="4102" table:style-name="ce1">
            <text:p>4102</text:p>
          </table:table-cell>
          <table:table-cell table:number-columns-repeated="16380" table:style-name="ce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office:string-value="10D51" table:formula="of:=DEC2HEX([.C211])" table:style-name="ce1">
            <text:p>10D51</text:p>
          </table:table-cell>
          <table:table-cell office:value-type="float" office:value="68945" table:style-name="ce1">
            <text:p>68945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office:string-value="10D55" table:formula="of:=DEC2HEX([.C212])" table:style-name="ce1">
            <text:p>10D55</text:p>
          </table:table-cell>
          <table:table-cell office:value-type="float" office:value="68949" table:style-name="ce1">
            <text:p>68949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width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office:string-value="10D59" table:formula="of:=DEC2HEX([.C213])" table:style-name="ce1">
            <text:p>10D59</text:p>
          </table:table-cell>
          <table:table-cell office:value-type="float" office:value="68953" table:style-name="ce1">
            <text:p>68953</text:p>
          </table:table-cell>
          <table:table-cell office:value-type="float" office:value="1028" table:style-name="ce1">
            <text:p>1028</text:p>
          </table:table-cell>
          <table:table-cell table:number-columns-repeated="2" table:style-name="ce1"/>
          <table:table-cell office:value-type="float" office:value="120" table:style-name="ce1">
            <text:p>120</text:p>
          </table:table-cell>
          <table:table-cell office:value-type="string" table:style-name="ce1">
            <text:p>height</text:p>
          </table:table-cell>
          <table:table-cell table:number-columns-repeated="16376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office:string-value="1115D" table:formula="of:=DEC2HEX([.C214])" table:style-name="ce1">
            <text:p>1115D</text:p>
          </table:table-cell>
          <table:table-cell office:value-type="float" office:value="69981" table:style-name="ce1">
            <text:p>6998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kipped until here (47008)</text:p>
          </table:table-cell>
          <table:table-cell table:style-name="ce1"/>
          <table:table-cell office:value-type="float" office:value="4560" table:formula="of:=[.G212]*[.G213]" table:style-name="ce1">
            <text:p>4560</text:p>
          </table:table-cell>
          <table:table-cell office:value-type="string" table:style-name="ce1">
            <text:p>pixels</text:p>
          </table:table-cell>
          <table:table-cell table:number-columns-repeated="16376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office:string-value="11161" table:formula="of:=DEC2HEX([.C215])" table:style-name="ce1">
            <text:p>11161</text:p>
          </table:table-cell>
          <table:table-cell office:value-type="float" office:value="69985" table:style-name="ce1">
            <text:p>69985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9120" table:formula="of:=[.G214]*2" table:style-name="ce1">
            <text:p>9120</text:p>
          </table:table-cell>
          <table:table-cell office:value-type="string" table:style-name="ce1">
            <text:p>2bytes/px</text:p>
          </table:table-cell>
          <table:table-cell table:number-columns-repeated="16376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office:string-value="11165" table:formula="of:=DEC2HEX([.C216])" table:style-name="ce1">
            <text:p>11165</text:p>
          </table:table-cell>
          <table:table-cell office:value-type="float" office:value="69989" table:style-name="ce1">
            <text:p>69989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float" office:value="18240" table:formula="of:=[.G215]*2" table:style-name="ce1">
            <text:p>18240</text:p>
          </table:table-cell>
          <table:table-cell office:value-type="string" table:style-name="ce1">
            <text:p>twice</text:p>
          </table:table-cell>
          <table:table-cell table:number-columns-repeated="16376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office:string-value="11185" table:formula="of:=DEC2HEX([.C217])" table:style-name="ce1">
            <text:p>11185</text:p>
          </table:table-cell>
          <table:table-cell office:value-type="float" office:value="70021" table:style-name="ce1">
            <text:p>70021</text:p>
          </table:table-cell>
          <table:table-cell office:value-type="float" office:value="26304" table:style-name="ce1">
            <text:p>26304</text:p>
          </table:table-cell>
          <table:table-cell office:value-type="string" table:style-name="ce1">
            <text:p>'&lt;&lt; looks more interesting</text:p>
          </table:table-cell>
          <table:table-cell table:style-name="ce1"/>
          <table:table-cell office:value-type="float" office:value="4800" table:formula="of:=[.D229]-[.G215]" table:style-name="ce1">
            <text:p>4800</text:p>
          </table:table-cell>
          <table:table-cell office:value-type="string" table:style-name="ce1">
            <text:p>delta</text:p>
          </table:table-cell>
          <table:table-cell table:number-columns-repeated="16376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office:string-value="17845" table:formula="of:=DEC2HEX([.C218])" table:style-name="ce1">
            <text:p>17845</text:p>
          </table:table-cell>
          <table:table-cell office:value-type="float" office:value="96325" table:style-name="ce1">
            <text:p>96325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3680" table:formula="of:=+[.G214]*3" table:style-name="ce3">
            <text:p>13680</text:p>
          </table:table-cell>
          <table:table-cell office:value-type="string" table:style-name="ce3">
            <text:p>3x pixels</text:p>
          </table:table-cell>
          <table:table-cell table:number-columns-repeated="16376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office:string-value="17849" table:formula="of:=DEC2HEX([.C219])" table:style-name="ce1">
            <text:p>17849</text:p>
          </table:table-cell>
          <table:table-cell office:value-type="float" office:value="96329" table:style-name="ce1">
            <text:p>96329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float" office:value="-240" table:formula="of:=+[.G218]-[.D229]" table:style-name="ce3">
            <text:p>-240</text:p>
          </table:table-cell>
          <table:table-cell office:value-type="string" table:style-name="ce3">
            <text:p>something…</text:p>
          </table:table-cell>
          <table:table-cell table:number-columns-repeated="1637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office:string-value="17869" table:formula="of:=DEC2HEX([.C220])" table:style-name="ce1">
            <text:p>17869</text:p>
          </table:table-cell>
          <table:table-cell office:value-type="float" office:value="96361" table:style-name="ce1">
            <text:p>9636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kipped until here (26434)</text:p>
          </table:table-cell>
          <table:table-cell table:number-columns-repeated="16379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office:string-value="178A3" table:formula="of:=DEC2HEX([.C221])" table:style-name="ce1">
            <text:p>178A3</text:p>
          </table:table-cell>
          <table:table-cell office:value-type="float" office:value="96419" table:style-name="ce1">
            <text:p>9641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'&lt;←- assets start here</text:p>
          </table:table-cell>
          <table:table-cell office:value-type="string" table:style-name="ce1">
            <text:p>0B 00 00 00</text:p>
          </table:table-cell>
          <table:table-cell table:number-columns-repeated="16378" table:style-name="ce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office:string-value="178A7" table:formula="of:=DEC2HEX([.C222])" table:style-name="ce1">
            <text:p>178A7</text:p>
          </table:table-cell>
          <table:table-cell office:value-type="float" office:value="96423" table:style-name="ce1">
            <text:p>96423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22]&gt;100;1;0)" table:style-name="ce1">
            <text:p>0</text:p>
          </table:table-cell>
          <table:table-cell office:value-type="string" table:style-name="ce1">
            <text:p>98 D8 00 00 01 00 00 00 D4 79 00 00 4B 00 8A 00 06 10 00 00 00 00 00 00 00 00 00 00 00 00 00 00</text:p>
          </table:table-cell>
          <table:table-cell table:number-columns-repeated="16378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office:string-value="178C7" table:formula="of:=DEC2HEX([.C223])" table:style-name="ce1">
            <text:p>178C7</text:p>
          </table:table-cell>
          <table:table-cell office:value-type="float" office:value="96455" table:style-name="ce1">
            <text:p>96455</text:p>
          </table:table-cell>
          <table:table-cell office:value-type="float" office:value="31188" table:style-name="ce1">
            <text:p>31188</text:p>
          </table:table-cell>
          <table:table-cell office:value-type="float" office:value="1" table:formula="of:=IF([.D223]&gt;100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office:string-value="1F29B" table:formula="of:=DEC2HEX([.C224])" table:style-name="ce1">
            <text:p>1F29B</text:p>
          </table:table-cell>
          <table:table-cell office:value-type="float" office:value="127643" table:style-name="ce1">
            <text:p>1276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24]&gt;100;1;0)" table:style-name="ce1">
            <text:p>0</text:p>
          </table:table-cell>
          <table:table-cell office:value-type="string" table:style-name="ce1">
            <text:p>00 00 00 00</text:p>
          </table:table-cell>
          <table:table-cell table:number-columns-repeated="16378" table:style-name="ce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office:string-value="1F29F" table:formula="of:=DEC2HEX([.C225])" table:style-name="ce1">
            <text:p>1F29F</text:p>
          </table:table-cell>
          <table:table-cell office:value-type="float" office:value="127647" table:style-name="ce1">
            <text:p>127647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25]&gt;100;1;0)" table:style-name="ce1">
            <text:p>0</text:p>
          </table:table-cell>
          <table:table-cell office:value-type="string" table:style-name="ce1">
            <text:p>10 46 00 00 01 00 00 00 60 36 00 00 26 00 78 00 06 10 00 00 00 00 00 00 00 00 00 00 00 00 00 00</text:p>
          </table:table-cell>
          <table:table-cell table:number-columns-repeated="16378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office:string-value="1F2BF" table:formula="of:=DEC2HEX([.C226])" table:style-name="ce1">
            <text:p>1F2BF</text:p>
          </table:table-cell>
          <table:table-cell office:value-type="float" office:value="127679" table:style-name="ce1">
            <text:p>127679</text:p>
          </table:table-cell>
          <table:table-cell office:value-type="float" office:value="13920" table:style-name="ce1">
            <text:p>13920</text:p>
          </table:table-cell>
          <table:table-cell office:value-type="float" office:value="1" table:formula="of:=IF([.D226]&gt;100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office:string-value="2291F" table:formula="of:=DEC2HEX([.C227])" table:style-name="ce1">
            <text:p>2291F</text:p>
          </table:table-cell>
          <table:table-cell office:value-type="float" office:value="141599" table:style-name="ce1">
            <text:p>1415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27]&gt;100;1;0)" table:style-name="ce1">
            <text:p>0</text:p>
          </table:table-cell>
          <table:table-cell office:value-type="string" table:style-name="ce1">
            <text:p>0C 00 00 00</text:p>
          </table:table-cell>
          <table:table-cell table:number-columns-repeated="16378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office:string-value="22923" table:formula="of:=DEC2HEX([.C228])" table:style-name="ce1">
            <text:p>22923</text:p>
          </table:table-cell>
          <table:table-cell office:value-type="float" office:value="141603" table:style-name="ce1">
            <text:p>141603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28]&gt;100;1;0)" table:style-name="ce1">
            <text:p>0</text:p>
          </table:table-cell>
          <table:table-cell office:value-type="string" table:style-name="ce1">
            <text:p>1A 61 00 00 01 00 00 00 60 36 00 00 26 00 78 00 06 10 00 00 00 00 00 00 00 00 00 00 00 00 00 00</text:p>
          </table:table-cell>
          <table:table-cell table:number-columns-repeated="16378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office:string-value="22943" table:formula="of:=DEC2HEX([.C229])" table:style-name="ce1">
            <text:p>22943</text:p>
          </table:table-cell>
          <table:table-cell office:value-type="float" office:value="141635" table:style-name="ce1">
            <text:p>141635</text:p>
          </table:table-cell>
          <table:table-cell office:value-type="float" office:value="13920" table:style-name="ce1">
            <text:p>13920</text:p>
          </table:table-cell>
          <table:table-cell office:value-type="float" office:value="1" table:formula="of:=IF([.D229]&gt;100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office:string-value="25FA3" table:formula="of:=DEC2HEX([.C230])" table:style-name="ce1">
            <text:p>25FA3</text:p>
          </table:table-cell>
          <table:table-cell office:value-type="float" office:value="155555" table:style-name="ce1">
            <text:p>1555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30]&gt;100;1;0)" table:style-name="ce1">
            <text:p>0</text:p>
          </table:table-cell>
          <table:table-cell office:value-type="string" table:style-name="ce1">
            <text:p>0D 00 00 00</text:p>
          </table:table-cell>
          <table:table-cell table:number-columns-repeated="16378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office:string-value="25FA7" table:formula="of:=DEC2HEX([.C231])" table:style-name="ce1">
            <text:p>25FA7</text:p>
          </table:table-cell>
          <table:table-cell office:value-type="float" office:value="155559" table:style-name="ce1">
            <text:p>155559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31]&gt;100;1;0)" table:style-name="ce1">
            <text:p>0</text:p>
          </table:table-cell>
          <table:table-cell office:value-type="string" table:style-name="ce1">
            <text:p>7A EE 00 00 01 00 00 00 60 36 00 00 26 00 78 00 06 10 00 00 00 00 00 00 00 00 00 00 00 00 00 00</text:p>
          </table:table-cell>
          <table:table-cell table:number-columns-repeated="16378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office:string-value="25FC7" table:formula="of:=DEC2HEX([.C232])" table:style-name="ce1">
            <text:p>25FC7</text:p>
          </table:table-cell>
          <table:table-cell office:value-type="float" office:value="155591" table:style-name="ce1">
            <text:p>155591</text:p>
          </table:table-cell>
          <table:table-cell office:value-type="float" office:value="13920" table:style-name="ce1">
            <text:p>13920</text:p>
          </table:table-cell>
          <table:table-cell office:value-type="float" office:value="1" table:formula="of:=IF([.D232]&gt;100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office:string-value="29627" table:formula="of:=DEC2HEX([.C233])" table:style-name="ce1">
            <text:p>29627</text:p>
          </table:table-cell>
          <table:table-cell office:value-type="float" office:value="169511" table:style-name="ce1">
            <text:p>1695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33]&gt;100;1;0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office:string-value="2962B" table:formula="of:=DEC2HEX([.C234])" table:style-name="ce1">
            <text:p>2962B</text:p>
          </table:table-cell>
          <table:table-cell office:value-type="float" office:value="169515" table:style-name="ce1">
            <text:p>169515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34]&gt;100;1;0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office:string-value="2964B" table:formula="of:=DEC2HEX([.C235])" table:style-name="ce1">
            <text:p>2964B</text:p>
          </table:table-cell>
          <table:table-cell office:value-type="float" office:value="169547" table:style-name="ce1">
            <text:p>169547</text:p>
          </table:table-cell>
          <table:table-cell office:value-type="float" office:value="13920" table:style-name="ce1">
            <text:p>13920</text:p>
          </table:table-cell>
          <table:table-cell office:value-type="float" office:value="1" table:formula="of:=IF([.D235]&gt;100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office:string-value="2CCAB" table:formula="of:=DEC2HEX([.C236])" table:style-name="ce1">
            <text:p>2CCAB</text:p>
          </table:table-cell>
          <table:table-cell office:value-type="float" office:value="183467" table:style-name="ce1">
            <text:p>1834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36]&gt;100;1;0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office:string-value="2CCAF" table:formula="of:=DEC2HEX([.C237])" table:style-name="ce1">
            <text:p>2CCAF</text:p>
          </table:table-cell>
          <table:table-cell office:value-type="float" office:value="183471" table:style-name="ce1">
            <text:p>183471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37]&gt;100;1;0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office:string-value="2CCCF" table:formula="of:=DEC2HEX([.C238])" table:style-name="ce1">
            <text:p>2CCCF</text:p>
          </table:table-cell>
          <table:table-cell office:value-type="float" office:value="183503" table:style-name="ce1">
            <text:p>183503</text:p>
          </table:table-cell>
          <table:table-cell office:value-type="float" office:value="13920" table:style-name="ce1">
            <text:p>13920</text:p>
          </table:table-cell>
          <table:table-cell office:value-type="float" office:value="1" table:formula="of:=IF([.D238]&gt;100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office:string-value="3032F" table:formula="of:=DEC2HEX([.C239])" table:style-name="ce1">
            <text:p>3032F</text:p>
          </table:table-cell>
          <table:table-cell office:value-type="float" office:value="197423" table:style-name="ce1">
            <text:p>1974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39]&gt;100;1;0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office:string-value="30333" table:formula="of:=DEC2HEX([.C240])" table:style-name="ce1">
            <text:p>30333</text:p>
          </table:table-cell>
          <table:table-cell office:value-type="float" office:value="197427" table:style-name="ce1">
            <text:p>197427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40]&gt;100;1;0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office:string-value="30353" table:formula="of:=DEC2HEX([.C241])" table:style-name="ce1">
            <text:p>30353</text:p>
          </table:table-cell>
          <table:table-cell office:value-type="float" office:value="197459" table:style-name="ce1">
            <text:p>197459</text:p>
          </table:table-cell>
          <table:table-cell office:value-type="float" office:value="13920" table:style-name="ce1">
            <text:p>13920</text:p>
          </table:table-cell>
          <table:table-cell office:value-type="float" office:value="1" table:formula="of:=IF([.D241]&gt;100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office:string-value="339B3" table:formula="of:=DEC2HEX([.C242])" table:style-name="ce1">
            <text:p>339B3</text:p>
          </table:table-cell>
          <table:table-cell office:value-type="float" office:value="211379" table:style-name="ce1">
            <text:p>2113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42]&gt;100;1;0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office:string-value="339B7" table:formula="of:=DEC2HEX([.C243])" table:style-name="ce1">
            <text:p>339B7</text:p>
          </table:table-cell>
          <table:table-cell office:value-type="float" office:value="211383" table:style-name="ce1">
            <text:p>211383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43]&gt;100;1;0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office:string-value="339D7" table:formula="of:=DEC2HEX([.C244])" table:style-name="ce1">
            <text:p>339D7</text:p>
          </table:table-cell>
          <table:table-cell office:value-type="float" office:value="211415" table:style-name="ce1">
            <text:p>211415</text:p>
          </table:table-cell>
          <table:table-cell office:value-type="float" office:value="13920" table:style-name="ce1">
            <text:p>13920</text:p>
          </table:table-cell>
          <table:table-cell office:value-type="float" office:value="1" table:formula="of:=IF([.D244]&gt;100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office:string-value="37037" table:formula="of:=DEC2HEX([.C245])" table:style-name="ce1">
            <text:p>37037</text:p>
          </table:table-cell>
          <table:table-cell office:value-type="float" office:value="225335" table:style-name="ce1">
            <text:p>2253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45]&gt;100;1;0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office:string-value="3703B" table:formula="of:=DEC2HEX([.C246])" table:style-name="ce1">
            <text:p>3703B</text:p>
          </table:table-cell>
          <table:table-cell office:value-type="float" office:value="225339" table:style-name="ce1">
            <text:p>225339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46]&gt;100;1;0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office:string-value="3705B" table:formula="of:=DEC2HEX([.C247])" table:style-name="ce1">
            <text:p>3705B</text:p>
          </table:table-cell>
          <table:table-cell office:value-type="float" office:value="225371" table:style-name="ce1">
            <text:p>225371</text:p>
          </table:table-cell>
          <table:table-cell office:value-type="float" office:value="13920" table:style-name="ce1">
            <text:p>13920</text:p>
          </table:table-cell>
          <table:table-cell office:value-type="float" office:value="1" table:formula="of:=IF([.D247]&gt;100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office:string-value="3A6BB" table:formula="of:=DEC2HEX([.C248])" table:style-name="ce1">
            <text:p>3A6BB</text:p>
          </table:table-cell>
          <table:table-cell office:value-type="float" office:value="239291" table:style-name="ce1">
            <text:p>2392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48]&gt;100;1;0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office:string-value="3A6BF" table:formula="of:=DEC2HEX([.C249])" table:style-name="ce1">
            <text:p>3A6BF</text:p>
          </table:table-cell>
          <table:table-cell office:value-type="float" office:value="239295" table:style-name="ce1">
            <text:p>239295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49]&gt;100;1;0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office:string-value="3A6DF" table:formula="of:=DEC2HEX([.C250])" table:style-name="ce1">
            <text:p>3A6DF</text:p>
          </table:table-cell>
          <table:table-cell office:value-type="float" office:value="239327" table:style-name="ce1">
            <text:p>239327</text:p>
          </table:table-cell>
          <table:table-cell office:value-type="float" office:value="13920" table:style-name="ce1">
            <text:p>13920</text:p>
          </table:table-cell>
          <table:table-cell office:value-type="float" office:value="1" table:formula="of:=IF([.D250]&gt;100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office:string-value="3DD3F" table:formula="of:=DEC2HEX([.C251])" table:style-name="ce1">
            <text:p>3DD3F</text:p>
          </table:table-cell>
          <table:table-cell office:value-type="float" office:value="253247" table:style-name="ce1">
            <text:p>2532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51]&gt;100;1;0)" table:style-name="ce1">
            <text:p>0</text:p>
          </table:table-cell>
          <table:table-cell office:value-type="string" table:style-name="ce1">
            <text:p>14 00 00 00</text:p>
          </table:table-cell>
          <table:table-cell table:number-columns-repeated="1637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office:string-value="3DD43" table:formula="of:=DEC2HEX([.C252])" table:style-name="ce1">
            <text:p>3DD43</text:p>
          </table:table-cell>
          <table:table-cell office:value-type="float" office:value="253251" table:style-name="ce1">
            <text:p>253251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52]&gt;100;1;0)" table:style-name="ce1">
            <text:p>0</text:p>
          </table:table-cell>
          <table:table-cell office:value-type="string" table:style-name="ce1">
            <text:p>69 C9 00 00 01 00 00 00 38 11 00 00 26 00 26 00 06 10 00 00 00 00 00 00 00 00 00 00 00 00 00 00</text:p>
          </table:table-cell>
          <table:table-cell table:number-columns-repeated="1637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office:string-value="3DD63" table:formula="of:=DEC2HEX([.C253])" table:style-name="ce1">
            <text:p>3DD63</text:p>
          </table:table-cell>
          <table:table-cell office:value-type="float" office:value="253283" table:style-name="ce1">
            <text:p>253283</text:p>
          </table:table-cell>
          <table:table-cell office:value-type="float" office:value="4408" table:style-name="ce1">
            <text:p>4408</text:p>
          </table:table-cell>
          <table:table-cell office:value-type="float" office:value="1" table:formula="of:=IF([.D253]&gt;100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office:string-value="3EE9B" table:formula="of:=DEC2HEX([.C254])" table:style-name="ce1">
            <text:p>3EE9B</text:p>
          </table:table-cell>
          <table:table-cell office:value-type="float" office:value="257691" table:style-name="ce1">
            <text:p>2576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54]&gt;100;1;0)" table:style-name="ce1">
            <text:p>0</text:p>
          </table:table-cell>
          <table:table-cell office:value-type="string" table:style-name="ce1">
            <text:p>15 00 00 00</text:p>
          </table:table-cell>
          <table:table-cell table:number-columns-repeated="16378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office:string-value="3EE9F" table:formula="of:=DEC2HEX([.C255])" table:style-name="ce1">
            <text:p>3EE9F</text:p>
          </table:table-cell>
          <table:table-cell office:value-type="float" office:value="257695" table:style-name="ce1">
            <text:p>257695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55]&gt;100;1;0)" table:style-name="ce1">
            <text:p>0</text:p>
          </table:table-cell>
          <table:table-cell office:value-type="string" table:style-name="ce1">
            <text:p>34 E6 00 00 01 00 00 00 08 30 00 00 26 00 6A 00 06 10 00 00 00 00 00 00 00 00 00 00 00 00 00 00</text:p>
          </table:table-cell>
          <table:table-cell table:number-columns-repeated="1637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office:string-value="3EEBF" table:formula="of:=DEC2HEX([.C256])" table:style-name="ce1">
            <text:p>3EEBF</text:p>
          </table:table-cell>
          <table:table-cell office:value-type="float" office:value="257727" table:style-name="ce1">
            <text:p>257727</text:p>
          </table:table-cell>
          <table:table-cell office:value-type="float" office:value="12296" table:style-name="ce1">
            <text:p>12296</text:p>
          </table:table-cell>
          <table:table-cell office:value-type="float" office:value="1" table:formula="of:=IF([.D256]&gt;100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office:string-value="41EC7" table:formula="of:=DEC2HEX([.C257])" table:style-name="ce1">
            <text:p>41EC7</text:p>
          </table:table-cell>
          <table:table-cell office:value-type="float" office:value="270023" table:style-name="ce1">
            <text:p>2700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5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office:string-value="41ECB" table:formula="of:=DEC2HEX([.C258])" table:style-name="ce1">
            <text:p>41ECB</text:p>
          </table:table-cell>
          <table:table-cell office:value-type="float" office:value="270027" table:style-name="ce1">
            <text:p>270027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5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office:string-value="41EEB" table:formula="of:=DEC2HEX([.C259])" table:style-name="ce1">
            <text:p>41EEB</text:p>
          </table:table-cell>
          <table:table-cell office:value-type="float" office:value="270059" table:style-name="ce1">
            <text:p>270059</text:p>
          </table:table-cell>
          <table:table-cell office:value-type="float" office:value="12296" table:style-name="ce1">
            <text:p>12296</text:p>
          </table:table-cell>
          <table:table-cell office:value-type="float" office:value="1" table:formula="of:=IF([.D259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office:string-value="44EF3" table:formula="of:=DEC2HEX([.C260])" table:style-name="ce1">
            <text:p>44EF3</text:p>
          </table:table-cell>
          <table:table-cell office:value-type="float" office:value="282355" table:style-name="ce1">
            <text:p>2823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6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office:string-value="44EF7" table:formula="of:=DEC2HEX([.C261])" table:style-name="ce1">
            <text:p>44EF7</text:p>
          </table:table-cell>
          <table:table-cell office:value-type="float" office:value="282359" table:style-name="ce1">
            <text:p>282359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6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office:string-value="44F17" table:formula="of:=DEC2HEX([.C262])" table:style-name="ce1">
            <text:p>44F17</text:p>
          </table:table-cell>
          <table:table-cell office:value-type="float" office:value="282391" table:style-name="ce1">
            <text:p>282391</text:p>
          </table:table-cell>
          <table:table-cell office:value-type="float" office:value="4408" table:style-name="ce1">
            <text:p>4408</text:p>
          </table:table-cell>
          <table:table-cell office:value-type="float" office:value="1" table:formula="of:=IF([.D262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office:string-value="4604F" table:formula="of:=DEC2HEX([.C263])" table:style-name="ce1">
            <text:p>4604F</text:p>
          </table:table-cell>
          <table:table-cell office:value-type="float" office:value="286799" table:style-name="ce1">
            <text:p>2867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6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office:string-value="46053" table:formula="of:=DEC2HEX([.C264])" table:style-name="ce1">
            <text:p>46053</text:p>
          </table:table-cell>
          <table:table-cell office:value-type="float" office:value="286803" table:style-name="ce1">
            <text:p>286803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6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office:string-value="46073" table:formula="of:=DEC2HEX([.C265])" table:style-name="ce1">
            <text:p>46073</text:p>
          </table:table-cell>
          <table:table-cell office:value-type="float" office:value="286835" table:style-name="ce1">
            <text:p>286835</text:p>
          </table:table-cell>
          <table:table-cell office:value-type="float" office:value="13920" table:style-name="ce1">
            <text:p>13920</text:p>
          </table:table-cell>
          <table:table-cell office:value-type="float" office:value="1" table:formula="of:=IF([.D265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office:string-value="496D3" table:formula="of:=DEC2HEX([.C266])" table:style-name="ce1">
            <text:p>496D3</text:p>
          </table:table-cell>
          <table:table-cell office:value-type="float" office:value="300755" table:style-name="ce1">
            <text:p>3007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6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office:string-value="496D7" table:formula="of:=DEC2HEX([.C267])" table:style-name="ce1">
            <text:p>496D7</text:p>
          </table:table-cell>
          <table:table-cell office:value-type="float" office:value="300759" table:style-name="ce1">
            <text:p>300759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6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office:string-value="496F7" table:formula="of:=DEC2HEX([.C268])" table:style-name="ce1">
            <text:p>496F7</text:p>
          </table:table-cell>
          <table:table-cell office:value-type="float" office:value="300791" table:style-name="ce1">
            <text:p>300791</text:p>
          </table:table-cell>
          <table:table-cell office:value-type="float" office:value="13920" table:style-name="ce1">
            <text:p>13920</text:p>
          </table:table-cell>
          <table:table-cell office:value-type="float" office:value="1" table:formula="of:=IF([.D268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office:string-value="4CD57" table:formula="of:=DEC2HEX([.C269])" table:style-name="ce1">
            <text:p>4CD57</text:p>
          </table:table-cell>
          <table:table-cell office:value-type="float" office:value="314711" table:style-name="ce1">
            <text:p>3147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6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office:string-value="4CD5B" table:formula="of:=DEC2HEX([.C270])" table:style-name="ce1">
            <text:p>4CD5B</text:p>
          </table:table-cell>
          <table:table-cell office:value-type="float" office:value="314715" table:style-name="ce1">
            <text:p>314715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7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office:string-value="4CD7B" table:formula="of:=DEC2HEX([.C271])" table:style-name="ce1">
            <text:p>4CD7B</text:p>
          </table:table-cell>
          <table:table-cell office:value-type="float" office:value="314747" table:style-name="ce1">
            <text:p>314747</text:p>
          </table:table-cell>
          <table:table-cell office:value-type="float" office:value="13920" table:style-name="ce1">
            <text:p>13920</text:p>
          </table:table-cell>
          <table:table-cell office:value-type="float" office:value="1" table:formula="of:=IF([.D271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office:string-value="503DB" table:formula="of:=DEC2HEX([.C272])" table:style-name="ce1">
            <text:p>503DB</text:p>
          </table:table-cell>
          <table:table-cell office:value-type="float" office:value="328667" table:style-name="ce1">
            <text:p>3286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7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office:string-value="503DF" table:formula="of:=DEC2HEX([.C273])" table:style-name="ce1">
            <text:p>503DF</text:p>
          </table:table-cell>
          <table:table-cell office:value-type="float" office:value="328671" table:style-name="ce1">
            <text:p>328671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7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office:string-value="503FF" table:formula="of:=DEC2HEX([.C274])" table:style-name="ce1">
            <text:p>503FF</text:p>
          </table:table-cell>
          <table:table-cell office:value-type="float" office:value="328703" table:style-name="ce1">
            <text:p>328703</text:p>
          </table:table-cell>
          <table:table-cell office:value-type="float" office:value="13920" table:style-name="ce1">
            <text:p>13920</text:p>
          </table:table-cell>
          <table:table-cell office:value-type="float" office:value="1" table:formula="of:=IF([.D274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office:string-value="53A5F" table:formula="of:=DEC2HEX([.C275])" table:style-name="ce1">
            <text:p>53A5F</text:p>
          </table:table-cell>
          <table:table-cell office:value-type="float" office:value="342623" table:style-name="ce1">
            <text:p>3426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7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office:string-value="53A63" table:formula="of:=DEC2HEX([.C276])" table:style-name="ce1">
            <text:p>53A63</text:p>
          </table:table-cell>
          <table:table-cell office:value-type="float" office:value="342627" table:style-name="ce1">
            <text:p>342627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7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office:string-value="53A83" table:formula="of:=DEC2HEX([.C277])" table:style-name="ce1">
            <text:p>53A83</text:p>
          </table:table-cell>
          <table:table-cell office:value-type="float" office:value="342659" table:style-name="ce1">
            <text:p>342659</text:p>
          </table:table-cell>
          <table:table-cell office:value-type="float" office:value="13920" table:style-name="ce1">
            <text:p>13920</text:p>
          </table:table-cell>
          <table:table-cell office:value-type="float" office:value="1" table:formula="of:=IF([.D277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office:string-value="570E3" table:formula="of:=DEC2HEX([.C278])" table:style-name="ce1">
            <text:p>570E3</text:p>
          </table:table-cell>
          <table:table-cell office:value-type="float" office:value="356579" table:style-name="ce1">
            <text:p>3565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7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office:string-value="570E7" table:formula="of:=DEC2HEX([.C279])" table:style-name="ce1">
            <text:p>570E7</text:p>
          </table:table-cell>
          <table:table-cell office:value-type="float" office:value="356583" table:style-name="ce1">
            <text:p>356583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7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office:string-value="57107" table:formula="of:=DEC2HEX([.C280])" table:style-name="ce1">
            <text:p>57107</text:p>
          </table:table-cell>
          <table:table-cell office:value-type="float" office:value="356615" table:style-name="ce1">
            <text:p>356615</text:p>
          </table:table-cell>
          <table:table-cell office:value-type="float" office:value="13920" table:style-name="ce1">
            <text:p>13920</text:p>
          </table:table-cell>
          <table:table-cell office:value-type="float" office:value="1" table:formula="of:=IF([.D280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office:string-value="5A767" table:formula="of:=DEC2HEX([.C281])" table:style-name="ce1">
            <text:p>5A767</text:p>
          </table:table-cell>
          <table:table-cell office:value-type="float" office:value="370535" table:style-name="ce1">
            <text:p>3705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8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office:string-value="5A76B" table:formula="of:=DEC2HEX([.C282])" table:style-name="ce1">
            <text:p>5A76B</text:p>
          </table:table-cell>
          <table:table-cell office:value-type="float" office:value="370539" table:style-name="ce1">
            <text:p>370539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8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office:string-value="5A78B" table:formula="of:=DEC2HEX([.C283])" table:style-name="ce1">
            <text:p>5A78B</text:p>
          </table:table-cell>
          <table:table-cell office:value-type="float" office:value="370571" table:style-name="ce1">
            <text:p>370571</text:p>
          </table:table-cell>
          <table:table-cell office:value-type="float" office:value="13920" table:style-name="ce1">
            <text:p>13920</text:p>
          </table:table-cell>
          <table:table-cell office:value-type="float" office:value="1" table:formula="of:=IF([.D283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office:string-value="5DDEB" table:formula="of:=DEC2HEX([.C284])" table:style-name="ce1">
            <text:p>5DDEB</text:p>
          </table:table-cell>
          <table:table-cell office:value-type="float" office:value="384491" table:style-name="ce1">
            <text:p>3844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8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office:string-value="5DDEF" table:formula="of:=DEC2HEX([.C285])" table:style-name="ce1">
            <text:p>5DDEF</text:p>
          </table:table-cell>
          <table:table-cell office:value-type="float" office:value="384495" table:style-name="ce1">
            <text:p>384495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8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office:string-value="5DE0F" table:formula="of:=DEC2HEX([.C286])" table:style-name="ce1">
            <text:p>5DE0F</text:p>
          </table:table-cell>
          <table:table-cell office:value-type="float" office:value="384527" table:style-name="ce1">
            <text:p>384527</text:p>
          </table:table-cell>
          <table:table-cell office:value-type="float" office:value="13920" table:style-name="ce1">
            <text:p>13920</text:p>
          </table:table-cell>
          <table:table-cell office:value-type="float" office:value="1" table:formula="of:=IF([.D286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office:string-value="6146F" table:formula="of:=DEC2HEX([.C287])" table:style-name="ce1">
            <text:p>6146F</text:p>
          </table:table-cell>
          <table:table-cell office:value-type="float" office:value="398447" table:style-name="ce1">
            <text:p>3984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8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office:string-value="61473" table:formula="of:=DEC2HEX([.C288])" table:style-name="ce1">
            <text:p>61473</text:p>
          </table:table-cell>
          <table:table-cell office:value-type="float" office:value="398451" table:style-name="ce1">
            <text:p>398451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8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office:string-value="61493" table:formula="of:=DEC2HEX([.C289])" table:style-name="ce1">
            <text:p>61493</text:p>
          </table:table-cell>
          <table:table-cell office:value-type="float" office:value="398483" table:style-name="ce1">
            <text:p>398483</text:p>
          </table:table-cell>
          <table:table-cell office:value-type="float" office:value="13920" table:style-name="ce1">
            <text:p>13920</text:p>
          </table:table-cell>
          <table:table-cell office:value-type="float" office:value="1" table:formula="of:=IF([.D289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office:string-value="64AF3" table:formula="of:=DEC2HEX([.C290])" table:style-name="ce1">
            <text:p>64AF3</text:p>
          </table:table-cell>
          <table:table-cell office:value-type="float" office:value="412403" table:style-name="ce1">
            <text:p>4124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9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office:string-value="64AF7" table:formula="of:=DEC2HEX([.C291])" table:style-name="ce1">
            <text:p>64AF7</text:p>
          </table:table-cell>
          <table:table-cell office:value-type="float" office:value="412407" table:style-name="ce1">
            <text:p>412407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9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office:string-value="64B17" table:formula="of:=DEC2HEX([.C292])" table:style-name="ce1">
            <text:p>64B17</text:p>
          </table:table-cell>
          <table:table-cell office:value-type="float" office:value="412439" table:style-name="ce1">
            <text:p>412439</text:p>
          </table:table-cell>
          <table:table-cell office:value-type="float" office:value="4770" table:style-name="ce1">
            <text:p>4770</text:p>
          </table:table-cell>
          <table:table-cell office:value-type="float" office:value="1" table:formula="of:=IF([.D292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office:string-value="65DB9" table:formula="of:=DEC2HEX([.C293])" table:style-name="ce1">
            <text:p>65DB9</text:p>
          </table:table-cell>
          <table:table-cell office:value-type="float" office:value="417209" table:style-name="ce1">
            <text:p>41720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9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office:string-value="65DBD" table:formula="of:=DEC2HEX([.C294])" table:style-name="ce1">
            <text:p>65DBD</text:p>
          </table:table-cell>
          <table:table-cell office:value-type="float" office:value="417213" table:style-name="ce1">
            <text:p>417213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9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office:string-value="65DDD" table:formula="of:=DEC2HEX([.C295])" table:style-name="ce1">
            <text:p>65DDD</text:p>
          </table:table-cell>
          <table:table-cell office:value-type="float" office:value="417245" table:style-name="ce1">
            <text:p>417245</text:p>
          </table:table-cell>
          <table:table-cell office:value-type="float" office:value="5202" table:style-name="ce1">
            <text:p>5202</text:p>
          </table:table-cell>
          <table:table-cell office:value-type="float" office:value="1" table:formula="of:=IF([.D295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office:string-value="6722F" table:formula="of:=DEC2HEX([.C296])" table:style-name="ce1">
            <text:p>6722F</text:p>
          </table:table-cell>
          <table:table-cell office:value-type="float" office:value="422447" table:style-name="ce1">
            <text:p>4224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9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office:string-value="67233" table:formula="of:=DEC2HEX([.C297])" table:style-name="ce1">
            <text:p>67233</text:p>
          </table:table-cell>
          <table:table-cell office:value-type="float" office:value="422451" table:style-name="ce1">
            <text:p>422451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29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office:string-value="67253" table:formula="of:=DEC2HEX([.C298])" table:style-name="ce1">
            <text:p>67253</text:p>
          </table:table-cell>
          <table:table-cell office:value-type="float" office:value="422483" table:style-name="ce1">
            <text:p>422483</text:p>
          </table:table-cell>
          <table:table-cell office:value-type="float" office:value="6230" table:style-name="ce1">
            <text:p>6230</text:p>
          </table:table-cell>
          <table:table-cell office:value-type="float" office:value="1" table:formula="of:=IF([.D298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office:string-value="68AA9" table:formula="of:=DEC2HEX([.C299])" table:style-name="ce1">
            <text:p>68AA9</text:p>
          </table:table-cell>
          <table:table-cell office:value-type="float" office:value="428713" table:style-name="ce1">
            <text:p>42871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29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office:string-value="68AAD" table:formula="of:=DEC2HEX([.C300])" table:style-name="ce1">
            <text:p>68AAD</text:p>
          </table:table-cell>
          <table:table-cell office:value-type="float" office:value="428717" table:style-name="ce1">
            <text:p>428717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0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office:string-value="68ACD" table:formula="of:=DEC2HEX([.C301])" table:style-name="ce1">
            <text:p>68ACD</text:p>
          </table:table-cell>
          <table:table-cell office:value-type="float" office:value="428749" table:style-name="ce1">
            <text:p>428749</text:p>
          </table:table-cell>
          <table:table-cell office:value-type="float" office:value="24720" table:style-name="ce1">
            <text:p>24720</text:p>
          </table:table-cell>
          <table:table-cell office:value-type="float" office:value="1" table:formula="of:=IF([.D301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office:string-value="6EB5D" table:formula="of:=DEC2HEX([.C302])" table:style-name="ce1">
            <text:p>6EB5D</text:p>
          </table:table-cell>
          <table:table-cell office:value-type="float" office:value="453469" table:style-name="ce1">
            <text:p>45346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0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office:string-value="6EB61" table:formula="of:=DEC2HEX([.C303])" table:style-name="ce1">
            <text:p>6EB61</text:p>
          </table:table-cell>
          <table:table-cell office:value-type="float" office:value="453473" table:style-name="ce1">
            <text:p>453473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0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office:string-value="6EB81" table:formula="of:=DEC2HEX([.C304])" table:style-name="ce1">
            <text:p>6EB81</text:p>
          </table:table-cell>
          <table:table-cell office:value-type="float" office:value="453505" table:style-name="ce1">
            <text:p>453505</text:p>
          </table:table-cell>
          <table:table-cell office:value-type="float" office:value="24720" table:style-name="ce1">
            <text:p>24720</text:p>
          </table:table-cell>
          <table:table-cell office:value-type="float" office:value="1" table:formula="of:=IF([.D304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office:string-value="74C11" table:formula="of:=DEC2HEX([.C305])" table:style-name="ce1">
            <text:p>74C11</text:p>
          </table:table-cell>
          <table:table-cell office:value-type="float" office:value="478225" table:style-name="ce1">
            <text:p>47822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0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office:string-value="74C15" table:formula="of:=DEC2HEX([.C306])" table:style-name="ce1">
            <text:p>74C15</text:p>
          </table:table-cell>
          <table:table-cell office:value-type="float" office:value="478229" table:style-name="ce1">
            <text:p>478229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0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office:string-value="74C35" table:formula="of:=DEC2HEX([.C307])" table:style-name="ce1">
            <text:p>74C35</text:p>
          </table:table-cell>
          <table:table-cell office:value-type="float" office:value="478261" table:style-name="ce1">
            <text:p>478261</text:p>
          </table:table-cell>
          <table:table-cell office:value-type="float" office:value="11340" table:style-name="ce1">
            <text:p>11340</text:p>
          </table:table-cell>
          <table:table-cell office:value-type="float" office:value="1" table:formula="of:=IF([.D307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office:string-value="77881" table:formula="of:=DEC2HEX([.C308])" table:style-name="ce1">
            <text:p>77881</text:p>
          </table:table-cell>
          <table:table-cell office:value-type="float" office:value="489601" table:style-name="ce1">
            <text:p>48960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0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office:string-value="77885" table:formula="of:=DEC2HEX([.C309])" table:style-name="ce1">
            <text:p>77885</text:p>
          </table:table-cell>
          <table:table-cell office:value-type="float" office:value="489605" table:style-name="ce1">
            <text:p>489605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0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office:string-value="778A5" table:formula="of:=DEC2HEX([.C310])" table:style-name="ce1">
            <text:p>778A5</text:p>
          </table:table-cell>
          <table:table-cell office:value-type="float" office:value="489637" table:style-name="ce1">
            <text:p>489637</text:p>
          </table:table-cell>
          <table:table-cell office:value-type="float" office:value="11340" table:style-name="ce1">
            <text:p>11340</text:p>
          </table:table-cell>
          <table:table-cell office:value-type="float" office:value="1" table:formula="of:=IF([.D310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office:string-value="7A4F1" table:formula="of:=DEC2HEX([.C311])" table:style-name="ce1">
            <text:p>7A4F1</text:p>
          </table:table-cell>
          <table:table-cell office:value-type="float" office:value="500977" table:style-name="ce1">
            <text:p>50097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1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office:string-value="7A4F5" table:formula="of:=DEC2HEX([.C312])" table:style-name="ce1">
            <text:p>7A4F5</text:p>
          </table:table-cell>
          <table:table-cell office:value-type="float" office:value="500981" table:style-name="ce1">
            <text:p>500981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1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office:string-value="7A515" table:formula="of:=DEC2HEX([.C313])" table:style-name="ce1">
            <text:p>7A515</text:p>
          </table:table-cell>
          <table:table-cell office:value-type="float" office:value="501013" table:style-name="ce1">
            <text:p>501013</text:p>
          </table:table-cell>
          <table:table-cell office:value-type="float" office:value="21060" table:style-name="ce1">
            <text:p>21060</text:p>
          </table:table-cell>
          <table:table-cell office:value-type="float" office:value="1" table:formula="of:=IF([.D313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office:string-value="7F759" table:formula="of:=DEC2HEX([.C314])" table:style-name="ce1">
            <text:p>7F759</text:p>
          </table:table-cell>
          <table:table-cell office:value-type="float" office:value="522073" table:style-name="ce1">
            <text:p>52207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1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office:string-value="7F75D" table:formula="of:=DEC2HEX([.C315])" table:style-name="ce1">
            <text:p>7F75D</text:p>
          </table:table-cell>
          <table:table-cell office:value-type="float" office:value="522077" table:style-name="ce1">
            <text:p>522077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1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office:string-value="7F77D" table:formula="of:=DEC2HEX([.C316])" table:style-name="ce1">
            <text:p>7F77D</text:p>
          </table:table-cell>
          <table:table-cell office:value-type="float" office:value="522109" table:style-name="ce1">
            <text:p>522109</text:p>
          </table:table-cell>
          <table:table-cell office:value-type="float" office:value="21060" table:style-name="ce1">
            <text:p>21060</text:p>
          </table:table-cell>
          <table:table-cell office:value-type="float" office:value="1" table:formula="of:=IF([.D316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office:string-value="849C1" table:formula="of:=DEC2HEX([.C317])" table:style-name="ce1">
            <text:p>849C1</text:p>
          </table:table-cell>
          <table:table-cell office:value-type="float" office:value="543169" table:style-name="ce1">
            <text:p>54316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1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office:string-value="849C5" table:formula="of:=DEC2HEX([.C318])" table:style-name="ce1">
            <text:p>849C5</text:p>
          </table:table-cell>
          <table:table-cell office:value-type="float" office:value="543173" table:style-name="ce1">
            <text:p>543173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1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office:string-value="849E5" table:formula="of:=DEC2HEX([.C319])" table:style-name="ce1">
            <text:p>849E5</text:p>
          </table:table-cell>
          <table:table-cell office:value-type="float" office:value="543205" table:style-name="ce1">
            <text:p>543205</text:p>
          </table:table-cell>
          <table:table-cell office:value-type="float" office:value="32768" table:style-name="ce1">
            <text:p>32768</text:p>
          </table:table-cell>
          <table:table-cell office:value-type="float" office:value="1" table:formula="of:=IF([.D319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office:string-value="8C9E5" table:formula="of:=DEC2HEX([.C320])" table:style-name="ce1">
            <text:p>8C9E5</text:p>
          </table:table-cell>
          <table:table-cell office:value-type="float" office:value="575973" table:style-name="ce1">
            <text:p>575973</text:p>
          </table:table-cell>
          <table:table-cell office:value-type="float" office:value="27370" table:style-name="ce1">
            <text:p>27370</text:p>
          </table:table-cell>
          <table:table-cell office:value-type="float" office:value="1" table:formula="of:=IF([.D320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office:string-value="934CF" table:formula="of:=DEC2HEX([.C321])" table:style-name="ce1">
            <text:p>934CF</text:p>
          </table:table-cell>
          <table:table-cell office:value-type="float" office:value="603343" table:style-name="ce1">
            <text:p>6033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2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office:string-value="934D3" table:formula="of:=DEC2HEX([.C322])" table:style-name="ce1">
            <text:p>934D3</text:p>
          </table:table-cell>
          <table:table-cell office:value-type="float" office:value="603347" table:style-name="ce1">
            <text:p>603347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2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office:string-value="934F3" table:formula="of:=DEC2HEX([.C323])" table:style-name="ce1">
            <text:p>934F3</text:p>
          </table:table-cell>
          <table:table-cell office:value-type="float" office:value="603379" table:style-name="ce1">
            <text:p>603379</text:p>
          </table:table-cell>
          <table:table-cell office:value-type="float" office:value="32768" table:style-name="ce1">
            <text:p>32768</text:p>
          </table:table-cell>
          <table:table-cell office:value-type="float" office:value="1" table:formula="of:=IF([.D323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office:string-value="9B4F3" table:formula="of:=DEC2HEX([.C324])" table:style-name="ce1">
            <text:p>9B4F3</text:p>
          </table:table-cell>
          <table:table-cell office:value-type="float" office:value="636147" table:style-name="ce1">
            <text:p>636147</text:p>
          </table:table-cell>
          <table:table-cell office:value-type="float" office:value="26122" table:style-name="ce1">
            <text:p>26122</text:p>
          </table:table-cell>
          <table:table-cell office:value-type="float" office:value="1" table:formula="of:=IF([.D324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office:string-value="A1AFD" table:formula="of:=DEC2HEX([.C325])" table:style-name="ce1">
            <text:p>A1AFD</text:p>
          </table:table-cell>
          <table:table-cell office:value-type="float" office:value="662269" table:style-name="ce1">
            <text:p>66226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2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office:string-value="A1B01" table:formula="of:=DEC2HEX([.C326])" table:style-name="ce1">
            <text:p>A1B01</text:p>
          </table:table-cell>
          <table:table-cell office:value-type="float" office:value="662273" table:style-name="ce1">
            <text:p>662273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2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office:string-value="A1B21" table:formula="of:=DEC2HEX([.C327])" table:style-name="ce1">
            <text:p>A1B21</text:p>
          </table:table-cell>
          <table:table-cell office:value-type="float" office:value="662305" table:style-name="ce1">
            <text:p>662305</text:p>
          </table:table-cell>
          <table:table-cell office:value-type="float" office:value="13530" table:style-name="ce1">
            <text:p>13530</text:p>
          </table:table-cell>
          <table:table-cell office:value-type="float" office:value="1" table:formula="of:=IF([.D327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office:string-value="A4FFB" table:formula="of:=DEC2HEX([.C328])" table:style-name="ce1">
            <text:p>A4FFB</text:p>
          </table:table-cell>
          <table:table-cell office:value-type="float" office:value="675835" table:style-name="ce1">
            <text:p>6758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2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office:string-value="A4FFF" table:formula="of:=DEC2HEX([.C329])" table:style-name="ce1">
            <text:p>A4FFF</text:p>
          </table:table-cell>
          <table:table-cell office:value-type="float" office:value="675839" table:style-name="ce1">
            <text:p>675839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2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office:string-value="A501F" table:formula="of:=DEC2HEX([.C330])" table:style-name="ce1">
            <text:p>A501F</text:p>
          </table:table-cell>
          <table:table-cell office:value-type="float" office:value="675871" table:style-name="ce1">
            <text:p>675871</text:p>
          </table:table-cell>
          <table:table-cell office:value-type="float" office:value="16200" table:style-name="ce1">
            <text:p>16200</text:p>
          </table:table-cell>
          <table:table-cell office:value-type="float" office:value="1" table:formula="of:=IF([.D330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office:string-value="A8F67" table:formula="of:=DEC2HEX([.C331])" table:style-name="ce1">
            <text:p>A8F67</text:p>
          </table:table-cell>
          <table:table-cell office:value-type="float" office:value="692071" table:style-name="ce1">
            <text:p>6920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3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office:string-value="A8F6B" table:formula="of:=DEC2HEX([.C332])" table:style-name="ce1">
            <text:p>A8F6B</text:p>
          </table:table-cell>
          <table:table-cell office:value-type="float" office:value="692075" table:style-name="ce1">
            <text:p>692075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3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office:string-value="A8F8B" table:formula="of:=DEC2HEX([.C333])" table:style-name="ce1">
            <text:p>A8F8B</text:p>
          </table:table-cell>
          <table:table-cell office:value-type="float" office:value="692107" table:style-name="ce1">
            <text:p>692107</text:p>
          </table:table-cell>
          <table:table-cell office:value-type="float" office:value="16200" table:style-name="ce1">
            <text:p>16200</text:p>
          </table:table-cell>
          <table:table-cell office:value-type="float" office:value="1" table:formula="of:=IF([.D333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office:string-value="ACED3" table:formula="of:=DEC2HEX([.C334])" table:style-name="ce1">
            <text:p>ACED3</text:p>
          </table:table-cell>
          <table:table-cell office:value-type="float" office:value="708307" table:style-name="ce1">
            <text:p>7083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3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office:string-value="ACED7" table:formula="of:=DEC2HEX([.C335])" table:style-name="ce1">
            <text:p>ACED7</text:p>
          </table:table-cell>
          <table:table-cell office:value-type="float" office:value="708311" table:style-name="ce1">
            <text:p>708311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3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office:string-value="ACEF7" table:formula="of:=DEC2HEX([.C336])" table:style-name="ce1">
            <text:p>ACEF7</text:p>
          </table:table-cell>
          <table:table-cell office:value-type="float" office:value="708343" table:style-name="ce1">
            <text:p>708343</text:p>
          </table:table-cell>
          <table:table-cell office:value-type="float" office:value="21996" table:style-name="ce1">
            <text:p>21996</text:p>
          </table:table-cell>
          <table:table-cell office:value-type="float" office:value="1" table:formula="of:=IF([.D336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office:string-value="B24E3" table:formula="of:=DEC2HEX([.C337])" table:style-name="ce1">
            <text:p>B24E3</text:p>
          </table:table-cell>
          <table:table-cell office:value-type="float" office:value="730339" table:style-name="ce1">
            <text:p>73033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3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office:string-value="B24E7" table:formula="of:=DEC2HEX([.C338])" table:style-name="ce1">
            <text:p>B24E7</text:p>
          </table:table-cell>
          <table:table-cell office:value-type="float" office:value="730343" table:style-name="ce1">
            <text:p>730343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3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office:string-value="B2507" table:formula="of:=DEC2HEX([.C339])" table:style-name="ce1">
            <text:p>B2507</text:p>
          </table:table-cell>
          <table:table-cell office:value-type="float" office:value="730375" table:style-name="ce1">
            <text:p>730375</text:p>
          </table:table-cell>
          <table:table-cell office:value-type="float" office:value="11288" table:style-name="ce1">
            <text:p>11288</text:p>
          </table:table-cell>
          <table:table-cell office:value-type="float" office:value="1" table:formula="of:=IF([.D339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office:string-value="B511F" table:formula="of:=DEC2HEX([.C340])" table:style-name="ce1">
            <text:p>B511F</text:p>
          </table:table-cell>
          <table:table-cell office:value-type="float" office:value="741663" table:style-name="ce1">
            <text:p>7416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4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office:string-value="B5123" table:formula="of:=DEC2HEX([.C341])" table:style-name="ce1">
            <text:p>B5123</text:p>
          </table:table-cell>
          <table:table-cell office:value-type="float" office:value="741667" table:style-name="ce1">
            <text:p>741667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4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office:string-value="B5143" table:formula="of:=DEC2HEX([.C342])" table:style-name="ce1">
            <text:p>B5143</text:p>
          </table:table-cell>
          <table:table-cell office:value-type="float" office:value="741699" table:style-name="ce1">
            <text:p>741699</text:p>
          </table:table-cell>
          <table:table-cell office:value-type="float" office:value="14592" table:style-name="ce1">
            <text:p>14592</text:p>
          </table:table-cell>
          <table:table-cell office:value-type="float" office:value="1" table:formula="of:=IF([.D342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office:string-value="B8A43" table:formula="of:=DEC2HEX([.C343])" table:style-name="ce1">
            <text:p>B8A43</text:p>
          </table:table-cell>
          <table:table-cell office:value-type="float" office:value="756291" table:style-name="ce1">
            <text:p>7562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4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office:string-value="B8A47" table:formula="of:=DEC2HEX([.C344])" table:style-name="ce1">
            <text:p>B8A47</text:p>
          </table:table-cell>
          <table:table-cell office:value-type="float" office:value="756295" table:style-name="ce1">
            <text:p>756295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4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office:string-value="B8A67" table:formula="of:=DEC2HEX([.C345])" table:style-name="ce1">
            <text:p>B8A67</text:p>
          </table:table-cell>
          <table:table-cell office:value-type="float" office:value="756327" table:style-name="ce1">
            <text:p>756327</text:p>
          </table:table-cell>
          <table:table-cell office:value-type="float" office:value="6144" table:style-name="ce1">
            <text:p>6144</text:p>
          </table:table-cell>
          <table:table-cell office:value-type="float" office:value="1" table:formula="of:=IF([.D345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office:string-value="BA267" table:formula="of:=DEC2HEX([.C346])" table:style-name="ce1">
            <text:p>BA267</text:p>
          </table:table-cell>
          <table:table-cell office:value-type="float" office:value="762471" table:style-name="ce1">
            <text:p>7624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4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office:string-value="BA26B" table:formula="of:=DEC2HEX([.C347])" table:style-name="ce1">
            <text:p>BA26B</text:p>
          </table:table-cell>
          <table:table-cell office:value-type="float" office:value="762475" table:style-name="ce1">
            <text:p>762475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4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office:string-value="BA28B" table:formula="of:=DEC2HEX([.C348])" table:style-name="ce1">
            <text:p>BA28B</text:p>
          </table:table-cell>
          <table:table-cell office:value-type="float" office:value="762507" table:style-name="ce1">
            <text:p>762507</text:p>
          </table:table-cell>
          <table:table-cell office:value-type="float" office:value="6144" table:style-name="ce1">
            <text:p>6144</text:p>
          </table:table-cell>
          <table:table-cell office:value-type="float" office:value="1" table:formula="of:=IF([.D348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office:string-value="BBA8B" table:formula="of:=DEC2HEX([.C349])" table:style-name="ce1">
            <text:p>BBA8B</text:p>
          </table:table-cell>
          <table:table-cell office:value-type="float" office:value="768651" table:style-name="ce1">
            <text:p>76865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4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office:string-value="BBA8F" table:formula="of:=DEC2HEX([.C350])" table:style-name="ce1">
            <text:p>BBA8F</text:p>
          </table:table-cell>
          <table:table-cell office:value-type="float" office:value="768655" table:style-name="ce1">
            <text:p>768655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5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office:string-value="BBAAF" table:formula="of:=DEC2HEX([.C351])" table:style-name="ce1">
            <text:p>BBAAF</text:p>
          </table:table-cell>
          <table:table-cell office:value-type="float" office:value="768687" table:style-name="ce1">
            <text:p>768687</text:p>
          </table:table-cell>
          <table:table-cell office:value-type="float" office:value="6144" table:style-name="ce1">
            <text:p>6144</text:p>
          </table:table-cell>
          <table:table-cell office:value-type="float" office:value="1" table:formula="of:=IF([.D351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office:string-value="BD2AF" table:formula="of:=DEC2HEX([.C352])" table:style-name="ce1">
            <text:p>BD2AF</text:p>
          </table:table-cell>
          <table:table-cell office:value-type="float" office:value="774831" table:style-name="ce1">
            <text:p>77483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5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office:string-value="BD2B3" table:formula="of:=DEC2HEX([.C353])" table:style-name="ce1">
            <text:p>BD2B3</text:p>
          </table:table-cell>
          <table:table-cell office:value-type="float" office:value="774835" table:style-name="ce1">
            <text:p>774835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5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office:string-value="BD2D3" table:formula="of:=DEC2HEX([.C354])" table:style-name="ce1">
            <text:p>BD2D3</text:p>
          </table:table-cell>
          <table:table-cell office:value-type="float" office:value="774867" table:style-name="ce1">
            <text:p>774867</text:p>
          </table:table-cell>
          <table:table-cell office:value-type="float" office:value="6144" table:style-name="ce1">
            <text:p>6144</text:p>
          </table:table-cell>
          <table:table-cell office:value-type="float" office:value="1" table:formula="of:=IF([.D354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office:string-value="BEAD3" table:formula="of:=DEC2HEX([.C355])" table:style-name="ce1">
            <text:p>BEAD3</text:p>
          </table:table-cell>
          <table:table-cell office:value-type="float" office:value="781011" table:style-name="ce1">
            <text:p>7810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5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office:string-value="BEAD7" table:formula="of:=DEC2HEX([.C356])" table:style-name="ce1">
            <text:p>BEAD7</text:p>
          </table:table-cell>
          <table:table-cell office:value-type="float" office:value="781015" table:style-name="ce1">
            <text:p>781015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5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office:string-value="BEAF7" table:formula="of:=DEC2HEX([.C357])" table:style-name="ce1">
            <text:p>BEAF7</text:p>
          </table:table-cell>
          <table:table-cell office:value-type="float" office:value="781047" table:style-name="ce1">
            <text:p>781047</text:p>
          </table:table-cell>
          <table:table-cell office:value-type="float" office:value="8466" table:style-name="ce1">
            <text:p>8466</text:p>
          </table:table-cell>
          <table:table-cell office:value-type="float" office:value="1" table:formula="of:=IF([.D357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office:string-value="C0C09" table:formula="of:=DEC2HEX([.C358])" table:style-name="ce1">
            <text:p>C0C09</text:p>
          </table:table-cell>
          <table:table-cell office:value-type="float" office:value="789513" table:style-name="ce1">
            <text:p>78951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5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office:string-value="C0C0D" table:formula="of:=DEC2HEX([.C359])" table:style-name="ce1">
            <text:p>C0C0D</text:p>
          </table:table-cell>
          <table:table-cell office:value-type="float" office:value="789517" table:style-name="ce1">
            <text:p>789517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5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office:string-value="C0C2D" table:formula="of:=DEC2HEX([.C360])" table:style-name="ce1">
            <text:p>C0C2D</text:p>
          </table:table-cell>
          <table:table-cell office:value-type="float" office:value="789549" table:style-name="ce1">
            <text:p>789549</text:p>
          </table:table-cell>
          <table:table-cell office:value-type="float" office:value="6808" table:style-name="ce1">
            <text:p>6808</text:p>
          </table:table-cell>
          <table:table-cell office:value-type="float" office:value="1" table:formula="of:=IF([.D360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office:string-value="C26C5" table:formula="of:=DEC2HEX([.C361])" table:style-name="ce1">
            <text:p>C26C5</text:p>
          </table:table-cell>
          <table:table-cell office:value-type="float" office:value="796357" table:style-name="ce1">
            <text:p>79635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6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office:string-value="C26C9" table:formula="of:=DEC2HEX([.C362])" table:style-name="ce1">
            <text:p>C26C9</text:p>
          </table:table-cell>
          <table:table-cell office:value-type="float" office:value="796361" table:style-name="ce1">
            <text:p>796361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6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office:string-value="C26E9" table:formula="of:=DEC2HEX([.C363])" table:style-name="ce1">
            <text:p>C26E9</text:p>
          </table:table-cell>
          <table:table-cell office:value-type="float" office:value="796393" table:style-name="ce1">
            <text:p>796393</text:p>
          </table:table-cell>
          <table:table-cell office:value-type="float" office:value="9750" table:style-name="ce1">
            <text:p>9750</text:p>
          </table:table-cell>
          <table:table-cell office:value-type="float" office:value="1" table:formula="of:=IF([.D363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office:string-value="C4CFF" table:formula="of:=DEC2HEX([.C364])" table:style-name="ce1">
            <text:p>C4CFF</text:p>
          </table:table-cell>
          <table:table-cell office:value-type="float" office:value="806143" table:style-name="ce1">
            <text:p>8061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6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office:string-value="C4D03" table:formula="of:=DEC2HEX([.C365])" table:style-name="ce1">
            <text:p>C4D03</text:p>
          </table:table-cell>
          <table:table-cell office:value-type="float" office:value="806147" table:style-name="ce1">
            <text:p>806147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6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office:string-value="C4D23" table:formula="of:=DEC2HEX([.C366])" table:style-name="ce1">
            <text:p>C4D23</text:p>
          </table:table-cell>
          <table:table-cell office:value-type="float" office:value="806179" table:style-name="ce1">
            <text:p>806179</text:p>
          </table:table-cell>
          <table:table-cell office:value-type="float" office:value="26128" table:style-name="ce1">
            <text:p>26128</text:p>
          </table:table-cell>
          <table:table-cell office:value-type="float" office:value="1" table:formula="of:=IF([.D366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office:string-value="CB333" table:formula="of:=DEC2HEX([.C367])" table:style-name="ce1">
            <text:p>CB333</text:p>
          </table:table-cell>
          <table:table-cell office:value-type="float" office:value="832307" table:style-name="ce1">
            <text:p>8323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6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office:string-value="CB337" table:formula="of:=DEC2HEX([.C368])" table:style-name="ce1">
            <text:p>CB337</text:p>
          </table:table-cell>
          <table:table-cell office:value-type="float" office:value="832311" table:style-name="ce1">
            <text:p>832311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6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office:string-value="CB357" table:formula="of:=DEC2HEX([.C369])" table:style-name="ce1">
            <text:p>CB357</text:p>
          </table:table-cell>
          <table:table-cell office:value-type="float" office:value="832343" table:style-name="ce1">
            <text:p>832343</text:p>
          </table:table-cell>
          <table:table-cell office:value-type="float" office:value="32768" table:style-name="ce1">
            <text:p>32768</text:p>
          </table:table-cell>
          <table:table-cell office:value-type="float" office:value="1" table:formula="of:=IF([.D369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office:string-value="D3357" table:formula="of:=DEC2HEX([.C370])" table:style-name="ce1">
            <text:p>D3357</text:p>
          </table:table-cell>
          <table:table-cell office:value-type="float" office:value="865111" table:style-name="ce1">
            <text:p>865111</text:p>
          </table:table-cell>
          <table:table-cell office:value-type="float" office:value="12716" table:style-name="ce1">
            <text:p>12716</text:p>
          </table:table-cell>
          <table:table-cell office:value-type="float" office:value="1" table:formula="of:=IF([.D370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office:string-value="D6503" table:formula="of:=DEC2HEX([.C371])" table:style-name="ce1">
            <text:p>D6503</text:p>
          </table:table-cell>
          <table:table-cell office:value-type="float" office:value="877827" table:style-name="ce1">
            <text:p>8778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7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office:string-value="D6507" table:formula="of:=DEC2HEX([.C372])" table:style-name="ce1">
            <text:p>D6507</text:p>
          </table:table-cell>
          <table:table-cell office:value-type="float" office:value="877831" table:style-name="ce1">
            <text:p>877831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7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office:string-value="D6527" table:formula="of:=DEC2HEX([.C373])" table:style-name="ce1">
            <text:p>D6527</text:p>
          </table:table-cell>
          <table:table-cell office:value-type="float" office:value="877863" table:style-name="ce1">
            <text:p>877863</text:p>
          </table:table-cell>
          <table:table-cell office:value-type="float" office:value="32768" table:style-name="ce1">
            <text:p>32768</text:p>
          </table:table-cell>
          <table:table-cell office:value-type="float" office:value="1" table:formula="of:=IF([.D373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office:string-value="DE527" table:formula="of:=DEC2HEX([.C374])" table:style-name="ce1">
            <text:p>DE527</text:p>
          </table:table-cell>
          <table:table-cell office:value-type="float" office:value="910631" table:style-name="ce1">
            <text:p>910631</text:p>
          </table:table-cell>
          <table:table-cell office:value-type="float" office:value="10318" table:style-name="ce1">
            <text:p>10318</text:p>
          </table:table-cell>
          <table:table-cell office:value-type="float" office:value="1" table:formula="of:=IF([.D374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office:string-value="E0D75" table:formula="of:=DEC2HEX([.C375])" table:style-name="ce1">
            <text:p>E0D75</text:p>
          </table:table-cell>
          <table:table-cell office:value-type="float" office:value="920949" table:style-name="ce1">
            <text:p>92094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7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office:string-value="E0D79" table:formula="of:=DEC2HEX([.C376])" table:style-name="ce1">
            <text:p>E0D79</text:p>
          </table:table-cell>
          <table:table-cell office:value-type="float" office:value="920953" table:style-name="ce1">
            <text:p>920953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7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office:string-value="E0D99" table:formula="of:=DEC2HEX([.C377])" table:style-name="ce1">
            <text:p>E0D99</text:p>
          </table:table-cell>
          <table:table-cell office:value-type="float" office:value="920985" table:style-name="ce1">
            <text:p>920985</text:p>
          </table:table-cell>
          <table:table-cell office:value-type="float" office:value="16362" table:style-name="ce1">
            <text:p>16362</text:p>
          </table:table-cell>
          <table:table-cell office:value-type="float" office:value="1" table:formula="of:=IF([.D377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office:string-value="E4D83" table:formula="of:=DEC2HEX([.C378])" table:style-name="ce1">
            <text:p>E4D83</text:p>
          </table:table-cell>
          <table:table-cell office:value-type="float" office:value="937347" table:style-name="ce1">
            <text:p>9373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7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office:string-value="E4D87" table:formula="of:=DEC2HEX([.C379])" table:style-name="ce1">
            <text:p>E4D87</text:p>
          </table:table-cell>
          <table:table-cell office:value-type="float" office:value="937351" table:style-name="ce1">
            <text:p>937351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7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office:string-value="E4DA7" table:formula="of:=DEC2HEX([.C380])" table:style-name="ce1">
            <text:p>E4DA7</text:p>
          </table:table-cell>
          <table:table-cell office:value-type="float" office:value="937383" table:style-name="ce1">
            <text:p>937383</text:p>
          </table:table-cell>
          <table:table-cell office:value-type="float" office:value="31464" table:style-name="ce1">
            <text:p>31464</text:p>
          </table:table-cell>
          <table:table-cell office:value-type="float" office:value="1" table:formula="of:=IF([.D380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office:string-value="EC88F" table:formula="of:=DEC2HEX([.C381])" table:style-name="ce1">
            <text:p>EC88F</text:p>
          </table:table-cell>
          <table:table-cell office:value-type="float" office:value="968847" table:style-name="ce1">
            <text:p>9688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8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office:string-value="EC893" table:formula="of:=DEC2HEX([.C382])" table:style-name="ce1">
            <text:p>EC893</text:p>
          </table:table-cell>
          <table:table-cell office:value-type="float" office:value="968851" table:style-name="ce1">
            <text:p>968851</text:p>
          </table:table-cell>
          <table:table-cell office:value-type="float" office:value="28" table:style-name="ce1">
            <text:p>28</text:p>
          </table:table-cell>
          <table:table-cell office:value-type="float" office:value="0" table:formula="of:=IF([.D38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office:string-value="EC8AF" table:formula="of:=DEC2HEX([.C383])" table:style-name="ce1">
            <text:p>EC8AF</text:p>
          </table:table-cell>
          <table:table-cell office:value-type="float" office:value="968879" table:style-name="ce1">
            <text:p>9688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8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office:string-value="EC8B3" table:formula="of:=DEC2HEX([.C384])" table:style-name="ce1">
            <text:p>EC8B3</text:p>
          </table:table-cell>
          <table:table-cell office:value-type="float" office:value="968883" table:style-name="ce1">
            <text:p>968883</text:p>
          </table:table-cell>
          <table:table-cell office:value-type="float" office:value="14" table:style-name="ce1">
            <text:p>14</text:p>
          </table:table-cell>
          <table:table-cell office:value-type="float" office:value="0" table:formula="of:=IF([.D38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office:string-value="EC8C1" table:formula="of:=DEC2HEX([.C385])" table:style-name="ce1">
            <text:p>EC8C1</text:p>
          </table:table-cell>
          <table:table-cell office:value-type="float" office:value="968897" table:style-name="ce1">
            <text:p>96889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8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office:string-value="EC8C5" table:formula="of:=DEC2HEX([.C386])" table:style-name="ce1">
            <text:p>EC8C5</text:p>
          </table:table-cell>
          <table:table-cell office:value-type="float" office:value="968901" table:style-name="ce1">
            <text:p>968901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38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office:string-value="EC8E5" table:formula="of:=DEC2HEX([.C387])" table:style-name="ce1">
            <text:p>EC8E5</text:p>
          </table:table-cell>
          <table:table-cell office:value-type="float" office:value="968933" table:style-name="ce1">
            <text:p>96893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8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office:string-value="EC8E9" table:formula="of:=DEC2HEX([.C388])" table:style-name="ce1">
            <text:p>EC8E9</text:p>
          </table:table-cell>
          <table:table-cell office:value-type="float" office:value="968937" table:style-name="ce1">
            <text:p>96893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8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office:string-value="EC8ED" table:formula="of:=DEC2HEX([.C389])" table:style-name="ce1">
            <text:p>EC8ED</text:p>
          </table:table-cell>
          <table:table-cell office:value-type="float" office:value="968941" table:style-name="ce1">
            <text:p>96894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8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office:string-value="EC8F1" table:formula="of:=DEC2HEX([.C390])" table:style-name="ce1">
            <text:p>EC8F1</text:p>
          </table:table-cell>
          <table:table-cell office:value-type="float" office:value="968945" table:style-name="ce1">
            <text:p>968945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IF([.D39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office:string-value="EC8FB" table:formula="of:=DEC2HEX([.C391])" table:style-name="ce1">
            <text:p>EC8FB</text:p>
          </table:table-cell>
          <table:table-cell office:value-type="float" office:value="968955" table:style-name="ce1">
            <text:p>9689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9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office:string-value="EC8FF" table:formula="of:=DEC2HEX([.C392])" table:style-name="ce1">
            <text:p>EC8FF</text:p>
          </table:table-cell>
          <table:table-cell office:value-type="float" office:value="968959" table:style-name="ce1">
            <text:p>9689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9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office:string-value="EC903" table:formula="of:=DEC2HEX([.C393])" table:style-name="ce1">
            <text:p>EC903</text:p>
          </table:table-cell>
          <table:table-cell office:value-type="float" office:value="968963" table:style-name="ce1">
            <text:p>9689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9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office:string-value="EC907" table:formula="of:=DEC2HEX([.C394])" table:style-name="ce1">
            <text:p>EC907</text:p>
          </table:table-cell>
          <table:table-cell office:value-type="float" office:value="968967" table:style-name="ce1">
            <text:p>9689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9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office:string-value="EC90B" table:formula="of:=DEC2HEX([.C395])" table:style-name="ce1">
            <text:p>EC90B</text:p>
          </table:table-cell>
          <table:table-cell office:value-type="float" office:value="968971" table:style-name="ce1">
            <text:p>9689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9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office:string-value="EC90F" table:formula="of:=DEC2HEX([.C396])" table:style-name="ce1">
            <text:p>EC90F</text:p>
          </table:table-cell>
          <table:table-cell office:value-type="float" office:value="968975" table:style-name="ce1">
            <text:p>96897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9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office:string-value="EC913" table:formula="of:=DEC2HEX([.C397])" table:style-name="ce1">
            <text:p>EC913</text:p>
          </table:table-cell>
          <table:table-cell office:value-type="float" office:value="968979" table:style-name="ce1">
            <text:p>9689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9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office:string-value="EC917" table:formula="of:=DEC2HEX([.C398])" table:style-name="ce1">
            <text:p>EC917</text:p>
          </table:table-cell>
          <table:table-cell office:value-type="float" office:value="968983" table:style-name="ce1">
            <text:p>96898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9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office:string-value="EC91B" table:formula="of:=DEC2HEX([.C399])" table:style-name="ce1">
            <text:p>EC91B</text:p>
          </table:table-cell>
          <table:table-cell office:value-type="float" office:value="968987" table:style-name="ce1">
            <text:p>96898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39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office:string-value="EC91F" table:formula="of:=DEC2HEX([.C400])" table:style-name="ce1">
            <text:p>EC91F</text:p>
          </table:table-cell>
          <table:table-cell office:value-type="float" office:value="968991" table:style-name="ce1">
            <text:p>9689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0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office:string-value="EC923" table:formula="of:=DEC2HEX([.C401])" table:style-name="ce1">
            <text:p>EC923</text:p>
          </table:table-cell>
          <table:table-cell office:value-type="float" office:value="968995" table:style-name="ce1">
            <text:p>96899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0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office:string-value="EC927" table:formula="of:=DEC2HEX([.C402])" table:style-name="ce1">
            <text:p>EC927</text:p>
          </table:table-cell>
          <table:table-cell office:value-type="float" office:value="968999" table:style-name="ce1">
            <text:p>9689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0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office:string-value="EC92B" table:formula="of:=DEC2HEX([.C403])" table:style-name="ce1">
            <text:p>EC92B</text:p>
          </table:table-cell>
          <table:table-cell office:value-type="float" office:value="969003" table:style-name="ce1">
            <text:p>9690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0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office:string-value="EC92F" table:formula="of:=DEC2HEX([.C404])" table:style-name="ce1">
            <text:p>EC92F</text:p>
          </table:table-cell>
          <table:table-cell office:value-type="float" office:value="969007" table:style-name="ce1">
            <text:p>9690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0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office:string-value="EC933" table:formula="of:=DEC2HEX([.C405])" table:style-name="ce1">
            <text:p>EC933</text:p>
          </table:table-cell>
          <table:table-cell office:value-type="float" office:value="969011" table:style-name="ce1">
            <text:p>9690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0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office:string-value="EC937" table:formula="of:=DEC2HEX([.C406])" table:style-name="ce1">
            <text:p>EC937</text:p>
          </table:table-cell>
          <table:table-cell office:value-type="float" office:value="969015" table:style-name="ce1">
            <text:p>96901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0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office:string-value="EC93B" table:formula="of:=DEC2HEX([.C407])" table:style-name="ce1">
            <text:p>EC93B</text:p>
          </table:table-cell>
          <table:table-cell office:value-type="float" office:value="969019" table:style-name="ce1">
            <text:p>9690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0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office:string-value="EC93F" table:formula="of:=DEC2HEX([.C408])" table:style-name="ce1">
            <text:p>EC93F</text:p>
          </table:table-cell>
          <table:table-cell office:value-type="float" office:value="969023" table:style-name="ce1">
            <text:p>9690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0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office:string-value="EC943" table:formula="of:=DEC2HEX([.C409])" table:style-name="ce1">
            <text:p>EC943</text:p>
          </table:table-cell>
          <table:table-cell office:value-type="float" office:value="969027" table:style-name="ce1">
            <text:p>9690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0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office:string-value="EC947" table:formula="of:=DEC2HEX([.C410])" table:style-name="ce1">
            <text:p>EC947</text:p>
          </table:table-cell>
          <table:table-cell office:value-type="float" office:value="969031" table:style-name="ce1">
            <text:p>96903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1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office:string-value="EC94B" table:formula="of:=DEC2HEX([.C411])" table:style-name="ce1">
            <text:p>EC94B</text:p>
          </table:table-cell>
          <table:table-cell office:value-type="float" office:value="969035" table:style-name="ce1">
            <text:p>9690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1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office:string-value="EC94F" table:formula="of:=DEC2HEX([.C412])" table:style-name="ce1">
            <text:p>EC94F</text:p>
          </table:table-cell>
          <table:table-cell office:value-type="float" office:value="969039" table:style-name="ce1">
            <text:p>96903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1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office:string-value="EC953" table:formula="of:=DEC2HEX([.C413])" table:style-name="ce1">
            <text:p>EC953</text:p>
          </table:table-cell>
          <table:table-cell office:value-type="float" office:value="969043" table:style-name="ce1">
            <text:p>9690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1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office:string-value="EC957" table:formula="of:=DEC2HEX([.C414])" table:style-name="ce1">
            <text:p>EC957</text:p>
          </table:table-cell>
          <table:table-cell office:value-type="float" office:value="969047" table:style-name="ce1">
            <text:p>9690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1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office:string-value="EC95B" table:formula="of:=DEC2HEX([.C415])" table:style-name="ce1">
            <text:p>EC95B</text:p>
          </table:table-cell>
          <table:table-cell office:value-type="float" office:value="969051" table:style-name="ce1">
            <text:p>96905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1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office:string-value="EC95F" table:formula="of:=DEC2HEX([.C416])" table:style-name="ce1">
            <text:p>EC95F</text:p>
          </table:table-cell>
          <table:table-cell office:value-type="float" office:value="969055" table:style-name="ce1">
            <text:p>9690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1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office:string-value="EC963" table:formula="of:=DEC2HEX([.C417])" table:style-name="ce1">
            <text:p>EC963</text:p>
          </table:table-cell>
          <table:table-cell office:value-type="float" office:value="969059" table:style-name="ce1">
            <text:p>9690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1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office:string-value="EC967" table:formula="of:=DEC2HEX([.C418])" table:style-name="ce1">
            <text:p>EC967</text:p>
          </table:table-cell>
          <table:table-cell office:value-type="float" office:value="969063" table:style-name="ce1">
            <text:p>9690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1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office:string-value="EC96B" table:formula="of:=DEC2HEX([.C419])" table:style-name="ce1">
            <text:p>EC96B</text:p>
          </table:table-cell>
          <table:table-cell office:value-type="float" office:value="969067" table:style-name="ce1">
            <text:p>9690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1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office:string-value="EC96F" table:formula="of:=DEC2HEX([.C420])" table:style-name="ce1">
            <text:p>EC96F</text:p>
          </table:table-cell>
          <table:table-cell office:value-type="float" office:value="969071" table:style-name="ce1">
            <text:p>9690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2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office:string-value="EC973" table:formula="of:=DEC2HEX([.C421])" table:style-name="ce1">
            <text:p>EC973</text:p>
          </table:table-cell>
          <table:table-cell office:value-type="float" office:value="969075" table:style-name="ce1">
            <text:p>96907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2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office:string-value="EC977" table:formula="of:=DEC2HEX([.C422])" table:style-name="ce1">
            <text:p>EC977</text:p>
          </table:table-cell>
          <table:table-cell office:value-type="float" office:value="969079" table:style-name="ce1">
            <text:p>9690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2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office:string-value="EC97B" table:formula="of:=DEC2HEX([.C423])" table:style-name="ce1">
            <text:p>EC97B</text:p>
          </table:table-cell>
          <table:table-cell office:value-type="float" office:value="969083" table:style-name="ce1">
            <text:p>96908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2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office:string-value="EC97F" table:formula="of:=DEC2HEX([.C424])" table:style-name="ce1">
            <text:p>EC97F</text:p>
          </table:table-cell>
          <table:table-cell office:value-type="float" office:value="969087" table:style-name="ce1">
            <text:p>96908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2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office:string-value="EC983" table:formula="of:=DEC2HEX([.C425])" table:style-name="ce1">
            <text:p>EC983</text:p>
          </table:table-cell>
          <table:table-cell office:value-type="float" office:value="969091" table:style-name="ce1">
            <text:p>9690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2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office:string-value="EC987" table:formula="of:=DEC2HEX([.C426])" table:style-name="ce1">
            <text:p>EC987</text:p>
          </table:table-cell>
          <table:table-cell office:value-type="float" office:value="969095" table:style-name="ce1">
            <text:p>96909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2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office:string-value="EC98B" table:formula="of:=DEC2HEX([.C427])" table:style-name="ce1">
            <text:p>EC98B</text:p>
          </table:table-cell>
          <table:table-cell office:value-type="float" office:value="969099" table:style-name="ce1">
            <text:p>9690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2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office:string-value="EC98F" table:formula="of:=DEC2HEX([.C428])" table:style-name="ce1">
            <text:p>EC98F</text:p>
          </table:table-cell>
          <table:table-cell office:value-type="float" office:value="969103" table:style-name="ce1">
            <text:p>9691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2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office:string-value="EC993" table:formula="of:=DEC2HEX([.C429])" table:style-name="ce1">
            <text:p>EC993</text:p>
          </table:table-cell>
          <table:table-cell office:value-type="float" office:value="969107" table:style-name="ce1">
            <text:p>9691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2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office:string-value="EC997" table:formula="of:=DEC2HEX([.C430])" table:style-name="ce1">
            <text:p>EC997</text:p>
          </table:table-cell>
          <table:table-cell office:value-type="float" office:value="969111" table:style-name="ce1">
            <text:p>9691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3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office:string-value="EC99B" table:formula="of:=DEC2HEX([.C431])" table:style-name="ce1">
            <text:p>EC99B</text:p>
          </table:table-cell>
          <table:table-cell office:value-type="float" office:value="969115" table:style-name="ce1">
            <text:p>96911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3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office:string-value="EC99F" table:formula="of:=DEC2HEX([.C432])" table:style-name="ce1">
            <text:p>EC99F</text:p>
          </table:table-cell>
          <table:table-cell office:value-type="float" office:value="969119" table:style-name="ce1">
            <text:p>9691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3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office:string-value="EC9A3" table:formula="of:=DEC2HEX([.C433])" table:style-name="ce1">
            <text:p>EC9A3</text:p>
          </table:table-cell>
          <table:table-cell office:value-type="float" office:value="969123" table:style-name="ce1">
            <text:p>9691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3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office:string-value="EC9A7" table:formula="of:=DEC2HEX([.C434])" table:style-name="ce1">
            <text:p>EC9A7</text:p>
          </table:table-cell>
          <table:table-cell office:value-type="float" office:value="969127" table:style-name="ce1">
            <text:p>9691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3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office:string-value="EC9AB" table:formula="of:=DEC2HEX([.C435])" table:style-name="ce1">
            <text:p>EC9AB</text:p>
          </table:table-cell>
          <table:table-cell office:value-type="float" office:value="969131" table:style-name="ce1">
            <text:p>96913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3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office:string-value="EC9AF" table:formula="of:=DEC2HEX([.C436])" table:style-name="ce1">
            <text:p>EC9AF</text:p>
          </table:table-cell>
          <table:table-cell office:value-type="float" office:value="969135" table:style-name="ce1">
            <text:p>9691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3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office:string-value="EC9B3" table:formula="of:=DEC2HEX([.C437])" table:style-name="ce1">
            <text:p>EC9B3</text:p>
          </table:table-cell>
          <table:table-cell office:value-type="float" office:value="969139" table:style-name="ce1">
            <text:p>96913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3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office:string-value="EC9B7" table:formula="of:=DEC2HEX([.C438])" table:style-name="ce1">
            <text:p>EC9B7</text:p>
          </table:table-cell>
          <table:table-cell office:value-type="float" office:value="969143" table:style-name="ce1">
            <text:p>9691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3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office:string-value="EC9BB" table:formula="of:=DEC2HEX([.C439])" table:style-name="ce1">
            <text:p>EC9BB</text:p>
          </table:table-cell>
          <table:table-cell office:value-type="float" office:value="969147" table:style-name="ce1">
            <text:p>9691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3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office:string-value="EC9BF" table:formula="of:=DEC2HEX([.C440])" table:style-name="ce1">
            <text:p>EC9BF</text:p>
          </table:table-cell>
          <table:table-cell office:value-type="float" office:value="969151" table:style-name="ce1">
            <text:p>96915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4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office:string-value="EC9C3" table:formula="of:=DEC2HEX([.C441])" table:style-name="ce1">
            <text:p>EC9C3</text:p>
          </table:table-cell>
          <table:table-cell office:value-type="float" office:value="969155" table:style-name="ce1">
            <text:p>9691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4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office:string-value="EC9C7" table:formula="of:=DEC2HEX([.C442])" table:style-name="ce1">
            <text:p>EC9C7</text:p>
          </table:table-cell>
          <table:table-cell office:value-type="float" office:value="969159" table:style-name="ce1">
            <text:p>9691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4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office:string-value="EC9CB" table:formula="of:=DEC2HEX([.C443])" table:style-name="ce1">
            <text:p>EC9CB</text:p>
          </table:table-cell>
          <table:table-cell office:value-type="float" office:value="969163" table:style-name="ce1">
            <text:p>9691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4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office:string-value="EC9CF" table:formula="of:=DEC2HEX([.C444])" table:style-name="ce1">
            <text:p>EC9CF</text:p>
          </table:table-cell>
          <table:table-cell office:value-type="float" office:value="969167" table:style-name="ce1">
            <text:p>9691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4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office:string-value="EC9D3" table:formula="of:=DEC2HEX([.C445])" table:style-name="ce1">
            <text:p>EC9D3</text:p>
          </table:table-cell>
          <table:table-cell office:value-type="float" office:value="969171" table:style-name="ce1">
            <text:p>9691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4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office:string-value="EC9D7" table:formula="of:=DEC2HEX([.C446])" table:style-name="ce1">
            <text:p>EC9D7</text:p>
          </table:table-cell>
          <table:table-cell office:value-type="float" office:value="969175" table:style-name="ce1">
            <text:p>96917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4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office:string-value="EC9DB" table:formula="of:=DEC2HEX([.C447])" table:style-name="ce1">
            <text:p>EC9DB</text:p>
          </table:table-cell>
          <table:table-cell office:value-type="float" office:value="969179" table:style-name="ce1">
            <text:p>9691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4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office:string-value="EC9DF" table:formula="of:=DEC2HEX([.C448])" table:style-name="ce1">
            <text:p>EC9DF</text:p>
          </table:table-cell>
          <table:table-cell office:value-type="float" office:value="969183" table:style-name="ce1">
            <text:p>96918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4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office:string-value="EC9E3" table:formula="of:=DEC2HEX([.C449])" table:style-name="ce1">
            <text:p>EC9E3</text:p>
          </table:table-cell>
          <table:table-cell office:value-type="float" office:value="969187" table:style-name="ce1">
            <text:p>96918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4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office:string-value="EC9E7" table:formula="of:=DEC2HEX([.C450])" table:style-name="ce1">
            <text:p>EC9E7</text:p>
          </table:table-cell>
          <table:table-cell office:value-type="float" office:value="969191" table:style-name="ce1">
            <text:p>9691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5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office:string-value="EC9EB" table:formula="of:=DEC2HEX([.C451])" table:style-name="ce1">
            <text:p>EC9EB</text:p>
          </table:table-cell>
          <table:table-cell office:value-type="float" office:value="969195" table:style-name="ce1">
            <text:p>96919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5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office:string-value="EC9EF" table:formula="of:=DEC2HEX([.C452])" table:style-name="ce1">
            <text:p>EC9EF</text:p>
          </table:table-cell>
          <table:table-cell office:value-type="float" office:value="969199" table:style-name="ce1">
            <text:p>9691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5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office:string-value="EC9F3" table:formula="of:=DEC2HEX([.C453])" table:style-name="ce1">
            <text:p>EC9F3</text:p>
          </table:table-cell>
          <table:table-cell office:value-type="float" office:value="969203" table:style-name="ce1">
            <text:p>9692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5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office:string-value="EC9F7" table:formula="of:=DEC2HEX([.C454])" table:style-name="ce1">
            <text:p>EC9F7</text:p>
          </table:table-cell>
          <table:table-cell office:value-type="float" office:value="969207" table:style-name="ce1">
            <text:p>9692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5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office:string-value="EC9FB" table:formula="of:=DEC2HEX([.C455])" table:style-name="ce1">
            <text:p>EC9FB</text:p>
          </table:table-cell>
          <table:table-cell office:value-type="float" office:value="969211" table:style-name="ce1">
            <text:p>9692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5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office:string-value="EC9FF" table:formula="of:=DEC2HEX([.C456])" table:style-name="ce1">
            <text:p>EC9FF</text:p>
          </table:table-cell>
          <table:table-cell office:value-type="float" office:value="969215" table:style-name="ce1">
            <text:p>96921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5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office:string-value="ECA03" table:formula="of:=DEC2HEX([.C457])" table:style-name="ce1">
            <text:p>ECA03</text:p>
          </table:table-cell>
          <table:table-cell office:value-type="float" office:value="969219" table:style-name="ce1">
            <text:p>9692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5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office:string-value="ECA07" table:formula="of:=DEC2HEX([.C458])" table:style-name="ce1">
            <text:p>ECA07</text:p>
          </table:table-cell>
          <table:table-cell office:value-type="float" office:value="969223" table:style-name="ce1">
            <text:p>9692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5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office:string-value="ECA0B" table:formula="of:=DEC2HEX([.C459])" table:style-name="ce1">
            <text:p>ECA0B</text:p>
          </table:table-cell>
          <table:table-cell office:value-type="float" office:value="969227" table:style-name="ce1">
            <text:p>9692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5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office:string-value="ECA0F" table:formula="of:=DEC2HEX([.C460])" table:style-name="ce1">
            <text:p>ECA0F</text:p>
          </table:table-cell>
          <table:table-cell office:value-type="float" office:value="969231" table:style-name="ce1">
            <text:p>96923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6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office:string-value="ECA13" table:formula="of:=DEC2HEX([.C461])" table:style-name="ce1">
            <text:p>ECA13</text:p>
          </table:table-cell>
          <table:table-cell office:value-type="float" office:value="969235" table:style-name="ce1">
            <text:p>9692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6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office:string-value="ECA17" table:formula="of:=DEC2HEX([.C462])" table:style-name="ce1">
            <text:p>ECA17</text:p>
          </table:table-cell>
          <table:table-cell office:value-type="float" office:value="969239" table:style-name="ce1">
            <text:p>96923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6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office:string-value="ECA1B" table:formula="of:=DEC2HEX([.C463])" table:style-name="ce1">
            <text:p>ECA1B</text:p>
          </table:table-cell>
          <table:table-cell office:value-type="float" office:value="969243" table:style-name="ce1">
            <text:p>9692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6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office:string-value="ECA1F" table:formula="of:=DEC2HEX([.C464])" table:style-name="ce1">
            <text:p>ECA1F</text:p>
          </table:table-cell>
          <table:table-cell office:value-type="float" office:value="969247" table:style-name="ce1">
            <text:p>9692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6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office:string-value="ECA23" table:formula="of:=DEC2HEX([.C465])" table:style-name="ce1">
            <text:p>ECA23</text:p>
          </table:table-cell>
          <table:table-cell office:value-type="float" office:value="969251" table:style-name="ce1">
            <text:p>96925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6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office:string-value="ECA27" table:formula="of:=DEC2HEX([.C466])" table:style-name="ce1">
            <text:p>ECA27</text:p>
          </table:table-cell>
          <table:table-cell office:value-type="float" office:value="969255" table:style-name="ce1">
            <text:p>9692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6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office:string-value="ECA2B" table:formula="of:=DEC2HEX([.C467])" table:style-name="ce1">
            <text:p>ECA2B</text:p>
          </table:table-cell>
          <table:table-cell office:value-type="float" office:value="969259" table:style-name="ce1">
            <text:p>9692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6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office:string-value="ECA2F" table:formula="of:=DEC2HEX([.C468])" table:style-name="ce1">
            <text:p>ECA2F</text:p>
          </table:table-cell>
          <table:table-cell office:value-type="float" office:value="969263" table:style-name="ce1">
            <text:p>9692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6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office:string-value="ECA33" table:formula="of:=DEC2HEX([.C469])" table:style-name="ce1">
            <text:p>ECA33</text:p>
          </table:table-cell>
          <table:table-cell office:value-type="float" office:value="969267" table:style-name="ce1">
            <text:p>9692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6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office:string-value="ECA37" table:formula="of:=DEC2HEX([.C470])" table:style-name="ce1">
            <text:p>ECA37</text:p>
          </table:table-cell>
          <table:table-cell office:value-type="float" office:value="969271" table:style-name="ce1">
            <text:p>9692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7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office:string-value="ECA3B" table:formula="of:=DEC2HEX([.C471])" table:style-name="ce1">
            <text:p>ECA3B</text:p>
          </table:table-cell>
          <table:table-cell office:value-type="float" office:value="969275" table:style-name="ce1">
            <text:p>96927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7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office:string-value="ECA3F" table:formula="of:=DEC2HEX([.C472])" table:style-name="ce1">
            <text:p>ECA3F</text:p>
          </table:table-cell>
          <table:table-cell office:value-type="float" office:value="969279" table:style-name="ce1">
            <text:p>9692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7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office:string-value="ECA43" table:formula="of:=DEC2HEX([.C473])" table:style-name="ce1">
            <text:p>ECA43</text:p>
          </table:table-cell>
          <table:table-cell office:value-type="float" office:value="969283" table:style-name="ce1">
            <text:p>96928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7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office:string-value="ECA47" table:formula="of:=DEC2HEX([.C474])" table:style-name="ce1">
            <text:p>ECA47</text:p>
          </table:table-cell>
          <table:table-cell office:value-type="float" office:value="969287" table:style-name="ce1">
            <text:p>96928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7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office:string-value="ECA4B" table:formula="of:=DEC2HEX([.C475])" table:style-name="ce1">
            <text:p>ECA4B</text:p>
          </table:table-cell>
          <table:table-cell office:value-type="float" office:value="969291" table:style-name="ce1">
            <text:p>9692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7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office:string-value="ECA4F" table:formula="of:=DEC2HEX([.C476])" table:style-name="ce1">
            <text:p>ECA4F</text:p>
          </table:table-cell>
          <table:table-cell office:value-type="float" office:value="969295" table:style-name="ce1">
            <text:p>96929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7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office:string-value="ECA53" table:formula="of:=DEC2HEX([.C477])" table:style-name="ce1">
            <text:p>ECA53</text:p>
          </table:table-cell>
          <table:table-cell office:value-type="float" office:value="969299" table:style-name="ce1">
            <text:p>9692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7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office:string-value="ECA57" table:formula="of:=DEC2HEX([.C478])" table:style-name="ce1">
            <text:p>ECA57</text:p>
          </table:table-cell>
          <table:table-cell office:value-type="float" office:value="969303" table:style-name="ce1">
            <text:p>9693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7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office:string-value="ECA5B" table:formula="of:=DEC2HEX([.C479])" table:style-name="ce1">
            <text:p>ECA5B</text:p>
          </table:table-cell>
          <table:table-cell office:value-type="float" office:value="969307" table:style-name="ce1">
            <text:p>9693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7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office:string-value="ECA5F" table:formula="of:=DEC2HEX([.C480])" table:style-name="ce1">
            <text:p>ECA5F</text:p>
          </table:table-cell>
          <table:table-cell office:value-type="float" office:value="969311" table:style-name="ce1">
            <text:p>9693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8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office:string-value="ECA63" table:formula="of:=DEC2HEX([.C481])" table:style-name="ce1">
            <text:p>ECA63</text:p>
          </table:table-cell>
          <table:table-cell office:value-type="float" office:value="969315" table:style-name="ce1">
            <text:p>96931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8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office:string-value="ECA67" table:formula="of:=DEC2HEX([.C482])" table:style-name="ce1">
            <text:p>ECA67</text:p>
          </table:table-cell>
          <table:table-cell office:value-type="float" office:value="969319" table:style-name="ce1">
            <text:p>9693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8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office:string-value="ECA6B" table:formula="of:=DEC2HEX([.C483])" table:style-name="ce1">
            <text:p>ECA6B</text:p>
          </table:table-cell>
          <table:table-cell office:value-type="float" office:value="969323" table:style-name="ce1">
            <text:p>969323</text:p>
          </table:table-cell>
          <table:table-cell office:value-type="float" office:value="550" table:style-name="ce1">
            <text:p>550</text:p>
          </table:table-cell>
          <table:table-cell office:value-type="float" office:value="1" table:formula="of:=IF([.D483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office:string-value="ECC91" table:formula="of:=DEC2HEX([.C484])" table:style-name="ce1">
            <text:p>ECC91</text:p>
          </table:table-cell>
          <table:table-cell office:value-type="float" office:value="969873" table:style-name="ce1">
            <text:p>96987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8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office:string-value="ECC95" table:formula="of:=DEC2HEX([.C485])" table:style-name="ce1">
            <text:p>ECC95</text:p>
          </table:table-cell>
          <table:table-cell office:value-type="float" office:value="969877" table:style-name="ce1">
            <text:p>96987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8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office:string-value="ECC99" table:formula="of:=DEC2HEX([.C486])" table:style-name="ce1">
            <text:p>ECC99</text:p>
          </table:table-cell>
          <table:table-cell office:value-type="float" office:value="969881" table:style-name="ce1">
            <text:p>96988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8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office:string-value="ECC9D" table:formula="of:=DEC2HEX([.C487])" table:style-name="ce1">
            <text:p>ECC9D</text:p>
          </table:table-cell>
          <table:table-cell office:value-type="float" office:value="969885" table:style-name="ce1">
            <text:p>96988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8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office:string-value="ECCA1" table:formula="of:=DEC2HEX([.C488])" table:style-name="ce1">
            <text:p>ECCA1</text:p>
          </table:table-cell>
          <table:table-cell office:value-type="float" office:value="969889" table:style-name="ce1">
            <text:p>96988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8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office:string-value="ECCA5" table:formula="of:=DEC2HEX([.C489])" table:style-name="ce1">
            <text:p>ECCA5</text:p>
          </table:table-cell>
          <table:table-cell office:value-type="float" office:value="969893" table:style-name="ce1">
            <text:p>96989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8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office:string-value="ECCA9" table:formula="of:=DEC2HEX([.C490])" table:style-name="ce1">
            <text:p>ECCA9</text:p>
          </table:table-cell>
          <table:table-cell office:value-type="float" office:value="969897" table:style-name="ce1">
            <text:p>96989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9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office:string-value="ECCAD" table:formula="of:=DEC2HEX([.C491])" table:style-name="ce1">
            <text:p>ECCAD</text:p>
          </table:table-cell>
          <table:table-cell office:value-type="float" office:value="969901" table:style-name="ce1">
            <text:p>96990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9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office:string-value="ECCB1" table:formula="of:=DEC2HEX([.C492])" table:style-name="ce1">
            <text:p>ECCB1</text:p>
          </table:table-cell>
          <table:table-cell office:value-type="float" office:value="969905" table:style-name="ce1">
            <text:p>96990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9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office:string-value="ECCB5" table:formula="of:=DEC2HEX([.C493])" table:style-name="ce1">
            <text:p>ECCB5</text:p>
          </table:table-cell>
          <table:table-cell office:value-type="float" office:value="969909" table:style-name="ce1">
            <text:p>969909</text:p>
          </table:table-cell>
          <table:table-cell office:value-type="float" office:value="36" table:style-name="ce1">
            <text:p>36</text:p>
          </table:table-cell>
          <table:table-cell office:value-type="float" office:value="0" table:formula="of:=IF([.D49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office:string-value="ECCD9" table:formula="of:=DEC2HEX([.C494])" table:style-name="ce1">
            <text:p>ECCD9</text:p>
          </table:table-cell>
          <table:table-cell office:value-type="float" office:value="969945" table:style-name="ce1">
            <text:p>96994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9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office:string-value="ECCDD" table:formula="of:=DEC2HEX([.C495])" table:style-name="ce1">
            <text:p>ECCDD</text:p>
          </table:table-cell>
          <table:table-cell office:value-type="float" office:value="969949" table:style-name="ce1">
            <text:p>96994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9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office:string-value="ECCE1" table:formula="of:=DEC2HEX([.C496])" table:style-name="ce1">
            <text:p>ECCE1</text:p>
          </table:table-cell>
          <table:table-cell office:value-type="float" office:value="969953" table:style-name="ce1">
            <text:p>96995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9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office:string-value="ECCE5" table:formula="of:=DEC2HEX([.C497])" table:style-name="ce1">
            <text:p>ECCE5</text:p>
          </table:table-cell>
          <table:table-cell office:value-type="float" office:value="969957" table:style-name="ce1">
            <text:p>969957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IF([.D49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office:string-value="ECCED" table:formula="of:=DEC2HEX([.C498])" table:style-name="ce1">
            <text:p>ECCED</text:p>
          </table:table-cell>
          <table:table-cell office:value-type="float" office:value="969965" table:style-name="ce1">
            <text:p>96996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9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office:string-value="ECCF1" table:formula="of:=DEC2HEX([.C499])" table:style-name="ce1">
            <text:p>ECCF1</text:p>
          </table:table-cell>
          <table:table-cell office:value-type="float" office:value="969969" table:style-name="ce1">
            <text:p>96996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49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office:string-value="ECCF5" table:formula="of:=DEC2HEX([.C500])" table:style-name="ce1">
            <text:p>ECCF5</text:p>
          </table:table-cell>
          <table:table-cell office:value-type="float" office:value="969973" table:style-name="ce1">
            <text:p>969973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50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office:string-value="ECCF8" table:formula="of:=DEC2HEX([.C501])" table:style-name="ce1">
            <text:p>ECCF8</text:p>
          </table:table-cell>
          <table:table-cell office:value-type="float" office:value="969976" table:style-name="ce1">
            <text:p>96997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0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office:string-value="ECCFC" table:formula="of:=DEC2HEX([.C502])" table:style-name="ce1">
            <text:p>ECCFC</text:p>
          </table:table-cell>
          <table:table-cell office:value-type="float" office:value="969980" table:style-name="ce1">
            <text:p>96998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0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office:string-value="ECD00" table:formula="of:=DEC2HEX([.C503])" table:style-name="ce1">
            <text:p>ECD00</text:p>
          </table:table-cell>
          <table:table-cell office:value-type="float" office:value="969984" table:style-name="ce1">
            <text:p>96998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0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office:string-value="ECD04" table:formula="of:=DEC2HEX([.C504])" table:style-name="ce1">
            <text:p>ECD04</text:p>
          </table:table-cell>
          <table:table-cell office:value-type="float" office:value="969988" table:style-name="ce1">
            <text:p>9699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0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office:string-value="ECD08" table:formula="of:=DEC2HEX([.C505])" table:style-name="ce1">
            <text:p>ECD08</text:p>
          </table:table-cell>
          <table:table-cell office:value-type="float" office:value="969992" table:style-name="ce1">
            <text:p>9699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0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office:string-value="ECD0C" table:formula="of:=DEC2HEX([.C506])" table:style-name="ce1">
            <text:p>ECD0C</text:p>
          </table:table-cell>
          <table:table-cell office:value-type="float" office:value="969996" table:style-name="ce1">
            <text:p>9699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0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office:string-value="ECD10" table:formula="of:=DEC2HEX([.C507])" table:style-name="ce1">
            <text:p>ECD10</text:p>
          </table:table-cell>
          <table:table-cell office:value-type="float" office:value="970000" table:style-name="ce1">
            <text:p>97000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0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office:string-value="ECD14" table:formula="of:=DEC2HEX([.C508])" table:style-name="ce1">
            <text:p>ECD14</text:p>
          </table:table-cell>
          <table:table-cell office:value-type="float" office:value="970004" table:style-name="ce1">
            <text:p>97000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0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office:string-value="ECD18" table:formula="of:=DEC2HEX([.C509])" table:style-name="ce1">
            <text:p>ECD18</text:p>
          </table:table-cell>
          <table:table-cell office:value-type="float" office:value="970008" table:style-name="ce1">
            <text:p>97000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0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office:string-value="ECD1C" table:formula="of:=DEC2HEX([.C510])" table:style-name="ce1">
            <text:p>ECD1C</text:p>
          </table:table-cell>
          <table:table-cell office:value-type="float" office:value="970012" table:style-name="ce1">
            <text:p>97001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1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office:string-value="ECD20" table:formula="of:=DEC2HEX([.C511])" table:style-name="ce1">
            <text:p>ECD20</text:p>
          </table:table-cell>
          <table:table-cell office:value-type="float" office:value="970016" table:style-name="ce1">
            <text:p>970016</text:p>
          </table:table-cell>
          <table:table-cell office:value-type="float" office:value="1024" table:style-name="ce1">
            <text:p>1024</text:p>
          </table:table-cell>
          <table:table-cell office:value-type="float" office:value="1" table:formula="of:=IF([.D511]&gt;100;1;0)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office:string-value="ED120" table:formula="of:=DEC2HEX([.C512])" table:style-name="ce1">
            <text:p>ED120</text:p>
          </table:table-cell>
          <table:table-cell office:value-type="float" office:value="971040" table:style-name="ce1">
            <text:p>97104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1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office:string-value="ED124" table:formula="of:=DEC2HEX([.C513])" table:style-name="ce1">
            <text:p>ED124</text:p>
          </table:table-cell>
          <table:table-cell office:value-type="float" office:value="971044" table:style-name="ce1">
            <text:p>9710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1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office:string-value="ED128" table:formula="of:=DEC2HEX([.C514])" table:style-name="ce1">
            <text:p>ED128</text:p>
          </table:table-cell>
          <table:table-cell office:value-type="float" office:value="971048" table:style-name="ce1">
            <text:p>9710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1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office:string-value="ED12C" table:formula="of:=DEC2HEX([.C515])" table:style-name="ce1">
            <text:p>ED12C</text:p>
          </table:table-cell>
          <table:table-cell office:value-type="float" office:value="971052" table:style-name="ce1">
            <text:p>9710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1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office:string-value="ED130" table:formula="of:=DEC2HEX([.C516])" table:style-name="ce1">
            <text:p>ED130</text:p>
          </table:table-cell>
          <table:table-cell office:value-type="float" office:value="971056" table:style-name="ce1">
            <text:p>97105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1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office:string-value="ED134" table:formula="of:=DEC2HEX([.C517])" table:style-name="ce1">
            <text:p>ED134</text:p>
          </table:table-cell>
          <table:table-cell office:value-type="float" office:value="971060" table:style-name="ce1">
            <text:p>97106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1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office:string-value="ED138" table:formula="of:=DEC2HEX([.C518])" table:style-name="ce1">
            <text:p>ED138</text:p>
          </table:table-cell>
          <table:table-cell office:value-type="float" office:value="971064" table:style-name="ce1">
            <text:p>97106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1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office:string-value="ED13C" table:formula="of:=DEC2HEX([.C519])" table:style-name="ce1">
            <text:p>ED13C</text:p>
          </table:table-cell>
          <table:table-cell office:value-type="float" office:value="971068" table:style-name="ce1">
            <text:p>971068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51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office:string-value="ED13D" table:formula="of:=DEC2HEX([.C520])" table:style-name="ce1">
            <text:p>ED13D</text:p>
          </table:table-cell>
          <table:table-cell office:value-type="float" office:value="971069" table:style-name="ce1">
            <text:p>971069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52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office:string-value="ED13E" table:formula="of:=DEC2HEX([.C521])" table:style-name="ce1">
            <text:p>ED13E</text:p>
          </table:table-cell>
          <table:table-cell office:value-type="float" office:value="971070" table:style-name="ce1">
            <text:p>97107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2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office:string-value="ED142" table:formula="of:=DEC2HEX([.C522])" table:style-name="ce1">
            <text:p>ED142</text:p>
          </table:table-cell>
          <table:table-cell office:value-type="float" office:value="971074" table:style-name="ce1">
            <text:p>97107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2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office:string-value="ED146" table:formula="of:=DEC2HEX([.C523])" table:style-name="ce1">
            <text:p>ED146</text:p>
          </table:table-cell>
          <table:table-cell office:value-type="float" office:value="971078" table:style-name="ce1">
            <text:p>97107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2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office:string-value="ED14A" table:formula="of:=DEC2HEX([.C524])" table:style-name="ce1">
            <text:p>ED14A</text:p>
          </table:table-cell>
          <table:table-cell office:value-type="float" office:value="971082" table:style-name="ce1">
            <text:p>97108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2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office:string-value="ED14E" table:formula="of:=DEC2HEX([.C525])" table:style-name="ce1">
            <text:p>ED14E</text:p>
          </table:table-cell>
          <table:table-cell office:value-type="float" office:value="971086" table:style-name="ce1">
            <text:p>97108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2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office:string-value="ED152" table:formula="of:=DEC2HEX([.C526])" table:style-name="ce1">
            <text:p>ED152</text:p>
          </table:table-cell>
          <table:table-cell office:value-type="float" office:value="971090" table:style-name="ce1">
            <text:p>97109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2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office:string-value="ED156" table:formula="of:=DEC2HEX([.C527])" table:style-name="ce1">
            <text:p>ED156</text:p>
          </table:table-cell>
          <table:table-cell office:value-type="float" office:value="971094" table:style-name="ce1">
            <text:p>97109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2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office:string-value="ED15A" table:formula="of:=DEC2HEX([.C528])" table:style-name="ce1">
            <text:p>ED15A</text:p>
          </table:table-cell>
          <table:table-cell office:value-type="float" office:value="971098" table:style-name="ce1">
            <text:p>97109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2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office:string-value="ED15E" table:formula="of:=DEC2HEX([.C529])" table:style-name="ce1">
            <text:p>ED15E</text:p>
          </table:table-cell>
          <table:table-cell office:value-type="float" office:value="971102" table:style-name="ce1">
            <text:p>97110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2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office:string-value="ED162" table:formula="of:=DEC2HEX([.C530])" table:style-name="ce1">
            <text:p>ED162</text:p>
          </table:table-cell>
          <table:table-cell office:value-type="float" office:value="971106" table:style-name="ce1">
            <text:p>97110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3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office:string-value="ED166" table:formula="of:=DEC2HEX([.C531])" table:style-name="ce1">
            <text:p>ED166</text:p>
          </table:table-cell>
          <table:table-cell office:value-type="float" office:value="971110" table:style-name="ce1">
            <text:p>97111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3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office:string-value="ED16A" table:formula="of:=DEC2HEX([.C532])" table:style-name="ce1">
            <text:p>ED16A</text:p>
          </table:table-cell>
          <table:table-cell office:value-type="float" office:value="971114" table:style-name="ce1">
            <text:p>97111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3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office:string-value="ED16E" table:formula="of:=DEC2HEX([.C533])" table:style-name="ce1">
            <text:p>ED16E</text:p>
          </table:table-cell>
          <table:table-cell office:value-type="float" office:value="971118" table:style-name="ce1">
            <text:p>971118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53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office:string-value="ED16F" table:formula="of:=DEC2HEX([.C534])" table:style-name="ce1">
            <text:p>ED16F</text:p>
          </table:table-cell>
          <table:table-cell office:value-type="float" office:value="971119" table:style-name="ce1">
            <text:p>9711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3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office:string-value="ED173" table:formula="of:=DEC2HEX([.C535])" table:style-name="ce1">
            <text:p>ED173</text:p>
          </table:table-cell>
          <table:table-cell office:value-type="float" office:value="971123" table:style-name="ce1">
            <text:p>9711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3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office:string-value="ED177" table:formula="of:=DEC2HEX([.C536])" table:style-name="ce1">
            <text:p>ED177</text:p>
          </table:table-cell>
          <table:table-cell office:value-type="float" office:value="971127" table:style-name="ce1">
            <text:p>9711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3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office:string-value="ED17B" table:formula="of:=DEC2HEX([.C537])" table:style-name="ce1">
            <text:p>ED17B</text:p>
          </table:table-cell>
          <table:table-cell office:value-type="float" office:value="971131" table:style-name="ce1">
            <text:p>97113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3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office:string-value="ED17F" table:formula="of:=DEC2HEX([.C538])" table:style-name="ce1">
            <text:p>ED17F</text:p>
          </table:table-cell>
          <table:table-cell office:value-type="float" office:value="971135" table:style-name="ce1">
            <text:p>9711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3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office:string-value="ED183" table:formula="of:=DEC2HEX([.C539])" table:style-name="ce1">
            <text:p>ED183</text:p>
          </table:table-cell>
          <table:table-cell office:value-type="float" office:value="971139" table:style-name="ce1">
            <text:p>97113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3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office:string-value="ED187" table:formula="of:=DEC2HEX([.C540])" table:style-name="ce1">
            <text:p>ED187</text:p>
          </table:table-cell>
          <table:table-cell office:value-type="float" office:value="971143" table:style-name="ce1">
            <text:p>971143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IF([.D54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office:string-value="ED18F" table:formula="of:=DEC2HEX([.C541])" table:style-name="ce1">
            <text:p>ED18F</text:p>
          </table:table-cell>
          <table:table-cell office:value-type="float" office:value="971151" table:style-name="ce1">
            <text:p>97115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4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office:string-value="ED193" table:formula="of:=DEC2HEX([.C542])" table:style-name="ce1">
            <text:p>ED193</text:p>
          </table:table-cell>
          <table:table-cell office:value-type="float" office:value="971155" table:style-name="ce1">
            <text:p>9711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4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office:string-value="ED197" table:formula="of:=DEC2HEX([.C543])" table:style-name="ce1">
            <text:p>ED197</text:p>
          </table:table-cell>
          <table:table-cell office:value-type="float" office:value="971159" table:style-name="ce1">
            <text:p>9711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4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office:string-value="ED19B" table:formula="of:=DEC2HEX([.C544])" table:style-name="ce1">
            <text:p>ED19B</text:p>
          </table:table-cell>
          <table:table-cell office:value-type="float" office:value="971163" table:style-name="ce1">
            <text:p>9711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4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office:string-value="ED19F" table:formula="of:=DEC2HEX([.C545])" table:style-name="ce1">
            <text:p>ED19F</text:p>
          </table:table-cell>
          <table:table-cell office:value-type="float" office:value="971167" table:style-name="ce1">
            <text:p>9711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4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office:string-value="ED1A3" table:formula="of:=DEC2HEX([.C546])" table:style-name="ce1">
            <text:p>ED1A3</text:p>
          </table:table-cell>
          <table:table-cell office:value-type="float" office:value="971171" table:style-name="ce1">
            <text:p>9711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4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office:string-value="ED1A7" table:formula="of:=DEC2HEX([.C547])" table:style-name="ce1">
            <text:p>ED1A7</text:p>
          </table:table-cell>
          <table:table-cell office:value-type="float" office:value="971175" table:style-name="ce1">
            <text:p>97117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4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office:string-value="ED1AB" table:formula="of:=DEC2HEX([.C548])" table:style-name="ce1">
            <text:p>ED1AB</text:p>
          </table:table-cell>
          <table:table-cell office:value-type="float" office:value="971179" table:style-name="ce1">
            <text:p>971179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54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office:string-value="ED1AC" table:formula="of:=DEC2HEX([.C549])" table:style-name="ce1">
            <text:p>ED1AC</text:p>
          </table:table-cell>
          <table:table-cell office:value-type="float" office:value="971180" table:style-name="ce1">
            <text:p>97118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4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office:string-value="ED1B0" table:formula="of:=DEC2HEX([.C550])" table:style-name="ce1">
            <text:p>ED1B0</text:p>
          </table:table-cell>
          <table:table-cell office:value-type="float" office:value="971184" table:style-name="ce1">
            <text:p>97118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5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office:string-value="ED1B4" table:formula="of:=DEC2HEX([.C551])" table:style-name="ce1">
            <text:p>ED1B4</text:p>
          </table:table-cell>
          <table:table-cell office:value-type="float" office:value="971188" table:style-name="ce1">
            <text:p>9711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5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office:string-value="ED1B8" table:formula="of:=DEC2HEX([.C552])" table:style-name="ce1">
            <text:p>ED1B8</text:p>
          </table:table-cell>
          <table:table-cell office:value-type="float" office:value="971192" table:style-name="ce1">
            <text:p>9711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5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office:string-value="ED1BC" table:formula="of:=DEC2HEX([.C553])" table:style-name="ce1">
            <text:p>ED1BC</text:p>
          </table:table-cell>
          <table:table-cell office:value-type="float" office:value="971196" table:style-name="ce1">
            <text:p>9711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5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office:string-value="ED1C0" table:formula="of:=DEC2HEX([.C554])" table:style-name="ce1">
            <text:p>ED1C0</text:p>
          </table:table-cell>
          <table:table-cell office:value-type="float" office:value="971200" table:style-name="ce1">
            <text:p>97120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5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office:string-value="ED1C4" table:formula="of:=DEC2HEX([.C555])" table:style-name="ce1">
            <text:p>ED1C4</text:p>
          </table:table-cell>
          <table:table-cell office:value-type="float" office:value="971204" table:style-name="ce1">
            <text:p>971204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IF([.D55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office:string-value="ED1CE" table:formula="of:=DEC2HEX([.C556])" table:style-name="ce1">
            <text:p>ED1CE</text:p>
          </table:table-cell>
          <table:table-cell office:value-type="float" office:value="971214" table:style-name="ce1">
            <text:p>97121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5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office:string-value="ED1D2" table:formula="of:=DEC2HEX([.C557])" table:style-name="ce1">
            <text:p>ED1D2</text:p>
          </table:table-cell>
          <table:table-cell office:value-type="float" office:value="971218" table:style-name="ce1">
            <text:p>97121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5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office:string-value="ED1D6" table:formula="of:=DEC2HEX([.C558])" table:style-name="ce1">
            <text:p>ED1D6</text:p>
          </table:table-cell>
          <table:table-cell office:value-type="float" office:value="971222" table:style-name="ce1">
            <text:p>97122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5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office:string-value="ED1DA" table:formula="of:=DEC2HEX([.C559])" table:style-name="ce1">
            <text:p>ED1DA</text:p>
          </table:table-cell>
          <table:table-cell office:value-type="float" office:value="971226" table:style-name="ce1">
            <text:p>97122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5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office:string-value="ED1DE" table:formula="of:=DEC2HEX([.C560])" table:style-name="ce1">
            <text:p>ED1DE</text:p>
          </table:table-cell>
          <table:table-cell office:value-type="float" office:value="971230" table:style-name="ce1">
            <text:p>97123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6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office:string-value="ED1E2" table:formula="of:=DEC2HEX([.C561])" table:style-name="ce1">
            <text:p>ED1E2</text:p>
          </table:table-cell>
          <table:table-cell office:value-type="float" office:value="971234" table:style-name="ce1">
            <text:p>97123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6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office:string-value="ED1E6" table:formula="of:=DEC2HEX([.C562])" table:style-name="ce1">
            <text:p>ED1E6</text:p>
          </table:table-cell>
          <table:table-cell office:value-type="float" office:value="971238" table:style-name="ce1">
            <text:p>97123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6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office:string-value="ED1EA" table:formula="of:=DEC2HEX([.C563])" table:style-name="ce1">
            <text:p>ED1EA</text:p>
          </table:table-cell>
          <table:table-cell office:value-type="float" office:value="971242" table:style-name="ce1">
            <text:p>97124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56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office:string-value="ED1EB" table:formula="of:=DEC2HEX([.C564])" table:style-name="ce1">
            <text:p>ED1EB</text:p>
          </table:table-cell>
          <table:table-cell office:value-type="float" office:value="971243" table:style-name="ce1">
            <text:p>9712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6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office:string-value="ED1EF" table:formula="of:=DEC2HEX([.C565])" table:style-name="ce1">
            <text:p>ED1EF</text:p>
          </table:table-cell>
          <table:table-cell office:value-type="float" office:value="971247" table:style-name="ce1">
            <text:p>9712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6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office:string-value="ED1F3" table:formula="of:=DEC2HEX([.C566])" table:style-name="ce1">
            <text:p>ED1F3</text:p>
          </table:table-cell>
          <table:table-cell office:value-type="float" office:value="971251" table:style-name="ce1">
            <text:p>97125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6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office:string-value="ED1F7" table:formula="of:=DEC2HEX([.C567])" table:style-name="ce1">
            <text:p>ED1F7</text:p>
          </table:table-cell>
          <table:table-cell office:value-type="float" office:value="971255" table:style-name="ce1">
            <text:p>9712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6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office:string-value="ED1FB" table:formula="of:=DEC2HEX([.C568])" table:style-name="ce1">
            <text:p>ED1FB</text:p>
          </table:table-cell>
          <table:table-cell office:value-type="float" office:value="971259" table:style-name="ce1">
            <text:p>9712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6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office:string-value="ED1FF" table:formula="of:=DEC2HEX([.C569])" table:style-name="ce1">
            <text:p>ED1FF</text:p>
          </table:table-cell>
          <table:table-cell office:value-type="float" office:value="971263" table:style-name="ce1">
            <text:p>9712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6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office:string-value="ED203" table:formula="of:=DEC2HEX([.C570])" table:style-name="ce1">
            <text:p>ED203</text:p>
          </table:table-cell>
          <table:table-cell office:value-type="float" office:value="971267" table:style-name="ce1">
            <text:p>971267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IF([.D57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office:string-value="ED20D" table:formula="of:=DEC2HEX([.C571])" table:style-name="ce1">
            <text:p>ED20D</text:p>
          </table:table-cell>
          <table:table-cell office:value-type="float" office:value="971277" table:style-name="ce1">
            <text:p>97127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7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office:string-value="ED211" table:formula="of:=DEC2HEX([.C572])" table:style-name="ce1">
            <text:p>ED211</text:p>
          </table:table-cell>
          <table:table-cell office:value-type="float" office:value="971281" table:style-name="ce1">
            <text:p>97128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7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office:string-value="ED215" table:formula="of:=DEC2HEX([.C573])" table:style-name="ce1">
            <text:p>ED215</text:p>
          </table:table-cell>
          <table:table-cell office:value-type="float" office:value="971285" table:style-name="ce1">
            <text:p>97128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7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office:string-value="ED219" table:formula="of:=DEC2HEX([.C574])" table:style-name="ce1">
            <text:p>ED219</text:p>
          </table:table-cell>
          <table:table-cell office:value-type="float" office:value="971289" table:style-name="ce1">
            <text:p>97128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7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office:string-value="ED21D" table:formula="of:=DEC2HEX([.C575])" table:style-name="ce1">
            <text:p>ED21D</text:p>
          </table:table-cell>
          <table:table-cell office:value-type="float" office:value="971293" table:style-name="ce1">
            <text:p>97129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7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office:string-value="ED221" table:formula="of:=DEC2HEX([.C576])" table:style-name="ce1">
            <text:p>ED221</text:p>
          </table:table-cell>
          <table:table-cell office:value-type="float" office:value="971297" table:style-name="ce1">
            <text:p>97129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7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office:string-value="ED225" table:formula="of:=DEC2HEX([.C577])" table:style-name="ce1">
            <text:p>ED225</text:p>
          </table:table-cell>
          <table:table-cell office:value-type="float" office:value="971301" table:style-name="ce1">
            <text:p>97130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7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office:string-value="ED229" table:formula="of:=DEC2HEX([.C578])" table:style-name="ce1">
            <text:p>ED229</text:p>
          </table:table-cell>
          <table:table-cell office:value-type="float" office:value="971305" table:style-name="ce1">
            <text:p>971305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57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office:string-value="ED22A" table:formula="of:=DEC2HEX([.C579])" table:style-name="ce1">
            <text:p>ED22A</text:p>
          </table:table-cell>
          <table:table-cell office:value-type="float" office:value="971306" table:style-name="ce1">
            <text:p>97130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7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office:string-value="ED22E" table:formula="of:=DEC2HEX([.C580])" table:style-name="ce1">
            <text:p>ED22E</text:p>
          </table:table-cell>
          <table:table-cell office:value-type="float" office:value="971310" table:style-name="ce1">
            <text:p>97131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8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office:string-value="ED232" table:formula="of:=DEC2HEX([.C581])" table:style-name="ce1">
            <text:p>ED232</text:p>
          </table:table-cell>
          <table:table-cell office:value-type="float" office:value="971314" table:style-name="ce1">
            <text:p>97131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8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office:string-value="ED236" table:formula="of:=DEC2HEX([.C582])" table:style-name="ce1">
            <text:p>ED236</text:p>
          </table:table-cell>
          <table:table-cell office:value-type="float" office:value="971318" table:style-name="ce1">
            <text:p>97131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8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office:string-value="ED23A" table:formula="of:=DEC2HEX([.C583])" table:style-name="ce1">
            <text:p>ED23A</text:p>
          </table:table-cell>
          <table:table-cell office:value-type="float" office:value="971322" table:style-name="ce1">
            <text:p>97132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8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office:string-value="ED23E" table:formula="of:=DEC2HEX([.C584])" table:style-name="ce1">
            <text:p>ED23E</text:p>
          </table:table-cell>
          <table:table-cell office:value-type="float" office:value="971326" table:style-name="ce1">
            <text:p>97132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8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office:string-value="ED242" table:formula="of:=DEC2HEX([.C585])" table:style-name="ce1">
            <text:p>ED242</text:p>
          </table:table-cell>
          <table:table-cell office:value-type="float" office:value="971330" table:style-name="ce1">
            <text:p>971330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IF([.D58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office:string-value="ED24C" table:formula="of:=DEC2HEX([.C586])" table:style-name="ce1">
            <text:p>ED24C</text:p>
          </table:table-cell>
          <table:table-cell office:value-type="float" office:value="971340" table:style-name="ce1">
            <text:p>97134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8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office:string-value="ED250" table:formula="of:=DEC2HEX([.C587])" table:style-name="ce1">
            <text:p>ED250</text:p>
          </table:table-cell>
          <table:table-cell office:value-type="float" office:value="971344" table:style-name="ce1">
            <text:p>9713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8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office:string-value="ED254" table:formula="of:=DEC2HEX([.C588])" table:style-name="ce1">
            <text:p>ED254</text:p>
          </table:table-cell>
          <table:table-cell office:value-type="float" office:value="971348" table:style-name="ce1">
            <text:p>9713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8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office:string-value="ED258" table:formula="of:=DEC2HEX([.C589])" table:style-name="ce1">
            <text:p>ED258</text:p>
          </table:table-cell>
          <table:table-cell office:value-type="float" office:value="971352" table:style-name="ce1">
            <text:p>9713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8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office:string-value="ED25C" table:formula="of:=DEC2HEX([.C590])" table:style-name="ce1">
            <text:p>ED25C</text:p>
          </table:table-cell>
          <table:table-cell office:value-type="float" office:value="971356" table:style-name="ce1">
            <text:p>97135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9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office:string-value="ED260" table:formula="of:=DEC2HEX([.C591])" table:style-name="ce1">
            <text:p>ED260</text:p>
          </table:table-cell>
          <table:table-cell office:value-type="float" office:value="971360" table:style-name="ce1">
            <text:p>97136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9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office:string-value="ED264" table:formula="of:=DEC2HEX([.C592])" table:style-name="ce1">
            <text:p>ED264</text:p>
          </table:table-cell>
          <table:table-cell office:value-type="float" office:value="971364" table:style-name="ce1">
            <text:p>97136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9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office:string-value="ED268" table:formula="of:=DEC2HEX([.C593])" table:style-name="ce1">
            <text:p>ED268</text:p>
          </table:table-cell>
          <table:table-cell office:value-type="float" office:value="971368" table:style-name="ce1">
            <text:p>971368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59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office:string-value="ED269" table:formula="of:=DEC2HEX([.C594])" table:style-name="ce1">
            <text:p>ED269</text:p>
          </table:table-cell>
          <table:table-cell office:value-type="float" office:value="971369" table:style-name="ce1">
            <text:p>97136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9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office:string-value="ED26D" table:formula="of:=DEC2HEX([.C595])" table:style-name="ce1">
            <text:p>ED26D</text:p>
          </table:table-cell>
          <table:table-cell office:value-type="float" office:value="971373" table:style-name="ce1">
            <text:p>97137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9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office:string-value="ED271" table:formula="of:=DEC2HEX([.C596])" table:style-name="ce1">
            <text:p>ED271</text:p>
          </table:table-cell>
          <table:table-cell office:value-type="float" office:value="971377" table:style-name="ce1">
            <text:p>97137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9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office:string-value="ED275" table:formula="of:=DEC2HEX([.C597])" table:style-name="ce1">
            <text:p>ED275</text:p>
          </table:table-cell>
          <table:table-cell office:value-type="float" office:value="971381" table:style-name="ce1">
            <text:p>97138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9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office:string-value="ED279" table:formula="of:=DEC2HEX([.C598])" table:style-name="ce1">
            <text:p>ED279</text:p>
          </table:table-cell>
          <table:table-cell office:value-type="float" office:value="971385" table:style-name="ce1">
            <text:p>97138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9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office:string-value="ED27D" table:formula="of:=DEC2HEX([.C599])" table:style-name="ce1">
            <text:p>ED27D</text:p>
          </table:table-cell>
          <table:table-cell office:value-type="float" office:value="971389" table:style-name="ce1">
            <text:p>97138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59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office:string-value="ED281" table:formula="of:=DEC2HEX([.C600])" table:style-name="ce1">
            <text:p>ED281</text:p>
          </table:table-cell>
          <table:table-cell office:value-type="float" office:value="971393" table:style-name="ce1">
            <text:p>971393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IF([.D60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office:string-value="ED28B" table:formula="of:=DEC2HEX([.C601])" table:style-name="ce1">
            <text:p>ED28B</text:p>
          </table:table-cell>
          <table:table-cell office:value-type="float" office:value="971403" table:style-name="ce1">
            <text:p>9714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0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office:string-value="ED28F" table:formula="of:=DEC2HEX([.C602])" table:style-name="ce1">
            <text:p>ED28F</text:p>
          </table:table-cell>
          <table:table-cell office:value-type="float" office:value="971407" table:style-name="ce1">
            <text:p>9714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0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office:string-value="ED293" table:formula="of:=DEC2HEX([.C603])" table:style-name="ce1">
            <text:p>ED293</text:p>
          </table:table-cell>
          <table:table-cell office:value-type="float" office:value="971411" table:style-name="ce1">
            <text:p>9714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0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office:string-value="ED297" table:formula="of:=DEC2HEX([.C604])" table:style-name="ce1">
            <text:p>ED297</text:p>
          </table:table-cell>
          <table:table-cell office:value-type="float" office:value="971415" table:style-name="ce1">
            <text:p>97141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0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office:string-value="ED29B" table:formula="of:=DEC2HEX([.C605])" table:style-name="ce1">
            <text:p>ED29B</text:p>
          </table:table-cell>
          <table:table-cell office:value-type="float" office:value="971419" table:style-name="ce1">
            <text:p>9714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0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office:string-value="ED29F" table:formula="of:=DEC2HEX([.C606])" table:style-name="ce1">
            <text:p>ED29F</text:p>
          </table:table-cell>
          <table:table-cell office:value-type="float" office:value="971423" table:style-name="ce1">
            <text:p>9714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0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office:string-value="ED2A3" table:formula="of:=DEC2HEX([.C607])" table:style-name="ce1">
            <text:p>ED2A3</text:p>
          </table:table-cell>
          <table:table-cell office:value-type="float" office:value="971427" table:style-name="ce1">
            <text:p>9714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0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office:string-value="ED2A7" table:formula="of:=DEC2HEX([.C608])" table:style-name="ce1">
            <text:p>ED2A7</text:p>
          </table:table-cell>
          <table:table-cell office:value-type="float" office:value="971431" table:style-name="ce1">
            <text:p>97143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60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office:string-value="ED2A8" table:formula="of:=DEC2HEX([.C609])" table:style-name="ce1">
            <text:p>ED2A8</text:p>
          </table:table-cell>
          <table:table-cell office:value-type="float" office:value="971432" table:style-name="ce1">
            <text:p>97143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0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office:string-value="ED2AC" table:formula="of:=DEC2HEX([.C610])" table:style-name="ce1">
            <text:p>ED2AC</text:p>
          </table:table-cell>
          <table:table-cell office:value-type="float" office:value="971436" table:style-name="ce1">
            <text:p>97143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1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office:string-value="ED2B0" table:formula="of:=DEC2HEX([.C611])" table:style-name="ce1">
            <text:p>ED2B0</text:p>
          </table:table-cell>
          <table:table-cell office:value-type="float" office:value="971440" table:style-name="ce1">
            <text:p>97144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1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office:string-value="ED2B4" table:formula="of:=DEC2HEX([.C612])" table:style-name="ce1">
            <text:p>ED2B4</text:p>
          </table:table-cell>
          <table:table-cell office:value-type="float" office:value="971444" table:style-name="ce1">
            <text:p>9714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1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office:string-value="ED2B8" table:formula="of:=DEC2HEX([.C613])" table:style-name="ce1">
            <text:p>ED2B8</text:p>
          </table:table-cell>
          <table:table-cell office:value-type="float" office:value="971448" table:style-name="ce1">
            <text:p>9714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1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office:string-value="ED2BC" table:formula="of:=DEC2HEX([.C614])" table:style-name="ce1">
            <text:p>ED2BC</text:p>
          </table:table-cell>
          <table:table-cell office:value-type="float" office:value="971452" table:style-name="ce1">
            <text:p>9714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1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office:string-value="ED2C0" table:formula="of:=DEC2HEX([.C615])" table:style-name="ce1">
            <text:p>ED2C0</text:p>
          </table:table-cell>
          <table:table-cell office:value-type="float" office:value="971456" table:style-name="ce1">
            <text:p>971456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IF([.D61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office:string-value="ED2CA" table:formula="of:=DEC2HEX([.C616])" table:style-name="ce1">
            <text:p>ED2CA</text:p>
          </table:table-cell>
          <table:table-cell office:value-type="float" office:value="971466" table:style-name="ce1">
            <text:p>97146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1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office:string-value="ED2CE" table:formula="of:=DEC2HEX([.C617])" table:style-name="ce1">
            <text:p>ED2CE</text:p>
          </table:table-cell>
          <table:table-cell office:value-type="float" office:value="971470" table:style-name="ce1">
            <text:p>97147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1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office:string-value="ED2D2" table:formula="of:=DEC2HEX([.C618])" table:style-name="ce1">
            <text:p>ED2D2</text:p>
          </table:table-cell>
          <table:table-cell office:value-type="float" office:value="971474" table:style-name="ce1">
            <text:p>97147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1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office:string-value="ED2D6" table:formula="of:=DEC2HEX([.C619])" table:style-name="ce1">
            <text:p>ED2D6</text:p>
          </table:table-cell>
          <table:table-cell office:value-type="float" office:value="971478" table:style-name="ce1">
            <text:p>97147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1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office:string-value="ED2DA" table:formula="of:=DEC2HEX([.C620])" table:style-name="ce1">
            <text:p>ED2DA</text:p>
          </table:table-cell>
          <table:table-cell office:value-type="float" office:value="971482" table:style-name="ce1">
            <text:p>97148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2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office:string-value="ED2DE" table:formula="of:=DEC2HEX([.C621])" table:style-name="ce1">
            <text:p>ED2DE</text:p>
          </table:table-cell>
          <table:table-cell office:value-type="float" office:value="971486" table:style-name="ce1">
            <text:p>97148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2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office:string-value="ED2E2" table:formula="of:=DEC2HEX([.C622])" table:style-name="ce1">
            <text:p>ED2E2</text:p>
          </table:table-cell>
          <table:table-cell office:value-type="float" office:value="971490" table:style-name="ce1">
            <text:p>97149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2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office:string-value="ED2E6" table:formula="of:=DEC2HEX([.C623])" table:style-name="ce1">
            <text:p>ED2E6</text:p>
          </table:table-cell>
          <table:table-cell office:value-type="float" office:value="971494" table:style-name="ce1">
            <text:p>971494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62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office:string-value="ED2E7" table:formula="of:=DEC2HEX([.C624])" table:style-name="ce1">
            <text:p>ED2E7</text:p>
          </table:table-cell>
          <table:table-cell office:value-type="float" office:value="971495" table:style-name="ce1">
            <text:p>97149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2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office:string-value="ED2EB" table:formula="of:=DEC2HEX([.C625])" table:style-name="ce1">
            <text:p>ED2EB</text:p>
          </table:table-cell>
          <table:table-cell office:value-type="float" office:value="971499" table:style-name="ce1">
            <text:p>9714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2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office:string-value="ED2EF" table:formula="of:=DEC2HEX([.C626])" table:style-name="ce1">
            <text:p>ED2EF</text:p>
          </table:table-cell>
          <table:table-cell office:value-type="float" office:value="971503" table:style-name="ce1">
            <text:p>9715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2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office:string-value="ED2F3" table:formula="of:=DEC2HEX([.C627])" table:style-name="ce1">
            <text:p>ED2F3</text:p>
          </table:table-cell>
          <table:table-cell office:value-type="float" office:value="971507" table:style-name="ce1">
            <text:p>9715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2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office:string-value="ED2F7" table:formula="of:=DEC2HEX([.C628])" table:style-name="ce1">
            <text:p>ED2F7</text:p>
          </table:table-cell>
          <table:table-cell office:value-type="float" office:value="971511" table:style-name="ce1">
            <text:p>9715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2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office:string-value="ED2FB" table:formula="of:=DEC2HEX([.C629])" table:style-name="ce1">
            <text:p>ED2FB</text:p>
          </table:table-cell>
          <table:table-cell office:value-type="float" office:value="971515" table:style-name="ce1">
            <text:p>97151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2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office:string-value="ED2FF" table:formula="of:=DEC2HEX([.C630])" table:style-name="ce1">
            <text:p>ED2FF</text:p>
          </table:table-cell>
          <table:table-cell office:value-type="float" office:value="971519" table:style-name="ce1">
            <text:p>971519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IF([.D63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office:string-value="ED309" table:formula="of:=DEC2HEX([.C631])" table:style-name="ce1">
            <text:p>ED309</text:p>
          </table:table-cell>
          <table:table-cell office:value-type="float" office:value="971529" table:style-name="ce1">
            <text:p>97152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3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office:string-value="ED30D" table:formula="of:=DEC2HEX([.C632])" table:style-name="ce1">
            <text:p>ED30D</text:p>
          </table:table-cell>
          <table:table-cell office:value-type="float" office:value="971533" table:style-name="ce1">
            <text:p>97153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3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office:string-value="ED311" table:formula="of:=DEC2HEX([.C633])" table:style-name="ce1">
            <text:p>ED311</text:p>
          </table:table-cell>
          <table:table-cell office:value-type="float" office:value="971537" table:style-name="ce1">
            <text:p>97153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3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office:string-value="ED315" table:formula="of:=DEC2HEX([.C634])" table:style-name="ce1">
            <text:p>ED315</text:p>
          </table:table-cell>
          <table:table-cell office:value-type="float" office:value="971541" table:style-name="ce1">
            <text:p>97154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3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office:string-value="ED319" table:formula="of:=DEC2HEX([.C635])" table:style-name="ce1">
            <text:p>ED319</text:p>
          </table:table-cell>
          <table:table-cell office:value-type="float" office:value="971545" table:style-name="ce1">
            <text:p>97154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3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office:string-value="ED31D" table:formula="of:=DEC2HEX([.C636])" table:style-name="ce1">
            <text:p>ED31D</text:p>
          </table:table-cell>
          <table:table-cell office:value-type="float" office:value="971549" table:style-name="ce1">
            <text:p>97154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3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office:string-value="ED321" table:formula="of:=DEC2HEX([.C637])" table:style-name="ce1">
            <text:p>ED321</text:p>
          </table:table-cell>
          <table:table-cell office:value-type="float" office:value="971553" table:style-name="ce1">
            <text:p>97155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3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office:string-value="ED325" table:formula="of:=DEC2HEX([.C638])" table:style-name="ce1">
            <text:p>ED325</text:p>
          </table:table-cell>
          <table:table-cell office:value-type="float" office:value="971557" table:style-name="ce1">
            <text:p>971557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63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office:string-value="ED326" table:formula="of:=DEC2HEX([.C639])" table:style-name="ce1">
            <text:p>ED326</text:p>
          </table:table-cell>
          <table:table-cell office:value-type="float" office:value="971558" table:style-name="ce1">
            <text:p>97155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3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office:string-value="ED32A" table:formula="of:=DEC2HEX([.C640])" table:style-name="ce1">
            <text:p>ED32A</text:p>
          </table:table-cell>
          <table:table-cell office:value-type="float" office:value="971562" table:style-name="ce1">
            <text:p>97156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4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office:string-value="ED32E" table:formula="of:=DEC2HEX([.C641])" table:style-name="ce1">
            <text:p>ED32E</text:p>
          </table:table-cell>
          <table:table-cell office:value-type="float" office:value="971566" table:style-name="ce1">
            <text:p>97156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4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office:string-value="ED332" table:formula="of:=DEC2HEX([.C642])" table:style-name="ce1">
            <text:p>ED332</text:p>
          </table:table-cell>
          <table:table-cell office:value-type="float" office:value="971570" table:style-name="ce1">
            <text:p>97157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4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office:string-value="ED336" table:formula="of:=DEC2HEX([.C643])" table:style-name="ce1">
            <text:p>ED336</text:p>
          </table:table-cell>
          <table:table-cell office:value-type="float" office:value="971574" table:style-name="ce1">
            <text:p>97157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4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office:string-value="ED33A" table:formula="of:=DEC2HEX([.C644])" table:style-name="ce1">
            <text:p>ED33A</text:p>
          </table:table-cell>
          <table:table-cell office:value-type="float" office:value="971578" table:style-name="ce1">
            <text:p>97157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4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office:string-value="ED33E" table:formula="of:=DEC2HEX([.C645])" table:style-name="ce1">
            <text:p>ED33E</text:p>
          </table:table-cell>
          <table:table-cell office:value-type="float" office:value="971582" table:style-name="ce1">
            <text:p>971582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IF([.D64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office:string-value="ED348" table:formula="of:=DEC2HEX([.C646])" table:style-name="ce1">
            <text:p>ED348</text:p>
          </table:table-cell>
          <table:table-cell office:value-type="float" office:value="971592" table:style-name="ce1">
            <text:p>9715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4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office:string-value="ED34C" table:formula="of:=DEC2HEX([.C647])" table:style-name="ce1">
            <text:p>ED34C</text:p>
          </table:table-cell>
          <table:table-cell office:value-type="float" office:value="971596" table:style-name="ce1">
            <text:p>9715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4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office:string-value="ED350" table:formula="of:=DEC2HEX([.C648])" table:style-name="ce1">
            <text:p>ED350</text:p>
          </table:table-cell>
          <table:table-cell office:value-type="float" office:value="971600" table:style-name="ce1">
            <text:p>97160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4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office:string-value="ED354" table:formula="of:=DEC2HEX([.C649])" table:style-name="ce1">
            <text:p>ED354</text:p>
          </table:table-cell>
          <table:table-cell office:value-type="float" office:value="971604" table:style-name="ce1">
            <text:p>97160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4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office:string-value="ED358" table:formula="of:=DEC2HEX([.C650])" table:style-name="ce1">
            <text:p>ED358</text:p>
          </table:table-cell>
          <table:table-cell office:value-type="float" office:value="971608" table:style-name="ce1">
            <text:p>97160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5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office:string-value="ED35C" table:formula="of:=DEC2HEX([.C651])" table:style-name="ce1">
            <text:p>ED35C</text:p>
          </table:table-cell>
          <table:table-cell office:value-type="float" office:value="971612" table:style-name="ce1">
            <text:p>97161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5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office:string-value="ED360" table:formula="of:=DEC2HEX([.C652])" table:style-name="ce1">
            <text:p>ED360</text:p>
          </table:table-cell>
          <table:table-cell office:value-type="float" office:value="971616" table:style-name="ce1">
            <text:p>97161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5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office:string-value="ED364" table:formula="of:=DEC2HEX([.C653])" table:style-name="ce1">
            <text:p>ED364</text:p>
          </table:table-cell>
          <table:table-cell office:value-type="float" office:value="971620" table:style-name="ce1">
            <text:p>971620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65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office:string-value="ED365" table:formula="of:=DEC2HEX([.C654])" table:style-name="ce1">
            <text:p>ED365</text:p>
          </table:table-cell>
          <table:table-cell office:value-type="float" office:value="971621" table:style-name="ce1">
            <text:p>97162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5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office:string-value="ED369" table:formula="of:=DEC2HEX([.C655])" table:style-name="ce1">
            <text:p>ED369</text:p>
          </table:table-cell>
          <table:table-cell office:value-type="float" office:value="971625" table:style-name="ce1">
            <text:p>97162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5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office:string-value="ED36D" table:formula="of:=DEC2HEX([.C656])" table:style-name="ce1">
            <text:p>ED36D</text:p>
          </table:table-cell>
          <table:table-cell office:value-type="float" office:value="971629" table:style-name="ce1">
            <text:p>97162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5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office:string-value="ED371" table:formula="of:=DEC2HEX([.C657])" table:style-name="ce1">
            <text:p>ED371</text:p>
          </table:table-cell>
          <table:table-cell office:value-type="float" office:value="971633" table:style-name="ce1">
            <text:p>97163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5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office:string-value="ED375" table:formula="of:=DEC2HEX([.C658])" table:style-name="ce1">
            <text:p>ED375</text:p>
          </table:table-cell>
          <table:table-cell office:value-type="float" office:value="971637" table:style-name="ce1">
            <text:p>97163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5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office:string-value="ED379" table:formula="of:=DEC2HEX([.C659])" table:style-name="ce1">
            <text:p>ED379</text:p>
          </table:table-cell>
          <table:table-cell office:value-type="float" office:value="971641" table:style-name="ce1">
            <text:p>97164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5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office:string-value="ED37D" table:formula="of:=DEC2HEX([.C660])" table:style-name="ce1">
            <text:p>ED37D</text:p>
          </table:table-cell>
          <table:table-cell office:value-type="float" office:value="971645" table:style-name="ce1">
            <text:p>971645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IF([.D66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office:string-value="ED387" table:formula="of:=DEC2HEX([.C661])" table:style-name="ce1">
            <text:p>ED387</text:p>
          </table:table-cell>
          <table:table-cell office:value-type="float" office:value="971655" table:style-name="ce1">
            <text:p>9716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6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office:string-value="ED38B" table:formula="of:=DEC2HEX([.C662])" table:style-name="ce1">
            <text:p>ED38B</text:p>
          </table:table-cell>
          <table:table-cell office:value-type="float" office:value="971659" table:style-name="ce1">
            <text:p>9716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6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office:string-value="ED38F" table:formula="of:=DEC2HEX([.C663])" table:style-name="ce1">
            <text:p>ED38F</text:p>
          </table:table-cell>
          <table:table-cell office:value-type="float" office:value="971663" table:style-name="ce1">
            <text:p>9716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6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office:string-value="ED393" table:formula="of:=DEC2HEX([.C664])" table:style-name="ce1">
            <text:p>ED393</text:p>
          </table:table-cell>
          <table:table-cell office:value-type="float" office:value="971667" table:style-name="ce1">
            <text:p>9716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6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office:string-value="ED397" table:formula="of:=DEC2HEX([.C665])" table:style-name="ce1">
            <text:p>ED397</text:p>
          </table:table-cell>
          <table:table-cell office:value-type="float" office:value="971671" table:style-name="ce1">
            <text:p>9716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6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office:string-value="ED39B" table:formula="of:=DEC2HEX([.C666])" table:style-name="ce1">
            <text:p>ED39B</text:p>
          </table:table-cell>
          <table:table-cell office:value-type="float" office:value="971675" table:style-name="ce1">
            <text:p>97167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6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office:string-value="ED39F" table:formula="of:=DEC2HEX([.C667])" table:style-name="ce1">
            <text:p>ED39F</text:p>
          </table:table-cell>
          <table:table-cell office:value-type="float" office:value="971679" table:style-name="ce1">
            <text:p>9716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6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office:string-value="ED3A3" table:formula="of:=DEC2HEX([.C668])" table:style-name="ce1">
            <text:p>ED3A3</text:p>
          </table:table-cell>
          <table:table-cell office:value-type="float" office:value="971683" table:style-name="ce1">
            <text:p>971683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66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office:string-value="ED3A4" table:formula="of:=DEC2HEX([.C669])" table:style-name="ce1">
            <text:p>ED3A4</text:p>
          </table:table-cell>
          <table:table-cell office:value-type="float" office:value="971684" table:style-name="ce1">
            <text:p>97168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6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office:string-value="ED3A8" table:formula="of:=DEC2HEX([.C670])" table:style-name="ce1">
            <text:p>ED3A8</text:p>
          </table:table-cell>
          <table:table-cell office:value-type="float" office:value="971688" table:style-name="ce1">
            <text:p>9716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7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office:string-value="ED3AC" table:formula="of:=DEC2HEX([.C671])" table:style-name="ce1">
            <text:p>ED3AC</text:p>
          </table:table-cell>
          <table:table-cell office:value-type="float" office:value="971692" table:style-name="ce1">
            <text:p>9716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7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office:string-value="ED3B0" table:formula="of:=DEC2HEX([.C672])" table:style-name="ce1">
            <text:p>ED3B0</text:p>
          </table:table-cell>
          <table:table-cell office:value-type="float" office:value="971696" table:style-name="ce1">
            <text:p>9716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7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office:string-value="ED3B4" table:formula="of:=DEC2HEX([.C673])" table:style-name="ce1">
            <text:p>ED3B4</text:p>
          </table:table-cell>
          <table:table-cell office:value-type="float" office:value="971700" table:style-name="ce1">
            <text:p>97170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7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office:string-value="ED3B8" table:formula="of:=DEC2HEX([.C674])" table:style-name="ce1">
            <text:p>ED3B8</text:p>
          </table:table-cell>
          <table:table-cell office:value-type="float" office:value="971704" table:style-name="ce1">
            <text:p>97170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7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office:string-value="ED3BC" table:formula="of:=DEC2HEX([.C675])" table:style-name="ce1">
            <text:p>ED3BC</text:p>
          </table:table-cell>
          <table:table-cell office:value-type="float" office:value="971708" table:style-name="ce1">
            <text:p>971708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67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office:string-value="ED3C7" table:formula="of:=DEC2HEX([.C676])" table:style-name="ce1">
            <text:p>ED3C7</text:p>
          </table:table-cell>
          <table:table-cell office:value-type="float" office:value="971719" table:style-name="ce1">
            <text:p>9717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7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office:string-value="ED3CB" table:formula="of:=DEC2HEX([.C677])" table:style-name="ce1">
            <text:p>ED3CB</text:p>
          </table:table-cell>
          <table:table-cell office:value-type="float" office:value="971723" table:style-name="ce1">
            <text:p>9717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7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office:string-value="ED3CF" table:formula="of:=DEC2HEX([.C678])" table:style-name="ce1">
            <text:p>ED3CF</text:p>
          </table:table-cell>
          <table:table-cell office:value-type="float" office:value="971727" table:style-name="ce1">
            <text:p>9717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7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office:string-value="ED3D3" table:formula="of:=DEC2HEX([.C679])" table:style-name="ce1">
            <text:p>ED3D3</text:p>
          </table:table-cell>
          <table:table-cell office:value-type="float" office:value="971731" table:style-name="ce1">
            <text:p>97173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7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office:string-value="ED3D7" table:formula="of:=DEC2HEX([.C680])" table:style-name="ce1">
            <text:p>ED3D7</text:p>
          </table:table-cell>
          <table:table-cell office:value-type="float" office:value="971735" table:style-name="ce1">
            <text:p>9717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8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office:string-value="ED3DB" table:formula="of:=DEC2HEX([.C681])" table:style-name="ce1">
            <text:p>ED3DB</text:p>
          </table:table-cell>
          <table:table-cell office:value-type="float" office:value="971739" table:style-name="ce1">
            <text:p>97173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8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office:string-value="ED3DF" table:formula="of:=DEC2HEX([.C682])" table:style-name="ce1">
            <text:p>ED3DF</text:p>
          </table:table-cell>
          <table:table-cell office:value-type="float" office:value="971743" table:style-name="ce1">
            <text:p>9717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8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office:string-value="ED3E3" table:formula="of:=DEC2HEX([.C683])" table:style-name="ce1">
            <text:p>ED3E3</text:p>
          </table:table-cell>
          <table:table-cell office:value-type="float" office:value="971747" table:style-name="ce1">
            <text:p>971747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68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office:string-value="ED3E4" table:formula="of:=DEC2HEX([.C684])" table:style-name="ce1">
            <text:p>ED3E4</text:p>
          </table:table-cell>
          <table:table-cell office:value-type="float" office:value="971748" table:style-name="ce1">
            <text:p>9717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8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office:string-value="ED3E8" table:formula="of:=DEC2HEX([.C685])" table:style-name="ce1">
            <text:p>ED3E8</text:p>
          </table:table-cell>
          <table:table-cell office:value-type="float" office:value="971752" table:style-name="ce1">
            <text:p>9717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8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office:string-value="ED3EC" table:formula="of:=DEC2HEX([.C686])" table:style-name="ce1">
            <text:p>ED3EC</text:p>
          </table:table-cell>
          <table:table-cell office:value-type="float" office:value="971756" table:style-name="ce1">
            <text:p>97175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8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office:string-value="ED3F0" table:formula="of:=DEC2HEX([.C687])" table:style-name="ce1">
            <text:p>ED3F0</text:p>
          </table:table-cell>
          <table:table-cell office:value-type="float" office:value="971760" table:style-name="ce1">
            <text:p>97176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8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office:string-value="ED3F4" table:formula="of:=DEC2HEX([.C688])" table:style-name="ce1">
            <text:p>ED3F4</text:p>
          </table:table-cell>
          <table:table-cell office:value-type="float" office:value="971764" table:style-name="ce1">
            <text:p>97176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8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office:string-value="ED3F8" table:formula="of:=DEC2HEX([.C689])" table:style-name="ce1">
            <text:p>ED3F8</text:p>
          </table:table-cell>
          <table:table-cell office:value-type="float" office:value="971768" table:style-name="ce1">
            <text:p>97176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8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office:string-value="ED3FC" table:formula="of:=DEC2HEX([.C690])" table:style-name="ce1">
            <text:p>ED3FC</text:p>
          </table:table-cell>
          <table:table-cell office:value-type="float" office:value="971772" table:style-name="ce1">
            <text:p>971772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69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office:string-value="ED407" table:formula="of:=DEC2HEX([.C691])" table:style-name="ce1">
            <text:p>ED407</text:p>
          </table:table-cell>
          <table:table-cell office:value-type="float" office:value="971783" table:style-name="ce1">
            <text:p>97178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9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office:string-value="ED40B" table:formula="of:=DEC2HEX([.C692])" table:style-name="ce1">
            <text:p>ED40B</text:p>
          </table:table-cell>
          <table:table-cell office:value-type="float" office:value="971787" table:style-name="ce1">
            <text:p>97178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9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office:string-value="ED40F" table:formula="of:=DEC2HEX([.C693])" table:style-name="ce1">
            <text:p>ED40F</text:p>
          </table:table-cell>
          <table:table-cell office:value-type="float" office:value="971791" table:style-name="ce1">
            <text:p>9717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9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office:string-value="ED413" table:formula="of:=DEC2HEX([.C694])" table:style-name="ce1">
            <text:p>ED413</text:p>
          </table:table-cell>
          <table:table-cell office:value-type="float" office:value="971795" table:style-name="ce1">
            <text:p>97179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9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office:string-value="ED417" table:formula="of:=DEC2HEX([.C695])" table:style-name="ce1">
            <text:p>ED417</text:p>
          </table:table-cell>
          <table:table-cell office:value-type="float" office:value="971799" table:style-name="ce1">
            <text:p>9717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9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office:string-value="ED41B" table:formula="of:=DEC2HEX([.C696])" table:style-name="ce1">
            <text:p>ED41B</text:p>
          </table:table-cell>
          <table:table-cell office:value-type="float" office:value="971803" table:style-name="ce1">
            <text:p>9718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9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office:string-value="ED41F" table:formula="of:=DEC2HEX([.C697])" table:style-name="ce1">
            <text:p>ED41F</text:p>
          </table:table-cell>
          <table:table-cell office:value-type="float" office:value="971807" table:style-name="ce1">
            <text:p>9718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9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office:string-value="ED423" table:formula="of:=DEC2HEX([.C698])" table:style-name="ce1">
            <text:p>ED423</text:p>
          </table:table-cell>
          <table:table-cell office:value-type="float" office:value="971811" table:style-name="ce1">
            <text:p>97181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69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office:string-value="ED424" table:formula="of:=DEC2HEX([.C699])" table:style-name="ce1">
            <text:p>ED424</text:p>
          </table:table-cell>
          <table:table-cell office:value-type="float" office:value="971812" table:style-name="ce1">
            <text:p>97181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69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office:string-value="ED428" table:formula="of:=DEC2HEX([.C700])" table:style-name="ce1">
            <text:p>ED428</text:p>
          </table:table-cell>
          <table:table-cell office:value-type="float" office:value="971816" table:style-name="ce1">
            <text:p>97181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0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office:string-value="ED42C" table:formula="of:=DEC2HEX([.C701])" table:style-name="ce1">
            <text:p>ED42C</text:p>
          </table:table-cell>
          <table:table-cell office:value-type="float" office:value="971820" table:style-name="ce1">
            <text:p>97182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0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office:string-value="ED430" table:formula="of:=DEC2HEX([.C702])" table:style-name="ce1">
            <text:p>ED430</text:p>
          </table:table-cell>
          <table:table-cell office:value-type="float" office:value="971824" table:style-name="ce1">
            <text:p>97182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0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office:string-value="ED434" table:formula="of:=DEC2HEX([.C703])" table:style-name="ce1">
            <text:p>ED434</text:p>
          </table:table-cell>
          <table:table-cell office:value-type="float" office:value="971828" table:style-name="ce1">
            <text:p>97182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0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office:string-value="ED438" table:formula="of:=DEC2HEX([.C704])" table:style-name="ce1">
            <text:p>ED438</text:p>
          </table:table-cell>
          <table:table-cell office:value-type="float" office:value="971832" table:style-name="ce1">
            <text:p>97183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0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office:string-value="ED43C" table:formula="of:=DEC2HEX([.C705])" table:style-name="ce1">
            <text:p>ED43C</text:p>
          </table:table-cell>
          <table:table-cell office:value-type="float" office:value="971836" table:style-name="ce1">
            <text:p>971836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70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office:string-value="ED447" table:formula="of:=DEC2HEX([.C706])" table:style-name="ce1">
            <text:p>ED447</text:p>
          </table:table-cell>
          <table:table-cell office:value-type="float" office:value="971847" table:style-name="ce1">
            <text:p>9718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0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office:string-value="ED44B" table:formula="of:=DEC2HEX([.C707])" table:style-name="ce1">
            <text:p>ED44B</text:p>
          </table:table-cell>
          <table:table-cell office:value-type="float" office:value="971851" table:style-name="ce1">
            <text:p>97185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0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office:string-value="ED44F" table:formula="of:=DEC2HEX([.C708])" table:style-name="ce1">
            <text:p>ED44F</text:p>
          </table:table-cell>
          <table:table-cell office:value-type="float" office:value="971855" table:style-name="ce1">
            <text:p>9718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0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office:string-value="ED453" table:formula="of:=DEC2HEX([.C709])" table:style-name="ce1">
            <text:p>ED453</text:p>
          </table:table-cell>
          <table:table-cell office:value-type="float" office:value="971859" table:style-name="ce1">
            <text:p>9718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0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office:string-value="ED457" table:formula="of:=DEC2HEX([.C710])" table:style-name="ce1">
            <text:p>ED457</text:p>
          </table:table-cell>
          <table:table-cell office:value-type="float" office:value="971863" table:style-name="ce1">
            <text:p>9718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1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office:string-value="ED45B" table:formula="of:=DEC2HEX([.C711])" table:style-name="ce1">
            <text:p>ED45B</text:p>
          </table:table-cell>
          <table:table-cell office:value-type="float" office:value="971867" table:style-name="ce1">
            <text:p>9718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1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office:string-value="ED45F" table:formula="of:=DEC2HEX([.C712])" table:style-name="ce1">
            <text:p>ED45F</text:p>
          </table:table-cell>
          <table:table-cell office:value-type="float" office:value="971871" table:style-name="ce1">
            <text:p>9718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1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office:string-value="ED463" table:formula="of:=DEC2HEX([.C713])" table:style-name="ce1">
            <text:p>ED463</text:p>
          </table:table-cell>
          <table:table-cell office:value-type="float" office:value="971875" table:style-name="ce1">
            <text:p>971875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71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office:string-value="ED464" table:formula="of:=DEC2HEX([.C714])" table:style-name="ce1">
            <text:p>ED464</text:p>
          </table:table-cell>
          <table:table-cell office:value-type="float" office:value="971876" table:style-name="ce1">
            <text:p>97187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1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office:string-value="ED468" table:formula="of:=DEC2HEX([.C715])" table:style-name="ce1">
            <text:p>ED468</text:p>
          </table:table-cell>
          <table:table-cell office:value-type="float" office:value="971880" table:style-name="ce1">
            <text:p>97188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1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office:string-value="ED46C" table:formula="of:=DEC2HEX([.C716])" table:style-name="ce1">
            <text:p>ED46C</text:p>
          </table:table-cell>
          <table:table-cell office:value-type="float" office:value="971884" table:style-name="ce1">
            <text:p>97188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1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office:string-value="ED470" table:formula="of:=DEC2HEX([.C717])" table:style-name="ce1">
            <text:p>ED470</text:p>
          </table:table-cell>
          <table:table-cell office:value-type="float" office:value="971888" table:style-name="ce1">
            <text:p>9718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1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office:string-value="ED474" table:formula="of:=DEC2HEX([.C718])" table:style-name="ce1">
            <text:p>ED474</text:p>
          </table:table-cell>
          <table:table-cell office:value-type="float" office:value="971892" table:style-name="ce1">
            <text:p>9718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1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office:string-value="ED478" table:formula="of:=DEC2HEX([.C719])" table:style-name="ce1">
            <text:p>ED478</text:p>
          </table:table-cell>
          <table:table-cell office:value-type="float" office:value="971896" table:style-name="ce1">
            <text:p>9718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1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office:string-value="ED47C" table:formula="of:=DEC2HEX([.C720])" table:style-name="ce1">
            <text:p>ED47C</text:p>
          </table:table-cell>
          <table:table-cell office:value-type="float" office:value="971900" table:style-name="ce1">
            <text:p>971900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72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office:string-value="ED487" table:formula="of:=DEC2HEX([.C721])" table:style-name="ce1">
            <text:p>ED487</text:p>
          </table:table-cell>
          <table:table-cell office:value-type="float" office:value="971911" table:style-name="ce1">
            <text:p>9719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2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office:string-value="ED48B" table:formula="of:=DEC2HEX([.C722])" table:style-name="ce1">
            <text:p>ED48B</text:p>
          </table:table-cell>
          <table:table-cell office:value-type="float" office:value="971915" table:style-name="ce1">
            <text:p>97191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2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office:string-value="ED48F" table:formula="of:=DEC2HEX([.C723])" table:style-name="ce1">
            <text:p>ED48F</text:p>
          </table:table-cell>
          <table:table-cell office:value-type="float" office:value="971919" table:style-name="ce1">
            <text:p>9719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2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office:string-value="ED493" table:formula="of:=DEC2HEX([.C724])" table:style-name="ce1">
            <text:p>ED493</text:p>
          </table:table-cell>
          <table:table-cell office:value-type="float" office:value="971923" table:style-name="ce1">
            <text:p>9719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2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office:string-value="ED497" table:formula="of:=DEC2HEX([.C725])" table:style-name="ce1">
            <text:p>ED497</text:p>
          </table:table-cell>
          <table:table-cell office:value-type="float" office:value="971927" table:style-name="ce1">
            <text:p>9719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2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office:string-value="ED49B" table:formula="of:=DEC2HEX([.C726])" table:style-name="ce1">
            <text:p>ED49B</text:p>
          </table:table-cell>
          <table:table-cell office:value-type="float" office:value="971931" table:style-name="ce1">
            <text:p>97193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2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office:string-value="ED49F" table:formula="of:=DEC2HEX([.C727])" table:style-name="ce1">
            <text:p>ED49F</text:p>
          </table:table-cell>
          <table:table-cell office:value-type="float" office:value="971935" table:style-name="ce1">
            <text:p>9719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2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office:string-value="ED4A3" table:formula="of:=DEC2HEX([.C728])" table:style-name="ce1">
            <text:p>ED4A3</text:p>
          </table:table-cell>
          <table:table-cell office:value-type="float" office:value="971939" table:style-name="ce1">
            <text:p>971939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72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office:string-value="ED4A4" table:formula="of:=DEC2HEX([.C729])" table:style-name="ce1">
            <text:p>ED4A4</text:p>
          </table:table-cell>
          <table:table-cell office:value-type="float" office:value="971940" table:style-name="ce1">
            <text:p>97194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2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office:string-value="ED4A8" table:formula="of:=DEC2HEX([.C730])" table:style-name="ce1">
            <text:p>ED4A8</text:p>
          </table:table-cell>
          <table:table-cell office:value-type="float" office:value="971944" table:style-name="ce1">
            <text:p>9719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3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office:string-value="ED4AC" table:formula="of:=DEC2HEX([.C731])" table:style-name="ce1">
            <text:p>ED4AC</text:p>
          </table:table-cell>
          <table:table-cell office:value-type="float" office:value="971948" table:style-name="ce1">
            <text:p>9719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3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office:string-value="ED4B0" table:formula="of:=DEC2HEX([.C732])" table:style-name="ce1">
            <text:p>ED4B0</text:p>
          </table:table-cell>
          <table:table-cell office:value-type="float" office:value="971952" table:style-name="ce1">
            <text:p>9719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3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office:string-value="ED4B4" table:formula="of:=DEC2HEX([.C733])" table:style-name="ce1">
            <text:p>ED4B4</text:p>
          </table:table-cell>
          <table:table-cell office:value-type="float" office:value="971956" table:style-name="ce1">
            <text:p>97195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3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office:string-value="ED4B8" table:formula="of:=DEC2HEX([.C734])" table:style-name="ce1">
            <text:p>ED4B8</text:p>
          </table:table-cell>
          <table:table-cell office:value-type="float" office:value="971960" table:style-name="ce1">
            <text:p>97196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3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office:string-value="ED4BC" table:formula="of:=DEC2HEX([.C735])" table:style-name="ce1">
            <text:p>ED4BC</text:p>
          </table:table-cell>
          <table:table-cell office:value-type="float" office:value="971964" table:style-name="ce1">
            <text:p>971964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73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office:string-value="ED4C7" table:formula="of:=DEC2HEX([.C736])" table:style-name="ce1">
            <text:p>ED4C7</text:p>
          </table:table-cell>
          <table:table-cell office:value-type="float" office:value="971975" table:style-name="ce1">
            <text:p>97197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3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office:string-value="ED4CB" table:formula="of:=DEC2HEX([.C737])" table:style-name="ce1">
            <text:p>ED4CB</text:p>
          </table:table-cell>
          <table:table-cell office:value-type="float" office:value="971979" table:style-name="ce1">
            <text:p>9719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3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office:string-value="ED4CF" table:formula="of:=DEC2HEX([.C738])" table:style-name="ce1">
            <text:p>ED4CF</text:p>
          </table:table-cell>
          <table:table-cell office:value-type="float" office:value="971983" table:style-name="ce1">
            <text:p>97198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3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office:string-value="ED4D3" table:formula="of:=DEC2HEX([.C739])" table:style-name="ce1">
            <text:p>ED4D3</text:p>
          </table:table-cell>
          <table:table-cell office:value-type="float" office:value="971987" table:style-name="ce1">
            <text:p>97198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3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office:string-value="ED4D7" table:formula="of:=DEC2HEX([.C740])" table:style-name="ce1">
            <text:p>ED4D7</text:p>
          </table:table-cell>
          <table:table-cell office:value-type="float" office:value="971991" table:style-name="ce1">
            <text:p>9719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4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office:string-value="ED4DB" table:formula="of:=DEC2HEX([.C741])" table:style-name="ce1">
            <text:p>ED4DB</text:p>
          </table:table-cell>
          <table:table-cell office:value-type="float" office:value="971995" table:style-name="ce1">
            <text:p>97199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4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office:string-value="ED4DF" table:formula="of:=DEC2HEX([.C742])" table:style-name="ce1">
            <text:p>ED4DF</text:p>
          </table:table-cell>
          <table:table-cell office:value-type="float" office:value="971999" table:style-name="ce1">
            <text:p>9719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4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office:string-value="ED4E3" table:formula="of:=DEC2HEX([.C743])" table:style-name="ce1">
            <text:p>ED4E3</text:p>
          </table:table-cell>
          <table:table-cell office:value-type="float" office:value="972003" table:style-name="ce1">
            <text:p>972003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74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office:string-value="ED4E4" table:formula="of:=DEC2HEX([.C744])" table:style-name="ce1">
            <text:p>ED4E4</text:p>
          </table:table-cell>
          <table:table-cell office:value-type="float" office:value="972004" table:style-name="ce1">
            <text:p>97200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4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office:string-value="ED4E8" table:formula="of:=DEC2HEX([.C745])" table:style-name="ce1">
            <text:p>ED4E8</text:p>
          </table:table-cell>
          <table:table-cell office:value-type="float" office:value="972008" table:style-name="ce1">
            <text:p>97200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4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office:string-value="ED4EC" table:formula="of:=DEC2HEX([.C746])" table:style-name="ce1">
            <text:p>ED4EC</text:p>
          </table:table-cell>
          <table:table-cell office:value-type="float" office:value="972012" table:style-name="ce1">
            <text:p>97201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4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office:string-value="ED4F0" table:formula="of:=DEC2HEX([.C747])" table:style-name="ce1">
            <text:p>ED4F0</text:p>
          </table:table-cell>
          <table:table-cell office:value-type="float" office:value="972016" table:style-name="ce1">
            <text:p>97201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4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office:string-value="ED4F4" table:formula="of:=DEC2HEX([.C748])" table:style-name="ce1">
            <text:p>ED4F4</text:p>
          </table:table-cell>
          <table:table-cell office:value-type="float" office:value="972020" table:style-name="ce1">
            <text:p>97202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4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office:string-value="ED4F8" table:formula="of:=DEC2HEX([.C749])" table:style-name="ce1">
            <text:p>ED4F8</text:p>
          </table:table-cell>
          <table:table-cell office:value-type="float" office:value="972024" table:style-name="ce1">
            <text:p>97202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4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office:string-value="ED4FC" table:formula="of:=DEC2HEX([.C750])" table:style-name="ce1">
            <text:p>ED4FC</text:p>
          </table:table-cell>
          <table:table-cell office:value-type="float" office:value="972028" table:style-name="ce1">
            <text:p>972028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75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office:string-value="ED507" table:formula="of:=DEC2HEX([.C751])" table:style-name="ce1">
            <text:p>ED507</text:p>
          </table:table-cell>
          <table:table-cell office:value-type="float" office:value="972039" table:style-name="ce1">
            <text:p>97203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5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office:string-value="ED50B" table:formula="of:=DEC2HEX([.C752])" table:style-name="ce1">
            <text:p>ED50B</text:p>
          </table:table-cell>
          <table:table-cell office:value-type="float" office:value="972043" table:style-name="ce1">
            <text:p>9720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5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office:string-value="ED50F" table:formula="of:=DEC2HEX([.C753])" table:style-name="ce1">
            <text:p>ED50F</text:p>
          </table:table-cell>
          <table:table-cell office:value-type="float" office:value="972047" table:style-name="ce1">
            <text:p>9720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5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office:string-value="ED513" table:formula="of:=DEC2HEX([.C754])" table:style-name="ce1">
            <text:p>ED513</text:p>
          </table:table-cell>
          <table:table-cell office:value-type="float" office:value="972051" table:style-name="ce1">
            <text:p>97205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5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office:string-value="ED517" table:formula="of:=DEC2HEX([.C755])" table:style-name="ce1">
            <text:p>ED517</text:p>
          </table:table-cell>
          <table:table-cell office:value-type="float" office:value="972055" table:style-name="ce1">
            <text:p>9720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5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office:string-value="ED51B" table:formula="of:=DEC2HEX([.C756])" table:style-name="ce1">
            <text:p>ED51B</text:p>
          </table:table-cell>
          <table:table-cell office:value-type="float" office:value="972059" table:style-name="ce1">
            <text:p>9720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5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office:string-value="ED51F" table:formula="of:=DEC2HEX([.C757])" table:style-name="ce1">
            <text:p>ED51F</text:p>
          </table:table-cell>
          <table:table-cell office:value-type="float" office:value="972063" table:style-name="ce1">
            <text:p>9720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5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office:string-value="ED523" table:formula="of:=DEC2HEX([.C758])" table:style-name="ce1">
            <text:p>ED523</text:p>
          </table:table-cell>
          <table:table-cell office:value-type="float" office:value="972067" table:style-name="ce1">
            <text:p>972067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75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office:string-value="ED524" table:formula="of:=DEC2HEX([.C759])" table:style-name="ce1">
            <text:p>ED524</text:p>
          </table:table-cell>
          <table:table-cell office:value-type="float" office:value="972068" table:style-name="ce1">
            <text:p>97206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5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office:string-value="ED528" table:formula="of:=DEC2HEX([.C760])" table:style-name="ce1">
            <text:p>ED528</text:p>
          </table:table-cell>
          <table:table-cell office:value-type="float" office:value="972072" table:style-name="ce1">
            <text:p>97207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6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office:string-value="ED52C" table:formula="of:=DEC2HEX([.C761])" table:style-name="ce1">
            <text:p>ED52C</text:p>
          </table:table-cell>
          <table:table-cell office:value-type="float" office:value="972076" table:style-name="ce1">
            <text:p>97207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6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office:string-value="ED530" table:formula="of:=DEC2HEX([.C762])" table:style-name="ce1">
            <text:p>ED530</text:p>
          </table:table-cell>
          <table:table-cell office:value-type="float" office:value="972080" table:style-name="ce1">
            <text:p>97208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6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office:string-value="ED534" table:formula="of:=DEC2HEX([.C763])" table:style-name="ce1">
            <text:p>ED534</text:p>
          </table:table-cell>
          <table:table-cell office:value-type="float" office:value="972084" table:style-name="ce1">
            <text:p>97208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6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office:string-value="ED538" table:formula="of:=DEC2HEX([.C764])" table:style-name="ce1">
            <text:p>ED538</text:p>
          </table:table-cell>
          <table:table-cell office:value-type="float" office:value="972088" table:style-name="ce1">
            <text:p>9720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6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office:string-value="ED53C" table:formula="of:=DEC2HEX([.C765])" table:style-name="ce1">
            <text:p>ED53C</text:p>
          </table:table-cell>
          <table:table-cell office:value-type="float" office:value="972092" table:style-name="ce1">
            <text:p>972092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76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office:string-value="ED547" table:formula="of:=DEC2HEX([.C766])" table:style-name="ce1">
            <text:p>ED547</text:p>
          </table:table-cell>
          <table:table-cell office:value-type="float" office:value="972103" table:style-name="ce1">
            <text:p>9721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6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office:string-value="ED54B" table:formula="of:=DEC2HEX([.C767])" table:style-name="ce1">
            <text:p>ED54B</text:p>
          </table:table-cell>
          <table:table-cell office:value-type="float" office:value="972107" table:style-name="ce1">
            <text:p>9721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6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office:string-value="ED54F" table:formula="of:=DEC2HEX([.C768])" table:style-name="ce1">
            <text:p>ED54F</text:p>
          </table:table-cell>
          <table:table-cell office:value-type="float" office:value="972111" table:style-name="ce1">
            <text:p>9721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6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office:string-value="ED553" table:formula="of:=DEC2HEX([.C769])" table:style-name="ce1">
            <text:p>ED553</text:p>
          </table:table-cell>
          <table:table-cell office:value-type="float" office:value="972115" table:style-name="ce1">
            <text:p>97211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6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office:string-value="ED557" table:formula="of:=DEC2HEX([.C770])" table:style-name="ce1">
            <text:p>ED557</text:p>
          </table:table-cell>
          <table:table-cell office:value-type="float" office:value="972119" table:style-name="ce1">
            <text:p>9721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7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office:string-value="ED55B" table:formula="of:=DEC2HEX([.C771])" table:style-name="ce1">
            <text:p>ED55B</text:p>
          </table:table-cell>
          <table:table-cell office:value-type="float" office:value="972123" table:style-name="ce1">
            <text:p>9721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7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office:string-value="ED55F" table:formula="of:=DEC2HEX([.C772])" table:style-name="ce1">
            <text:p>ED55F</text:p>
          </table:table-cell>
          <table:table-cell office:value-type="float" office:value="972127" table:style-name="ce1">
            <text:p>9721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7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office:string-value="ED563" table:formula="of:=DEC2HEX([.C773])" table:style-name="ce1">
            <text:p>ED563</text:p>
          </table:table-cell>
          <table:table-cell office:value-type="float" office:value="972131" table:style-name="ce1">
            <text:p>97213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77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office:string-value="ED564" table:formula="of:=DEC2HEX([.C774])" table:style-name="ce1">
            <text:p>ED564</text:p>
          </table:table-cell>
          <table:table-cell office:value-type="float" office:value="972132" table:style-name="ce1">
            <text:p>97213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7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office:string-value="ED568" table:formula="of:=DEC2HEX([.C775])" table:style-name="ce1">
            <text:p>ED568</text:p>
          </table:table-cell>
          <table:table-cell office:value-type="float" office:value="972136" table:style-name="ce1">
            <text:p>97213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7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office:string-value="ED56C" table:formula="of:=DEC2HEX([.C776])" table:style-name="ce1">
            <text:p>ED56C</text:p>
          </table:table-cell>
          <table:table-cell office:value-type="float" office:value="972140" table:style-name="ce1">
            <text:p>97214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7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string" office:string-value="ED570" table:formula="of:=DEC2HEX([.C777])" table:style-name="ce1">
            <text:p>ED570</text:p>
          </table:table-cell>
          <table:table-cell office:value-type="float" office:value="972144" table:style-name="ce1">
            <text:p>9721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7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office:string-value="ED574" table:formula="of:=DEC2HEX([.C778])" table:style-name="ce1">
            <text:p>ED574</text:p>
          </table:table-cell>
          <table:table-cell office:value-type="float" office:value="972148" table:style-name="ce1">
            <text:p>9721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7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string" office:string-value="ED578" table:formula="of:=DEC2HEX([.C779])" table:style-name="ce1">
            <text:p>ED578</text:p>
          </table:table-cell>
          <table:table-cell office:value-type="float" office:value="972152" table:style-name="ce1">
            <text:p>9721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7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office:string-value="ED57C" table:formula="of:=DEC2HEX([.C780])" table:style-name="ce1">
            <text:p>ED57C</text:p>
          </table:table-cell>
          <table:table-cell office:value-type="float" office:value="972156" table:style-name="ce1">
            <text:p>972156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78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office:string-value="ED587" table:formula="of:=DEC2HEX([.C781])" table:style-name="ce1">
            <text:p>ED587</text:p>
          </table:table-cell>
          <table:table-cell office:value-type="float" office:value="972167" table:style-name="ce1">
            <text:p>9721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8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office:string-value="ED58B" table:formula="of:=DEC2HEX([.C782])" table:style-name="ce1">
            <text:p>ED58B</text:p>
          </table:table-cell>
          <table:table-cell office:value-type="float" office:value="972171" table:style-name="ce1">
            <text:p>9721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8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office:string-value="ED58F" table:formula="of:=DEC2HEX([.C783])" table:style-name="ce1">
            <text:p>ED58F</text:p>
          </table:table-cell>
          <table:table-cell office:value-type="float" office:value="972175" table:style-name="ce1">
            <text:p>97217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8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office:string-value="ED593" table:formula="of:=DEC2HEX([.C784])" table:style-name="ce1">
            <text:p>ED593</text:p>
          </table:table-cell>
          <table:table-cell office:value-type="float" office:value="972179" table:style-name="ce1">
            <text:p>9721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8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office:string-value="ED597" table:formula="of:=DEC2HEX([.C785])" table:style-name="ce1">
            <text:p>ED597</text:p>
          </table:table-cell>
          <table:table-cell office:value-type="float" office:value="972183" table:style-name="ce1">
            <text:p>97218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8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office:string-value="ED59B" table:formula="of:=DEC2HEX([.C786])" table:style-name="ce1">
            <text:p>ED59B</text:p>
          </table:table-cell>
          <table:table-cell office:value-type="float" office:value="972187" table:style-name="ce1">
            <text:p>97218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8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office:string-value="ED59F" table:formula="of:=DEC2HEX([.C787])" table:style-name="ce1">
            <text:p>ED59F</text:p>
          </table:table-cell>
          <table:table-cell office:value-type="float" office:value="972191" table:style-name="ce1">
            <text:p>9721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8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office:string-value="ED5A3" table:formula="of:=DEC2HEX([.C788])" table:style-name="ce1">
            <text:p>ED5A3</text:p>
          </table:table-cell>
          <table:table-cell office:value-type="float" office:value="972195" table:style-name="ce1">
            <text:p>972195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78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office:string-value="ED5A4" table:formula="of:=DEC2HEX([.C789])" table:style-name="ce1">
            <text:p>ED5A4</text:p>
          </table:table-cell>
          <table:table-cell office:value-type="float" office:value="972196" table:style-name="ce1">
            <text:p>9721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8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office:string-value="ED5A8" table:formula="of:=DEC2HEX([.C790])" table:style-name="ce1">
            <text:p>ED5A8</text:p>
          </table:table-cell>
          <table:table-cell office:value-type="float" office:value="972200" table:style-name="ce1">
            <text:p>97220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9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office:string-value="ED5AC" table:formula="of:=DEC2HEX([.C791])" table:style-name="ce1">
            <text:p>ED5AC</text:p>
          </table:table-cell>
          <table:table-cell office:value-type="float" office:value="972204" table:style-name="ce1">
            <text:p>97220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9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office:string-value="ED5B0" table:formula="of:=DEC2HEX([.C792])" table:style-name="ce1">
            <text:p>ED5B0</text:p>
          </table:table-cell>
          <table:table-cell office:value-type="float" office:value="972208" table:style-name="ce1">
            <text:p>97220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9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office:string-value="ED5B4" table:formula="of:=DEC2HEX([.C793])" table:style-name="ce1">
            <text:p>ED5B4</text:p>
          </table:table-cell>
          <table:table-cell office:value-type="float" office:value="972212" table:style-name="ce1">
            <text:p>97221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9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office:string-value="ED5B8" table:formula="of:=DEC2HEX([.C794])" table:style-name="ce1">
            <text:p>ED5B8</text:p>
          </table:table-cell>
          <table:table-cell office:value-type="float" office:value="972216" table:style-name="ce1">
            <text:p>97221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9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office:string-value="ED5BC" table:formula="of:=DEC2HEX([.C795])" table:style-name="ce1">
            <text:p>ED5BC</text:p>
          </table:table-cell>
          <table:table-cell office:value-type="float" office:value="972220" table:style-name="ce1">
            <text:p>972220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79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office:string-value="ED5C7" table:formula="of:=DEC2HEX([.C796])" table:style-name="ce1">
            <text:p>ED5C7</text:p>
          </table:table-cell>
          <table:table-cell office:value-type="float" office:value="972231" table:style-name="ce1">
            <text:p>97223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9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office:string-value="ED5CB" table:formula="of:=DEC2HEX([.C797])" table:style-name="ce1">
            <text:p>ED5CB</text:p>
          </table:table-cell>
          <table:table-cell office:value-type="float" office:value="972235" table:style-name="ce1">
            <text:p>9722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9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office:string-value="ED5CF" table:formula="of:=DEC2HEX([.C798])" table:style-name="ce1">
            <text:p>ED5CF</text:p>
          </table:table-cell>
          <table:table-cell office:value-type="float" office:value="972239" table:style-name="ce1">
            <text:p>97223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9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office:string-value="ED5D3" table:formula="of:=DEC2HEX([.C799])" table:style-name="ce1">
            <text:p>ED5D3</text:p>
          </table:table-cell>
          <table:table-cell office:value-type="float" office:value="972243" table:style-name="ce1">
            <text:p>9722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79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string" office:string-value="ED5D7" table:formula="of:=DEC2HEX([.C800])" table:style-name="ce1">
            <text:p>ED5D7</text:p>
          </table:table-cell>
          <table:table-cell office:value-type="float" office:value="972247" table:style-name="ce1">
            <text:p>9722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0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office:string-value="ED5DB" table:formula="of:=DEC2HEX([.C801])" table:style-name="ce1">
            <text:p>ED5DB</text:p>
          </table:table-cell>
          <table:table-cell office:value-type="float" office:value="972251" table:style-name="ce1">
            <text:p>97225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0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office:string-value="ED5DF" table:formula="of:=DEC2HEX([.C802])" table:style-name="ce1">
            <text:p>ED5DF</text:p>
          </table:table-cell>
          <table:table-cell office:value-type="float" office:value="972255" table:style-name="ce1">
            <text:p>9722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0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office:string-value="ED5E3" table:formula="of:=DEC2HEX([.C803])" table:style-name="ce1">
            <text:p>ED5E3</text:p>
          </table:table-cell>
          <table:table-cell office:value-type="float" office:value="972259" table:style-name="ce1">
            <text:p>972259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80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office:string-value="ED5E4" table:formula="of:=DEC2HEX([.C804])" table:style-name="ce1">
            <text:p>ED5E4</text:p>
          </table:table-cell>
          <table:table-cell office:value-type="float" office:value="972260" table:style-name="ce1">
            <text:p>97226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0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office:string-value="ED5E8" table:formula="of:=DEC2HEX([.C805])" table:style-name="ce1">
            <text:p>ED5E8</text:p>
          </table:table-cell>
          <table:table-cell office:value-type="float" office:value="972264" table:style-name="ce1">
            <text:p>97226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0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office:string-value="ED5EC" table:formula="of:=DEC2HEX([.C806])" table:style-name="ce1">
            <text:p>ED5EC</text:p>
          </table:table-cell>
          <table:table-cell office:value-type="float" office:value="972268" table:style-name="ce1">
            <text:p>97226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0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office:string-value="ED5F0" table:formula="of:=DEC2HEX([.C807])" table:style-name="ce1">
            <text:p>ED5F0</text:p>
          </table:table-cell>
          <table:table-cell office:value-type="float" office:value="972272" table:style-name="ce1">
            <text:p>97227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0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office:string-value="ED5F4" table:formula="of:=DEC2HEX([.C808])" table:style-name="ce1">
            <text:p>ED5F4</text:p>
          </table:table-cell>
          <table:table-cell office:value-type="float" office:value="972276" table:style-name="ce1">
            <text:p>97227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0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office:string-value="ED5F8" table:formula="of:=DEC2HEX([.C809])" table:style-name="ce1">
            <text:p>ED5F8</text:p>
          </table:table-cell>
          <table:table-cell office:value-type="float" office:value="972280" table:style-name="ce1">
            <text:p>97228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0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office:string-value="ED5FC" table:formula="of:=DEC2HEX([.C810])" table:style-name="ce1">
            <text:p>ED5FC</text:p>
          </table:table-cell>
          <table:table-cell office:value-type="float" office:value="972284" table:style-name="ce1">
            <text:p>972284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81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office:string-value="ED607" table:formula="of:=DEC2HEX([.C811])" table:style-name="ce1">
            <text:p>ED607</text:p>
          </table:table-cell>
          <table:table-cell office:value-type="float" office:value="972295" table:style-name="ce1">
            <text:p>97229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1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office:string-value="ED60B" table:formula="of:=DEC2HEX([.C812])" table:style-name="ce1">
            <text:p>ED60B</text:p>
          </table:table-cell>
          <table:table-cell office:value-type="float" office:value="972299" table:style-name="ce1">
            <text:p>9722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1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office:string-value="ED60F" table:formula="of:=DEC2HEX([.C813])" table:style-name="ce1">
            <text:p>ED60F</text:p>
          </table:table-cell>
          <table:table-cell office:value-type="float" office:value="972303" table:style-name="ce1">
            <text:p>9723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1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office:string-value="ED613" table:formula="of:=DEC2HEX([.C814])" table:style-name="ce1">
            <text:p>ED613</text:p>
          </table:table-cell>
          <table:table-cell office:value-type="float" office:value="972307" table:style-name="ce1">
            <text:p>9723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1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office:string-value="ED617" table:formula="of:=DEC2HEX([.C815])" table:style-name="ce1">
            <text:p>ED617</text:p>
          </table:table-cell>
          <table:table-cell office:value-type="float" office:value="972311" table:style-name="ce1">
            <text:p>9723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1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office:string-value="ED61B" table:formula="of:=DEC2HEX([.C816])" table:style-name="ce1">
            <text:p>ED61B</text:p>
          </table:table-cell>
          <table:table-cell office:value-type="float" office:value="972315" table:style-name="ce1">
            <text:p>97231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1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office:string-value="ED61F" table:formula="of:=DEC2HEX([.C817])" table:style-name="ce1">
            <text:p>ED61F</text:p>
          </table:table-cell>
          <table:table-cell office:value-type="float" office:value="972319" table:style-name="ce1">
            <text:p>9723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1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office:string-value="ED623" table:formula="of:=DEC2HEX([.C818])" table:style-name="ce1">
            <text:p>ED623</text:p>
          </table:table-cell>
          <table:table-cell office:value-type="float" office:value="972323" table:style-name="ce1">
            <text:p>972323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81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office:string-value="ED624" table:formula="of:=DEC2HEX([.C819])" table:style-name="ce1">
            <text:p>ED624</text:p>
          </table:table-cell>
          <table:table-cell office:value-type="float" office:value="972324" table:style-name="ce1">
            <text:p>97232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1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office:string-value="ED628" table:formula="of:=DEC2HEX([.C820])" table:style-name="ce1">
            <text:p>ED628</text:p>
          </table:table-cell>
          <table:table-cell office:value-type="float" office:value="972328" table:style-name="ce1">
            <text:p>97232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2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office:string-value="ED62C" table:formula="of:=DEC2HEX([.C821])" table:style-name="ce1">
            <text:p>ED62C</text:p>
          </table:table-cell>
          <table:table-cell office:value-type="float" office:value="972332" table:style-name="ce1">
            <text:p>97233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2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office:string-value="ED630" table:formula="of:=DEC2HEX([.C822])" table:style-name="ce1">
            <text:p>ED630</text:p>
          </table:table-cell>
          <table:table-cell office:value-type="float" office:value="972336" table:style-name="ce1">
            <text:p>97233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2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office:string-value="ED634" table:formula="of:=DEC2HEX([.C823])" table:style-name="ce1">
            <text:p>ED634</text:p>
          </table:table-cell>
          <table:table-cell office:value-type="float" office:value="972340" table:style-name="ce1">
            <text:p>97234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2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office:string-value="ED638" table:formula="of:=DEC2HEX([.C824])" table:style-name="ce1">
            <text:p>ED638</text:p>
          </table:table-cell>
          <table:table-cell office:value-type="float" office:value="972344" table:style-name="ce1">
            <text:p>9723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2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office:string-value="ED63C" table:formula="of:=DEC2HEX([.C825])" table:style-name="ce1">
            <text:p>ED63C</text:p>
          </table:table-cell>
          <table:table-cell office:value-type="float" office:value="972348" table:style-name="ce1">
            <text:p>972348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82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office:string-value="ED647" table:formula="of:=DEC2HEX([.C826])" table:style-name="ce1">
            <text:p>ED647</text:p>
          </table:table-cell>
          <table:table-cell office:value-type="float" office:value="972359" table:style-name="ce1">
            <text:p>9723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2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office:string-value="ED64B" table:formula="of:=DEC2HEX([.C827])" table:style-name="ce1">
            <text:p>ED64B</text:p>
          </table:table-cell>
          <table:table-cell office:value-type="float" office:value="972363" table:style-name="ce1">
            <text:p>9723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2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office:string-value="ED64F" table:formula="of:=DEC2HEX([.C828])" table:style-name="ce1">
            <text:p>ED64F</text:p>
          </table:table-cell>
          <table:table-cell office:value-type="float" office:value="972367" table:style-name="ce1">
            <text:p>9723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2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office:string-value="ED653" table:formula="of:=DEC2HEX([.C829])" table:style-name="ce1">
            <text:p>ED653</text:p>
          </table:table-cell>
          <table:table-cell office:value-type="float" office:value="972371" table:style-name="ce1">
            <text:p>9723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2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office:string-value="ED657" table:formula="of:=DEC2HEX([.C830])" table:style-name="ce1">
            <text:p>ED657</text:p>
          </table:table-cell>
          <table:table-cell office:value-type="float" office:value="972375" table:style-name="ce1">
            <text:p>97237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3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string" office:string-value="ED65B" table:formula="of:=DEC2HEX([.C831])" table:style-name="ce1">
            <text:p>ED65B</text:p>
          </table:table-cell>
          <table:table-cell office:value-type="float" office:value="972379" table:style-name="ce1">
            <text:p>9723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3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office:string-value="ED65F" table:formula="of:=DEC2HEX([.C832])" table:style-name="ce1">
            <text:p>ED65F</text:p>
          </table:table-cell>
          <table:table-cell office:value-type="float" office:value="972383" table:style-name="ce1">
            <text:p>97238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3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office:string-value="ED663" table:formula="of:=DEC2HEX([.C833])" table:style-name="ce1">
            <text:p>ED663</text:p>
          </table:table-cell>
          <table:table-cell office:value-type="float" office:value="972387" table:style-name="ce1">
            <text:p>972387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83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office:string-value="ED664" table:formula="of:=DEC2HEX([.C834])" table:style-name="ce1">
            <text:p>ED664</text:p>
          </table:table-cell>
          <table:table-cell office:value-type="float" office:value="972388" table:style-name="ce1">
            <text:p>9723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3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office:string-value="ED668" table:formula="of:=DEC2HEX([.C835])" table:style-name="ce1">
            <text:p>ED668</text:p>
          </table:table-cell>
          <table:table-cell office:value-type="float" office:value="972392" table:style-name="ce1">
            <text:p>9723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3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office:string-value="ED66C" table:formula="of:=DEC2HEX([.C836])" table:style-name="ce1">
            <text:p>ED66C</text:p>
          </table:table-cell>
          <table:table-cell office:value-type="float" office:value="972396" table:style-name="ce1">
            <text:p>9723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3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office:string-value="ED670" table:formula="of:=DEC2HEX([.C837])" table:style-name="ce1">
            <text:p>ED670</text:p>
          </table:table-cell>
          <table:table-cell office:value-type="float" office:value="972400" table:style-name="ce1">
            <text:p>97240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3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office:string-value="ED674" table:formula="of:=DEC2HEX([.C838])" table:style-name="ce1">
            <text:p>ED674</text:p>
          </table:table-cell>
          <table:table-cell office:value-type="float" office:value="972404" table:style-name="ce1">
            <text:p>97240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3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office:string-value="ED678" table:formula="of:=DEC2HEX([.C839])" table:style-name="ce1">
            <text:p>ED678</text:p>
          </table:table-cell>
          <table:table-cell office:value-type="float" office:value="972408" table:style-name="ce1">
            <text:p>97240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3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office:string-value="ED67C" table:formula="of:=DEC2HEX([.C840])" table:style-name="ce1">
            <text:p>ED67C</text:p>
          </table:table-cell>
          <table:table-cell office:value-type="float" office:value="972412" table:style-name="ce1">
            <text:p>972412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84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office:string-value="ED687" table:formula="of:=DEC2HEX([.C841])" table:style-name="ce1">
            <text:p>ED687</text:p>
          </table:table-cell>
          <table:table-cell office:value-type="float" office:value="972423" table:style-name="ce1">
            <text:p>9724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4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office:string-value="ED68B" table:formula="of:=DEC2HEX([.C842])" table:style-name="ce1">
            <text:p>ED68B</text:p>
          </table:table-cell>
          <table:table-cell office:value-type="float" office:value="972427" table:style-name="ce1">
            <text:p>9724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4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office:string-value="ED68F" table:formula="of:=DEC2HEX([.C843])" table:style-name="ce1">
            <text:p>ED68F</text:p>
          </table:table-cell>
          <table:table-cell office:value-type="float" office:value="972431" table:style-name="ce1">
            <text:p>97243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4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office:string-value="ED693" table:formula="of:=DEC2HEX([.C844])" table:style-name="ce1">
            <text:p>ED693</text:p>
          </table:table-cell>
          <table:table-cell office:value-type="float" office:value="972435" table:style-name="ce1">
            <text:p>9724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4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office:string-value="ED697" table:formula="of:=DEC2HEX([.C845])" table:style-name="ce1">
            <text:p>ED697</text:p>
          </table:table-cell>
          <table:table-cell office:value-type="float" office:value="972439" table:style-name="ce1">
            <text:p>97243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4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office:string-value="ED69B" table:formula="of:=DEC2HEX([.C846])" table:style-name="ce1">
            <text:p>ED69B</text:p>
          </table:table-cell>
          <table:table-cell office:value-type="float" office:value="972443" table:style-name="ce1">
            <text:p>9724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4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office:string-value="ED69F" table:formula="of:=DEC2HEX([.C847])" table:style-name="ce1">
            <text:p>ED69F</text:p>
          </table:table-cell>
          <table:table-cell office:value-type="float" office:value="972447" table:style-name="ce1">
            <text:p>9724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4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office:string-value="ED6A3" table:formula="of:=DEC2HEX([.C848])" table:style-name="ce1">
            <text:p>ED6A3</text:p>
          </table:table-cell>
          <table:table-cell office:value-type="float" office:value="972451" table:style-name="ce1">
            <text:p>97245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84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office:string-value="ED6A4" table:formula="of:=DEC2HEX([.C849])" table:style-name="ce1">
            <text:p>ED6A4</text:p>
          </table:table-cell>
          <table:table-cell office:value-type="float" office:value="972452" table:style-name="ce1">
            <text:p>9724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4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office:string-value="ED6A8" table:formula="of:=DEC2HEX([.C850])" table:style-name="ce1">
            <text:p>ED6A8</text:p>
          </table:table-cell>
          <table:table-cell office:value-type="float" office:value="972456" table:style-name="ce1">
            <text:p>97245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5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office:string-value="ED6AC" table:formula="of:=DEC2HEX([.C851])" table:style-name="ce1">
            <text:p>ED6AC</text:p>
          </table:table-cell>
          <table:table-cell office:value-type="float" office:value="972460" table:style-name="ce1">
            <text:p>97246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5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office:string-value="ED6B0" table:formula="of:=DEC2HEX([.C852])" table:style-name="ce1">
            <text:p>ED6B0</text:p>
          </table:table-cell>
          <table:table-cell office:value-type="float" office:value="972464" table:style-name="ce1">
            <text:p>97246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5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office:string-value="ED6B4" table:formula="of:=DEC2HEX([.C853])" table:style-name="ce1">
            <text:p>ED6B4</text:p>
          </table:table-cell>
          <table:table-cell office:value-type="float" office:value="972468" table:style-name="ce1">
            <text:p>97246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5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office:string-value="ED6B8" table:formula="of:=DEC2HEX([.C854])" table:style-name="ce1">
            <text:p>ED6B8</text:p>
          </table:table-cell>
          <table:table-cell office:value-type="float" office:value="972472" table:style-name="ce1">
            <text:p>97247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5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office:string-value="ED6BC" table:formula="of:=DEC2HEX([.C855])" table:style-name="ce1">
            <text:p>ED6BC</text:p>
          </table:table-cell>
          <table:table-cell office:value-type="float" office:value="972476" table:style-name="ce1">
            <text:p>972476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85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office:string-value="ED6C7" table:formula="of:=DEC2HEX([.C856])" table:style-name="ce1">
            <text:p>ED6C7</text:p>
          </table:table-cell>
          <table:table-cell office:value-type="float" office:value="972487" table:style-name="ce1">
            <text:p>97248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5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office:string-value="ED6CB" table:formula="of:=DEC2HEX([.C857])" table:style-name="ce1">
            <text:p>ED6CB</text:p>
          </table:table-cell>
          <table:table-cell office:value-type="float" office:value="972491" table:style-name="ce1">
            <text:p>9724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5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office:string-value="ED6CF" table:formula="of:=DEC2HEX([.C858])" table:style-name="ce1">
            <text:p>ED6CF</text:p>
          </table:table-cell>
          <table:table-cell office:value-type="float" office:value="972495" table:style-name="ce1">
            <text:p>97249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5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office:string-value="ED6D3" table:formula="of:=DEC2HEX([.C859])" table:style-name="ce1">
            <text:p>ED6D3</text:p>
          </table:table-cell>
          <table:table-cell office:value-type="float" office:value="972499" table:style-name="ce1">
            <text:p>9724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5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office:string-value="ED6D7" table:formula="of:=DEC2HEX([.C860])" table:style-name="ce1">
            <text:p>ED6D7</text:p>
          </table:table-cell>
          <table:table-cell office:value-type="float" office:value="972503" table:style-name="ce1">
            <text:p>9725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6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office:string-value="ED6DB" table:formula="of:=DEC2HEX([.C861])" table:style-name="ce1">
            <text:p>ED6DB</text:p>
          </table:table-cell>
          <table:table-cell office:value-type="float" office:value="972507" table:style-name="ce1">
            <text:p>9725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6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office:string-value="ED6DF" table:formula="of:=DEC2HEX([.C862])" table:style-name="ce1">
            <text:p>ED6DF</text:p>
          </table:table-cell>
          <table:table-cell office:value-type="float" office:value="972511" table:style-name="ce1">
            <text:p>9725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6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office:string-value="ED6E3" table:formula="of:=DEC2HEX([.C863])" table:style-name="ce1">
            <text:p>ED6E3</text:p>
          </table:table-cell>
          <table:table-cell office:value-type="float" office:value="972515" table:style-name="ce1">
            <text:p>972515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86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office:string-value="ED6E4" table:formula="of:=DEC2HEX([.C864])" table:style-name="ce1">
            <text:p>ED6E4</text:p>
          </table:table-cell>
          <table:table-cell office:value-type="float" office:value="972516" table:style-name="ce1">
            <text:p>97251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6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office:string-value="ED6E8" table:formula="of:=DEC2HEX([.C865])" table:style-name="ce1">
            <text:p>ED6E8</text:p>
          </table:table-cell>
          <table:table-cell office:value-type="float" office:value="972520" table:style-name="ce1">
            <text:p>97252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6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office:string-value="ED6EC" table:formula="of:=DEC2HEX([.C866])" table:style-name="ce1">
            <text:p>ED6EC</text:p>
          </table:table-cell>
          <table:table-cell office:value-type="float" office:value="972524" table:style-name="ce1">
            <text:p>97252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6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office:string-value="ED6F0" table:formula="of:=DEC2HEX([.C867])" table:style-name="ce1">
            <text:p>ED6F0</text:p>
          </table:table-cell>
          <table:table-cell office:value-type="float" office:value="972528" table:style-name="ce1">
            <text:p>97252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6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office:string-value="ED6F4" table:formula="of:=DEC2HEX([.C868])" table:style-name="ce1">
            <text:p>ED6F4</text:p>
          </table:table-cell>
          <table:table-cell office:value-type="float" office:value="972532" table:style-name="ce1">
            <text:p>97253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6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office:string-value="ED6F8" table:formula="of:=DEC2HEX([.C869])" table:style-name="ce1">
            <text:p>ED6F8</text:p>
          </table:table-cell>
          <table:table-cell office:value-type="float" office:value="972536" table:style-name="ce1">
            <text:p>97253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6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office:string-value="ED6FC" table:formula="of:=DEC2HEX([.C870])" table:style-name="ce1">
            <text:p>ED6FC</text:p>
          </table:table-cell>
          <table:table-cell office:value-type="float" office:value="972540" table:style-name="ce1">
            <text:p>972540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87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office:string-value="ED707" table:formula="of:=DEC2HEX([.C871])" table:style-name="ce1">
            <text:p>ED707</text:p>
          </table:table-cell>
          <table:table-cell office:value-type="float" office:value="972551" table:style-name="ce1">
            <text:p>97255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7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office:string-value="ED70B" table:formula="of:=DEC2HEX([.C872])" table:style-name="ce1">
            <text:p>ED70B</text:p>
          </table:table-cell>
          <table:table-cell office:value-type="float" office:value="972555" table:style-name="ce1">
            <text:p>9725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7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office:string-value="ED70F" table:formula="of:=DEC2HEX([.C873])" table:style-name="ce1">
            <text:p>ED70F</text:p>
          </table:table-cell>
          <table:table-cell office:value-type="float" office:value="972559" table:style-name="ce1">
            <text:p>9725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7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office:string-value="ED713" table:formula="of:=DEC2HEX([.C874])" table:style-name="ce1">
            <text:p>ED713</text:p>
          </table:table-cell>
          <table:table-cell office:value-type="float" office:value="972563" table:style-name="ce1">
            <text:p>9725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7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office:string-value="ED717" table:formula="of:=DEC2HEX([.C875])" table:style-name="ce1">
            <text:p>ED717</text:p>
          </table:table-cell>
          <table:table-cell office:value-type="float" office:value="972567" table:style-name="ce1">
            <text:p>9725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7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office:string-value="ED71B" table:formula="of:=DEC2HEX([.C876])" table:style-name="ce1">
            <text:p>ED71B</text:p>
          </table:table-cell>
          <table:table-cell office:value-type="float" office:value="972571" table:style-name="ce1">
            <text:p>9725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7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office:string-value="ED71F" table:formula="of:=DEC2HEX([.C877])" table:style-name="ce1">
            <text:p>ED71F</text:p>
          </table:table-cell>
          <table:table-cell office:value-type="float" office:value="972575" table:style-name="ce1">
            <text:p>97257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7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office:string-value="ED723" table:formula="of:=DEC2HEX([.C878])" table:style-name="ce1">
            <text:p>ED723</text:p>
          </table:table-cell>
          <table:table-cell office:value-type="float" office:value="972579" table:style-name="ce1">
            <text:p>972579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87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office:string-value="ED724" table:formula="of:=DEC2HEX([.C879])" table:style-name="ce1">
            <text:p>ED724</text:p>
          </table:table-cell>
          <table:table-cell office:value-type="float" office:value="972580" table:style-name="ce1">
            <text:p>97258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7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office:string-value="ED728" table:formula="of:=DEC2HEX([.C880])" table:style-name="ce1">
            <text:p>ED728</text:p>
          </table:table-cell>
          <table:table-cell office:value-type="float" office:value="972584" table:style-name="ce1">
            <text:p>97258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8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office:string-value="ED72C" table:formula="of:=DEC2HEX([.C881])" table:style-name="ce1">
            <text:p>ED72C</text:p>
          </table:table-cell>
          <table:table-cell office:value-type="float" office:value="972588" table:style-name="ce1">
            <text:p>9725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8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office:string-value="ED730" table:formula="of:=DEC2HEX([.C882])" table:style-name="ce1">
            <text:p>ED730</text:p>
          </table:table-cell>
          <table:table-cell office:value-type="float" office:value="972592" table:style-name="ce1">
            <text:p>9725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8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office:string-value="ED734" table:formula="of:=DEC2HEX([.C883])" table:style-name="ce1">
            <text:p>ED734</text:p>
          </table:table-cell>
          <table:table-cell office:value-type="float" office:value="972596" table:style-name="ce1">
            <text:p>9725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8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office:string-value="ED738" table:formula="of:=DEC2HEX([.C884])" table:style-name="ce1">
            <text:p>ED738</text:p>
          </table:table-cell>
          <table:table-cell office:value-type="float" office:value="972600" table:style-name="ce1">
            <text:p>97260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8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office:string-value="ED73C" table:formula="of:=DEC2HEX([.C885])" table:style-name="ce1">
            <text:p>ED73C</text:p>
          </table:table-cell>
          <table:table-cell office:value-type="float" office:value="972604" table:style-name="ce1">
            <text:p>972604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88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office:string-value="ED747" table:formula="of:=DEC2HEX([.C886])" table:style-name="ce1">
            <text:p>ED747</text:p>
          </table:table-cell>
          <table:table-cell office:value-type="float" office:value="972615" table:style-name="ce1">
            <text:p>97261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8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office:string-value="ED74B" table:formula="of:=DEC2HEX([.C887])" table:style-name="ce1">
            <text:p>ED74B</text:p>
          </table:table-cell>
          <table:table-cell office:value-type="float" office:value="972619" table:style-name="ce1">
            <text:p>9726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8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office:string-value="ED74F" table:formula="of:=DEC2HEX([.C888])" table:style-name="ce1">
            <text:p>ED74F</text:p>
          </table:table-cell>
          <table:table-cell office:value-type="float" office:value="972623" table:style-name="ce1">
            <text:p>9726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8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office:string-value="ED753" table:formula="of:=DEC2HEX([.C889])" table:style-name="ce1">
            <text:p>ED753</text:p>
          </table:table-cell>
          <table:table-cell office:value-type="float" office:value="972627" table:style-name="ce1">
            <text:p>9726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8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office:string-value="ED757" table:formula="of:=DEC2HEX([.C890])" table:style-name="ce1">
            <text:p>ED757</text:p>
          </table:table-cell>
          <table:table-cell office:value-type="float" office:value="972631" table:style-name="ce1">
            <text:p>97263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9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office:string-value="ED75B" table:formula="of:=DEC2HEX([.C891])" table:style-name="ce1">
            <text:p>ED75B</text:p>
          </table:table-cell>
          <table:table-cell office:value-type="float" office:value="972635" table:style-name="ce1">
            <text:p>9726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9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office:string-value="ED75F" table:formula="of:=DEC2HEX([.C892])" table:style-name="ce1">
            <text:p>ED75F</text:p>
          </table:table-cell>
          <table:table-cell office:value-type="float" office:value="972639" table:style-name="ce1">
            <text:p>97263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9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office:string-value="ED763" table:formula="of:=DEC2HEX([.C893])" table:style-name="ce1">
            <text:p>ED763</text:p>
          </table:table-cell>
          <table:table-cell office:value-type="float" office:value="972643" table:style-name="ce1">
            <text:p>972643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89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office:string-value="ED764" table:formula="of:=DEC2HEX([.C894])" table:style-name="ce1">
            <text:p>ED764</text:p>
          </table:table-cell>
          <table:table-cell office:value-type="float" office:value="972644" table:style-name="ce1">
            <text:p>9726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9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office:string-value="ED768" table:formula="of:=DEC2HEX([.C895])" table:style-name="ce1">
            <text:p>ED768</text:p>
          </table:table-cell>
          <table:table-cell office:value-type="float" office:value="972648" table:style-name="ce1">
            <text:p>9726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9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office:string-value="ED76C" table:formula="of:=DEC2HEX([.C896])" table:style-name="ce1">
            <text:p>ED76C</text:p>
          </table:table-cell>
          <table:table-cell office:value-type="float" office:value="972652" table:style-name="ce1">
            <text:p>9726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9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office:string-value="ED770" table:formula="of:=DEC2HEX([.C897])" table:style-name="ce1">
            <text:p>ED770</text:p>
          </table:table-cell>
          <table:table-cell office:value-type="float" office:value="972656" table:style-name="ce1">
            <text:p>97265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9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office:string-value="ED774" table:formula="of:=DEC2HEX([.C898])" table:style-name="ce1">
            <text:p>ED774</text:p>
          </table:table-cell>
          <table:table-cell office:value-type="float" office:value="972660" table:style-name="ce1">
            <text:p>97266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9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office:string-value="ED778" table:formula="of:=DEC2HEX([.C899])" table:style-name="ce1">
            <text:p>ED778</text:p>
          </table:table-cell>
          <table:table-cell office:value-type="float" office:value="972664" table:style-name="ce1">
            <text:p>97266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89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office:string-value="ED77C" table:formula="of:=DEC2HEX([.C900])" table:style-name="ce1">
            <text:p>ED77C</text:p>
          </table:table-cell>
          <table:table-cell office:value-type="float" office:value="972668" table:style-name="ce1">
            <text:p>972668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90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office:string-value="ED787" table:formula="of:=DEC2HEX([.C901])" table:style-name="ce1">
            <text:p>ED787</text:p>
          </table:table-cell>
          <table:table-cell office:value-type="float" office:value="972679" table:style-name="ce1">
            <text:p>9726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0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office:string-value="ED78B" table:formula="of:=DEC2HEX([.C902])" table:style-name="ce1">
            <text:p>ED78B</text:p>
          </table:table-cell>
          <table:table-cell office:value-type="float" office:value="972683" table:style-name="ce1">
            <text:p>97268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0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office:string-value="ED78F" table:formula="of:=DEC2HEX([.C903])" table:style-name="ce1">
            <text:p>ED78F</text:p>
          </table:table-cell>
          <table:table-cell office:value-type="float" office:value="972687" table:style-name="ce1">
            <text:p>97268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0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office:string-value="ED793" table:formula="of:=DEC2HEX([.C904])" table:style-name="ce1">
            <text:p>ED793</text:p>
          </table:table-cell>
          <table:table-cell office:value-type="float" office:value="972691" table:style-name="ce1">
            <text:p>9726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0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office:string-value="ED797" table:formula="of:=DEC2HEX([.C905])" table:style-name="ce1">
            <text:p>ED797</text:p>
          </table:table-cell>
          <table:table-cell office:value-type="float" office:value="972695" table:style-name="ce1">
            <text:p>97269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0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office:string-value="ED79B" table:formula="of:=DEC2HEX([.C906])" table:style-name="ce1">
            <text:p>ED79B</text:p>
          </table:table-cell>
          <table:table-cell office:value-type="float" office:value="972699" table:style-name="ce1">
            <text:p>9726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0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office:string-value="ED79F" table:formula="of:=DEC2HEX([.C907])" table:style-name="ce1">
            <text:p>ED79F</text:p>
          </table:table-cell>
          <table:table-cell office:value-type="float" office:value="972703" table:style-name="ce1">
            <text:p>9727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0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office:string-value="ED7A3" table:formula="of:=DEC2HEX([.C908])" table:style-name="ce1">
            <text:p>ED7A3</text:p>
          </table:table-cell>
          <table:table-cell office:value-type="float" office:value="972707" table:style-name="ce1">
            <text:p>972707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90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office:string-value="ED7A4" table:formula="of:=DEC2HEX([.C909])" table:style-name="ce1">
            <text:p>ED7A4</text:p>
          </table:table-cell>
          <table:table-cell office:value-type="float" office:value="972708" table:style-name="ce1">
            <text:p>97270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0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office:string-value="ED7A8" table:formula="of:=DEC2HEX([.C910])" table:style-name="ce1">
            <text:p>ED7A8</text:p>
          </table:table-cell>
          <table:table-cell office:value-type="float" office:value="972712" table:style-name="ce1">
            <text:p>97271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1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office:string-value="ED7AC" table:formula="of:=DEC2HEX([.C911])" table:style-name="ce1">
            <text:p>ED7AC</text:p>
          </table:table-cell>
          <table:table-cell office:value-type="float" office:value="972716" table:style-name="ce1">
            <text:p>97271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1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office:string-value="ED7B0" table:formula="of:=DEC2HEX([.C912])" table:style-name="ce1">
            <text:p>ED7B0</text:p>
          </table:table-cell>
          <table:table-cell office:value-type="float" office:value="972720" table:style-name="ce1">
            <text:p>97272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1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office:string-value="ED7B4" table:formula="of:=DEC2HEX([.C913])" table:style-name="ce1">
            <text:p>ED7B4</text:p>
          </table:table-cell>
          <table:table-cell office:value-type="float" office:value="972724" table:style-name="ce1">
            <text:p>97272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1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office:string-value="ED7B8" table:formula="of:=DEC2HEX([.C914])" table:style-name="ce1">
            <text:p>ED7B8</text:p>
          </table:table-cell>
          <table:table-cell office:value-type="float" office:value="972728" table:style-name="ce1">
            <text:p>97272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1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office:string-value="ED7BC" table:formula="of:=DEC2HEX([.C915])" table:style-name="ce1">
            <text:p>ED7BC</text:p>
          </table:table-cell>
          <table:table-cell office:value-type="float" office:value="972732" table:style-name="ce1">
            <text:p>972732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91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office:string-value="ED7C7" table:formula="of:=DEC2HEX([.C916])" table:style-name="ce1">
            <text:p>ED7C7</text:p>
          </table:table-cell>
          <table:table-cell office:value-type="float" office:value="972743" table:style-name="ce1">
            <text:p>9727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1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office:string-value="ED7CB" table:formula="of:=DEC2HEX([.C917])" table:style-name="ce1">
            <text:p>ED7CB</text:p>
          </table:table-cell>
          <table:table-cell office:value-type="float" office:value="972747" table:style-name="ce1">
            <text:p>9727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1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office:string-value="ED7CF" table:formula="of:=DEC2HEX([.C918])" table:style-name="ce1">
            <text:p>ED7CF</text:p>
          </table:table-cell>
          <table:table-cell office:value-type="float" office:value="972751" table:style-name="ce1">
            <text:p>97275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1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office:string-value="ED7D3" table:formula="of:=DEC2HEX([.C919])" table:style-name="ce1">
            <text:p>ED7D3</text:p>
          </table:table-cell>
          <table:table-cell office:value-type="float" office:value="972755" table:style-name="ce1">
            <text:p>9727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1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office:string-value="ED7D7" table:formula="of:=DEC2HEX([.C920])" table:style-name="ce1">
            <text:p>ED7D7</text:p>
          </table:table-cell>
          <table:table-cell office:value-type="float" office:value="972759" table:style-name="ce1">
            <text:p>9727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2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office:string-value="ED7DB" table:formula="of:=DEC2HEX([.C921])" table:style-name="ce1">
            <text:p>ED7DB</text:p>
          </table:table-cell>
          <table:table-cell office:value-type="float" office:value="972763" table:style-name="ce1">
            <text:p>9727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2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office:string-value="ED7DF" table:formula="of:=DEC2HEX([.C922])" table:style-name="ce1">
            <text:p>ED7DF</text:p>
          </table:table-cell>
          <table:table-cell office:value-type="float" office:value="972767" table:style-name="ce1">
            <text:p>9727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2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office:string-value="ED7E3" table:formula="of:=DEC2HEX([.C923])" table:style-name="ce1">
            <text:p>ED7E3</text:p>
          </table:table-cell>
          <table:table-cell office:value-type="float" office:value="972771" table:style-name="ce1">
            <text:p>97277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92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office:string-value="ED7E4" table:formula="of:=DEC2HEX([.C924])" table:style-name="ce1">
            <text:p>ED7E4</text:p>
          </table:table-cell>
          <table:table-cell office:value-type="float" office:value="972772" table:style-name="ce1">
            <text:p>97277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2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office:string-value="ED7E8" table:formula="of:=DEC2HEX([.C925])" table:style-name="ce1">
            <text:p>ED7E8</text:p>
          </table:table-cell>
          <table:table-cell office:value-type="float" office:value="972776" table:style-name="ce1">
            <text:p>97277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2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office:string-value="ED7EC" table:formula="of:=DEC2HEX([.C926])" table:style-name="ce1">
            <text:p>ED7EC</text:p>
          </table:table-cell>
          <table:table-cell office:value-type="float" office:value="972780" table:style-name="ce1">
            <text:p>97278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2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office:string-value="ED7F0" table:formula="of:=DEC2HEX([.C927])" table:style-name="ce1">
            <text:p>ED7F0</text:p>
          </table:table-cell>
          <table:table-cell office:value-type="float" office:value="972784" table:style-name="ce1">
            <text:p>97278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2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office:string-value="ED7F4" table:formula="of:=DEC2HEX([.C928])" table:style-name="ce1">
            <text:p>ED7F4</text:p>
          </table:table-cell>
          <table:table-cell office:value-type="float" office:value="972788" table:style-name="ce1">
            <text:p>9727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2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office:string-value="ED7F8" table:formula="of:=DEC2HEX([.C929])" table:style-name="ce1">
            <text:p>ED7F8</text:p>
          </table:table-cell>
          <table:table-cell office:value-type="float" office:value="972792" table:style-name="ce1">
            <text:p>9727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2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office:string-value="ED7FC" table:formula="of:=DEC2HEX([.C930])" table:style-name="ce1">
            <text:p>ED7FC</text:p>
          </table:table-cell>
          <table:table-cell office:value-type="float" office:value="972796" table:style-name="ce1">
            <text:p>972796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93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office:string-value="ED807" table:formula="of:=DEC2HEX([.C931])" table:style-name="ce1">
            <text:p>ED807</text:p>
          </table:table-cell>
          <table:table-cell office:value-type="float" office:value="972807" table:style-name="ce1">
            <text:p>9728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3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office:string-value="ED80B" table:formula="of:=DEC2HEX([.C932])" table:style-name="ce1">
            <text:p>ED80B</text:p>
          </table:table-cell>
          <table:table-cell office:value-type="float" office:value="972811" table:style-name="ce1">
            <text:p>9728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3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string" office:string-value="ED80F" table:formula="of:=DEC2HEX([.C933])" table:style-name="ce1">
            <text:p>ED80F</text:p>
          </table:table-cell>
          <table:table-cell office:value-type="float" office:value="972815" table:style-name="ce1">
            <text:p>97281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3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office:string-value="ED813" table:formula="of:=DEC2HEX([.C934])" table:style-name="ce1">
            <text:p>ED813</text:p>
          </table:table-cell>
          <table:table-cell office:value-type="float" office:value="972819" table:style-name="ce1">
            <text:p>9728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3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office:string-value="ED817" table:formula="of:=DEC2HEX([.C935])" table:style-name="ce1">
            <text:p>ED817</text:p>
          </table:table-cell>
          <table:table-cell office:value-type="float" office:value="972823" table:style-name="ce1">
            <text:p>9728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3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office:string-value="ED81B" table:formula="of:=DEC2HEX([.C936])" table:style-name="ce1">
            <text:p>ED81B</text:p>
          </table:table-cell>
          <table:table-cell office:value-type="float" office:value="972827" table:style-name="ce1">
            <text:p>9728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3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office:string-value="ED81F" table:formula="of:=DEC2HEX([.C937])" table:style-name="ce1">
            <text:p>ED81F</text:p>
          </table:table-cell>
          <table:table-cell office:value-type="float" office:value="972831" table:style-name="ce1">
            <text:p>97283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3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office:string-value="ED823" table:formula="of:=DEC2HEX([.C938])" table:style-name="ce1">
            <text:p>ED823</text:p>
          </table:table-cell>
          <table:table-cell office:value-type="float" office:value="972835" table:style-name="ce1">
            <text:p>972835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93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string" office:string-value="ED824" table:formula="of:=DEC2HEX([.C939])" table:style-name="ce1">
            <text:p>ED824</text:p>
          </table:table-cell>
          <table:table-cell office:value-type="float" office:value="972836" table:style-name="ce1">
            <text:p>97283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3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office:string-value="ED828" table:formula="of:=DEC2HEX([.C940])" table:style-name="ce1">
            <text:p>ED828</text:p>
          </table:table-cell>
          <table:table-cell office:value-type="float" office:value="972840" table:style-name="ce1">
            <text:p>97284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4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office:string-value="ED82C" table:formula="of:=DEC2HEX([.C941])" table:style-name="ce1">
            <text:p>ED82C</text:p>
          </table:table-cell>
          <table:table-cell office:value-type="float" office:value="972844" table:style-name="ce1">
            <text:p>9728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4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office:string-value="ED830" table:formula="of:=DEC2HEX([.C942])" table:style-name="ce1">
            <text:p>ED830</text:p>
          </table:table-cell>
          <table:table-cell office:value-type="float" office:value="972848" table:style-name="ce1">
            <text:p>9728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4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office:string-value="ED834" table:formula="of:=DEC2HEX([.C943])" table:style-name="ce1">
            <text:p>ED834</text:p>
          </table:table-cell>
          <table:table-cell office:value-type="float" office:value="972852" table:style-name="ce1">
            <text:p>9728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4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office:string-value="ED838" table:formula="of:=DEC2HEX([.C944])" table:style-name="ce1">
            <text:p>ED838</text:p>
          </table:table-cell>
          <table:table-cell office:value-type="float" office:value="972856" table:style-name="ce1">
            <text:p>97285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4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office:string-value="ED83C" table:formula="of:=DEC2HEX([.C945])" table:style-name="ce1">
            <text:p>ED83C</text:p>
          </table:table-cell>
          <table:table-cell office:value-type="float" office:value="972860" table:style-name="ce1">
            <text:p>972860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94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office:string-value="ED847" table:formula="of:=DEC2HEX([.C946])" table:style-name="ce1">
            <text:p>ED847</text:p>
          </table:table-cell>
          <table:table-cell office:value-type="float" office:value="972871" table:style-name="ce1">
            <text:p>9728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4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office:string-value="ED84B" table:formula="of:=DEC2HEX([.C947])" table:style-name="ce1">
            <text:p>ED84B</text:p>
          </table:table-cell>
          <table:table-cell office:value-type="float" office:value="972875" table:style-name="ce1">
            <text:p>97287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4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office:string-value="ED84F" table:formula="of:=DEC2HEX([.C948])" table:style-name="ce1">
            <text:p>ED84F</text:p>
          </table:table-cell>
          <table:table-cell office:value-type="float" office:value="972879" table:style-name="ce1">
            <text:p>9728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4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string" office:string-value="ED853" table:formula="of:=DEC2HEX([.C949])" table:style-name="ce1">
            <text:p>ED853</text:p>
          </table:table-cell>
          <table:table-cell office:value-type="float" office:value="972883" table:style-name="ce1">
            <text:p>97288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4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office:string-value="ED857" table:formula="of:=DEC2HEX([.C950])" table:style-name="ce1">
            <text:p>ED857</text:p>
          </table:table-cell>
          <table:table-cell office:value-type="float" office:value="972887" table:style-name="ce1">
            <text:p>97288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5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office:string-value="ED85B" table:formula="of:=DEC2HEX([.C951])" table:style-name="ce1">
            <text:p>ED85B</text:p>
          </table:table-cell>
          <table:table-cell office:value-type="float" office:value="972891" table:style-name="ce1">
            <text:p>9728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5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office:string-value="ED85F" table:formula="of:=DEC2HEX([.C952])" table:style-name="ce1">
            <text:p>ED85F</text:p>
          </table:table-cell>
          <table:table-cell office:value-type="float" office:value="972895" table:style-name="ce1">
            <text:p>97289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5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office:string-value="ED863" table:formula="of:=DEC2HEX([.C953])" table:style-name="ce1">
            <text:p>ED863</text:p>
          </table:table-cell>
          <table:table-cell office:value-type="float" office:value="972899" table:style-name="ce1">
            <text:p>972899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95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office:string-value="ED864" table:formula="of:=DEC2HEX([.C954])" table:style-name="ce1">
            <text:p>ED864</text:p>
          </table:table-cell>
          <table:table-cell office:value-type="float" office:value="972900" table:style-name="ce1">
            <text:p>97290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5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string" office:string-value="ED868" table:formula="of:=DEC2HEX([.C955])" table:style-name="ce1">
            <text:p>ED868</text:p>
          </table:table-cell>
          <table:table-cell office:value-type="float" office:value="972904" table:style-name="ce1">
            <text:p>97290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5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office:string-value="ED86C" table:formula="of:=DEC2HEX([.C956])" table:style-name="ce1">
            <text:p>ED86C</text:p>
          </table:table-cell>
          <table:table-cell office:value-type="float" office:value="972908" table:style-name="ce1">
            <text:p>97290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5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office:string-value="ED870" table:formula="of:=DEC2HEX([.C957])" table:style-name="ce1">
            <text:p>ED870</text:p>
          </table:table-cell>
          <table:table-cell office:value-type="float" office:value="972912" table:style-name="ce1">
            <text:p>97291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5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office:string-value="ED874" table:formula="of:=DEC2HEX([.C958])" table:style-name="ce1">
            <text:p>ED874</text:p>
          </table:table-cell>
          <table:table-cell office:value-type="float" office:value="972916" table:style-name="ce1">
            <text:p>97291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5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office:string-value="ED878" table:formula="of:=DEC2HEX([.C959])" table:style-name="ce1">
            <text:p>ED878</text:p>
          </table:table-cell>
          <table:table-cell office:value-type="float" office:value="972920" table:style-name="ce1">
            <text:p>97292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5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office:string-value="ED87C" table:formula="of:=DEC2HEX([.C960])" table:style-name="ce1">
            <text:p>ED87C</text:p>
          </table:table-cell>
          <table:table-cell office:value-type="float" office:value="972924" table:style-name="ce1">
            <text:p>972924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96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office:string-value="ED887" table:formula="of:=DEC2HEX([.C961])" table:style-name="ce1">
            <text:p>ED887</text:p>
          </table:table-cell>
          <table:table-cell office:value-type="float" office:value="972935" table:style-name="ce1">
            <text:p>9729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6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office:string-value="ED88B" table:formula="of:=DEC2HEX([.C962])" table:style-name="ce1">
            <text:p>ED88B</text:p>
          </table:table-cell>
          <table:table-cell office:value-type="float" office:value="972939" table:style-name="ce1">
            <text:p>97293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6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office:string-value="ED88F" table:formula="of:=DEC2HEX([.C963])" table:style-name="ce1">
            <text:p>ED88F</text:p>
          </table:table-cell>
          <table:table-cell office:value-type="float" office:value="972943" table:style-name="ce1">
            <text:p>9729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6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office:string-value="ED893" table:formula="of:=DEC2HEX([.C964])" table:style-name="ce1">
            <text:p>ED893</text:p>
          </table:table-cell>
          <table:table-cell office:value-type="float" office:value="972947" table:style-name="ce1">
            <text:p>9729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6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office:string-value="ED897" table:formula="of:=DEC2HEX([.C965])" table:style-name="ce1">
            <text:p>ED897</text:p>
          </table:table-cell>
          <table:table-cell office:value-type="float" office:value="972951" table:style-name="ce1">
            <text:p>97295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6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office:string-value="ED89B" table:formula="of:=DEC2HEX([.C966])" table:style-name="ce1">
            <text:p>ED89B</text:p>
          </table:table-cell>
          <table:table-cell office:value-type="float" office:value="972955" table:style-name="ce1">
            <text:p>9729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6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office:string-value="ED89F" table:formula="of:=DEC2HEX([.C967])" table:style-name="ce1">
            <text:p>ED89F</text:p>
          </table:table-cell>
          <table:table-cell office:value-type="float" office:value="972959" table:style-name="ce1">
            <text:p>9729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6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office:string-value="ED8A3" table:formula="of:=DEC2HEX([.C968])" table:style-name="ce1">
            <text:p>ED8A3</text:p>
          </table:table-cell>
          <table:table-cell office:value-type="float" office:value="972963" table:style-name="ce1">
            <text:p>972963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96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office:string-value="ED8A4" table:formula="of:=DEC2HEX([.C969])" table:style-name="ce1">
            <text:p>ED8A4</text:p>
          </table:table-cell>
          <table:table-cell office:value-type="float" office:value="972964" table:style-name="ce1">
            <text:p>97296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6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office:string-value="ED8A8" table:formula="of:=DEC2HEX([.C970])" table:style-name="ce1">
            <text:p>ED8A8</text:p>
          </table:table-cell>
          <table:table-cell office:value-type="float" office:value="972968" table:style-name="ce1">
            <text:p>97296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7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office:string-value="ED8AC" table:formula="of:=DEC2HEX([.C971])" table:style-name="ce1">
            <text:p>ED8AC</text:p>
          </table:table-cell>
          <table:table-cell office:value-type="float" office:value="972972" table:style-name="ce1">
            <text:p>97297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7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office:string-value="ED8B0" table:formula="of:=DEC2HEX([.C972])" table:style-name="ce1">
            <text:p>ED8B0</text:p>
          </table:table-cell>
          <table:table-cell office:value-type="float" office:value="972976" table:style-name="ce1">
            <text:p>97297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7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office:string-value="ED8B4" table:formula="of:=DEC2HEX([.C973])" table:style-name="ce1">
            <text:p>ED8B4</text:p>
          </table:table-cell>
          <table:table-cell office:value-type="float" office:value="972980" table:style-name="ce1">
            <text:p>97298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7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office:string-value="ED8B8" table:formula="of:=DEC2HEX([.C974])" table:style-name="ce1">
            <text:p>ED8B8</text:p>
          </table:table-cell>
          <table:table-cell office:value-type="float" office:value="972984" table:style-name="ce1">
            <text:p>97298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7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office:string-value="ED8BC" table:formula="of:=DEC2HEX([.C975])" table:style-name="ce1">
            <text:p>ED8BC</text:p>
          </table:table-cell>
          <table:table-cell office:value-type="float" office:value="972988" table:style-name="ce1">
            <text:p>972988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97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office:string-value="ED8C7" table:formula="of:=DEC2HEX([.C976])" table:style-name="ce1">
            <text:p>ED8C7</text:p>
          </table:table-cell>
          <table:table-cell office:value-type="float" office:value="972999" table:style-name="ce1">
            <text:p>9729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7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office:string-value="ED8CB" table:formula="of:=DEC2HEX([.C977])" table:style-name="ce1">
            <text:p>ED8CB</text:p>
          </table:table-cell>
          <table:table-cell office:value-type="float" office:value="973003" table:style-name="ce1">
            <text:p>9730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7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office:string-value="ED8CF" table:formula="of:=DEC2HEX([.C978])" table:style-name="ce1">
            <text:p>ED8CF</text:p>
          </table:table-cell>
          <table:table-cell office:value-type="float" office:value="973007" table:style-name="ce1">
            <text:p>9730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7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office:string-value="ED8D3" table:formula="of:=DEC2HEX([.C979])" table:style-name="ce1">
            <text:p>ED8D3</text:p>
          </table:table-cell>
          <table:table-cell office:value-type="float" office:value="973011" table:style-name="ce1">
            <text:p>9730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7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office:string-value="ED8D7" table:formula="of:=DEC2HEX([.C980])" table:style-name="ce1">
            <text:p>ED8D7</text:p>
          </table:table-cell>
          <table:table-cell office:value-type="float" office:value="973015" table:style-name="ce1">
            <text:p>97301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8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office:string-value="ED8DB" table:formula="of:=DEC2HEX([.C981])" table:style-name="ce1">
            <text:p>ED8DB</text:p>
          </table:table-cell>
          <table:table-cell office:value-type="float" office:value="973019" table:style-name="ce1">
            <text:p>9730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8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office:string-value="ED8DF" table:formula="of:=DEC2HEX([.C982])" table:style-name="ce1">
            <text:p>ED8DF</text:p>
          </table:table-cell>
          <table:table-cell office:value-type="float" office:value="973023" table:style-name="ce1">
            <text:p>9730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8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office:string-value="ED8E3" table:formula="of:=DEC2HEX([.C983])" table:style-name="ce1">
            <text:p>ED8E3</text:p>
          </table:table-cell>
          <table:table-cell office:value-type="float" office:value="973027" table:style-name="ce1">
            <text:p>973027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98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office:string-value="ED8E4" table:formula="of:=DEC2HEX([.C984])" table:style-name="ce1">
            <text:p>ED8E4</text:p>
          </table:table-cell>
          <table:table-cell office:value-type="float" office:value="973028" table:style-name="ce1">
            <text:p>97302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8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office:string-value="ED8E8" table:formula="of:=DEC2HEX([.C985])" table:style-name="ce1">
            <text:p>ED8E8</text:p>
          </table:table-cell>
          <table:table-cell office:value-type="float" office:value="973032" table:style-name="ce1">
            <text:p>97303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8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office:string-value="ED8EC" table:formula="of:=DEC2HEX([.C986])" table:style-name="ce1">
            <text:p>ED8EC</text:p>
          </table:table-cell>
          <table:table-cell office:value-type="float" office:value="973036" table:style-name="ce1">
            <text:p>97303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8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office:string-value="ED8F0" table:formula="of:=DEC2HEX([.C987])" table:style-name="ce1">
            <text:p>ED8F0</text:p>
          </table:table-cell>
          <table:table-cell office:value-type="float" office:value="973040" table:style-name="ce1">
            <text:p>97304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8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office:string-value="ED8F4" table:formula="of:=DEC2HEX([.C988])" table:style-name="ce1">
            <text:p>ED8F4</text:p>
          </table:table-cell>
          <table:table-cell office:value-type="float" office:value="973044" table:style-name="ce1">
            <text:p>9730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8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office:string-value="ED8F8" table:formula="of:=DEC2HEX([.C989])" table:style-name="ce1">
            <text:p>ED8F8</text:p>
          </table:table-cell>
          <table:table-cell office:value-type="float" office:value="973048" table:style-name="ce1">
            <text:p>9730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8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office:string-value="ED8FC" table:formula="of:=DEC2HEX([.C990])" table:style-name="ce1">
            <text:p>ED8FC</text:p>
          </table:table-cell>
          <table:table-cell office:value-type="float" office:value="973052" table:style-name="ce1">
            <text:p>973052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99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office:string-value="ED907" table:formula="of:=DEC2HEX([.C991])" table:style-name="ce1">
            <text:p>ED907</text:p>
          </table:table-cell>
          <table:table-cell office:value-type="float" office:value="973063" table:style-name="ce1">
            <text:p>9730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9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office:string-value="ED90B" table:formula="of:=DEC2HEX([.C992])" table:style-name="ce1">
            <text:p>ED90B</text:p>
          </table:table-cell>
          <table:table-cell office:value-type="float" office:value="973067" table:style-name="ce1">
            <text:p>9730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9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office:string-value="ED90F" table:formula="of:=DEC2HEX([.C993])" table:style-name="ce1">
            <text:p>ED90F</text:p>
          </table:table-cell>
          <table:table-cell office:value-type="float" office:value="973071" table:style-name="ce1">
            <text:p>9730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9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office:string-value="ED913" table:formula="of:=DEC2HEX([.C994])" table:style-name="ce1">
            <text:p>ED913</text:p>
          </table:table-cell>
          <table:table-cell office:value-type="float" office:value="973075" table:style-name="ce1">
            <text:p>97307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9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office:string-value="ED917" table:formula="of:=DEC2HEX([.C995])" table:style-name="ce1">
            <text:p>ED917</text:p>
          </table:table-cell>
          <table:table-cell office:value-type="float" office:value="973079" table:style-name="ce1">
            <text:p>9730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9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office:string-value="ED91B" table:formula="of:=DEC2HEX([.C996])" table:style-name="ce1">
            <text:p>ED91B</text:p>
          </table:table-cell>
          <table:table-cell office:value-type="float" office:value="973083" table:style-name="ce1">
            <text:p>97308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9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office:string-value="ED91F" table:formula="of:=DEC2HEX([.C997])" table:style-name="ce1">
            <text:p>ED91F</text:p>
          </table:table-cell>
          <table:table-cell office:value-type="float" office:value="973087" table:style-name="ce1">
            <text:p>97308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9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office:string-value="ED923" table:formula="of:=DEC2HEX([.C998])" table:style-name="ce1">
            <text:p>ED923</text:p>
          </table:table-cell>
          <table:table-cell office:value-type="float" office:value="973091" table:style-name="ce1">
            <text:p>97309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99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office:string-value="ED924" table:formula="of:=DEC2HEX([.C999])" table:style-name="ce1">
            <text:p>ED924</text:p>
          </table:table-cell>
          <table:table-cell office:value-type="float" office:value="973092" table:style-name="ce1">
            <text:p>9730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99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office:string-value="ED928" table:formula="of:=DEC2HEX([.C1000])" table:style-name="ce1">
            <text:p>ED928</text:p>
          </table:table-cell>
          <table:table-cell office:value-type="float" office:value="973096" table:style-name="ce1">
            <text:p>9730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0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office:string-value="ED92C" table:formula="of:=DEC2HEX([.C1001])" table:style-name="ce1">
            <text:p>ED92C</text:p>
          </table:table-cell>
          <table:table-cell office:value-type="float" office:value="973100" table:style-name="ce1">
            <text:p>97310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0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office:string-value="ED930" table:formula="of:=DEC2HEX([.C1002])" table:style-name="ce1">
            <text:p>ED930</text:p>
          </table:table-cell>
          <table:table-cell office:value-type="float" office:value="973104" table:style-name="ce1">
            <text:p>97310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0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office:string-value="ED934" table:formula="of:=DEC2HEX([.C1003])" table:style-name="ce1">
            <text:p>ED934</text:p>
          </table:table-cell>
          <table:table-cell office:value-type="float" office:value="973108" table:style-name="ce1">
            <text:p>97310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0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office:string-value="ED938" table:formula="of:=DEC2HEX([.C1004])" table:style-name="ce1">
            <text:p>ED938</text:p>
          </table:table-cell>
          <table:table-cell office:value-type="float" office:value="973112" table:style-name="ce1">
            <text:p>97311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0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office:string-value="ED93C" table:formula="of:=DEC2HEX([.C1005])" table:style-name="ce1">
            <text:p>ED93C</text:p>
          </table:table-cell>
          <table:table-cell office:value-type="float" office:value="973116" table:style-name="ce1">
            <text:p>973116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00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office:string-value="ED947" table:formula="of:=DEC2HEX([.C1006])" table:style-name="ce1">
            <text:p>ED947</text:p>
          </table:table-cell>
          <table:table-cell office:value-type="float" office:value="973127" table:style-name="ce1">
            <text:p>9731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0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office:string-value="ED94B" table:formula="of:=DEC2HEX([.C1007])" table:style-name="ce1">
            <text:p>ED94B</text:p>
          </table:table-cell>
          <table:table-cell office:value-type="float" office:value="973131" table:style-name="ce1">
            <text:p>97313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0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office:string-value="ED94F" table:formula="of:=DEC2HEX([.C1008])" table:style-name="ce1">
            <text:p>ED94F</text:p>
          </table:table-cell>
          <table:table-cell office:value-type="float" office:value="973135" table:style-name="ce1">
            <text:p>9731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0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office:string-value="ED953" table:formula="of:=DEC2HEX([.C1009])" table:style-name="ce1">
            <text:p>ED953</text:p>
          </table:table-cell>
          <table:table-cell office:value-type="float" office:value="973139" table:style-name="ce1">
            <text:p>97313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0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office:string-value="ED957" table:formula="of:=DEC2HEX([.C1010])" table:style-name="ce1">
            <text:p>ED957</text:p>
          </table:table-cell>
          <table:table-cell office:value-type="float" office:value="973143" table:style-name="ce1">
            <text:p>9731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1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office:string-value="ED95B" table:formula="of:=DEC2HEX([.C1011])" table:style-name="ce1">
            <text:p>ED95B</text:p>
          </table:table-cell>
          <table:table-cell office:value-type="float" office:value="973147" table:style-name="ce1">
            <text:p>9731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1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string" office:string-value="ED95F" table:formula="of:=DEC2HEX([.C1012])" table:style-name="ce1">
            <text:p>ED95F</text:p>
          </table:table-cell>
          <table:table-cell office:value-type="float" office:value="973151" table:style-name="ce1">
            <text:p>97315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1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string" office:string-value="ED963" table:formula="of:=DEC2HEX([.C1013])" table:style-name="ce1">
            <text:p>ED963</text:p>
          </table:table-cell>
          <table:table-cell office:value-type="float" office:value="973155" table:style-name="ce1">
            <text:p>973155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01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string" office:string-value="ED964" table:formula="of:=DEC2HEX([.C1014])" table:style-name="ce1">
            <text:p>ED964</text:p>
          </table:table-cell>
          <table:table-cell office:value-type="float" office:value="973156" table:style-name="ce1">
            <text:p>97315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1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string" office:string-value="ED968" table:formula="of:=DEC2HEX([.C1015])" table:style-name="ce1">
            <text:p>ED968</text:p>
          </table:table-cell>
          <table:table-cell office:value-type="float" office:value="973160" table:style-name="ce1">
            <text:p>97316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1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string" office:string-value="ED96C" table:formula="of:=DEC2HEX([.C1016])" table:style-name="ce1">
            <text:p>ED96C</text:p>
          </table:table-cell>
          <table:table-cell office:value-type="float" office:value="973164" table:style-name="ce1">
            <text:p>97316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1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string" office:string-value="ED970" table:formula="of:=DEC2HEX([.C1017])" table:style-name="ce1">
            <text:p>ED970</text:p>
          </table:table-cell>
          <table:table-cell office:value-type="float" office:value="973168" table:style-name="ce1">
            <text:p>97316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1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string" office:string-value="ED974" table:formula="of:=DEC2HEX([.C1018])" table:style-name="ce1">
            <text:p>ED974</text:p>
          </table:table-cell>
          <table:table-cell office:value-type="float" office:value="973172" table:style-name="ce1">
            <text:p>97317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1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office:string-value="ED978" table:formula="of:=DEC2HEX([.C1019])" table:style-name="ce1">
            <text:p>ED978</text:p>
          </table:table-cell>
          <table:table-cell office:value-type="float" office:value="973176" table:style-name="ce1">
            <text:p>97317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1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string" office:string-value="ED97C" table:formula="of:=DEC2HEX([.C1020])" table:style-name="ce1">
            <text:p>ED97C</text:p>
          </table:table-cell>
          <table:table-cell office:value-type="float" office:value="973180" table:style-name="ce1">
            <text:p>973180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02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office:string-value="ED987" table:formula="of:=DEC2HEX([.C1021])" table:style-name="ce1">
            <text:p>ED987</text:p>
          </table:table-cell>
          <table:table-cell office:value-type="float" office:value="973191" table:style-name="ce1">
            <text:p>9731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2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string" office:string-value="ED98B" table:formula="of:=DEC2HEX([.C1022])" table:style-name="ce1">
            <text:p>ED98B</text:p>
          </table:table-cell>
          <table:table-cell office:value-type="float" office:value="973195" table:style-name="ce1">
            <text:p>97319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2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string" office:string-value="ED98F" table:formula="of:=DEC2HEX([.C1023])" table:style-name="ce1">
            <text:p>ED98F</text:p>
          </table:table-cell>
          <table:table-cell office:value-type="float" office:value="973199" table:style-name="ce1">
            <text:p>9731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2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string" office:string-value="ED993" table:formula="of:=DEC2HEX([.C1024])" table:style-name="ce1">
            <text:p>ED993</text:p>
          </table:table-cell>
          <table:table-cell office:value-type="float" office:value="973203" table:style-name="ce1">
            <text:p>9732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2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string" office:string-value="ED997" table:formula="of:=DEC2HEX([.C1025])" table:style-name="ce1">
            <text:p>ED997</text:p>
          </table:table-cell>
          <table:table-cell office:value-type="float" office:value="973207" table:style-name="ce1">
            <text:p>9732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2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string" office:string-value="ED99B" table:formula="of:=DEC2HEX([.C1026])" table:style-name="ce1">
            <text:p>ED99B</text:p>
          </table:table-cell>
          <table:table-cell office:value-type="float" office:value="973211" table:style-name="ce1">
            <text:p>9732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2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string" office:string-value="ED99F" table:formula="of:=DEC2HEX([.C1027])" table:style-name="ce1">
            <text:p>ED99F</text:p>
          </table:table-cell>
          <table:table-cell office:value-type="float" office:value="973215" table:style-name="ce1">
            <text:p>97321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2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string" office:string-value="ED9A3" table:formula="of:=DEC2HEX([.C1028])" table:style-name="ce1">
            <text:p>ED9A3</text:p>
          </table:table-cell>
          <table:table-cell office:value-type="float" office:value="973219" table:style-name="ce1">
            <text:p>973219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02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string" office:string-value="ED9A4" table:formula="of:=DEC2HEX([.C1029])" table:style-name="ce1">
            <text:p>ED9A4</text:p>
          </table:table-cell>
          <table:table-cell office:value-type="float" office:value="973220" table:style-name="ce1">
            <text:p>97322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2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string" office:string-value="ED9A8" table:formula="of:=DEC2HEX([.C1030])" table:style-name="ce1">
            <text:p>ED9A8</text:p>
          </table:table-cell>
          <table:table-cell office:value-type="float" office:value="973224" table:style-name="ce1">
            <text:p>97322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3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office:string-value="ED9AC" table:formula="of:=DEC2HEX([.C1031])" table:style-name="ce1">
            <text:p>ED9AC</text:p>
          </table:table-cell>
          <table:table-cell office:value-type="float" office:value="973228" table:style-name="ce1">
            <text:p>97322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3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string" office:string-value="ED9B0" table:formula="of:=DEC2HEX([.C1032])" table:style-name="ce1">
            <text:p>ED9B0</text:p>
          </table:table-cell>
          <table:table-cell office:value-type="float" office:value="973232" table:style-name="ce1">
            <text:p>97323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3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string" office:string-value="ED9B4" table:formula="of:=DEC2HEX([.C1033])" table:style-name="ce1">
            <text:p>ED9B4</text:p>
          </table:table-cell>
          <table:table-cell office:value-type="float" office:value="973236" table:style-name="ce1">
            <text:p>97323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3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string" office:string-value="ED9B8" table:formula="of:=DEC2HEX([.C1034])" table:style-name="ce1">
            <text:p>ED9B8</text:p>
          </table:table-cell>
          <table:table-cell office:value-type="float" office:value="973240" table:style-name="ce1">
            <text:p>97324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3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string" office:string-value="ED9BC" table:formula="of:=DEC2HEX([.C1035])" table:style-name="ce1">
            <text:p>ED9BC</text:p>
          </table:table-cell>
          <table:table-cell office:value-type="float" office:value="973244" table:style-name="ce1">
            <text:p>973244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03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string" office:string-value="ED9C7" table:formula="of:=DEC2HEX([.C1036])" table:style-name="ce1">
            <text:p>ED9C7</text:p>
          </table:table-cell>
          <table:table-cell office:value-type="float" office:value="973255" table:style-name="ce1">
            <text:p>9732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3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string" office:string-value="ED9CB" table:formula="of:=DEC2HEX([.C1037])" table:style-name="ce1">
            <text:p>ED9CB</text:p>
          </table:table-cell>
          <table:table-cell office:value-type="float" office:value="973259" table:style-name="ce1">
            <text:p>9732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3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office:string-value="ED9CF" table:formula="of:=DEC2HEX([.C1038])" table:style-name="ce1">
            <text:p>ED9CF</text:p>
          </table:table-cell>
          <table:table-cell office:value-type="float" office:value="973263" table:style-name="ce1">
            <text:p>9732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3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string" office:string-value="ED9D3" table:formula="of:=DEC2HEX([.C1039])" table:style-name="ce1">
            <text:p>ED9D3</text:p>
          </table:table-cell>
          <table:table-cell office:value-type="float" office:value="973267" table:style-name="ce1">
            <text:p>9732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3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string" office:string-value="ED9D7" table:formula="of:=DEC2HEX([.C1040])" table:style-name="ce1">
            <text:p>ED9D7</text:p>
          </table:table-cell>
          <table:table-cell office:value-type="float" office:value="973271" table:style-name="ce1">
            <text:p>9732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4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office:string-value="ED9DB" table:formula="of:=DEC2HEX([.C1041])" table:style-name="ce1">
            <text:p>ED9DB</text:p>
          </table:table-cell>
          <table:table-cell office:value-type="float" office:value="973275" table:style-name="ce1">
            <text:p>97327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4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string" office:string-value="ED9DF" table:formula="of:=DEC2HEX([.C1042])" table:style-name="ce1">
            <text:p>ED9DF</text:p>
          </table:table-cell>
          <table:table-cell office:value-type="float" office:value="973279" table:style-name="ce1">
            <text:p>9732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4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string" office:string-value="ED9E3" table:formula="of:=DEC2HEX([.C1043])" table:style-name="ce1">
            <text:p>ED9E3</text:p>
          </table:table-cell>
          <table:table-cell office:value-type="float" office:value="973283" table:style-name="ce1">
            <text:p>973283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04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string" office:string-value="ED9E4" table:formula="of:=DEC2HEX([.C1044])" table:style-name="ce1">
            <text:p>ED9E4</text:p>
          </table:table-cell>
          <table:table-cell office:value-type="float" office:value="973284" table:style-name="ce1">
            <text:p>97328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4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string" office:string-value="ED9E8" table:formula="of:=DEC2HEX([.C1045])" table:style-name="ce1">
            <text:p>ED9E8</text:p>
          </table:table-cell>
          <table:table-cell office:value-type="float" office:value="973288" table:style-name="ce1">
            <text:p>9732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4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string" office:string-value="ED9EC" table:formula="of:=DEC2HEX([.C1046])" table:style-name="ce1">
            <text:p>ED9EC</text:p>
          </table:table-cell>
          <table:table-cell office:value-type="float" office:value="973292" table:style-name="ce1">
            <text:p>9732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4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string" office:string-value="ED9F0" table:formula="of:=DEC2HEX([.C1047])" table:style-name="ce1">
            <text:p>ED9F0</text:p>
          </table:table-cell>
          <table:table-cell office:value-type="float" office:value="973296" table:style-name="ce1">
            <text:p>9732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4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string" office:string-value="ED9F4" table:formula="of:=DEC2HEX([.C1048])" table:style-name="ce1">
            <text:p>ED9F4</text:p>
          </table:table-cell>
          <table:table-cell office:value-type="float" office:value="973300" table:style-name="ce1">
            <text:p>97330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4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string" office:string-value="ED9F8" table:formula="of:=DEC2HEX([.C1049])" table:style-name="ce1">
            <text:p>ED9F8</text:p>
          </table:table-cell>
          <table:table-cell office:value-type="float" office:value="973304" table:style-name="ce1">
            <text:p>97330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4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string" office:string-value="ED9FC" table:formula="of:=DEC2HEX([.C1050])" table:style-name="ce1">
            <text:p>ED9FC</text:p>
          </table:table-cell>
          <table:table-cell office:value-type="float" office:value="973308" table:style-name="ce1">
            <text:p>973308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05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office:string-value="EDA07" table:formula="of:=DEC2HEX([.C1051])" table:style-name="ce1">
            <text:p>EDA07</text:p>
          </table:table-cell>
          <table:table-cell office:value-type="float" office:value="973319" table:style-name="ce1">
            <text:p>9733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5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string" office:string-value="EDA0B" table:formula="of:=DEC2HEX([.C1052])" table:style-name="ce1">
            <text:p>EDA0B</text:p>
          </table:table-cell>
          <table:table-cell office:value-type="float" office:value="973323" table:style-name="ce1">
            <text:p>9733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5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office:string-value="EDA0F" table:formula="of:=DEC2HEX([.C1053])" table:style-name="ce1">
            <text:p>EDA0F</text:p>
          </table:table-cell>
          <table:table-cell office:value-type="float" office:value="973327" table:style-name="ce1">
            <text:p>9733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5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string" office:string-value="EDA13" table:formula="of:=DEC2HEX([.C1054])" table:style-name="ce1">
            <text:p>EDA13</text:p>
          </table:table-cell>
          <table:table-cell office:value-type="float" office:value="973331" table:style-name="ce1">
            <text:p>97333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5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string" office:string-value="EDA17" table:formula="of:=DEC2HEX([.C1055])" table:style-name="ce1">
            <text:p>EDA17</text:p>
          </table:table-cell>
          <table:table-cell office:value-type="float" office:value="973335" table:style-name="ce1">
            <text:p>9733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5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string" office:string-value="EDA1B" table:formula="of:=DEC2HEX([.C1056])" table:style-name="ce1">
            <text:p>EDA1B</text:p>
          </table:table-cell>
          <table:table-cell office:value-type="float" office:value="973339" table:style-name="ce1">
            <text:p>97333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5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string" office:string-value="EDA1F" table:formula="of:=DEC2HEX([.C1057])" table:style-name="ce1">
            <text:p>EDA1F</text:p>
          </table:table-cell>
          <table:table-cell office:value-type="float" office:value="973343" table:style-name="ce1">
            <text:p>9733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5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string" office:string-value="EDA23" table:formula="of:=DEC2HEX([.C1058])" table:style-name="ce1">
            <text:p>EDA23</text:p>
          </table:table-cell>
          <table:table-cell office:value-type="float" office:value="973347" table:style-name="ce1">
            <text:p>973347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05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string" office:string-value="EDA24" table:formula="of:=DEC2HEX([.C1059])" table:style-name="ce1">
            <text:p>EDA24</text:p>
          </table:table-cell>
          <table:table-cell office:value-type="float" office:value="973348" table:style-name="ce1">
            <text:p>9733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5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string" office:string-value="EDA28" table:formula="of:=DEC2HEX([.C1060])" table:style-name="ce1">
            <text:p>EDA28</text:p>
          </table:table-cell>
          <table:table-cell office:value-type="float" office:value="973352" table:style-name="ce1">
            <text:p>9733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6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office:string-value="EDA2C" table:formula="of:=DEC2HEX([.C1061])" table:style-name="ce1">
            <text:p>EDA2C</text:p>
          </table:table-cell>
          <table:table-cell office:value-type="float" office:value="973356" table:style-name="ce1">
            <text:p>97335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6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string" office:string-value="EDA30" table:formula="of:=DEC2HEX([.C1062])" table:style-name="ce1">
            <text:p>EDA30</text:p>
          </table:table-cell>
          <table:table-cell office:value-type="float" office:value="973360" table:style-name="ce1">
            <text:p>97336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6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string" office:string-value="EDA34" table:formula="of:=DEC2HEX([.C1063])" table:style-name="ce1">
            <text:p>EDA34</text:p>
          </table:table-cell>
          <table:table-cell office:value-type="float" office:value="973364" table:style-name="ce1">
            <text:p>97336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6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string" office:string-value="EDA38" table:formula="of:=DEC2HEX([.C1064])" table:style-name="ce1">
            <text:p>EDA38</text:p>
          </table:table-cell>
          <table:table-cell office:value-type="float" office:value="973368" table:style-name="ce1">
            <text:p>97336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6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string" office:string-value="EDA3C" table:formula="of:=DEC2HEX([.C1065])" table:style-name="ce1">
            <text:p>EDA3C</text:p>
          </table:table-cell>
          <table:table-cell office:value-type="float" office:value="973372" table:style-name="ce1">
            <text:p>973372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06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string" office:string-value="EDA47" table:formula="of:=DEC2HEX([.C1066])" table:style-name="ce1">
            <text:p>EDA47</text:p>
          </table:table-cell>
          <table:table-cell office:value-type="float" office:value="973383" table:style-name="ce1">
            <text:p>97338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6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string" office:string-value="EDA4B" table:formula="of:=DEC2HEX([.C1067])" table:style-name="ce1">
            <text:p>EDA4B</text:p>
          </table:table-cell>
          <table:table-cell office:value-type="float" office:value="973387" table:style-name="ce1">
            <text:p>97338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6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string" office:string-value="EDA4F" table:formula="of:=DEC2HEX([.C1068])" table:style-name="ce1">
            <text:p>EDA4F</text:p>
          </table:table-cell>
          <table:table-cell office:value-type="float" office:value="973391" table:style-name="ce1">
            <text:p>9733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6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string" office:string-value="EDA53" table:formula="of:=DEC2HEX([.C1069])" table:style-name="ce1">
            <text:p>EDA53</text:p>
          </table:table-cell>
          <table:table-cell office:value-type="float" office:value="973395" table:style-name="ce1">
            <text:p>97339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6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string" office:string-value="EDA57" table:formula="of:=DEC2HEX([.C1070])" table:style-name="ce1">
            <text:p>EDA57</text:p>
          </table:table-cell>
          <table:table-cell office:value-type="float" office:value="973399" table:style-name="ce1">
            <text:p>9733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7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office:string-value="EDA5B" table:formula="of:=DEC2HEX([.C1071])" table:style-name="ce1">
            <text:p>EDA5B</text:p>
          </table:table-cell>
          <table:table-cell office:value-type="float" office:value="973403" table:style-name="ce1">
            <text:p>9734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7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string" office:string-value="EDA5F" table:formula="of:=DEC2HEX([.C1072])" table:style-name="ce1">
            <text:p>EDA5F</text:p>
          </table:table-cell>
          <table:table-cell office:value-type="float" office:value="973407" table:style-name="ce1">
            <text:p>9734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7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string" office:string-value="EDA63" table:formula="of:=DEC2HEX([.C1073])" table:style-name="ce1">
            <text:p>EDA63</text:p>
          </table:table-cell>
          <table:table-cell office:value-type="float" office:value="973411" table:style-name="ce1">
            <text:p>97341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07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string" office:string-value="EDA64" table:formula="of:=DEC2HEX([.C1074])" table:style-name="ce1">
            <text:p>EDA64</text:p>
          </table:table-cell>
          <table:table-cell office:value-type="float" office:value="973412" table:style-name="ce1">
            <text:p>97341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7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string" office:string-value="EDA68" table:formula="of:=DEC2HEX([.C1075])" table:style-name="ce1">
            <text:p>EDA68</text:p>
          </table:table-cell>
          <table:table-cell office:value-type="float" office:value="973416" table:style-name="ce1">
            <text:p>97341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7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string" office:string-value="EDA6C" table:formula="of:=DEC2HEX([.C1076])" table:style-name="ce1">
            <text:p>EDA6C</text:p>
          </table:table-cell>
          <table:table-cell office:value-type="float" office:value="973420" table:style-name="ce1">
            <text:p>97342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7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string" office:string-value="EDA70" table:formula="of:=DEC2HEX([.C1077])" table:style-name="ce1">
            <text:p>EDA70</text:p>
          </table:table-cell>
          <table:table-cell office:value-type="float" office:value="973424" table:style-name="ce1">
            <text:p>97342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7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string" office:string-value="EDA74" table:formula="of:=DEC2HEX([.C1078])" table:style-name="ce1">
            <text:p>EDA74</text:p>
          </table:table-cell>
          <table:table-cell office:value-type="float" office:value="973428" table:style-name="ce1">
            <text:p>97342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7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string" office:string-value="EDA78" table:formula="of:=DEC2HEX([.C1079])" table:style-name="ce1">
            <text:p>EDA78</text:p>
          </table:table-cell>
          <table:table-cell office:value-type="float" office:value="973432" table:style-name="ce1">
            <text:p>97343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7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string" office:string-value="EDA7C" table:formula="of:=DEC2HEX([.C1080])" table:style-name="ce1">
            <text:p>EDA7C</text:p>
          </table:table-cell>
          <table:table-cell office:value-type="float" office:value="973436" table:style-name="ce1">
            <text:p>973436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08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office:string-value="EDA87" table:formula="of:=DEC2HEX([.C1081])" table:style-name="ce1">
            <text:p>EDA87</text:p>
          </table:table-cell>
          <table:table-cell office:value-type="float" office:value="973447" table:style-name="ce1">
            <text:p>9734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8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office:string-value="EDA8B" table:formula="of:=DEC2HEX([.C1082])" table:style-name="ce1">
            <text:p>EDA8B</text:p>
          </table:table-cell>
          <table:table-cell office:value-type="float" office:value="973451" table:style-name="ce1">
            <text:p>97345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8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string" office:string-value="EDA8F" table:formula="of:=DEC2HEX([.C1083])" table:style-name="ce1">
            <text:p>EDA8F</text:p>
          </table:table-cell>
          <table:table-cell office:value-type="float" office:value="973455" table:style-name="ce1">
            <text:p>9734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8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string" office:string-value="EDA93" table:formula="of:=DEC2HEX([.C1084])" table:style-name="ce1">
            <text:p>EDA93</text:p>
          </table:table-cell>
          <table:table-cell office:value-type="float" office:value="973459" table:style-name="ce1">
            <text:p>9734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8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string" office:string-value="EDA97" table:formula="of:=DEC2HEX([.C1085])" table:style-name="ce1">
            <text:p>EDA97</text:p>
          </table:table-cell>
          <table:table-cell office:value-type="float" office:value="973463" table:style-name="ce1">
            <text:p>9734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8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string" office:string-value="EDA9B" table:formula="of:=DEC2HEX([.C1086])" table:style-name="ce1">
            <text:p>EDA9B</text:p>
          </table:table-cell>
          <table:table-cell office:value-type="float" office:value="973467" table:style-name="ce1">
            <text:p>9734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8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string" office:string-value="EDA9F" table:formula="of:=DEC2HEX([.C1087])" table:style-name="ce1">
            <text:p>EDA9F</text:p>
          </table:table-cell>
          <table:table-cell office:value-type="float" office:value="973471" table:style-name="ce1">
            <text:p>9734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8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string" office:string-value="EDAA3" table:formula="of:=DEC2HEX([.C1088])" table:style-name="ce1">
            <text:p>EDAA3</text:p>
          </table:table-cell>
          <table:table-cell office:value-type="float" office:value="973475" table:style-name="ce1">
            <text:p>973475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08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string" office:string-value="EDAA4" table:formula="of:=DEC2HEX([.C1089])" table:style-name="ce1">
            <text:p>EDAA4</text:p>
          </table:table-cell>
          <table:table-cell office:value-type="float" office:value="973476" table:style-name="ce1">
            <text:p>97347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8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office:string-value="EDAA8" table:formula="of:=DEC2HEX([.C1090])" table:style-name="ce1">
            <text:p>EDAA8</text:p>
          </table:table-cell>
          <table:table-cell office:value-type="float" office:value="973480" table:style-name="ce1">
            <text:p>97348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9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office:string-value="EDAAC" table:formula="of:=DEC2HEX([.C1091])" table:style-name="ce1">
            <text:p>EDAAC</text:p>
          </table:table-cell>
          <table:table-cell office:value-type="float" office:value="973484" table:style-name="ce1">
            <text:p>97348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9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string" office:string-value="EDAB0" table:formula="of:=DEC2HEX([.C1092])" table:style-name="ce1">
            <text:p>EDAB0</text:p>
          </table:table-cell>
          <table:table-cell office:value-type="float" office:value="973488" table:style-name="ce1">
            <text:p>9734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9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string" office:string-value="EDAB4" table:formula="of:=DEC2HEX([.C1093])" table:style-name="ce1">
            <text:p>EDAB4</text:p>
          </table:table-cell>
          <table:table-cell office:value-type="float" office:value="973492" table:style-name="ce1">
            <text:p>9734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9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office:string-value="EDAB8" table:formula="of:=DEC2HEX([.C1094])" table:style-name="ce1">
            <text:p>EDAB8</text:p>
          </table:table-cell>
          <table:table-cell office:value-type="float" office:value="973496" table:style-name="ce1">
            <text:p>9734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9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string" office:string-value="EDABC" table:formula="of:=DEC2HEX([.C1095])" table:style-name="ce1">
            <text:p>EDABC</text:p>
          </table:table-cell>
          <table:table-cell office:value-type="float" office:value="973500" table:style-name="ce1">
            <text:p>973500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09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string" office:string-value="EDAC7" table:formula="of:=DEC2HEX([.C1096])" table:style-name="ce1">
            <text:p>EDAC7</text:p>
          </table:table-cell>
          <table:table-cell office:value-type="float" office:value="973511" table:style-name="ce1">
            <text:p>9735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9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string" office:string-value="EDACB" table:formula="of:=DEC2HEX([.C1097])" table:style-name="ce1">
            <text:p>EDACB</text:p>
          </table:table-cell>
          <table:table-cell office:value-type="float" office:value="973515" table:style-name="ce1">
            <text:p>97351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9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string" office:string-value="EDACF" table:formula="of:=DEC2HEX([.C1098])" table:style-name="ce1">
            <text:p>EDACF</text:p>
          </table:table-cell>
          <table:table-cell office:value-type="float" office:value="973519" table:style-name="ce1">
            <text:p>9735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9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string" office:string-value="EDAD3" table:formula="of:=DEC2HEX([.C1099])" table:style-name="ce1">
            <text:p>EDAD3</text:p>
          </table:table-cell>
          <table:table-cell office:value-type="float" office:value="973523" table:style-name="ce1">
            <text:p>9735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09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string" office:string-value="EDAD7" table:formula="of:=DEC2HEX([.C1100])" table:style-name="ce1">
            <text:p>EDAD7</text:p>
          </table:table-cell>
          <table:table-cell office:value-type="float" office:value="973527" table:style-name="ce1">
            <text:p>9735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0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office:string-value="EDADB" table:formula="of:=DEC2HEX([.C1101])" table:style-name="ce1">
            <text:p>EDADB</text:p>
          </table:table-cell>
          <table:table-cell office:value-type="float" office:value="973531" table:style-name="ce1">
            <text:p>97353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0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office:string-value="EDADF" table:formula="of:=DEC2HEX([.C1102])" table:style-name="ce1">
            <text:p>EDADF</text:p>
          </table:table-cell>
          <table:table-cell office:value-type="float" office:value="973535" table:style-name="ce1">
            <text:p>9735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0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office:string-value="EDAE3" table:formula="of:=DEC2HEX([.C1103])" table:style-name="ce1">
            <text:p>EDAE3</text:p>
          </table:table-cell>
          <table:table-cell office:value-type="float" office:value="973539" table:style-name="ce1">
            <text:p>973539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10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office:string-value="EDAE4" table:formula="of:=DEC2HEX([.C1104])" table:style-name="ce1">
            <text:p>EDAE4</text:p>
          </table:table-cell>
          <table:table-cell office:value-type="float" office:value="973540" table:style-name="ce1">
            <text:p>97354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0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office:string-value="EDAE8" table:formula="of:=DEC2HEX([.C1105])" table:style-name="ce1">
            <text:p>EDAE8</text:p>
          </table:table-cell>
          <table:table-cell office:value-type="float" office:value="973544" table:style-name="ce1">
            <text:p>9735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0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office:string-value="EDAEC" table:formula="of:=DEC2HEX([.C1106])" table:style-name="ce1">
            <text:p>EDAEC</text:p>
          </table:table-cell>
          <table:table-cell office:value-type="float" office:value="973548" table:style-name="ce1">
            <text:p>9735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0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office:string-value="EDAF0" table:formula="of:=DEC2HEX([.C1107])" table:style-name="ce1">
            <text:p>EDAF0</text:p>
          </table:table-cell>
          <table:table-cell office:value-type="float" office:value="973552" table:style-name="ce1">
            <text:p>9735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0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string" office:string-value="EDAF4" table:formula="of:=DEC2HEX([.C1108])" table:style-name="ce1">
            <text:p>EDAF4</text:p>
          </table:table-cell>
          <table:table-cell office:value-type="float" office:value="973556" table:style-name="ce1">
            <text:p>97355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0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string" office:string-value="EDAF8" table:formula="of:=DEC2HEX([.C1109])" table:style-name="ce1">
            <text:p>EDAF8</text:p>
          </table:table-cell>
          <table:table-cell office:value-type="float" office:value="973560" table:style-name="ce1">
            <text:p>97356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0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string" office:string-value="EDAFC" table:formula="of:=DEC2HEX([.C1110])" table:style-name="ce1">
            <text:p>EDAFC</text:p>
          </table:table-cell>
          <table:table-cell office:value-type="float" office:value="973564" table:style-name="ce1">
            <text:p>973564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11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office:string-value="EDB07" table:formula="of:=DEC2HEX([.C1111])" table:style-name="ce1">
            <text:p>EDB07</text:p>
          </table:table-cell>
          <table:table-cell office:value-type="float" office:value="973575" table:style-name="ce1">
            <text:p>97357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1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string" office:string-value="EDB0B" table:formula="of:=DEC2HEX([.C1112])" table:style-name="ce1">
            <text:p>EDB0B</text:p>
          </table:table-cell>
          <table:table-cell office:value-type="float" office:value="973579" table:style-name="ce1">
            <text:p>9735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1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string" office:string-value="EDB0F" table:formula="of:=DEC2HEX([.C1113])" table:style-name="ce1">
            <text:p>EDB0F</text:p>
          </table:table-cell>
          <table:table-cell office:value-type="float" office:value="973583" table:style-name="ce1">
            <text:p>97358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1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string" office:string-value="EDB13" table:formula="of:=DEC2HEX([.C1114])" table:style-name="ce1">
            <text:p>EDB13</text:p>
          </table:table-cell>
          <table:table-cell office:value-type="float" office:value="973587" table:style-name="ce1">
            <text:p>97358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1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string" office:string-value="EDB17" table:formula="of:=DEC2HEX([.C1115])" table:style-name="ce1">
            <text:p>EDB17</text:p>
          </table:table-cell>
          <table:table-cell office:value-type="float" office:value="973591" table:style-name="ce1">
            <text:p>9735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1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string" office:string-value="EDB1B" table:formula="of:=DEC2HEX([.C1116])" table:style-name="ce1">
            <text:p>EDB1B</text:p>
          </table:table-cell>
          <table:table-cell office:value-type="float" office:value="973595" table:style-name="ce1">
            <text:p>97359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1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string" office:string-value="EDB1F" table:formula="of:=DEC2HEX([.C1117])" table:style-name="ce1">
            <text:p>EDB1F</text:p>
          </table:table-cell>
          <table:table-cell office:value-type="float" office:value="973599" table:style-name="ce1">
            <text:p>9735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1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string" office:string-value="EDB23" table:formula="of:=DEC2HEX([.C1118])" table:style-name="ce1">
            <text:p>EDB23</text:p>
          </table:table-cell>
          <table:table-cell office:value-type="float" office:value="973603" table:style-name="ce1">
            <text:p>973603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11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string" office:string-value="EDB24" table:formula="of:=DEC2HEX([.C1119])" table:style-name="ce1">
            <text:p>EDB24</text:p>
          </table:table-cell>
          <table:table-cell office:value-type="float" office:value="973604" table:style-name="ce1">
            <text:p>97360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1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string" office:string-value="EDB28" table:formula="of:=DEC2HEX([.C1120])" table:style-name="ce1">
            <text:p>EDB28</text:p>
          </table:table-cell>
          <table:table-cell office:value-type="float" office:value="973608" table:style-name="ce1">
            <text:p>97360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2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string" office:string-value="EDB2C" table:formula="of:=DEC2HEX([.C1121])" table:style-name="ce1">
            <text:p>EDB2C</text:p>
          </table:table-cell>
          <table:table-cell office:value-type="float" office:value="973612" table:style-name="ce1">
            <text:p>97361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2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string" office:string-value="EDB30" table:formula="of:=DEC2HEX([.C1122])" table:style-name="ce1">
            <text:p>EDB30</text:p>
          </table:table-cell>
          <table:table-cell office:value-type="float" office:value="973616" table:style-name="ce1">
            <text:p>97361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2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string" office:string-value="EDB34" table:formula="of:=DEC2HEX([.C1123])" table:style-name="ce1">
            <text:p>EDB34</text:p>
          </table:table-cell>
          <table:table-cell office:value-type="float" office:value="973620" table:style-name="ce1">
            <text:p>97362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2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string" office:string-value="EDB38" table:formula="of:=DEC2HEX([.C1124])" table:style-name="ce1">
            <text:p>EDB38</text:p>
          </table:table-cell>
          <table:table-cell office:value-type="float" office:value="973624" table:style-name="ce1">
            <text:p>97362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2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string" office:string-value="EDB3C" table:formula="of:=DEC2HEX([.C1125])" table:style-name="ce1">
            <text:p>EDB3C</text:p>
          </table:table-cell>
          <table:table-cell office:value-type="float" office:value="973628" table:style-name="ce1">
            <text:p>973628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12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string" office:string-value="EDB47" table:formula="of:=DEC2HEX([.C1126])" table:style-name="ce1">
            <text:p>EDB47</text:p>
          </table:table-cell>
          <table:table-cell office:value-type="float" office:value="973639" table:style-name="ce1">
            <text:p>97363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2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string" office:string-value="EDB4B" table:formula="of:=DEC2HEX([.C1127])" table:style-name="ce1">
            <text:p>EDB4B</text:p>
          </table:table-cell>
          <table:table-cell office:value-type="float" office:value="973643" table:style-name="ce1">
            <text:p>9736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2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string" office:string-value="EDB4F" table:formula="of:=DEC2HEX([.C1128])" table:style-name="ce1">
            <text:p>EDB4F</text:p>
          </table:table-cell>
          <table:table-cell office:value-type="float" office:value="973647" table:style-name="ce1">
            <text:p>9736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2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string" office:string-value="EDB53" table:formula="of:=DEC2HEX([.C1129])" table:style-name="ce1">
            <text:p>EDB53</text:p>
          </table:table-cell>
          <table:table-cell office:value-type="float" office:value="973651" table:style-name="ce1">
            <text:p>97365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2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office:string-value="EDB57" table:formula="of:=DEC2HEX([.C1130])" table:style-name="ce1">
            <text:p>EDB57</text:p>
          </table:table-cell>
          <table:table-cell office:value-type="float" office:value="973655" table:style-name="ce1">
            <text:p>9736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3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office:string-value="EDB5B" table:formula="of:=DEC2HEX([.C1131])" table:style-name="ce1">
            <text:p>EDB5B</text:p>
          </table:table-cell>
          <table:table-cell office:value-type="float" office:value="973659" table:style-name="ce1">
            <text:p>9736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3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string" office:string-value="EDB5F" table:formula="of:=DEC2HEX([.C1132])" table:style-name="ce1">
            <text:p>EDB5F</text:p>
          </table:table-cell>
          <table:table-cell office:value-type="float" office:value="973663" table:style-name="ce1">
            <text:p>9736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3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string" office:string-value="EDB63" table:formula="of:=DEC2HEX([.C1133])" table:style-name="ce1">
            <text:p>EDB63</text:p>
          </table:table-cell>
          <table:table-cell office:value-type="float" office:value="973667" table:style-name="ce1">
            <text:p>973667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13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string" office:string-value="EDB64" table:formula="of:=DEC2HEX([.C1134])" table:style-name="ce1">
            <text:p>EDB64</text:p>
          </table:table-cell>
          <table:table-cell office:value-type="float" office:value="973668" table:style-name="ce1">
            <text:p>97366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3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string" office:string-value="EDB68" table:formula="of:=DEC2HEX([.C1135])" table:style-name="ce1">
            <text:p>EDB68</text:p>
          </table:table-cell>
          <table:table-cell office:value-type="float" office:value="973672" table:style-name="ce1">
            <text:p>97367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3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string" office:string-value="EDB6C" table:formula="of:=DEC2HEX([.C1136])" table:style-name="ce1">
            <text:p>EDB6C</text:p>
          </table:table-cell>
          <table:table-cell office:value-type="float" office:value="973676" table:style-name="ce1">
            <text:p>97367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3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string" office:string-value="EDB70" table:formula="of:=DEC2HEX([.C1137])" table:style-name="ce1">
            <text:p>EDB70</text:p>
          </table:table-cell>
          <table:table-cell office:value-type="float" office:value="973680" table:style-name="ce1">
            <text:p>97368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3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string" office:string-value="EDB74" table:formula="of:=DEC2HEX([.C1138])" table:style-name="ce1">
            <text:p>EDB74</text:p>
          </table:table-cell>
          <table:table-cell office:value-type="float" office:value="973684" table:style-name="ce1">
            <text:p>97368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3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string" office:string-value="EDB78" table:formula="of:=DEC2HEX([.C1139])" table:style-name="ce1">
            <text:p>EDB78</text:p>
          </table:table-cell>
          <table:table-cell office:value-type="float" office:value="973688" table:style-name="ce1">
            <text:p>9736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3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string" office:string-value="EDB7C" table:formula="of:=DEC2HEX([.C1140])" table:style-name="ce1">
            <text:p>EDB7C</text:p>
          </table:table-cell>
          <table:table-cell office:value-type="float" office:value="973692" table:style-name="ce1">
            <text:p>973692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14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office:string-value="EDB87" table:formula="of:=DEC2HEX([.C1141])" table:style-name="ce1">
            <text:p>EDB87</text:p>
          </table:table-cell>
          <table:table-cell office:value-type="float" office:value="973703" table:style-name="ce1">
            <text:p>9737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4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string" office:string-value="EDB8B" table:formula="of:=DEC2HEX([.C1142])" table:style-name="ce1">
            <text:p>EDB8B</text:p>
          </table:table-cell>
          <table:table-cell office:value-type="float" office:value="973707" table:style-name="ce1">
            <text:p>9737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4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string" office:string-value="EDB8F" table:formula="of:=DEC2HEX([.C1143])" table:style-name="ce1">
            <text:p>EDB8F</text:p>
          </table:table-cell>
          <table:table-cell office:value-type="float" office:value="973711" table:style-name="ce1">
            <text:p>9737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4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string" office:string-value="EDB93" table:formula="of:=DEC2HEX([.C1144])" table:style-name="ce1">
            <text:p>EDB93</text:p>
          </table:table-cell>
          <table:table-cell office:value-type="float" office:value="973715" table:style-name="ce1">
            <text:p>97371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4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string" office:string-value="EDB97" table:formula="of:=DEC2HEX([.C1145])" table:style-name="ce1">
            <text:p>EDB97</text:p>
          </table:table-cell>
          <table:table-cell office:value-type="float" office:value="973719" table:style-name="ce1">
            <text:p>9737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4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string" office:string-value="EDB9B" table:formula="of:=DEC2HEX([.C1146])" table:style-name="ce1">
            <text:p>EDB9B</text:p>
          </table:table-cell>
          <table:table-cell office:value-type="float" office:value="973723" table:style-name="ce1">
            <text:p>9737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4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string" office:string-value="EDB9F" table:formula="of:=DEC2HEX([.C1147])" table:style-name="ce1">
            <text:p>EDB9F</text:p>
          </table:table-cell>
          <table:table-cell office:value-type="float" office:value="973727" table:style-name="ce1">
            <text:p>9737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4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string" office:string-value="EDBA3" table:formula="of:=DEC2HEX([.C1148])" table:style-name="ce1">
            <text:p>EDBA3</text:p>
          </table:table-cell>
          <table:table-cell office:value-type="float" office:value="973731" table:style-name="ce1">
            <text:p>97373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14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string" office:string-value="EDBA4" table:formula="of:=DEC2HEX([.C1149])" table:style-name="ce1">
            <text:p>EDBA4</text:p>
          </table:table-cell>
          <table:table-cell office:value-type="float" office:value="973732" table:style-name="ce1">
            <text:p>97373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4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string" office:string-value="EDBA8" table:formula="of:=DEC2HEX([.C1150])" table:style-name="ce1">
            <text:p>EDBA8</text:p>
          </table:table-cell>
          <table:table-cell office:value-type="float" office:value="973736" table:style-name="ce1">
            <text:p>97373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5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string" office:string-value="EDBAC" table:formula="of:=DEC2HEX([.C1151])" table:style-name="ce1">
            <text:p>EDBAC</text:p>
          </table:table-cell>
          <table:table-cell office:value-type="float" office:value="973740" table:style-name="ce1">
            <text:p>97374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5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string" office:string-value="EDBB0" table:formula="of:=DEC2HEX([.C1152])" table:style-name="ce1">
            <text:p>EDBB0</text:p>
          </table:table-cell>
          <table:table-cell office:value-type="float" office:value="973744" table:style-name="ce1">
            <text:p>9737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5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string" office:string-value="EDBB4" table:formula="of:=DEC2HEX([.C1153])" table:style-name="ce1">
            <text:p>EDBB4</text:p>
          </table:table-cell>
          <table:table-cell office:value-type="float" office:value="973748" table:style-name="ce1">
            <text:p>9737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5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string" office:string-value="EDBB8" table:formula="of:=DEC2HEX([.C1154])" table:style-name="ce1">
            <text:p>EDBB8</text:p>
          </table:table-cell>
          <table:table-cell office:value-type="float" office:value="973752" table:style-name="ce1">
            <text:p>9737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5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string" office:string-value="EDBBC" table:formula="of:=DEC2HEX([.C1155])" table:style-name="ce1">
            <text:p>EDBBC</text:p>
          </table:table-cell>
          <table:table-cell office:value-type="float" office:value="973756" table:style-name="ce1">
            <text:p>973756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15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string" office:string-value="EDBC7" table:formula="of:=DEC2HEX([.C1156])" table:style-name="ce1">
            <text:p>EDBC7</text:p>
          </table:table-cell>
          <table:table-cell office:value-type="float" office:value="973767" table:style-name="ce1">
            <text:p>9737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5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string" office:string-value="EDBCB" table:formula="of:=DEC2HEX([.C1157])" table:style-name="ce1">
            <text:p>EDBCB</text:p>
          </table:table-cell>
          <table:table-cell office:value-type="float" office:value="973771" table:style-name="ce1">
            <text:p>9737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5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string" office:string-value="EDBCF" table:formula="of:=DEC2HEX([.C1158])" table:style-name="ce1">
            <text:p>EDBCF</text:p>
          </table:table-cell>
          <table:table-cell office:value-type="float" office:value="973775" table:style-name="ce1">
            <text:p>97377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5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string" office:string-value="EDBD3" table:formula="of:=DEC2HEX([.C1159])" table:style-name="ce1">
            <text:p>EDBD3</text:p>
          </table:table-cell>
          <table:table-cell office:value-type="float" office:value="973779" table:style-name="ce1">
            <text:p>9737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5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string" office:string-value="EDBD7" table:formula="of:=DEC2HEX([.C1160])" table:style-name="ce1">
            <text:p>EDBD7</text:p>
          </table:table-cell>
          <table:table-cell office:value-type="float" office:value="973783" table:style-name="ce1">
            <text:p>97378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6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office:string-value="EDBDB" table:formula="of:=DEC2HEX([.C1161])" table:style-name="ce1">
            <text:p>EDBDB</text:p>
          </table:table-cell>
          <table:table-cell office:value-type="float" office:value="973787" table:style-name="ce1">
            <text:p>97378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6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string" office:string-value="EDBDF" table:formula="of:=DEC2HEX([.C1162])" table:style-name="ce1">
            <text:p>EDBDF</text:p>
          </table:table-cell>
          <table:table-cell office:value-type="float" office:value="973791" table:style-name="ce1">
            <text:p>9737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6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string" office:string-value="EDBE3" table:formula="of:=DEC2HEX([.C1163])" table:style-name="ce1">
            <text:p>EDBE3</text:p>
          </table:table-cell>
          <table:table-cell office:value-type="float" office:value="973795" table:style-name="ce1">
            <text:p>973795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16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string" office:string-value="EDBE4" table:formula="of:=DEC2HEX([.C1164])" table:style-name="ce1">
            <text:p>EDBE4</text:p>
          </table:table-cell>
          <table:table-cell office:value-type="float" office:value="973796" table:style-name="ce1">
            <text:p>9737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6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string" office:string-value="EDBE8" table:formula="of:=DEC2HEX([.C1165])" table:style-name="ce1">
            <text:p>EDBE8</text:p>
          </table:table-cell>
          <table:table-cell office:value-type="float" office:value="973800" table:style-name="ce1">
            <text:p>97380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6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string" office:string-value="EDBEC" table:formula="of:=DEC2HEX([.C1166])" table:style-name="ce1">
            <text:p>EDBEC</text:p>
          </table:table-cell>
          <table:table-cell office:value-type="float" office:value="973804" table:style-name="ce1">
            <text:p>97380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6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string" office:string-value="EDBF0" table:formula="of:=DEC2HEX([.C1167])" table:style-name="ce1">
            <text:p>EDBF0</text:p>
          </table:table-cell>
          <table:table-cell office:value-type="float" office:value="973808" table:style-name="ce1">
            <text:p>97380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6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string" office:string-value="EDBF4" table:formula="of:=DEC2HEX([.C1168])" table:style-name="ce1">
            <text:p>EDBF4</text:p>
          </table:table-cell>
          <table:table-cell office:value-type="float" office:value="973812" table:style-name="ce1">
            <text:p>97381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6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string" office:string-value="EDBF8" table:formula="of:=DEC2HEX([.C1169])" table:style-name="ce1">
            <text:p>EDBF8</text:p>
          </table:table-cell>
          <table:table-cell office:value-type="float" office:value="973816" table:style-name="ce1">
            <text:p>97381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6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string" office:string-value="EDBFC" table:formula="of:=DEC2HEX([.C1170])" table:style-name="ce1">
            <text:p>EDBFC</text:p>
          </table:table-cell>
          <table:table-cell office:value-type="float" office:value="973820" table:style-name="ce1">
            <text:p>973820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17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string" office:string-value="EDC07" table:formula="of:=DEC2HEX([.C1171])" table:style-name="ce1">
            <text:p>EDC07</text:p>
          </table:table-cell>
          <table:table-cell office:value-type="float" office:value="973831" table:style-name="ce1">
            <text:p>97383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7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office:string-value="EDC0B" table:formula="of:=DEC2HEX([.C1172])" table:style-name="ce1">
            <text:p>EDC0B</text:p>
          </table:table-cell>
          <table:table-cell office:value-type="float" office:value="973835" table:style-name="ce1">
            <text:p>9738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7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string" office:string-value="EDC0F" table:formula="of:=DEC2HEX([.C1173])" table:style-name="ce1">
            <text:p>EDC0F</text:p>
          </table:table-cell>
          <table:table-cell office:value-type="float" office:value="973839" table:style-name="ce1">
            <text:p>97383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7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string" office:string-value="EDC13" table:formula="of:=DEC2HEX([.C1174])" table:style-name="ce1">
            <text:p>EDC13</text:p>
          </table:table-cell>
          <table:table-cell office:value-type="float" office:value="973843" table:style-name="ce1">
            <text:p>9738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7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string" office:string-value="EDC17" table:formula="of:=DEC2HEX([.C1175])" table:style-name="ce1">
            <text:p>EDC17</text:p>
          </table:table-cell>
          <table:table-cell office:value-type="float" office:value="973847" table:style-name="ce1">
            <text:p>9738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7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string" office:string-value="EDC1B" table:formula="of:=DEC2HEX([.C1176])" table:style-name="ce1">
            <text:p>EDC1B</text:p>
          </table:table-cell>
          <table:table-cell office:value-type="float" office:value="973851" table:style-name="ce1">
            <text:p>97385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7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string" office:string-value="EDC1F" table:formula="of:=DEC2HEX([.C1177])" table:style-name="ce1">
            <text:p>EDC1F</text:p>
          </table:table-cell>
          <table:table-cell office:value-type="float" office:value="973855" table:style-name="ce1">
            <text:p>9738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7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string" office:string-value="EDC23" table:formula="of:=DEC2HEX([.C1178])" table:style-name="ce1">
            <text:p>EDC23</text:p>
          </table:table-cell>
          <table:table-cell office:value-type="float" office:value="973859" table:style-name="ce1">
            <text:p>973859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17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string" office:string-value="EDC24" table:formula="of:=DEC2HEX([.C1179])" table:style-name="ce1">
            <text:p>EDC24</text:p>
          </table:table-cell>
          <table:table-cell office:value-type="float" office:value="973860" table:style-name="ce1">
            <text:p>97386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7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string" office:string-value="EDC28" table:formula="of:=DEC2HEX([.C1180])" table:style-name="ce1">
            <text:p>EDC28</text:p>
          </table:table-cell>
          <table:table-cell office:value-type="float" office:value="973864" table:style-name="ce1">
            <text:p>97386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8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string" office:string-value="EDC2C" table:formula="of:=DEC2HEX([.C1181])" table:style-name="ce1">
            <text:p>EDC2C</text:p>
          </table:table-cell>
          <table:table-cell office:value-type="float" office:value="973868" table:style-name="ce1">
            <text:p>97386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8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string" office:string-value="EDC30" table:formula="of:=DEC2HEX([.C1182])" table:style-name="ce1">
            <text:p>EDC30</text:p>
          </table:table-cell>
          <table:table-cell office:value-type="float" office:value="973872" table:style-name="ce1">
            <text:p>97387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8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string" office:string-value="EDC34" table:formula="of:=DEC2HEX([.C1183])" table:style-name="ce1">
            <text:p>EDC34</text:p>
          </table:table-cell>
          <table:table-cell office:value-type="float" office:value="973876" table:style-name="ce1">
            <text:p>97387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8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string" office:string-value="EDC38" table:formula="of:=DEC2HEX([.C1184])" table:style-name="ce1">
            <text:p>EDC38</text:p>
          </table:table-cell>
          <table:table-cell office:value-type="float" office:value="973880" table:style-name="ce1">
            <text:p>97388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8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string" office:string-value="EDC3C" table:formula="of:=DEC2HEX([.C1185])" table:style-name="ce1">
            <text:p>EDC3C</text:p>
          </table:table-cell>
          <table:table-cell office:value-type="float" office:value="973884" table:style-name="ce1">
            <text:p>973884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18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string" office:string-value="EDC47" table:formula="of:=DEC2HEX([.C1186])" table:style-name="ce1">
            <text:p>EDC47</text:p>
          </table:table-cell>
          <table:table-cell office:value-type="float" office:value="973895" table:style-name="ce1">
            <text:p>97389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8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string" office:string-value="EDC4B" table:formula="of:=DEC2HEX([.C1187])" table:style-name="ce1">
            <text:p>EDC4B</text:p>
          </table:table-cell>
          <table:table-cell office:value-type="float" office:value="973899" table:style-name="ce1">
            <text:p>9738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8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office:string-value="EDC4F" table:formula="of:=DEC2HEX([.C1188])" table:style-name="ce1">
            <text:p>EDC4F</text:p>
          </table:table-cell>
          <table:table-cell office:value-type="float" office:value="973903" table:style-name="ce1">
            <text:p>9739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8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string" office:string-value="EDC53" table:formula="of:=DEC2HEX([.C1189])" table:style-name="ce1">
            <text:p>EDC53</text:p>
          </table:table-cell>
          <table:table-cell office:value-type="float" office:value="973907" table:style-name="ce1">
            <text:p>9739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8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string" office:string-value="EDC57" table:formula="of:=DEC2HEX([.C1190])" table:style-name="ce1">
            <text:p>EDC57</text:p>
          </table:table-cell>
          <table:table-cell office:value-type="float" office:value="973911" table:style-name="ce1">
            <text:p>9739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9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string" office:string-value="EDC5B" table:formula="of:=DEC2HEX([.C1191])" table:style-name="ce1">
            <text:p>EDC5B</text:p>
          </table:table-cell>
          <table:table-cell office:value-type="float" office:value="973915" table:style-name="ce1">
            <text:p>97391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9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string" office:string-value="EDC5F" table:formula="of:=DEC2HEX([.C1192])" table:style-name="ce1">
            <text:p>EDC5F</text:p>
          </table:table-cell>
          <table:table-cell office:value-type="float" office:value="973919" table:style-name="ce1">
            <text:p>9739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9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string" office:string-value="EDC63" table:formula="of:=DEC2HEX([.C1193])" table:style-name="ce1">
            <text:p>EDC63</text:p>
          </table:table-cell>
          <table:table-cell office:value-type="float" office:value="973923" table:style-name="ce1">
            <text:p>973923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19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string" office:string-value="EDC64" table:formula="of:=DEC2HEX([.C1194])" table:style-name="ce1">
            <text:p>EDC64</text:p>
          </table:table-cell>
          <table:table-cell office:value-type="float" office:value="973924" table:style-name="ce1">
            <text:p>97392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9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string" office:string-value="EDC68" table:formula="of:=DEC2HEX([.C1195])" table:style-name="ce1">
            <text:p>EDC68</text:p>
          </table:table-cell>
          <table:table-cell office:value-type="float" office:value="973928" table:style-name="ce1">
            <text:p>97392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9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string" office:string-value="EDC6C" table:formula="of:=DEC2HEX([.C1196])" table:style-name="ce1">
            <text:p>EDC6C</text:p>
          </table:table-cell>
          <table:table-cell office:value-type="float" office:value="973932" table:style-name="ce1">
            <text:p>97393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9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string" office:string-value="EDC70" table:formula="of:=DEC2HEX([.C1197])" table:style-name="ce1">
            <text:p>EDC70</text:p>
          </table:table-cell>
          <table:table-cell office:value-type="float" office:value="973936" table:style-name="ce1">
            <text:p>97393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9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string" office:string-value="EDC74" table:formula="of:=DEC2HEX([.C1198])" table:style-name="ce1">
            <text:p>EDC74</text:p>
          </table:table-cell>
          <table:table-cell office:value-type="float" office:value="973940" table:style-name="ce1">
            <text:p>97394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9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string" office:string-value="EDC78" table:formula="of:=DEC2HEX([.C1199])" table:style-name="ce1">
            <text:p>EDC78</text:p>
          </table:table-cell>
          <table:table-cell office:value-type="float" office:value="973944" table:style-name="ce1">
            <text:p>9739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19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string" office:string-value="EDC7C" table:formula="of:=DEC2HEX([.C1200])" table:style-name="ce1">
            <text:p>EDC7C</text:p>
          </table:table-cell>
          <table:table-cell office:value-type="float" office:value="973948" table:style-name="ce1">
            <text:p>973948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20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office:string-value="EDC87" table:formula="of:=DEC2HEX([.C1201])" table:style-name="ce1">
            <text:p>EDC87</text:p>
          </table:table-cell>
          <table:table-cell office:value-type="float" office:value="973959" table:style-name="ce1">
            <text:p>9739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0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office:string-value="EDC8B" table:formula="of:=DEC2HEX([.C1202])" table:style-name="ce1">
            <text:p>EDC8B</text:p>
          </table:table-cell>
          <table:table-cell office:value-type="float" office:value="973963" table:style-name="ce1">
            <text:p>9739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0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string" office:string-value="EDC8F" table:formula="of:=DEC2HEX([.C1203])" table:style-name="ce1">
            <text:p>EDC8F</text:p>
          </table:table-cell>
          <table:table-cell office:value-type="float" office:value="973967" table:style-name="ce1">
            <text:p>9739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0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string" office:string-value="EDC93" table:formula="of:=DEC2HEX([.C1204])" table:style-name="ce1">
            <text:p>EDC93</text:p>
          </table:table-cell>
          <table:table-cell office:value-type="float" office:value="973971" table:style-name="ce1">
            <text:p>9739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0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string" office:string-value="EDC97" table:formula="of:=DEC2HEX([.C1205])" table:style-name="ce1">
            <text:p>EDC97</text:p>
          </table:table-cell>
          <table:table-cell office:value-type="float" office:value="973975" table:style-name="ce1">
            <text:p>97397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0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string" office:string-value="EDC9B" table:formula="of:=DEC2HEX([.C1206])" table:style-name="ce1">
            <text:p>EDC9B</text:p>
          </table:table-cell>
          <table:table-cell office:value-type="float" office:value="973979" table:style-name="ce1">
            <text:p>9739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0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string" office:string-value="EDC9F" table:formula="of:=DEC2HEX([.C1207])" table:style-name="ce1">
            <text:p>EDC9F</text:p>
          </table:table-cell>
          <table:table-cell office:value-type="float" office:value="973983" table:style-name="ce1">
            <text:p>97398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0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string" office:string-value="EDCA3" table:formula="of:=DEC2HEX([.C1208])" table:style-name="ce1">
            <text:p>EDCA3</text:p>
          </table:table-cell>
          <table:table-cell office:value-type="float" office:value="973987" table:style-name="ce1">
            <text:p>973987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20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string" office:string-value="EDCA4" table:formula="of:=DEC2HEX([.C1209])" table:style-name="ce1">
            <text:p>EDCA4</text:p>
          </table:table-cell>
          <table:table-cell office:value-type="float" office:value="973988" table:style-name="ce1">
            <text:p>9739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0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office:string-value="EDCA8" table:formula="of:=DEC2HEX([.C1210])" table:style-name="ce1">
            <text:p>EDCA8</text:p>
          </table:table-cell>
          <table:table-cell office:value-type="float" office:value="973992" table:style-name="ce1">
            <text:p>9739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1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office:string-value="EDCAC" table:formula="of:=DEC2HEX([.C1211])" table:style-name="ce1">
            <text:p>EDCAC</text:p>
          </table:table-cell>
          <table:table-cell office:value-type="float" office:value="973996" table:style-name="ce1">
            <text:p>9739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1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office:string-value="EDCB0" table:formula="of:=DEC2HEX([.C1212])" table:style-name="ce1">
            <text:p>EDCB0</text:p>
          </table:table-cell>
          <table:table-cell office:value-type="float" office:value="974000" table:style-name="ce1">
            <text:p>97400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1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office:string-value="EDCB4" table:formula="of:=DEC2HEX([.C1213])" table:style-name="ce1">
            <text:p>EDCB4</text:p>
          </table:table-cell>
          <table:table-cell office:value-type="float" office:value="974004" table:style-name="ce1">
            <text:p>97400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1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string" office:string-value="EDCB8" table:formula="of:=DEC2HEX([.C1214])" table:style-name="ce1">
            <text:p>EDCB8</text:p>
          </table:table-cell>
          <table:table-cell office:value-type="float" office:value="974008" table:style-name="ce1">
            <text:p>97400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1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string" office:string-value="EDCBC" table:formula="of:=DEC2HEX([.C1215])" table:style-name="ce1">
            <text:p>EDCBC</text:p>
          </table:table-cell>
          <table:table-cell office:value-type="float" office:value="974012" table:style-name="ce1">
            <text:p>974012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21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string" office:string-value="EDCC7" table:formula="of:=DEC2HEX([.C1216])" table:style-name="ce1">
            <text:p>EDCC7</text:p>
          </table:table-cell>
          <table:table-cell office:value-type="float" office:value="974023" table:style-name="ce1">
            <text:p>9740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1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string" office:string-value="EDCCB" table:formula="of:=DEC2HEX([.C1217])" table:style-name="ce1">
            <text:p>EDCCB</text:p>
          </table:table-cell>
          <table:table-cell office:value-type="float" office:value="974027" table:style-name="ce1">
            <text:p>9740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1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string" office:string-value="EDCCF" table:formula="of:=DEC2HEX([.C1218])" table:style-name="ce1">
            <text:p>EDCCF</text:p>
          </table:table-cell>
          <table:table-cell office:value-type="float" office:value="974031" table:style-name="ce1">
            <text:p>97403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1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string" office:string-value="EDCD3" table:formula="of:=DEC2HEX([.C1219])" table:style-name="ce1">
            <text:p>EDCD3</text:p>
          </table:table-cell>
          <table:table-cell office:value-type="float" office:value="974035" table:style-name="ce1">
            <text:p>9740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1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string" office:string-value="EDCD7" table:formula="of:=DEC2HEX([.C1220])" table:style-name="ce1">
            <text:p>EDCD7</text:p>
          </table:table-cell>
          <table:table-cell office:value-type="float" office:value="974039" table:style-name="ce1">
            <text:p>97403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2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office:string-value="EDCDB" table:formula="of:=DEC2HEX([.C1221])" table:style-name="ce1">
            <text:p>EDCDB</text:p>
          </table:table-cell>
          <table:table-cell office:value-type="float" office:value="974043" table:style-name="ce1">
            <text:p>9740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2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string" office:string-value="EDCDF" table:formula="of:=DEC2HEX([.C1222])" table:style-name="ce1">
            <text:p>EDCDF</text:p>
          </table:table-cell>
          <table:table-cell office:value-type="float" office:value="974047" table:style-name="ce1">
            <text:p>9740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2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string" office:string-value="EDCE3" table:formula="of:=DEC2HEX([.C1223])" table:style-name="ce1">
            <text:p>EDCE3</text:p>
          </table:table-cell>
          <table:table-cell office:value-type="float" office:value="974051" table:style-name="ce1">
            <text:p>97405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22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string" office:string-value="EDCE4" table:formula="of:=DEC2HEX([.C1224])" table:style-name="ce1">
            <text:p>EDCE4</text:p>
          </table:table-cell>
          <table:table-cell office:value-type="float" office:value="974052" table:style-name="ce1">
            <text:p>9740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2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string" office:string-value="EDCE8" table:formula="of:=DEC2HEX([.C1225])" table:style-name="ce1">
            <text:p>EDCE8</text:p>
          </table:table-cell>
          <table:table-cell office:value-type="float" office:value="974056" table:style-name="ce1">
            <text:p>97405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2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string" office:string-value="EDCEC" table:formula="of:=DEC2HEX([.C1226])" table:style-name="ce1">
            <text:p>EDCEC</text:p>
          </table:table-cell>
          <table:table-cell office:value-type="float" office:value="974060" table:style-name="ce1">
            <text:p>97406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2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string" office:string-value="EDCF0" table:formula="of:=DEC2HEX([.C1227])" table:style-name="ce1">
            <text:p>EDCF0</text:p>
          </table:table-cell>
          <table:table-cell office:value-type="float" office:value="974064" table:style-name="ce1">
            <text:p>97406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2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string" office:string-value="EDCF4" table:formula="of:=DEC2HEX([.C1228])" table:style-name="ce1">
            <text:p>EDCF4</text:p>
          </table:table-cell>
          <table:table-cell office:value-type="float" office:value="974068" table:style-name="ce1">
            <text:p>97406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2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string" office:string-value="EDCF8" table:formula="of:=DEC2HEX([.C1229])" table:style-name="ce1">
            <text:p>EDCF8</text:p>
          </table:table-cell>
          <table:table-cell office:value-type="float" office:value="974072" table:style-name="ce1">
            <text:p>97407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2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string" office:string-value="EDCFC" table:formula="of:=DEC2HEX([.C1230])" table:style-name="ce1">
            <text:p>EDCFC</text:p>
          </table:table-cell>
          <table:table-cell office:value-type="float" office:value="974076" table:style-name="ce1">
            <text:p>974076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23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string" office:string-value="EDD07" table:formula="of:=DEC2HEX([.C1231])" table:style-name="ce1">
            <text:p>EDD07</text:p>
          </table:table-cell>
          <table:table-cell office:value-type="float" office:value="974087" table:style-name="ce1">
            <text:p>97408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3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string" office:string-value="EDD0B" table:formula="of:=DEC2HEX([.C1232])" table:style-name="ce1">
            <text:p>EDD0B</text:p>
          </table:table-cell>
          <table:table-cell office:value-type="float" office:value="974091" table:style-name="ce1">
            <text:p>9740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3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string" office:string-value="EDD0F" table:formula="of:=DEC2HEX([.C1233])" table:style-name="ce1">
            <text:p>EDD0F</text:p>
          </table:table-cell>
          <table:table-cell office:value-type="float" office:value="974095" table:style-name="ce1">
            <text:p>97409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3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string" office:string-value="EDD13" table:formula="of:=DEC2HEX([.C1234])" table:style-name="ce1">
            <text:p>EDD13</text:p>
          </table:table-cell>
          <table:table-cell office:value-type="float" office:value="974099" table:style-name="ce1">
            <text:p>9740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3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string" office:string-value="EDD17" table:formula="of:=DEC2HEX([.C1235])" table:style-name="ce1">
            <text:p>EDD17</text:p>
          </table:table-cell>
          <table:table-cell office:value-type="float" office:value="974103" table:style-name="ce1">
            <text:p>9741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3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string" office:string-value="EDD1B" table:formula="of:=DEC2HEX([.C1236])" table:style-name="ce1">
            <text:p>EDD1B</text:p>
          </table:table-cell>
          <table:table-cell office:value-type="float" office:value="974107" table:style-name="ce1">
            <text:p>9741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3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string" office:string-value="EDD1F" table:formula="of:=DEC2HEX([.C1237])" table:style-name="ce1">
            <text:p>EDD1F</text:p>
          </table:table-cell>
          <table:table-cell office:value-type="float" office:value="974111" table:style-name="ce1">
            <text:p>9741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3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string" office:string-value="EDD23" table:formula="of:=DEC2HEX([.C1238])" table:style-name="ce1">
            <text:p>EDD23</text:p>
          </table:table-cell>
          <table:table-cell office:value-type="float" office:value="974115" table:style-name="ce1">
            <text:p>974115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23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string" office:string-value="EDD24" table:formula="of:=DEC2HEX([.C1239])" table:style-name="ce1">
            <text:p>EDD24</text:p>
          </table:table-cell>
          <table:table-cell office:value-type="float" office:value="974116" table:style-name="ce1">
            <text:p>97411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3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string" office:string-value="EDD28" table:formula="of:=DEC2HEX([.C1240])" table:style-name="ce1">
            <text:p>EDD28</text:p>
          </table:table-cell>
          <table:table-cell office:value-type="float" office:value="974120" table:style-name="ce1">
            <text:p>97412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4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string" office:string-value="EDD2C" table:formula="of:=DEC2HEX([.C1241])" table:style-name="ce1">
            <text:p>EDD2C</text:p>
          </table:table-cell>
          <table:table-cell office:value-type="float" office:value="974124" table:style-name="ce1">
            <text:p>97412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4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string" office:string-value="EDD30" table:formula="of:=DEC2HEX([.C1242])" table:style-name="ce1">
            <text:p>EDD30</text:p>
          </table:table-cell>
          <table:table-cell office:value-type="float" office:value="974128" table:style-name="ce1">
            <text:p>97412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4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string" office:string-value="EDD34" table:formula="of:=DEC2HEX([.C1243])" table:style-name="ce1">
            <text:p>EDD34</text:p>
          </table:table-cell>
          <table:table-cell office:value-type="float" office:value="974132" table:style-name="ce1">
            <text:p>97413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4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string" office:string-value="EDD38" table:formula="of:=DEC2HEX([.C1244])" table:style-name="ce1">
            <text:p>EDD38</text:p>
          </table:table-cell>
          <table:table-cell office:value-type="float" office:value="974136" table:style-name="ce1">
            <text:p>97413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4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string" office:string-value="EDD3C" table:formula="of:=DEC2HEX([.C1245])" table:style-name="ce1">
            <text:p>EDD3C</text:p>
          </table:table-cell>
          <table:table-cell office:value-type="float" office:value="974140" table:style-name="ce1">
            <text:p>974140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24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string" office:string-value="EDD47" table:formula="of:=DEC2HEX([.C1246])" table:style-name="ce1">
            <text:p>EDD47</text:p>
          </table:table-cell>
          <table:table-cell office:value-type="float" office:value="974151" table:style-name="ce1">
            <text:p>97415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4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string" office:string-value="EDD4B" table:formula="of:=DEC2HEX([.C1247])" table:style-name="ce1">
            <text:p>EDD4B</text:p>
          </table:table-cell>
          <table:table-cell office:value-type="float" office:value="974155" table:style-name="ce1">
            <text:p>9741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4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string" office:string-value="EDD4F" table:formula="of:=DEC2HEX([.C1248])" table:style-name="ce1">
            <text:p>EDD4F</text:p>
          </table:table-cell>
          <table:table-cell office:value-type="float" office:value="974159" table:style-name="ce1">
            <text:p>9741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4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string" office:string-value="EDD53" table:formula="of:=DEC2HEX([.C1249])" table:style-name="ce1">
            <text:p>EDD53</text:p>
          </table:table-cell>
          <table:table-cell office:value-type="float" office:value="974163" table:style-name="ce1">
            <text:p>9741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4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string" office:string-value="EDD57" table:formula="of:=DEC2HEX([.C1250])" table:style-name="ce1">
            <text:p>EDD57</text:p>
          </table:table-cell>
          <table:table-cell office:value-type="float" office:value="974167" table:style-name="ce1">
            <text:p>9741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5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string" office:string-value="EDD5B" table:formula="of:=DEC2HEX([.C1251])" table:style-name="ce1">
            <text:p>EDD5B</text:p>
          </table:table-cell>
          <table:table-cell office:value-type="float" office:value="974171" table:style-name="ce1">
            <text:p>97417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5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string" office:string-value="EDD5F" table:formula="of:=DEC2HEX([.C1252])" table:style-name="ce1">
            <text:p>EDD5F</text:p>
          </table:table-cell>
          <table:table-cell office:value-type="float" office:value="974175" table:style-name="ce1">
            <text:p>97417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5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string" office:string-value="EDD63" table:formula="of:=DEC2HEX([.C1253])" table:style-name="ce1">
            <text:p>EDD63</text:p>
          </table:table-cell>
          <table:table-cell office:value-type="float" office:value="974179" table:style-name="ce1">
            <text:p>974179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25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string" office:string-value="EDD64" table:formula="of:=DEC2HEX([.C1254])" table:style-name="ce1">
            <text:p>EDD64</text:p>
          </table:table-cell>
          <table:table-cell office:value-type="float" office:value="974180" table:style-name="ce1">
            <text:p>97418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5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string" office:string-value="EDD68" table:formula="of:=DEC2HEX([.C1255])" table:style-name="ce1">
            <text:p>EDD68</text:p>
          </table:table-cell>
          <table:table-cell office:value-type="float" office:value="974184" table:style-name="ce1">
            <text:p>97418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5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string" office:string-value="EDD6C" table:formula="of:=DEC2HEX([.C1256])" table:style-name="ce1">
            <text:p>EDD6C</text:p>
          </table:table-cell>
          <table:table-cell office:value-type="float" office:value="974188" table:style-name="ce1">
            <text:p>9741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5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string" office:string-value="EDD70" table:formula="of:=DEC2HEX([.C1257])" table:style-name="ce1">
            <text:p>EDD70</text:p>
          </table:table-cell>
          <table:table-cell office:value-type="float" office:value="974192" table:style-name="ce1">
            <text:p>9741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5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string" office:string-value="EDD74" table:formula="of:=DEC2HEX([.C1258])" table:style-name="ce1">
            <text:p>EDD74</text:p>
          </table:table-cell>
          <table:table-cell office:value-type="float" office:value="974196" table:style-name="ce1">
            <text:p>9741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5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string" office:string-value="EDD78" table:formula="of:=DEC2HEX([.C1259])" table:style-name="ce1">
            <text:p>EDD78</text:p>
          </table:table-cell>
          <table:table-cell office:value-type="float" office:value="974200" table:style-name="ce1">
            <text:p>97420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5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string" office:string-value="EDD7C" table:formula="of:=DEC2HEX([.C1260])" table:style-name="ce1">
            <text:p>EDD7C</text:p>
          </table:table-cell>
          <table:table-cell office:value-type="float" office:value="974204" table:style-name="ce1">
            <text:p>974204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26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string" office:string-value="EDD87" table:formula="of:=DEC2HEX([.C1261])" table:style-name="ce1">
            <text:p>EDD87</text:p>
          </table:table-cell>
          <table:table-cell office:value-type="float" office:value="974215" table:style-name="ce1">
            <text:p>97421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6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string" office:string-value="EDD8B" table:formula="of:=DEC2HEX([.C1262])" table:style-name="ce1">
            <text:p>EDD8B</text:p>
          </table:table-cell>
          <table:table-cell office:value-type="float" office:value="974219" table:style-name="ce1">
            <text:p>9742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6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string" office:string-value="EDD8F" table:formula="of:=DEC2HEX([.C1263])" table:style-name="ce1">
            <text:p>EDD8F</text:p>
          </table:table-cell>
          <table:table-cell office:value-type="float" office:value="974223" table:style-name="ce1">
            <text:p>9742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6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string" office:string-value="EDD93" table:formula="of:=DEC2HEX([.C1264])" table:style-name="ce1">
            <text:p>EDD93</text:p>
          </table:table-cell>
          <table:table-cell office:value-type="float" office:value="974227" table:style-name="ce1">
            <text:p>9742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6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string" office:string-value="EDD97" table:formula="of:=DEC2HEX([.C1265])" table:style-name="ce1">
            <text:p>EDD97</text:p>
          </table:table-cell>
          <table:table-cell office:value-type="float" office:value="974231" table:style-name="ce1">
            <text:p>97423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6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string" office:string-value="EDD9B" table:formula="of:=DEC2HEX([.C1266])" table:style-name="ce1">
            <text:p>EDD9B</text:p>
          </table:table-cell>
          <table:table-cell office:value-type="float" office:value="974235" table:style-name="ce1">
            <text:p>97423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6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string" office:string-value="EDD9F" table:formula="of:=DEC2HEX([.C1267])" table:style-name="ce1">
            <text:p>EDD9F</text:p>
          </table:table-cell>
          <table:table-cell office:value-type="float" office:value="974239" table:style-name="ce1">
            <text:p>97423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6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string" office:string-value="EDDA3" table:formula="of:=DEC2HEX([.C1268])" table:style-name="ce1">
            <text:p>EDDA3</text:p>
          </table:table-cell>
          <table:table-cell office:value-type="float" office:value="974243" table:style-name="ce1">
            <text:p>974243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26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string" office:string-value="EDDA4" table:formula="of:=DEC2HEX([.C1269])" table:style-name="ce1">
            <text:p>EDDA4</text:p>
          </table:table-cell>
          <table:table-cell office:value-type="float" office:value="974244" table:style-name="ce1">
            <text:p>9742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6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string" office:string-value="EDDA8" table:formula="of:=DEC2HEX([.C1270])" table:style-name="ce1">
            <text:p>EDDA8</text:p>
          </table:table-cell>
          <table:table-cell office:value-type="float" office:value="974248" table:style-name="ce1">
            <text:p>9742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7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string" office:string-value="EDDAC" table:formula="of:=DEC2HEX([.C1271])" table:style-name="ce1">
            <text:p>EDDAC</text:p>
          </table:table-cell>
          <table:table-cell office:value-type="float" office:value="974252" table:style-name="ce1">
            <text:p>9742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7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string" office:string-value="EDDB0" table:formula="of:=DEC2HEX([.C1272])" table:style-name="ce1">
            <text:p>EDDB0</text:p>
          </table:table-cell>
          <table:table-cell office:value-type="float" office:value="974256" table:style-name="ce1">
            <text:p>97425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7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string" office:string-value="EDDB4" table:formula="of:=DEC2HEX([.C1273])" table:style-name="ce1">
            <text:p>EDDB4</text:p>
          </table:table-cell>
          <table:table-cell office:value-type="float" office:value="974260" table:style-name="ce1">
            <text:p>97426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7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string" office:string-value="EDDB8" table:formula="of:=DEC2HEX([.C1274])" table:style-name="ce1">
            <text:p>EDDB8</text:p>
          </table:table-cell>
          <table:table-cell office:value-type="float" office:value="974264" table:style-name="ce1">
            <text:p>97426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7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string" office:string-value="EDDBC" table:formula="of:=DEC2HEX([.C1275])" table:style-name="ce1">
            <text:p>EDDBC</text:p>
          </table:table-cell>
          <table:table-cell office:value-type="float" office:value="974268" table:style-name="ce1">
            <text:p>974268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27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string" office:string-value="EDDC7" table:formula="of:=DEC2HEX([.C1276])" table:style-name="ce1">
            <text:p>EDDC7</text:p>
          </table:table-cell>
          <table:table-cell office:value-type="float" office:value="974279" table:style-name="ce1">
            <text:p>97427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7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string" office:string-value="EDDCB" table:formula="of:=DEC2HEX([.C1277])" table:style-name="ce1">
            <text:p>EDDCB</text:p>
          </table:table-cell>
          <table:table-cell office:value-type="float" office:value="974283" table:style-name="ce1">
            <text:p>97428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7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string" office:string-value="EDDCF" table:formula="of:=DEC2HEX([.C1278])" table:style-name="ce1">
            <text:p>EDDCF</text:p>
          </table:table-cell>
          <table:table-cell office:value-type="float" office:value="974287" table:style-name="ce1">
            <text:p>97428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7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string" office:string-value="EDDD3" table:formula="of:=DEC2HEX([.C1279])" table:style-name="ce1">
            <text:p>EDDD3</text:p>
          </table:table-cell>
          <table:table-cell office:value-type="float" office:value="974291" table:style-name="ce1">
            <text:p>97429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7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string" office:string-value="EDDD7" table:formula="of:=DEC2HEX([.C1280])" table:style-name="ce1">
            <text:p>EDDD7</text:p>
          </table:table-cell>
          <table:table-cell office:value-type="float" office:value="974295" table:style-name="ce1">
            <text:p>97429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8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string" office:string-value="EDDDB" table:formula="of:=DEC2HEX([.C1281])" table:style-name="ce1">
            <text:p>EDDDB</text:p>
          </table:table-cell>
          <table:table-cell office:value-type="float" office:value="974299" table:style-name="ce1">
            <text:p>97429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8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string" office:string-value="EDDDF" table:formula="of:=DEC2HEX([.C1282])" table:style-name="ce1">
            <text:p>EDDDF</text:p>
          </table:table-cell>
          <table:table-cell office:value-type="float" office:value="974303" table:style-name="ce1">
            <text:p>97430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8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string" office:string-value="EDDE3" table:formula="of:=DEC2HEX([.C1283])" table:style-name="ce1">
            <text:p>EDDE3</text:p>
          </table:table-cell>
          <table:table-cell office:value-type="float" office:value="974307" table:style-name="ce1">
            <text:p>974307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28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string" office:string-value="EDDE4" table:formula="of:=DEC2HEX([.C1284])" table:style-name="ce1">
            <text:p>EDDE4</text:p>
          </table:table-cell>
          <table:table-cell office:value-type="float" office:value="974308" table:style-name="ce1">
            <text:p>97430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8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string" office:string-value="EDDE8" table:formula="of:=DEC2HEX([.C1285])" table:style-name="ce1">
            <text:p>EDDE8</text:p>
          </table:table-cell>
          <table:table-cell office:value-type="float" office:value="974312" table:style-name="ce1">
            <text:p>97431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8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string" office:string-value="EDDEC" table:formula="of:=DEC2HEX([.C1286])" table:style-name="ce1">
            <text:p>EDDEC</text:p>
          </table:table-cell>
          <table:table-cell office:value-type="float" office:value="974316" table:style-name="ce1">
            <text:p>97431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8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string" office:string-value="EDDF0" table:formula="of:=DEC2HEX([.C1287])" table:style-name="ce1">
            <text:p>EDDF0</text:p>
          </table:table-cell>
          <table:table-cell office:value-type="float" office:value="974320" table:style-name="ce1">
            <text:p>97432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8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string" office:string-value="EDDF4" table:formula="of:=DEC2HEX([.C1288])" table:style-name="ce1">
            <text:p>EDDF4</text:p>
          </table:table-cell>
          <table:table-cell office:value-type="float" office:value="974324" table:style-name="ce1">
            <text:p>97432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8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string" office:string-value="EDDF8" table:formula="of:=DEC2HEX([.C1289])" table:style-name="ce1">
            <text:p>EDDF8</text:p>
          </table:table-cell>
          <table:table-cell office:value-type="float" office:value="974328" table:style-name="ce1">
            <text:p>97432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8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string" office:string-value="EDDFC" table:formula="of:=DEC2HEX([.C1290])" table:style-name="ce1">
            <text:p>EDDFC</text:p>
          </table:table-cell>
          <table:table-cell office:value-type="float" office:value="974332" table:style-name="ce1">
            <text:p>974332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29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string" office:string-value="EDE07" table:formula="of:=DEC2HEX([.C1291])" table:style-name="ce1">
            <text:p>EDE07</text:p>
          </table:table-cell>
          <table:table-cell office:value-type="float" office:value="974343" table:style-name="ce1">
            <text:p>97434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9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string" office:string-value="EDE0B" table:formula="of:=DEC2HEX([.C1292])" table:style-name="ce1">
            <text:p>EDE0B</text:p>
          </table:table-cell>
          <table:table-cell office:value-type="float" office:value="974347" table:style-name="ce1">
            <text:p>97434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9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string" office:string-value="EDE0F" table:formula="of:=DEC2HEX([.C1293])" table:style-name="ce1">
            <text:p>EDE0F</text:p>
          </table:table-cell>
          <table:table-cell office:value-type="float" office:value="974351" table:style-name="ce1">
            <text:p>97435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9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string" office:string-value="EDE13" table:formula="of:=DEC2HEX([.C1294])" table:style-name="ce1">
            <text:p>EDE13</text:p>
          </table:table-cell>
          <table:table-cell office:value-type="float" office:value="974355" table:style-name="ce1">
            <text:p>97435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9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string" office:string-value="EDE17" table:formula="of:=DEC2HEX([.C1295])" table:style-name="ce1">
            <text:p>EDE17</text:p>
          </table:table-cell>
          <table:table-cell office:value-type="float" office:value="974359" table:style-name="ce1">
            <text:p>9743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9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string" office:string-value="EDE1B" table:formula="of:=DEC2HEX([.C1296])" table:style-name="ce1">
            <text:p>EDE1B</text:p>
          </table:table-cell>
          <table:table-cell office:value-type="float" office:value="974363" table:style-name="ce1">
            <text:p>9743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9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string" office:string-value="EDE1F" table:formula="of:=DEC2HEX([.C1297])" table:style-name="ce1">
            <text:p>EDE1F</text:p>
          </table:table-cell>
          <table:table-cell office:value-type="float" office:value="974367" table:style-name="ce1">
            <text:p>9743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9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string" office:string-value="EDE23" table:formula="of:=DEC2HEX([.C1298])" table:style-name="ce1">
            <text:p>EDE23</text:p>
          </table:table-cell>
          <table:table-cell office:value-type="float" office:value="974371" table:style-name="ce1">
            <text:p>97437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29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string" office:string-value="EDE24" table:formula="of:=DEC2HEX([.C1299])" table:style-name="ce1">
            <text:p>EDE24</text:p>
          </table:table-cell>
          <table:table-cell office:value-type="float" office:value="974372" table:style-name="ce1">
            <text:p>97437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29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string" office:string-value="EDE28" table:formula="of:=DEC2HEX([.C1300])" table:style-name="ce1">
            <text:p>EDE28</text:p>
          </table:table-cell>
          <table:table-cell office:value-type="float" office:value="974376" table:style-name="ce1">
            <text:p>97437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0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string" office:string-value="EDE2C" table:formula="of:=DEC2HEX([.C1301])" table:style-name="ce1">
            <text:p>EDE2C</text:p>
          </table:table-cell>
          <table:table-cell office:value-type="float" office:value="974380" table:style-name="ce1">
            <text:p>97438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0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string" office:string-value="EDE30" table:formula="of:=DEC2HEX([.C1302])" table:style-name="ce1">
            <text:p>EDE30</text:p>
          </table:table-cell>
          <table:table-cell office:value-type="float" office:value="974384" table:style-name="ce1">
            <text:p>97438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0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string" office:string-value="EDE34" table:formula="of:=DEC2HEX([.C1303])" table:style-name="ce1">
            <text:p>EDE34</text:p>
          </table:table-cell>
          <table:table-cell office:value-type="float" office:value="974388" table:style-name="ce1">
            <text:p>9743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0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string" office:string-value="EDE38" table:formula="of:=DEC2HEX([.C1304])" table:style-name="ce1">
            <text:p>EDE38</text:p>
          </table:table-cell>
          <table:table-cell office:value-type="float" office:value="974392" table:style-name="ce1">
            <text:p>9743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0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string" office:string-value="EDE3C" table:formula="of:=DEC2HEX([.C1305])" table:style-name="ce1">
            <text:p>EDE3C</text:p>
          </table:table-cell>
          <table:table-cell office:value-type="float" office:value="974396" table:style-name="ce1">
            <text:p>974396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IF([.D130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string" office:string-value="EDE47" table:formula="of:=DEC2HEX([.C1306])" table:style-name="ce1">
            <text:p>EDE47</text:p>
          </table:table-cell>
          <table:table-cell office:value-type="float" office:value="974407" table:style-name="ce1">
            <text:p>97440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0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string" office:string-value="EDE4B" table:formula="of:=DEC2HEX([.C1307])" table:style-name="ce1">
            <text:p>EDE4B</text:p>
          </table:table-cell>
          <table:table-cell office:value-type="float" office:value="974411" table:style-name="ce1">
            <text:p>97441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0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string" office:string-value="EDE4F" table:formula="of:=DEC2HEX([.C1308])" table:style-name="ce1">
            <text:p>EDE4F</text:p>
          </table:table-cell>
          <table:table-cell office:value-type="float" office:value="974415" table:style-name="ce1">
            <text:p>97441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0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string" office:string-value="EDE53" table:formula="of:=DEC2HEX([.C1309])" table:style-name="ce1">
            <text:p>EDE53</text:p>
          </table:table-cell>
          <table:table-cell office:value-type="float" office:value="974419" table:style-name="ce1">
            <text:p>97441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0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string" office:string-value="EDE57" table:formula="of:=DEC2HEX([.C1310])" table:style-name="ce1">
            <text:p>EDE57</text:p>
          </table:table-cell>
          <table:table-cell office:value-type="float" office:value="974423" table:style-name="ce1">
            <text:p>97442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1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office:string-value="EDE5B" table:formula="of:=DEC2HEX([.C1311])" table:style-name="ce1">
            <text:p>EDE5B</text:p>
          </table:table-cell>
          <table:table-cell office:value-type="float" office:value="974427" table:style-name="ce1">
            <text:p>97442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1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string" office:string-value="EDE5F" table:formula="of:=DEC2HEX([.C1312])" table:style-name="ce1">
            <text:p>EDE5F</text:p>
          </table:table-cell>
          <table:table-cell office:value-type="float" office:value="974431" table:style-name="ce1">
            <text:p>97443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1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string" office:string-value="EDE63" table:formula="of:=DEC2HEX([.C1313])" table:style-name="ce1">
            <text:p>EDE63</text:p>
          </table:table-cell>
          <table:table-cell office:value-type="float" office:value="974435" table:style-name="ce1">
            <text:p>974435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31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string" office:string-value="EDE64" table:formula="of:=DEC2HEX([.C1314])" table:style-name="ce1">
            <text:p>EDE64</text:p>
          </table:table-cell>
          <table:table-cell office:value-type="float" office:value="974436" table:style-name="ce1">
            <text:p>97443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1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string" office:string-value="EDE68" table:formula="of:=DEC2HEX([.C1315])" table:style-name="ce1">
            <text:p>EDE68</text:p>
          </table:table-cell>
          <table:table-cell office:value-type="float" office:value="974440" table:style-name="ce1">
            <text:p>97444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1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string" office:string-value="EDE6C" table:formula="of:=DEC2HEX([.C1316])" table:style-name="ce1">
            <text:p>EDE6C</text:p>
          </table:table-cell>
          <table:table-cell office:value-type="float" office:value="974444" table:style-name="ce1">
            <text:p>9744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1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string" office:string-value="EDE70" table:formula="of:=DEC2HEX([.C1317])" table:style-name="ce1">
            <text:p>EDE70</text:p>
          </table:table-cell>
          <table:table-cell office:value-type="float" office:value="974448" table:style-name="ce1">
            <text:p>9744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1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string" office:string-value="EDE74" table:formula="of:=DEC2HEX([.C1318])" table:style-name="ce1">
            <text:p>EDE74</text:p>
          </table:table-cell>
          <table:table-cell office:value-type="float" office:value="974452" table:style-name="ce1">
            <text:p>9744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1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string" office:string-value="EDE78" table:formula="of:=DEC2HEX([.C1319])" table:style-name="ce1">
            <text:p>EDE78</text:p>
          </table:table-cell>
          <table:table-cell office:value-type="float" office:value="974456" table:style-name="ce1">
            <text:p>97445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1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string" office:string-value="EDE7C" table:formula="of:=DEC2HEX([.C1320])" table:style-name="ce1">
            <text:p>EDE7C</text:p>
          </table:table-cell>
          <table:table-cell office:value-type="float" office:value="974460" table:style-name="ce1">
            <text:p>97446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2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string" office:string-value="EDE80" table:formula="of:=DEC2HEX([.C1321])" table:style-name="ce1">
            <text:p>EDE80</text:p>
          </table:table-cell>
          <table:table-cell office:value-type="float" office:value="974464" table:style-name="ce1">
            <text:p>97446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2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string" office:string-value="EDE84" table:formula="of:=DEC2HEX([.C1322])" table:style-name="ce1">
            <text:p>EDE84</text:p>
          </table:table-cell>
          <table:table-cell office:value-type="float" office:value="974468" table:style-name="ce1">
            <text:p>97446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2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string" office:string-value="EDE88" table:formula="of:=DEC2HEX([.C1323])" table:style-name="ce1">
            <text:p>EDE88</text:p>
          </table:table-cell>
          <table:table-cell office:value-type="float" office:value="974472" table:style-name="ce1">
            <text:p>97447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2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string" office:string-value="EDE8C" table:formula="of:=DEC2HEX([.C1324])" table:style-name="ce1">
            <text:p>EDE8C</text:p>
          </table:table-cell>
          <table:table-cell office:value-type="float" office:value="974476" table:style-name="ce1">
            <text:p>97447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2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string" office:string-value="EDE90" table:formula="of:=DEC2HEX([.C1325])" table:style-name="ce1">
            <text:p>EDE90</text:p>
          </table:table-cell>
          <table:table-cell office:value-type="float" office:value="974480" table:style-name="ce1">
            <text:p>97448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2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string" office:string-value="EDE94" table:formula="of:=DEC2HEX([.C1326])" table:style-name="ce1">
            <text:p>EDE94</text:p>
          </table:table-cell>
          <table:table-cell office:value-type="float" office:value="974484" table:style-name="ce1">
            <text:p>97448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2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string" office:string-value="EDE98" table:formula="of:=DEC2HEX([.C1327])" table:style-name="ce1">
            <text:p>EDE98</text:p>
          </table:table-cell>
          <table:table-cell office:value-type="float" office:value="974488" table:style-name="ce1">
            <text:p>9744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2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string" office:string-value="EDE9C" table:formula="of:=DEC2HEX([.C1328])" table:style-name="ce1">
            <text:p>EDE9C</text:p>
          </table:table-cell>
          <table:table-cell office:value-type="float" office:value="974492" table:style-name="ce1">
            <text:p>9744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2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string" office:string-value="EDEA0" table:formula="of:=DEC2HEX([.C1329])" table:style-name="ce1">
            <text:p>EDEA0</text:p>
          </table:table-cell>
          <table:table-cell office:value-type="float" office:value="974496" table:style-name="ce1">
            <text:p>9744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2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string" office:string-value="EDEA4" table:formula="of:=DEC2HEX([.C1330])" table:style-name="ce1">
            <text:p>EDEA4</text:p>
          </table:table-cell>
          <table:table-cell office:value-type="float" office:value="974500" table:style-name="ce1">
            <text:p>97450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3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string" office:string-value="EDEA8" table:formula="of:=DEC2HEX([.C1331])" table:style-name="ce1">
            <text:p>EDEA8</text:p>
          </table:table-cell>
          <table:table-cell office:value-type="float" office:value="974504" table:style-name="ce1">
            <text:p>97450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3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string" office:string-value="EDEAC" table:formula="of:=DEC2HEX([.C1332])" table:style-name="ce1">
            <text:p>EDEAC</text:p>
          </table:table-cell>
          <table:table-cell office:value-type="float" office:value="974508" table:style-name="ce1">
            <text:p>97450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3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string" office:string-value="EDEB0" table:formula="of:=DEC2HEX([.C1333])" table:style-name="ce1">
            <text:p>EDEB0</text:p>
          </table:table-cell>
          <table:table-cell office:value-type="float" office:value="974512" table:style-name="ce1">
            <text:p>97451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3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string" office:string-value="EDEB4" table:formula="of:=DEC2HEX([.C1334])" table:style-name="ce1">
            <text:p>EDEB4</text:p>
          </table:table-cell>
          <table:table-cell office:value-type="float" office:value="974516" table:style-name="ce1">
            <text:p>97451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3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string" office:string-value="EDEB8" table:formula="of:=DEC2HEX([.C1335])" table:style-name="ce1">
            <text:p>EDEB8</text:p>
          </table:table-cell>
          <table:table-cell office:value-type="float" office:value="974520" table:style-name="ce1">
            <text:p>97452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3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string" office:string-value="EDEBC" table:formula="of:=DEC2HEX([.C1336])" table:style-name="ce1">
            <text:p>EDEBC</text:p>
          </table:table-cell>
          <table:table-cell office:value-type="float" office:value="974524" table:style-name="ce1">
            <text:p>97452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3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string" office:string-value="EDEC0" table:formula="of:=DEC2HEX([.C1337])" table:style-name="ce1">
            <text:p>EDEC0</text:p>
          </table:table-cell>
          <table:table-cell office:value-type="float" office:value="974528" table:style-name="ce1">
            <text:p>97452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3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string" office:string-value="EDEC4" table:formula="of:=DEC2HEX([.C1338])" table:style-name="ce1">
            <text:p>EDEC4</text:p>
          </table:table-cell>
          <table:table-cell office:value-type="float" office:value="974532" table:style-name="ce1">
            <text:p>97453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3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string" office:string-value="EDEC8" table:formula="of:=DEC2HEX([.C1339])" table:style-name="ce1">
            <text:p>EDEC8</text:p>
          </table:table-cell>
          <table:table-cell office:value-type="float" office:value="974536" table:style-name="ce1">
            <text:p>97453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3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string" office:string-value="EDECC" table:formula="of:=DEC2HEX([.C1340])" table:style-name="ce1">
            <text:p>EDECC</text:p>
          </table:table-cell>
          <table:table-cell office:value-type="float" office:value="974540" table:style-name="ce1">
            <text:p>97454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4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string" office:string-value="EDED0" table:formula="of:=DEC2HEX([.C1341])" table:style-name="ce1">
            <text:p>EDED0</text:p>
          </table:table-cell>
          <table:table-cell office:value-type="float" office:value="974544" table:style-name="ce1">
            <text:p>9745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4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string" office:string-value="EDED4" table:formula="of:=DEC2HEX([.C1342])" table:style-name="ce1">
            <text:p>EDED4</text:p>
          </table:table-cell>
          <table:table-cell office:value-type="float" office:value="974548" table:style-name="ce1">
            <text:p>9745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4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string" office:string-value="EDED8" table:formula="of:=DEC2HEX([.C1343])" table:style-name="ce1">
            <text:p>EDED8</text:p>
          </table:table-cell>
          <table:table-cell office:value-type="float" office:value="974552" table:style-name="ce1">
            <text:p>9745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4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string" office:string-value="EDEDC" table:formula="of:=DEC2HEX([.C1344])" table:style-name="ce1">
            <text:p>EDEDC</text:p>
          </table:table-cell>
          <table:table-cell office:value-type="float" office:value="974556" table:style-name="ce1">
            <text:p>97455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4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string" office:string-value="EDEE0" table:formula="of:=DEC2HEX([.C1345])" table:style-name="ce1">
            <text:p>EDEE0</text:p>
          </table:table-cell>
          <table:table-cell office:value-type="float" office:value="974560" table:style-name="ce1">
            <text:p>97456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4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string" office:string-value="EDEE4" table:formula="of:=DEC2HEX([.C1346])" table:style-name="ce1">
            <text:p>EDEE4</text:p>
          </table:table-cell>
          <table:table-cell office:value-type="float" office:value="974564" table:style-name="ce1">
            <text:p>97456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4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string" office:string-value="EDEE8" table:formula="of:=DEC2HEX([.C1347])" table:style-name="ce1">
            <text:p>EDEE8</text:p>
          </table:table-cell>
          <table:table-cell office:value-type="float" office:value="974568" table:style-name="ce1">
            <text:p>97456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4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string" office:string-value="EDEEC" table:formula="of:=DEC2HEX([.C1348])" table:style-name="ce1">
            <text:p>EDEEC</text:p>
          </table:table-cell>
          <table:table-cell office:value-type="float" office:value="974572" table:style-name="ce1">
            <text:p>97457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4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string" office:string-value="EDEF0" table:formula="of:=DEC2HEX([.C1349])" table:style-name="ce1">
            <text:p>EDEF0</text:p>
          </table:table-cell>
          <table:table-cell office:value-type="float" office:value="974576" table:style-name="ce1">
            <text:p>97457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4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string" office:string-value="EDEF4" table:formula="of:=DEC2HEX([.C1350])" table:style-name="ce1">
            <text:p>EDEF4</text:p>
          </table:table-cell>
          <table:table-cell office:value-type="float" office:value="974580" table:style-name="ce1">
            <text:p>97458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5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string" office:string-value="EDEF8" table:formula="of:=DEC2HEX([.C1351])" table:style-name="ce1">
            <text:p>EDEF8</text:p>
          </table:table-cell>
          <table:table-cell office:value-type="float" office:value="974584" table:style-name="ce1">
            <text:p>97458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5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string" office:string-value="EDEFC" table:formula="of:=DEC2HEX([.C1352])" table:style-name="ce1">
            <text:p>EDEFC</text:p>
          </table:table-cell>
          <table:table-cell office:value-type="float" office:value="974588" table:style-name="ce1">
            <text:p>9745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5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string" office:string-value="EDF00" table:formula="of:=DEC2HEX([.C1353])" table:style-name="ce1">
            <text:p>EDF00</text:p>
          </table:table-cell>
          <table:table-cell office:value-type="float" office:value="974592" table:style-name="ce1">
            <text:p>9745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5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string" office:string-value="EDF04" table:formula="of:=DEC2HEX([.C1354])" table:style-name="ce1">
            <text:p>EDF04</text:p>
          </table:table-cell>
          <table:table-cell office:value-type="float" office:value="974596" table:style-name="ce1">
            <text:p>9745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5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string" office:string-value="EDF08" table:formula="of:=DEC2HEX([.C1355])" table:style-name="ce1">
            <text:p>EDF08</text:p>
          </table:table-cell>
          <table:table-cell office:value-type="float" office:value="974600" table:style-name="ce1">
            <text:p>97460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5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string" office:string-value="EDF0C" table:formula="of:=DEC2HEX([.C1356])" table:style-name="ce1">
            <text:p>EDF0C</text:p>
          </table:table-cell>
          <table:table-cell office:value-type="float" office:value="974604" table:style-name="ce1">
            <text:p>97460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5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string" office:string-value="EDF10" table:formula="of:=DEC2HEX([.C1357])" table:style-name="ce1">
            <text:p>EDF10</text:p>
          </table:table-cell>
          <table:table-cell office:value-type="float" office:value="974608" table:style-name="ce1">
            <text:p>97460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5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string" office:string-value="EDF14" table:formula="of:=DEC2HEX([.C1358])" table:style-name="ce1">
            <text:p>EDF14</text:p>
          </table:table-cell>
          <table:table-cell office:value-type="float" office:value="974612" table:style-name="ce1">
            <text:p>97461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5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string" office:string-value="EDF18" table:formula="of:=DEC2HEX([.C1359])" table:style-name="ce1">
            <text:p>EDF18</text:p>
          </table:table-cell>
          <table:table-cell office:value-type="float" office:value="974616" table:style-name="ce1">
            <text:p>97461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5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string" office:string-value="EDF1C" table:formula="of:=DEC2HEX([.C1360])" table:style-name="ce1">
            <text:p>EDF1C</text:p>
          </table:table-cell>
          <table:table-cell office:value-type="float" office:value="974620" table:style-name="ce1">
            <text:p>97462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6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string" office:string-value="EDF20" table:formula="of:=DEC2HEX([.C1361])" table:style-name="ce1">
            <text:p>EDF20</text:p>
          </table:table-cell>
          <table:table-cell office:value-type="float" office:value="974624" table:style-name="ce1">
            <text:p>97462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6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string" office:string-value="EDF24" table:formula="of:=DEC2HEX([.C1362])" table:style-name="ce1">
            <text:p>EDF24</text:p>
          </table:table-cell>
          <table:table-cell office:value-type="float" office:value="974628" table:style-name="ce1">
            <text:p>97462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6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string" office:string-value="EDF28" table:formula="of:=DEC2HEX([.C1363])" table:style-name="ce1">
            <text:p>EDF28</text:p>
          </table:table-cell>
          <table:table-cell office:value-type="float" office:value="974632" table:style-name="ce1">
            <text:p>97463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6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string" office:string-value="EDF2C" table:formula="of:=DEC2HEX([.C1364])" table:style-name="ce1">
            <text:p>EDF2C</text:p>
          </table:table-cell>
          <table:table-cell office:value-type="float" office:value="974636" table:style-name="ce1">
            <text:p>97463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6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string" office:string-value="EDF30" table:formula="of:=DEC2HEX([.C1365])" table:style-name="ce1">
            <text:p>EDF30</text:p>
          </table:table-cell>
          <table:table-cell office:value-type="float" office:value="974640" table:style-name="ce1">
            <text:p>97464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6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string" office:string-value="EDF34" table:formula="of:=DEC2HEX([.C1366])" table:style-name="ce1">
            <text:p>EDF34</text:p>
          </table:table-cell>
          <table:table-cell office:value-type="float" office:value="974644" table:style-name="ce1">
            <text:p>9746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6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string" office:string-value="EDF38" table:formula="of:=DEC2HEX([.C1367])" table:style-name="ce1">
            <text:p>EDF38</text:p>
          </table:table-cell>
          <table:table-cell office:value-type="float" office:value="974648" table:style-name="ce1">
            <text:p>9746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6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string" office:string-value="EDF3C" table:formula="of:=DEC2HEX([.C1368])" table:style-name="ce1">
            <text:p>EDF3C</text:p>
          </table:table-cell>
          <table:table-cell office:value-type="float" office:value="974652" table:style-name="ce1">
            <text:p>9746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6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string" office:string-value="EDF40" table:formula="of:=DEC2HEX([.C1369])" table:style-name="ce1">
            <text:p>EDF40</text:p>
          </table:table-cell>
          <table:table-cell office:value-type="float" office:value="974656" table:style-name="ce1">
            <text:p>97465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6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string" office:string-value="EDF44" table:formula="of:=DEC2HEX([.C1370])" table:style-name="ce1">
            <text:p>EDF44</text:p>
          </table:table-cell>
          <table:table-cell office:value-type="float" office:value="974660" table:style-name="ce1">
            <text:p>97466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7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string" office:string-value="EDF48" table:formula="of:=DEC2HEX([.C1371])" table:style-name="ce1">
            <text:p>EDF48</text:p>
          </table:table-cell>
          <table:table-cell office:value-type="float" office:value="974664" table:style-name="ce1">
            <text:p>97466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7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string" office:string-value="EDF4C" table:formula="of:=DEC2HEX([.C1372])" table:style-name="ce1">
            <text:p>EDF4C</text:p>
          </table:table-cell>
          <table:table-cell office:value-type="float" office:value="974668" table:style-name="ce1">
            <text:p>97466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7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string" office:string-value="EDF50" table:formula="of:=DEC2HEX([.C1373])" table:style-name="ce1">
            <text:p>EDF50</text:p>
          </table:table-cell>
          <table:table-cell office:value-type="float" office:value="974672" table:style-name="ce1">
            <text:p>97467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7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string" office:string-value="EDF54" table:formula="of:=DEC2HEX([.C1374])" table:style-name="ce1">
            <text:p>EDF54</text:p>
          </table:table-cell>
          <table:table-cell office:value-type="float" office:value="974676" table:style-name="ce1">
            <text:p>97467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7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string" office:string-value="EDF58" table:formula="of:=DEC2HEX([.C1375])" table:style-name="ce1">
            <text:p>EDF58</text:p>
          </table:table-cell>
          <table:table-cell office:value-type="float" office:value="974680" table:style-name="ce1">
            <text:p>97468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7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string" office:string-value="EDF5C" table:formula="of:=DEC2HEX([.C1376])" table:style-name="ce1">
            <text:p>EDF5C</text:p>
          </table:table-cell>
          <table:table-cell office:value-type="float" office:value="974684" table:style-name="ce1">
            <text:p>97468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7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string" office:string-value="EDF60" table:formula="of:=DEC2HEX([.C1377])" table:style-name="ce1">
            <text:p>EDF60</text:p>
          </table:table-cell>
          <table:table-cell office:value-type="float" office:value="974688" table:style-name="ce1">
            <text:p>9746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7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string" office:string-value="EDF64" table:formula="of:=DEC2HEX([.C1378])" table:style-name="ce1">
            <text:p>EDF64</text:p>
          </table:table-cell>
          <table:table-cell office:value-type="float" office:value="974692" table:style-name="ce1">
            <text:p>9746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7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string" office:string-value="EDF68" table:formula="of:=DEC2HEX([.C1379])" table:style-name="ce1">
            <text:p>EDF68</text:p>
          </table:table-cell>
          <table:table-cell office:value-type="float" office:value="974696" table:style-name="ce1">
            <text:p>9746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7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string" office:string-value="EDF6C" table:formula="of:=DEC2HEX([.C1380])" table:style-name="ce1">
            <text:p>EDF6C</text:p>
          </table:table-cell>
          <table:table-cell office:value-type="float" office:value="974700" table:style-name="ce1">
            <text:p>97470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8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string" office:string-value="EDF70" table:formula="of:=DEC2HEX([.C1381])" table:style-name="ce1">
            <text:p>EDF70</text:p>
          </table:table-cell>
          <table:table-cell office:value-type="float" office:value="974704" table:style-name="ce1">
            <text:p>97470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8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string" office:string-value="EDF74" table:formula="of:=DEC2HEX([.C1382])" table:style-name="ce1">
            <text:p>EDF74</text:p>
          </table:table-cell>
          <table:table-cell office:value-type="float" office:value="974708" table:style-name="ce1">
            <text:p>97470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8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string" office:string-value="EDF78" table:formula="of:=DEC2HEX([.C1383])" table:style-name="ce1">
            <text:p>EDF78</text:p>
          </table:table-cell>
          <table:table-cell office:value-type="float" office:value="974712" table:style-name="ce1">
            <text:p>97471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8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string" office:string-value="EDF7C" table:formula="of:=DEC2HEX([.C1384])" table:style-name="ce1">
            <text:p>EDF7C</text:p>
          </table:table-cell>
          <table:table-cell office:value-type="float" office:value="974716" table:style-name="ce1">
            <text:p>97471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8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string" office:string-value="EDF80" table:formula="of:=DEC2HEX([.C1385])" table:style-name="ce1">
            <text:p>EDF80</text:p>
          </table:table-cell>
          <table:table-cell office:value-type="float" office:value="974720" table:style-name="ce1">
            <text:p>97472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8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string" office:string-value="EDF84" table:formula="of:=DEC2HEX([.C1386])" table:style-name="ce1">
            <text:p>EDF84</text:p>
          </table:table-cell>
          <table:table-cell office:value-type="float" office:value="974724" table:style-name="ce1">
            <text:p>97472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8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string" office:string-value="EDF88" table:formula="of:=DEC2HEX([.C1387])" table:style-name="ce1">
            <text:p>EDF88</text:p>
          </table:table-cell>
          <table:table-cell office:value-type="float" office:value="974728" table:style-name="ce1">
            <text:p>97472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8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string" office:string-value="EDF8C" table:formula="of:=DEC2HEX([.C1388])" table:style-name="ce1">
            <text:p>EDF8C</text:p>
          </table:table-cell>
          <table:table-cell office:value-type="float" office:value="974732" table:style-name="ce1">
            <text:p>97473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8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string" office:string-value="EDF90" table:formula="of:=DEC2HEX([.C1389])" table:style-name="ce1">
            <text:p>EDF90</text:p>
          </table:table-cell>
          <table:table-cell office:value-type="float" office:value="974736" table:style-name="ce1">
            <text:p>97473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8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string" office:string-value="EDF94" table:formula="of:=DEC2HEX([.C1390])" table:style-name="ce1">
            <text:p>EDF94</text:p>
          </table:table-cell>
          <table:table-cell office:value-type="float" office:value="974740" table:style-name="ce1">
            <text:p>97474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9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string" office:string-value="EDF98" table:formula="of:=DEC2HEX([.C1391])" table:style-name="ce1">
            <text:p>EDF98</text:p>
          </table:table-cell>
          <table:table-cell office:value-type="float" office:value="974744" table:style-name="ce1">
            <text:p>9747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9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string" office:string-value="EDF9C" table:formula="of:=DEC2HEX([.C1392])" table:style-name="ce1">
            <text:p>EDF9C</text:p>
          </table:table-cell>
          <table:table-cell office:value-type="float" office:value="974748" table:style-name="ce1">
            <text:p>9747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9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string" office:string-value="EDFA0" table:formula="of:=DEC2HEX([.C1393])" table:style-name="ce1">
            <text:p>EDFA0</text:p>
          </table:table-cell>
          <table:table-cell office:value-type="float" office:value="974752" table:style-name="ce1">
            <text:p>9747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9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string" office:string-value="EDFA4" table:formula="of:=DEC2HEX([.C1394])" table:style-name="ce1">
            <text:p>EDFA4</text:p>
          </table:table-cell>
          <table:table-cell office:value-type="float" office:value="974756" table:style-name="ce1">
            <text:p>97475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9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string" office:string-value="EDFA8" table:formula="of:=DEC2HEX([.C1395])" table:style-name="ce1">
            <text:p>EDFA8</text:p>
          </table:table-cell>
          <table:table-cell office:value-type="float" office:value="974760" table:style-name="ce1">
            <text:p>97476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9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string" office:string-value="EDFAC" table:formula="of:=DEC2HEX([.C1396])" table:style-name="ce1">
            <text:p>EDFAC</text:p>
          </table:table-cell>
          <table:table-cell office:value-type="float" office:value="974764" table:style-name="ce1">
            <text:p>97476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9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string" office:string-value="EDFB0" table:formula="of:=DEC2HEX([.C1397])" table:style-name="ce1">
            <text:p>EDFB0</text:p>
          </table:table-cell>
          <table:table-cell office:value-type="float" office:value="974768" table:style-name="ce1">
            <text:p>97476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9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string" office:string-value="EDFB4" table:formula="of:=DEC2HEX([.C1398])" table:style-name="ce1">
            <text:p>EDFB4</text:p>
          </table:table-cell>
          <table:table-cell office:value-type="float" office:value="974772" table:style-name="ce1">
            <text:p>97477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9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string" office:string-value="EDFB8" table:formula="of:=DEC2HEX([.C1399])" table:style-name="ce1">
            <text:p>EDFB8</text:p>
          </table:table-cell>
          <table:table-cell office:value-type="float" office:value="974776" table:style-name="ce1">
            <text:p>97477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39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string" office:string-value="EDFBC" table:formula="of:=DEC2HEX([.C1400])" table:style-name="ce1">
            <text:p>EDFBC</text:p>
          </table:table-cell>
          <table:table-cell office:value-type="float" office:value="974780" table:style-name="ce1">
            <text:p>97478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0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string" office:string-value="EDFC0" table:formula="of:=DEC2HEX([.C1401])" table:style-name="ce1">
            <text:p>EDFC0</text:p>
          </table:table-cell>
          <table:table-cell office:value-type="float" office:value="974784" table:style-name="ce1">
            <text:p>97478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0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string" office:string-value="EDFC4" table:formula="of:=DEC2HEX([.C1402])" table:style-name="ce1">
            <text:p>EDFC4</text:p>
          </table:table-cell>
          <table:table-cell office:value-type="float" office:value="974788" table:style-name="ce1">
            <text:p>9747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0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string" office:string-value="EDFC8" table:formula="of:=DEC2HEX([.C1403])" table:style-name="ce1">
            <text:p>EDFC8</text:p>
          </table:table-cell>
          <table:table-cell office:value-type="float" office:value="974792" table:style-name="ce1">
            <text:p>9747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0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string" office:string-value="EDFCC" table:formula="of:=DEC2HEX([.C1404])" table:style-name="ce1">
            <text:p>EDFCC</text:p>
          </table:table-cell>
          <table:table-cell office:value-type="float" office:value="974796" table:style-name="ce1">
            <text:p>9747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0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string" office:string-value="EDFD0" table:formula="of:=DEC2HEX([.C1405])" table:style-name="ce1">
            <text:p>EDFD0</text:p>
          </table:table-cell>
          <table:table-cell office:value-type="float" office:value="974800" table:style-name="ce1">
            <text:p>97480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0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string" office:string-value="EDFD4" table:formula="of:=DEC2HEX([.C1406])" table:style-name="ce1">
            <text:p>EDFD4</text:p>
          </table:table-cell>
          <table:table-cell office:value-type="float" office:value="974804" table:style-name="ce1">
            <text:p>97480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0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string" office:string-value="EDFD8" table:formula="of:=DEC2HEX([.C1407])" table:style-name="ce1">
            <text:p>EDFD8</text:p>
          </table:table-cell>
          <table:table-cell office:value-type="float" office:value="974808" table:style-name="ce1">
            <text:p>97480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0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string" office:string-value="EDFDC" table:formula="of:=DEC2HEX([.C1408])" table:style-name="ce1">
            <text:p>EDFDC</text:p>
          </table:table-cell>
          <table:table-cell office:value-type="float" office:value="974812" table:style-name="ce1">
            <text:p>97481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0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string" office:string-value="EDFE0" table:formula="of:=DEC2HEX([.C1409])" table:style-name="ce1">
            <text:p>EDFE0</text:p>
          </table:table-cell>
          <table:table-cell office:value-type="float" office:value="974816" table:style-name="ce1">
            <text:p>97481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0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string" office:string-value="EDFE4" table:formula="of:=DEC2HEX([.C1410])" table:style-name="ce1">
            <text:p>EDFE4</text:p>
          </table:table-cell>
          <table:table-cell office:value-type="float" office:value="974820" table:style-name="ce1">
            <text:p>97482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1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office:string-value="EDFE8" table:formula="of:=DEC2HEX([.C1411])" table:style-name="ce1">
            <text:p>EDFE8</text:p>
          </table:table-cell>
          <table:table-cell office:value-type="float" office:value="974824" table:style-name="ce1">
            <text:p>97482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1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string" office:string-value="EDFEC" table:formula="of:=DEC2HEX([.C1412])" table:style-name="ce1">
            <text:p>EDFEC</text:p>
          </table:table-cell>
          <table:table-cell office:value-type="float" office:value="974828" table:style-name="ce1">
            <text:p>97482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1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string" office:string-value="EDFF0" table:formula="of:=DEC2HEX([.C1413])" table:style-name="ce1">
            <text:p>EDFF0</text:p>
          </table:table-cell>
          <table:table-cell office:value-type="float" office:value="974832" table:style-name="ce1">
            <text:p>97483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1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string" office:string-value="EDFF4" table:formula="of:=DEC2HEX([.C1414])" table:style-name="ce1">
            <text:p>EDFF4</text:p>
          </table:table-cell>
          <table:table-cell office:value-type="float" office:value="974836" table:style-name="ce1">
            <text:p>97483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1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string" office:string-value="EDFF8" table:formula="of:=DEC2HEX([.C1415])" table:style-name="ce1">
            <text:p>EDFF8</text:p>
          </table:table-cell>
          <table:table-cell office:value-type="float" office:value="974840" table:style-name="ce1">
            <text:p>97484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1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string" office:string-value="EDFFC" table:formula="of:=DEC2HEX([.C1416])" table:style-name="ce1">
            <text:p>EDFFC</text:p>
          </table:table-cell>
          <table:table-cell office:value-type="float" office:value="974844" table:style-name="ce1">
            <text:p>9748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1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string" office:string-value="EE000" table:formula="of:=DEC2HEX([.C1417])" table:style-name="ce1">
            <text:p>EE000</text:p>
          </table:table-cell>
          <table:table-cell office:value-type="float" office:value="974848" table:style-name="ce1">
            <text:p>9748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1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string" office:string-value="EE004" table:formula="of:=DEC2HEX([.C1418])" table:style-name="ce1">
            <text:p>EE004</text:p>
          </table:table-cell>
          <table:table-cell office:value-type="float" office:value="974852" table:style-name="ce1">
            <text:p>97485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1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string" office:string-value="EE008" table:formula="of:=DEC2HEX([.C1419])" table:style-name="ce1">
            <text:p>EE008</text:p>
          </table:table-cell>
          <table:table-cell office:value-type="float" office:value="974856" table:style-name="ce1">
            <text:p>97485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1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string" office:string-value="EE00C" table:formula="of:=DEC2HEX([.C1420])" table:style-name="ce1">
            <text:p>EE00C</text:p>
          </table:table-cell>
          <table:table-cell office:value-type="float" office:value="974860" table:style-name="ce1">
            <text:p>97486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2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string" office:string-value="EE010" table:formula="of:=DEC2HEX([.C1421])" table:style-name="ce1">
            <text:p>EE010</text:p>
          </table:table-cell>
          <table:table-cell office:value-type="float" office:value="974864" table:style-name="ce1">
            <text:p>97486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2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string" office:string-value="EE014" table:formula="of:=DEC2HEX([.C1422])" table:style-name="ce1">
            <text:p>EE014</text:p>
          </table:table-cell>
          <table:table-cell office:value-type="float" office:value="974868" table:style-name="ce1">
            <text:p>97486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2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string" office:string-value="EE018" table:formula="of:=DEC2HEX([.C1423])" table:style-name="ce1">
            <text:p>EE018</text:p>
          </table:table-cell>
          <table:table-cell office:value-type="float" office:value="974872" table:style-name="ce1">
            <text:p>97487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2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string" office:string-value="EE01C" table:formula="of:=DEC2HEX([.C1424])" table:style-name="ce1">
            <text:p>EE01C</text:p>
          </table:table-cell>
          <table:table-cell office:value-type="float" office:value="974876" table:style-name="ce1">
            <text:p>97487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2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string" office:string-value="EE020" table:formula="of:=DEC2HEX([.C1425])" table:style-name="ce1">
            <text:p>EE020</text:p>
          </table:table-cell>
          <table:table-cell office:value-type="float" office:value="974880" table:style-name="ce1">
            <text:p>974880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2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string" office:string-value="EE040" table:formula="of:=DEC2HEX([.C1426])" table:style-name="ce1">
            <text:p>EE040</text:p>
          </table:table-cell>
          <table:table-cell office:value-type="float" office:value="974912" table:style-name="ce1">
            <text:p>974912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2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string" office:string-value="EE060" table:formula="of:=DEC2HEX([.C1427])" table:style-name="ce1">
            <text:p>EE060</text:p>
          </table:table-cell>
          <table:table-cell office:value-type="float" office:value="974944" table:style-name="ce1">
            <text:p>974944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2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string" office:string-value="EE080" table:formula="of:=DEC2HEX([.C1428])" table:style-name="ce1">
            <text:p>EE080</text:p>
          </table:table-cell>
          <table:table-cell office:value-type="float" office:value="974976" table:style-name="ce1">
            <text:p>974976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2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string" office:string-value="EE0A0" table:formula="of:=DEC2HEX([.C1429])" table:style-name="ce1">
            <text:p>EE0A0</text:p>
          </table:table-cell>
          <table:table-cell office:value-type="float" office:value="975008" table:style-name="ce1">
            <text:p>975008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2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string" office:string-value="EE0C0" table:formula="of:=DEC2HEX([.C1430])" table:style-name="ce1">
            <text:p>EE0C0</text:p>
          </table:table-cell>
          <table:table-cell office:value-type="float" office:value="975040" table:style-name="ce1">
            <text:p>975040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3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string" office:string-value="EE0E0" table:formula="of:=DEC2HEX([.C1431])" table:style-name="ce1">
            <text:p>EE0E0</text:p>
          </table:table-cell>
          <table:table-cell office:value-type="float" office:value="975072" table:style-name="ce1">
            <text:p>975072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3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string" office:string-value="EE100" table:formula="of:=DEC2HEX([.C1432])" table:style-name="ce1">
            <text:p>EE100</text:p>
          </table:table-cell>
          <table:table-cell office:value-type="float" office:value="975104" table:style-name="ce1">
            <text:p>975104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3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string" office:string-value="EE120" table:formula="of:=DEC2HEX([.C1433])" table:style-name="ce1">
            <text:p>EE120</text:p>
          </table:table-cell>
          <table:table-cell office:value-type="float" office:value="975136" table:style-name="ce1">
            <text:p>975136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3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string" office:string-value="EE140" table:formula="of:=DEC2HEX([.C1434])" table:style-name="ce1">
            <text:p>EE140</text:p>
          </table:table-cell>
          <table:table-cell office:value-type="float" office:value="975168" table:style-name="ce1">
            <text:p>975168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3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string" office:string-value="EE160" table:formula="of:=DEC2HEX([.C1435])" table:style-name="ce1">
            <text:p>EE160</text:p>
          </table:table-cell>
          <table:table-cell office:value-type="float" office:value="975200" table:style-name="ce1">
            <text:p>975200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3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string" office:string-value="EE180" table:formula="of:=DEC2HEX([.C1436])" table:style-name="ce1">
            <text:p>EE180</text:p>
          </table:table-cell>
          <table:table-cell office:value-type="float" office:value="975232" table:style-name="ce1">
            <text:p>975232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3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string" office:string-value="EE1A0" table:formula="of:=DEC2HEX([.C1437])" table:style-name="ce1">
            <text:p>EE1A0</text:p>
          </table:table-cell>
          <table:table-cell office:value-type="float" office:value="975264" table:style-name="ce1">
            <text:p>975264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3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string" office:string-value="EE1C0" table:formula="of:=DEC2HEX([.C1438])" table:style-name="ce1">
            <text:p>EE1C0</text:p>
          </table:table-cell>
          <table:table-cell office:value-type="float" office:value="975296" table:style-name="ce1">
            <text:p>975296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3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string" office:string-value="EE1E0" table:formula="of:=DEC2HEX([.C1439])" table:style-name="ce1">
            <text:p>EE1E0</text:p>
          </table:table-cell>
          <table:table-cell office:value-type="float" office:value="975328" table:style-name="ce1">
            <text:p>975328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3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string" office:string-value="EE200" table:formula="of:=DEC2HEX([.C1440])" table:style-name="ce1">
            <text:p>EE200</text:p>
          </table:table-cell>
          <table:table-cell office:value-type="float" office:value="975360" table:style-name="ce1">
            <text:p>975360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4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string" office:string-value="EE220" table:formula="of:=DEC2HEX([.C1441])" table:style-name="ce1">
            <text:p>EE220</text:p>
          </table:table-cell>
          <table:table-cell office:value-type="float" office:value="975392" table:style-name="ce1">
            <text:p>975392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4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string" office:string-value="EE240" table:formula="of:=DEC2HEX([.C1442])" table:style-name="ce1">
            <text:p>EE240</text:p>
          </table:table-cell>
          <table:table-cell office:value-type="float" office:value="975424" table:style-name="ce1">
            <text:p>975424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4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string" office:string-value="EE260" table:formula="of:=DEC2HEX([.C1443])" table:style-name="ce1">
            <text:p>EE260</text:p>
          </table:table-cell>
          <table:table-cell office:value-type="float" office:value="975456" table:style-name="ce1">
            <text:p>975456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4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string" office:string-value="EE280" table:formula="of:=DEC2HEX([.C1444])" table:style-name="ce1">
            <text:p>EE280</text:p>
          </table:table-cell>
          <table:table-cell office:value-type="float" office:value="975488" table:style-name="ce1">
            <text:p>975488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4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string" office:string-value="EE2A0" table:formula="of:=DEC2HEX([.C1445])" table:style-name="ce1">
            <text:p>EE2A0</text:p>
          </table:table-cell>
          <table:table-cell office:value-type="float" office:value="975520" table:style-name="ce1">
            <text:p>975520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4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string" office:string-value="EE2C0" table:formula="of:=DEC2HEX([.C1446])" table:style-name="ce1">
            <text:p>EE2C0</text:p>
          </table:table-cell>
          <table:table-cell office:value-type="float" office:value="975552" table:style-name="ce1">
            <text:p>975552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4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string" office:string-value="EE2E0" table:formula="of:=DEC2HEX([.C1447])" table:style-name="ce1">
            <text:p>EE2E0</text:p>
          </table:table-cell>
          <table:table-cell office:value-type="float" office:value="975584" table:style-name="ce1">
            <text:p>975584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4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string" office:string-value="EE300" table:formula="of:=DEC2HEX([.C1448])" table:style-name="ce1">
            <text:p>EE300</text:p>
          </table:table-cell>
          <table:table-cell office:value-type="float" office:value="975616" table:style-name="ce1">
            <text:p>975616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4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string" office:string-value="EE320" table:formula="of:=DEC2HEX([.C1449])" table:style-name="ce1">
            <text:p>EE320</text:p>
          </table:table-cell>
          <table:table-cell office:value-type="float" office:value="975648" table:style-name="ce1">
            <text:p>975648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4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string" office:string-value="EE340" table:formula="of:=DEC2HEX([.C1450])" table:style-name="ce1">
            <text:p>EE340</text:p>
          </table:table-cell>
          <table:table-cell office:value-type="float" office:value="975680" table:style-name="ce1">
            <text:p>975680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5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string" office:string-value="EE360" table:formula="of:=DEC2HEX([.C1451])" table:style-name="ce1">
            <text:p>EE360</text:p>
          </table:table-cell>
          <table:table-cell office:value-type="float" office:value="975712" table:style-name="ce1">
            <text:p>975712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5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string" office:string-value="EE380" table:formula="of:=DEC2HEX([.C1452])" table:style-name="ce1">
            <text:p>EE380</text:p>
          </table:table-cell>
          <table:table-cell office:value-type="float" office:value="975744" table:style-name="ce1">
            <text:p>975744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5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string" office:string-value="EE3A0" table:formula="of:=DEC2HEX([.C1453])" table:style-name="ce1">
            <text:p>EE3A0</text:p>
          </table:table-cell>
          <table:table-cell office:value-type="float" office:value="975776" table:style-name="ce1">
            <text:p>975776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5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string" office:string-value="EE3C0" table:formula="of:=DEC2HEX([.C1454])" table:style-name="ce1">
            <text:p>EE3C0</text:p>
          </table:table-cell>
          <table:table-cell office:value-type="float" office:value="975808" table:style-name="ce1">
            <text:p>975808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5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string" office:string-value="EE3E0" table:formula="of:=DEC2HEX([.C1455])" table:style-name="ce1">
            <text:p>EE3E0</text:p>
          </table:table-cell>
          <table:table-cell office:value-type="float" office:value="975840" table:style-name="ce1">
            <text:p>975840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5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string" office:string-value="EE400" table:formula="of:=DEC2HEX([.C1456])" table:style-name="ce1">
            <text:p>EE400</text:p>
          </table:table-cell>
          <table:table-cell office:value-type="float" office:value="975872" table:style-name="ce1">
            <text:p>975872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5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string" office:string-value="EE420" table:formula="of:=DEC2HEX([.C1457])" table:style-name="ce1">
            <text:p>EE420</text:p>
          </table:table-cell>
          <table:table-cell office:value-type="float" office:value="975904" table:style-name="ce1">
            <text:p>975904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5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string" office:string-value="EE440" table:formula="of:=DEC2HEX([.C1458])" table:style-name="ce1">
            <text:p>EE440</text:p>
          </table:table-cell>
          <table:table-cell office:value-type="float" office:value="975936" table:style-name="ce1">
            <text:p>975936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5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string" office:string-value="EE460" table:formula="of:=DEC2HEX([.C1459])" table:style-name="ce1">
            <text:p>EE460</text:p>
          </table:table-cell>
          <table:table-cell office:value-type="float" office:value="975968" table:style-name="ce1">
            <text:p>975968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5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string" office:string-value="EE480" table:formula="of:=DEC2HEX([.C1460])" table:style-name="ce1">
            <text:p>EE480</text:p>
          </table:table-cell>
          <table:table-cell office:value-type="float" office:value="976000" table:style-name="ce1">
            <text:p>976000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6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string" office:string-value="EE4A0" table:formula="of:=DEC2HEX([.C1461])" table:style-name="ce1">
            <text:p>EE4A0</text:p>
          </table:table-cell>
          <table:table-cell office:value-type="float" office:value="976032" table:style-name="ce1">
            <text:p>976032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6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string" office:string-value="EE4C0" table:formula="of:=DEC2HEX([.C1462])" table:style-name="ce1">
            <text:p>EE4C0</text:p>
          </table:table-cell>
          <table:table-cell office:value-type="float" office:value="976064" table:style-name="ce1">
            <text:p>976064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6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string" office:string-value="EE4E0" table:formula="of:=DEC2HEX([.C1463])" table:style-name="ce1">
            <text:p>EE4E0</text:p>
          </table:table-cell>
          <table:table-cell office:value-type="float" office:value="976096" table:style-name="ce1">
            <text:p>976096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6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string" office:string-value="EE500" table:formula="of:=DEC2HEX([.C1464])" table:style-name="ce1">
            <text:p>EE500</text:p>
          </table:table-cell>
          <table:table-cell office:value-type="float" office:value="976128" table:style-name="ce1">
            <text:p>976128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6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string" office:string-value="EE520" table:formula="of:=DEC2HEX([.C1465])" table:style-name="ce1">
            <text:p>EE520</text:p>
          </table:table-cell>
          <table:table-cell office:value-type="float" office:value="976160" table:style-name="ce1">
            <text:p>976160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6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string" office:string-value="EE540" table:formula="of:=DEC2HEX([.C1466])" table:style-name="ce1">
            <text:p>EE540</text:p>
          </table:table-cell>
          <table:table-cell office:value-type="float" office:value="976192" table:style-name="ce1">
            <text:p>976192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6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string" office:string-value="EE560" table:formula="of:=DEC2HEX([.C1467])" table:style-name="ce1">
            <text:p>EE560</text:p>
          </table:table-cell>
          <table:table-cell office:value-type="float" office:value="976224" table:style-name="ce1">
            <text:p>976224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6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string" office:string-value="EE580" table:formula="of:=DEC2HEX([.C1468])" table:style-name="ce1">
            <text:p>EE580</text:p>
          </table:table-cell>
          <table:table-cell office:value-type="float" office:value="976256" table:style-name="ce1">
            <text:p>976256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6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string" office:string-value="EE5A0" table:formula="of:=DEC2HEX([.C1469])" table:style-name="ce1">
            <text:p>EE5A0</text:p>
          </table:table-cell>
          <table:table-cell office:value-type="float" office:value="976288" table:style-name="ce1">
            <text:p>976288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6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string" office:string-value="EE5C0" table:formula="of:=DEC2HEX([.C1470])" table:style-name="ce1">
            <text:p>EE5C0</text:p>
          </table:table-cell>
          <table:table-cell office:value-type="float" office:value="976320" table:style-name="ce1">
            <text:p>976320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7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string" office:string-value="EE5E0" table:formula="of:=DEC2HEX([.C1471])" table:style-name="ce1">
            <text:p>EE5E0</text:p>
          </table:table-cell>
          <table:table-cell office:value-type="float" office:value="976352" table:style-name="ce1">
            <text:p>976352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7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string" office:string-value="EE600" table:formula="of:=DEC2HEX([.C1472])" table:style-name="ce1">
            <text:p>EE600</text:p>
          </table:table-cell>
          <table:table-cell office:value-type="float" office:value="976384" table:style-name="ce1">
            <text:p>976384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7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string" office:string-value="EE620" table:formula="of:=DEC2HEX([.C1473])" table:style-name="ce1">
            <text:p>EE620</text:p>
          </table:table-cell>
          <table:table-cell office:value-type="float" office:value="976416" table:style-name="ce1">
            <text:p>976416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7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string" office:string-value="EE640" table:formula="of:=DEC2HEX([.C1474])" table:style-name="ce1">
            <text:p>EE640</text:p>
          </table:table-cell>
          <table:table-cell office:value-type="float" office:value="976448" table:style-name="ce1">
            <text:p>976448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7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string" office:string-value="EE660" table:formula="of:=DEC2HEX([.C1475])" table:style-name="ce1">
            <text:p>EE660</text:p>
          </table:table-cell>
          <table:table-cell office:value-type="float" office:value="976480" table:style-name="ce1">
            <text:p>976480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7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string" office:string-value="EE680" table:formula="of:=DEC2HEX([.C1476])" table:style-name="ce1">
            <text:p>EE680</text:p>
          </table:table-cell>
          <table:table-cell office:value-type="float" office:value="976512" table:style-name="ce1">
            <text:p>976512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7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string" office:string-value="EE6A0" table:formula="of:=DEC2HEX([.C1477])" table:style-name="ce1">
            <text:p>EE6A0</text:p>
          </table:table-cell>
          <table:table-cell office:value-type="float" office:value="976544" table:style-name="ce1">
            <text:p>976544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7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string" office:string-value="EE6C0" table:formula="of:=DEC2HEX([.C1478])" table:style-name="ce1">
            <text:p>EE6C0</text:p>
          </table:table-cell>
          <table:table-cell office:value-type="float" office:value="976576" table:style-name="ce1">
            <text:p>976576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IF([.D147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string" office:string-value="EE6C2" table:formula="of:=DEC2HEX([.C1479])" table:style-name="ce1">
            <text:p>EE6C2</text:p>
          </table:table-cell>
          <table:table-cell office:value-type="float" office:value="976578" table:style-name="ce1">
            <text:p>97657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IF([.D147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string" office:string-value="EE6C4" table:formula="of:=DEC2HEX([.C1480])" table:style-name="ce1">
            <text:p>EE6C4</text:p>
          </table:table-cell>
          <table:table-cell office:value-type="float" office:value="976580" table:style-name="ce1">
            <text:p>97658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8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string" office:string-value="EE6C8" table:formula="of:=DEC2HEX([.C1481])" table:style-name="ce1">
            <text:p>EE6C8</text:p>
          </table:table-cell>
          <table:table-cell office:value-type="float" office:value="976584" table:style-name="ce1">
            <text:p>976584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IF([.D148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string" office:string-value="EE6CA" table:formula="of:=DEC2HEX([.C1482])" table:style-name="ce1">
            <text:p>EE6CA</text:p>
          </table:table-cell>
          <table:table-cell office:value-type="float" office:value="976586" table:style-name="ce1">
            <text:p>976586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IF([.D148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string" office:string-value="EE6CC" table:formula="of:=DEC2HEX([.C1483])" table:style-name="ce1">
            <text:p>EE6CC</text:p>
          </table:table-cell>
          <table:table-cell office:value-type="float" office:value="976588" table:style-name="ce1">
            <text:p>97658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IF([.D148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string" office:string-value="EE6CE" table:formula="of:=DEC2HEX([.C1484])" table:style-name="ce1">
            <text:p>EE6CE</text:p>
          </table:table-cell>
          <table:table-cell office:value-type="float" office:value="976590" table:style-name="ce1">
            <text:p>97659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8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string" office:string-value="EE6D2" table:formula="of:=DEC2HEX([.C1485])" table:style-name="ce1">
            <text:p>EE6D2</text:p>
          </table:table-cell>
          <table:table-cell office:value-type="float" office:value="976594" table:style-name="ce1">
            <text:p>976594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IF([.D148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string" office:string-value="EE6D4" table:formula="of:=DEC2HEX([.C1486])" table:style-name="ce1">
            <text:p>EE6D4</text:p>
          </table:table-cell>
          <table:table-cell office:value-type="float" office:value="976596" table:style-name="ce1">
            <text:p>97659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8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string" office:string-value="EE6D8" table:formula="of:=DEC2HEX([.C1487])" table:style-name="ce1">
            <text:p>EE6D8</text:p>
          </table:table-cell>
          <table:table-cell office:value-type="float" office:value="976600" table:style-name="ce1">
            <text:p>97660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8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string" office:string-value="EE6DC" table:formula="of:=DEC2HEX([.C1488])" table:style-name="ce1">
            <text:p>EE6DC</text:p>
          </table:table-cell>
          <table:table-cell office:value-type="float" office:value="976604" table:style-name="ce1">
            <text:p>97660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8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string" office:string-value="EE6E0" table:formula="of:=DEC2HEX([.C1489])" table:style-name="ce1">
            <text:p>EE6E0</text:p>
          </table:table-cell>
          <table:table-cell office:value-type="float" office:value="976608" table:style-name="ce1">
            <text:p>97660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8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string" office:string-value="EE6E4" table:formula="of:=DEC2HEX([.C1490])" table:style-name="ce1">
            <text:p>EE6E4</text:p>
          </table:table-cell>
          <table:table-cell office:value-type="float" office:value="976612" table:style-name="ce1">
            <text:p>97661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9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string" office:string-value="EE6E8" table:formula="of:=DEC2HEX([.C1491])" table:style-name="ce1">
            <text:p>EE6E8</text:p>
          </table:table-cell>
          <table:table-cell office:value-type="float" office:value="976616" table:style-name="ce1">
            <text:p>97661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9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string" office:string-value="EE6EC" table:formula="of:=DEC2HEX([.C1492])" table:style-name="ce1">
            <text:p>EE6EC</text:p>
          </table:table-cell>
          <table:table-cell office:value-type="float" office:value="976620" table:style-name="ce1">
            <text:p>976620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IF([.D149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string" office:string-value="EE6EE" table:formula="of:=DEC2HEX([.C1493])" table:style-name="ce1">
            <text:p>EE6EE</text:p>
          </table:table-cell>
          <table:table-cell office:value-type="float" office:value="976622" table:style-name="ce1">
            <text:p>97662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9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string" office:string-value="EE6F2" table:formula="of:=DEC2HEX([.C1494])" table:style-name="ce1">
            <text:p>EE6F2</text:p>
          </table:table-cell>
          <table:table-cell office:value-type="float" office:value="976626" table:style-name="ce1">
            <text:p>97662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9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string" office:string-value="EE6F6" table:formula="of:=DEC2HEX([.C1495])" table:style-name="ce1">
            <text:p>EE6F6</text:p>
          </table:table-cell>
          <table:table-cell office:value-type="float" office:value="976630" table:style-name="ce1">
            <text:p>97663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9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string" office:string-value="EE6FA" table:formula="of:=DEC2HEX([.C1496])" table:style-name="ce1">
            <text:p>EE6FA</text:p>
          </table:table-cell>
          <table:table-cell office:value-type="float" office:value="976634" table:style-name="ce1">
            <text:p>97663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9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string" office:string-value="EE6FE" table:formula="of:=DEC2HEX([.C1497])" table:style-name="ce1">
            <text:p>EE6FE</text:p>
          </table:table-cell>
          <table:table-cell office:value-type="float" office:value="976638" table:style-name="ce1">
            <text:p>97663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9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string" office:string-value="EE702" table:formula="of:=DEC2HEX([.C1498])" table:style-name="ce1">
            <text:p>EE702</text:p>
          </table:table-cell>
          <table:table-cell office:value-type="float" office:value="976642" table:style-name="ce1">
            <text:p>97664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49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string" office:string-value="EE706" table:formula="of:=DEC2HEX([.C1499])" table:style-name="ce1">
            <text:p>EE706</text:p>
          </table:table-cell>
          <table:table-cell office:value-type="float" office:value="976646" table:style-name="ce1">
            <text:p>976646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IF([.D149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string" office:string-value="EE708" table:formula="of:=DEC2HEX([.C1500])" table:style-name="ce1">
            <text:p>EE708</text:p>
          </table:table-cell>
          <table:table-cell office:value-type="float" office:value="976648" table:style-name="ce1">
            <text:p>97664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IF([.D150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string" office:string-value="EE70A" table:formula="of:=DEC2HEX([.C1501])" table:style-name="ce1">
            <text:p>EE70A</text:p>
          </table:table-cell>
          <table:table-cell office:value-type="float" office:value="976650" table:style-name="ce1">
            <text:p>97665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0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string" office:string-value="EE70E" table:formula="of:=DEC2HEX([.C1502])" table:style-name="ce1">
            <text:p>EE70E</text:p>
          </table:table-cell>
          <table:table-cell office:value-type="float" office:value="976654" table:style-name="ce1">
            <text:p>97665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0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string" office:string-value="EE712" table:formula="of:=DEC2HEX([.C1503])" table:style-name="ce1">
            <text:p>EE712</text:p>
          </table:table-cell>
          <table:table-cell office:value-type="float" office:value="976658" table:style-name="ce1">
            <text:p>97665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0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string" office:string-value="EE716" table:formula="of:=DEC2HEX([.C1504])" table:style-name="ce1">
            <text:p>EE716</text:p>
          </table:table-cell>
          <table:table-cell office:value-type="float" office:value="976662" table:style-name="ce1">
            <text:p>97666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0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string" office:string-value="EE71A" table:formula="of:=DEC2HEX([.C1505])" table:style-name="ce1">
            <text:p>EE71A</text:p>
          </table:table-cell>
          <table:table-cell office:value-type="float" office:value="976666" table:style-name="ce1">
            <text:p>976666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50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string" office:string-value="EE71B" table:formula="of:=DEC2HEX([.C1506])" table:style-name="ce1">
            <text:p>EE71B</text:p>
          </table:table-cell>
          <table:table-cell office:value-type="float" office:value="976667" table:style-name="ce1">
            <text:p>97666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0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string" office:string-value="EE71F" table:formula="of:=DEC2HEX([.C1507])" table:style-name="ce1">
            <text:p>EE71F</text:p>
          </table:table-cell>
          <table:table-cell office:value-type="float" office:value="976671" table:style-name="ce1">
            <text:p>976671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IF([.D150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string" office:string-value="EE72F" table:formula="of:=DEC2HEX([.C1508])" table:style-name="ce1">
            <text:p>EE72F</text:p>
          </table:table-cell>
          <table:table-cell office:value-type="float" office:value="976687" table:style-name="ce1">
            <text:p>976687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50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string" office:string-value="EE730" table:formula="of:=DEC2HEX([.C1509])" table:style-name="ce1">
            <text:p>EE730</text:p>
          </table:table-cell>
          <table:table-cell office:value-type="float" office:value="976688" table:style-name="ce1">
            <text:p>97668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0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string" office:string-value="EE734" table:formula="of:=DEC2HEX([.C1510])" table:style-name="ce1">
            <text:p>EE734</text:p>
          </table:table-cell>
          <table:table-cell office:value-type="float" office:value="976692" table:style-name="ce1">
            <text:p>97669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1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string" office:string-value="EE738" table:formula="of:=DEC2HEX([.C1511])" table:style-name="ce1">
            <text:p>EE738</text:p>
          </table:table-cell>
          <table:table-cell office:value-type="float" office:value="976696" table:style-name="ce1">
            <text:p>976696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51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string" office:string-value="EE739" table:formula="of:=DEC2HEX([.C1512])" table:style-name="ce1">
            <text:p>EE739</text:p>
          </table:table-cell>
          <table:table-cell office:value-type="float" office:value="976697" table:style-name="ce1">
            <text:p>97669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1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string" office:string-value="EE73D" table:formula="of:=DEC2HEX([.C1513])" table:style-name="ce1">
            <text:p>EE73D</text:p>
          </table:table-cell>
          <table:table-cell office:value-type="float" office:value="976701" table:style-name="ce1">
            <text:p>97670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1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string" office:string-value="EE741" table:formula="of:=DEC2HEX([.C1514])" table:style-name="ce1">
            <text:p>EE741</text:p>
          </table:table-cell>
          <table:table-cell office:value-type="float" office:value="976705" table:style-name="ce1">
            <text:p>97670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1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string" office:string-value="EE745" table:formula="of:=DEC2HEX([.C1515])" table:style-name="ce1">
            <text:p>EE745</text:p>
          </table:table-cell>
          <table:table-cell office:value-type="float" office:value="976709" table:style-name="ce1">
            <text:p>976709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51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string" office:string-value="EE746" table:formula="of:=DEC2HEX([.C1516])" table:style-name="ce1">
            <text:p>EE746</text:p>
          </table:table-cell>
          <table:table-cell office:value-type="float" office:value="976710" table:style-name="ce1">
            <text:p>97671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1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string" office:string-value="EE74A" table:formula="of:=DEC2HEX([.C1517])" table:style-name="ce1">
            <text:p>EE74A</text:p>
          </table:table-cell>
          <table:table-cell office:value-type="float" office:value="976714" table:style-name="ce1">
            <text:p>97671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1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string" office:string-value="EE74E" table:formula="of:=DEC2HEX([.C1518])" table:style-name="ce1">
            <text:p>EE74E</text:p>
          </table:table-cell>
          <table:table-cell office:value-type="float" office:value="976718" table:style-name="ce1">
            <text:p>976718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51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string" office:string-value="EE74F" table:formula="of:=DEC2HEX([.C1519])" table:style-name="ce1">
            <text:p>EE74F</text:p>
          </table:table-cell>
          <table:table-cell office:value-type="float" office:value="976719" table:style-name="ce1">
            <text:p>976719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51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string" office:string-value="EE750" table:formula="of:=DEC2HEX([.C1520])" table:style-name="ce1">
            <text:p>EE750</text:p>
          </table:table-cell>
          <table:table-cell office:value-type="float" office:value="976720" table:style-name="ce1">
            <text:p>97672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2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string" office:string-value="EE754" table:formula="of:=DEC2HEX([.C1521])" table:style-name="ce1">
            <text:p>EE754</text:p>
          </table:table-cell>
          <table:table-cell office:value-type="float" office:value="976724" table:style-name="ce1">
            <text:p>97672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2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string" office:string-value="EE758" table:formula="of:=DEC2HEX([.C1522])" table:style-name="ce1">
            <text:p>EE758</text:p>
          </table:table-cell>
          <table:table-cell office:value-type="float" office:value="976728" table:style-name="ce1">
            <text:p>976728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52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string" office:string-value="EE759" table:formula="of:=DEC2HEX([.C1523])" table:style-name="ce1">
            <text:p>EE759</text:p>
          </table:table-cell>
          <table:table-cell office:value-type="float" office:value="976729" table:style-name="ce1">
            <text:p>97672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2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string" office:string-value="EE769" table:formula="of:=DEC2HEX([.C1524])" table:style-name="ce1">
            <text:p>EE769</text:p>
          </table:table-cell>
          <table:table-cell office:value-type="float" office:value="976745" table:style-name="ce1">
            <text:p>976745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52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string" office:string-value="EE76A" table:formula="of:=DEC2HEX([.C1525])" table:style-name="ce1">
            <text:p>EE76A</text:p>
          </table:table-cell>
          <table:table-cell office:value-type="float" office:value="976746" table:style-name="ce1">
            <text:p>97674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2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string" office:string-value="EE76E" table:formula="of:=DEC2HEX([.C1526])" table:style-name="ce1">
            <text:p>EE76E</text:p>
          </table:table-cell>
          <table:table-cell office:value-type="float" office:value="976750" table:style-name="ce1">
            <text:p>97675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2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string" office:string-value="EE772" table:formula="of:=DEC2HEX([.C1527])" table:style-name="ce1">
            <text:p>EE772</text:p>
          </table:table-cell>
          <table:table-cell office:value-type="float" office:value="976754" table:style-name="ce1">
            <text:p>97675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2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string" office:string-value="EE776" table:formula="of:=DEC2HEX([.C1528])" table:style-name="ce1">
            <text:p>EE776</text:p>
          </table:table-cell>
          <table:table-cell office:value-type="float" office:value="976758" table:style-name="ce1">
            <text:p>976758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52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string" office:string-value="EE777" table:formula="of:=DEC2HEX([.C1529])" table:style-name="ce1">
            <text:p>EE777</text:p>
          </table:table-cell>
          <table:table-cell office:value-type="float" office:value="976759" table:style-name="ce1">
            <text:p>976759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2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string" office:string-value="EE77B" table:formula="of:=DEC2HEX([.C1530])" table:style-name="ce1">
            <text:p>EE77B</text:p>
          </table:table-cell>
          <table:table-cell office:value-type="float" office:value="976763" table:style-name="ce1">
            <text:p>97676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3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string" office:string-value="EE77F" table:formula="of:=DEC2HEX([.C1531])" table:style-name="ce1">
            <text:p>EE77F</text:p>
          </table:table-cell>
          <table:table-cell office:value-type="float" office:value="976767" table:style-name="ce1">
            <text:p>976767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531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string" office:string-value="EE780" table:formula="of:=DEC2HEX([.C1532])" table:style-name="ce1">
            <text:p>EE780</text:p>
          </table:table-cell>
          <table:table-cell office:value-type="float" office:value="976768" table:style-name="ce1">
            <text:p>97676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32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string" office:string-value="EE784" table:formula="of:=DEC2HEX([.C1533])" table:style-name="ce1">
            <text:p>EE784</text:p>
          </table:table-cell>
          <table:table-cell office:value-type="float" office:value="976772" table:style-name="ce1">
            <text:p>976772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33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string" office:string-value="EE788" table:formula="of:=DEC2HEX([.C1534])" table:style-name="ce1">
            <text:p>EE788</text:p>
          </table:table-cell>
          <table:table-cell office:value-type="float" office:value="976776" table:style-name="ce1">
            <text:p>976776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534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string" office:string-value="EE789" table:formula="of:=DEC2HEX([.C1535])" table:style-name="ce1">
            <text:p>EE789</text:p>
          </table:table-cell>
          <table:table-cell office:value-type="float" office:value="976777" table:style-name="ce1">
            <text:p>976777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35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string" office:string-value="EE78D" table:formula="of:=DEC2HEX([.C1536])" table:style-name="ce1">
            <text:p>EE78D</text:p>
          </table:table-cell>
          <table:table-cell office:value-type="float" office:value="976781" table:style-name="ce1">
            <text:p>97678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36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string" office:string-value="EE791" table:formula="of:=DEC2HEX([.C1537])" table:style-name="ce1">
            <text:p>EE791</text:p>
          </table:table-cell>
          <table:table-cell office:value-type="float" office:value="976785" table:style-name="ce1">
            <text:p>976785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537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string" office:string-value="EE792" table:formula="of:=DEC2HEX([.C1538])" table:style-name="ce1">
            <text:p>EE792</text:p>
          </table:table-cell>
          <table:table-cell office:value-type="float" office:value="976786" table:style-name="ce1">
            <text:p>97678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38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string" office:string-value="EE796" table:formula="of:=DEC2HEX([.C1539])" table:style-name="ce1">
            <text:p>EE796</text:p>
          </table:table-cell>
          <table:table-cell office:value-type="float" office:value="976790" table:style-name="ce1">
            <text:p>97679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39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string" office:string-value="EE79A" table:formula="of:=DEC2HEX([.C1540])" table:style-name="ce1">
            <text:p>EE79A</text:p>
          </table:table-cell>
          <table:table-cell office:value-type="float" office:value="976794" table:style-name="ce1">
            <text:p>97679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IF([.D1540]&gt;100;1;0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string" office:string-value="EE79E" table:formula="of:=DEC2HEX([.C1541])" table:style-name="ce1">
            <text:p>EE79E</text:p>
          </table:table-cell>
          <table:table-cell office:value-type="float" office:value="976798" table:style-name="ce1">
            <text:p>976798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D1541]&gt;100;1;0)" table:style-name="ce1">
            <text:p>0</text:p>
          </table:table-cell>
          <table:table-cell table:number-columns-repeated="16379"/>
        </table:table-row>
        <table:table-row table:number-rows-repeated="1047035" table:style-name="ro2">
          <table:table-cell table:number-columns-repeated="16384"/>
        </table:table-row>
      </table:table>
      <table:database-ranges>
        <table:database-range table:target-range-address="Tabelle1.A1:Tabelle1.I1541" table:name="__Anonymous_Sheet_DB__1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_50_0_32__37__32_-_32_Akzent1" style:display-name="20 % - Akzent1" style:family="table-cell" style:data-style-name="N0">
      <style:table-cell-properties style:vertical-align="automatic" fo:background-color="#C0E6F5"/>
    </style:style>
    <style:style style:name="_50_0_32__37__32_-_32_Akzent2" style:display-name="20 % - Akzent2" style:family="table-cell" style:data-style-name="N0">
      <style:table-cell-properties style:vertical-align="automatic" fo:background-color="#FBE2D5"/>
    </style:style>
    <style:style style:name="_50_0_32__37__32_-_32_Akzent3" style:display-name="20 % - Akzent3" style:family="table-cell" style:data-style-name="N0">
      <style:table-cell-properties style:vertical-align="automatic" fo:background-color="#C1F0C8"/>
    </style:style>
    <style:style style:name="_50_0_32__37__32_-_32_Akzent4" style:display-name="20 % - Akzent4" style:family="table-cell" style:data-style-name="N0">
      <style:table-cell-properties style:vertical-align="automatic" fo:background-color="#CAEDFB"/>
    </style:style>
    <style:style style:name="_50_0_32__37__32_-_32_Akzent5" style:display-name="20 % - Akzent5" style:family="table-cell" style:data-style-name="N0">
      <style:table-cell-properties style:vertical-align="automatic" fo:background-color="#F2CEEF"/>
    </style:style>
    <style:style style:name="_50_0_32__37__32_-_32_Akzent6" style:display-name="20 % - Akzent6" style:family="table-cell" style:data-style-name="N0">
      <style:table-cell-properties style:vertical-align="automatic" fo:background-color="#DAF2D0"/>
    </style:style>
    <style:style style:name="_52_0_32__37__32_-_32_Akzent1" style:display-name="40 % - Akzent1" style:family="table-cell" style:data-style-name="N0">
      <style:table-cell-properties style:vertical-align="automatic" fo:background-color="#83CCEB"/>
    </style:style>
    <style:style style:name="_52_0_32__37__32_-_32_Akzent2" style:display-name="40 % - Akzent2" style:family="table-cell" style:data-style-name="N0">
      <style:table-cell-properties style:vertical-align="automatic" fo:background-color="#F7C7AC"/>
    </style:style>
    <style:style style:name="_52_0_32__37__32_-_32_Akzent3" style:display-name="40 % - Akzent3" style:family="table-cell" style:data-style-name="N0">
      <style:table-cell-properties style:vertical-align="automatic" fo:background-color="#83E28E"/>
    </style:style>
    <style:style style:name="_52_0_32__37__32_-_32_Akzent4" style:display-name="40 % - Akzent4" style:family="table-cell" style:data-style-name="N0">
      <style:table-cell-properties style:vertical-align="automatic" fo:background-color="#94DCF8"/>
    </style:style>
    <style:style style:name="_52_0_32__37__32_-_32_Akzent5" style:display-name="40 % - Akzent5" style:family="table-cell" style:data-style-name="N0">
      <style:table-cell-properties style:vertical-align="automatic" fo:background-color="#E49EDD"/>
    </style:style>
    <style:style style:name="_52_0_32__37__32_-_32_Akzent6" style:display-name="40 % - Akzent6" style:family="table-cell" style:data-style-name="N0">
      <style:table-cell-properties style:vertical-align="automatic" fo:background-color="#B5E6A2"/>
    </style:style>
    <style:style style:name="_54_0_32__37__32_-_32_Akzent1" style:display-name="60 % - Akzent1" style:family="table-cell" style:data-style-name="N0">
      <style:table-cell-properties style:vertical-align="automatic" fo:background-color="#44B3E1"/>
    </style:style>
    <style:style style:name="_54_0_32__37__32_-_32_Akzent2" style:display-name="60 % - Akzent2" style:family="table-cell" style:data-style-name="N0">
      <style:table-cell-properties style:vertical-align="automatic" fo:background-color="#F1A983"/>
    </style:style>
    <style:style style:name="_54_0_32__37__32_-_32_Akzent3" style:display-name="60 % - Akzent3" style:family="table-cell" style:data-style-name="N0">
      <style:table-cell-properties style:vertical-align="automatic" fo:background-color="#47D359"/>
    </style:style>
    <style:style style:name="_54_0_32__37__32_-_32_Akzent4" style:display-name="60 % - Akzent4" style:family="table-cell" style:data-style-name="N0">
      <style:table-cell-properties style:vertical-align="automatic" fo:background-color="#61CBF3"/>
    </style:style>
    <style:style style:name="_54_0_32__37__32_-_32_Akzent5" style:display-name="60 % - Akzent5" style:family="table-cell" style:data-style-name="N0">
      <style:table-cell-properties style:vertical-align="automatic" fo:background-color="#D86DCD"/>
    </style:style>
    <style:style style:name="_54_0_32__37__32_-_32_Akzent6" style:display-name="60 % - Akzent6" style:family="table-cell" style:data-style-name="N0">
      <style:table-cell-properties style:vertical-align="automatic" fo:background-color="#8ED973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kzent1" style:family="table-cell" style:data-style-name="N0">
      <style:table-cell-properties style:vertical-align="automatic" fo:background-color="#156082"/>
      <style:text-properties fo:color="#FFFFFF"/>
    </style:style>
    <style:style style:name="Akzent2" style:family="table-cell" style:data-style-name="N0">
      <style:table-cell-properties style:vertical-align="automatic" fo:background-color="#E97132"/>
      <style:text-properties fo:color="#FFFFFF"/>
    </style:style>
    <style:style style:name="Akzent3" style:family="table-cell" style:data-style-name="N0">
      <style:table-cell-properties style:vertical-align="automatic" fo:background-color="#196B24"/>
      <style:text-properties fo:color="#FFFFFF"/>
    </style:style>
    <style:style style:name="Akzent4" style:family="table-cell" style:data-style-name="N0">
      <style:table-cell-properties style:vertical-align="automatic" fo:background-color="#0F9ED5"/>
      <style:text-properties fo:color="#FFFFFF"/>
    </style:style>
    <style:style style:name="Akzent5" style:family="table-cell" style:data-style-name="N0">
      <style:table-cell-properties style:vertical-align="automatic" fo:background-color="#A02B93"/>
      <style:text-properties fo:color="#FFFFFF"/>
    </style:style>
    <style:style style:name="Akzent6" style:family="table-cell" style:data-style-name="N0">
      <style:table-cell-properties style:vertical-align="automatic" fo:background-color="#4EA72E"/>
      <style:text-properties fo:color="#FFFFFF"/>
    </style:style>
    <style:style style:name="Ausgabe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erechnung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Ergebnis" style:family="table-cell" style:data-style-name="N0">
      <style:table-cell-properties fo:border-top="thin solid #156082" fo:border-bottom="thin solid #156082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ut" style:family="table-cell" style:data-style-name="N0">
      <style:table-cell-properties style:vertical-align="automatic"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EB9C"/>
      <style:text-properties fo:color="#9C57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Notiz" style:family="table-cell" style:data-style-name="N0">
      <style:table-cell-properties fo:border="thin solid #B2B2B2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chlecht" style:family="table-cell" style:data-style-name="N0">
      <style:table-cell-properties style:vertical-align="automatic"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_220_berschrift" style:display-name="Überschrift" style:family="table-cell" style:data-style-name="N0">
      <style:table-cell-properties style:vertical-align="automatic" fo:background-color="transparent"/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2pt solid #156082" fo:border-left="none" fo:border-right="none" style:vertical-align="automatic" fo:background-color="transparent"/>
      <style:text-properties fo:color="#0E2841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2pt solid #64BEE6" fo:border-left="none" fo:border-right="none" style:vertical-align="automatic" fo:background-color="transparent"/>
      <style:text-properties fo:color="#0E2841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44B3E1" fo:border-left="none" fo:border-right="none" style:vertical-align="automatic" fo:background-color="transparent"/>
      <style:text-properties fo:color="#0E2841" fo:font-weight="bold" style:font-weight-asian="bold" style:font-weight-complex="bold"/>
    </style:style>
    <style:style style:name="_220_berschrift_32_4" style:display-name="Überschrift 4" style:family="table-cell" style:data-style-name="N0">
      <style:table-cell-properties style:vertical-align="automatic" fo:background-color="transparent"/>
      <style:text-properties fo:color="#0E2841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solid #FF8001" fo:border-left="none" fo:border-right="none" style:vertical-align="automatic" fo:background-color="transparent"/>
      <style:text-properties fo:color="#FA7D00"/>
    </style:style>
    <style:style style:name="Warnender_32_Text" style:display-name="Warnender Text" style:family="table-cell" style:data-style-name="N0">
      <style:table-cell-properties style:vertical-align="automatic" fo:background-color="transparent"/>
      <style:text-properties fo:color="#FF0000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Zelle_32__252_berpr_252_fen" style:display-name="Zelle überprüfen" style:family="table-cell" style:data-style-name="N0">
      <style:table-cell-properties fo:border="thin solid #3F3F3F" style:vertical-align="automatic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Crazy Cat</meta:initial-creator>
    <dc:creator>Michael W</dc:creator>
    <meta:creation-date>2026-06-06T11:57:19Z</meta:creation-date>
    <dc:date>2026-06-06T18:00:17Z</dc:date>
    <meta:editing-cycles>2</meta:editing-cycles>
    <meta:editing-duration>PT0S</meta:editing-duration>
  </office:meta>
</office:document-meta>
</file>